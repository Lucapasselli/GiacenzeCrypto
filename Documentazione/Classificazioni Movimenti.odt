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E0000034288A74A67.png" manifest:media-type="image/png"/>
  <manifest:file-entry manifest:full-path="Pictures/10000001000001C4000000B9AD8E1772.png" manifest:media-type="image/png"/>
  <manifest:file-entry manifest:full-path="Pictures/1000000100000295000000E4C1AC2374.png" manifest:media-type="image/png"/>
  <manifest:file-entry manifest:full-path="Pictures/10000001000001F2000000E2496A8752.png" manifest:media-type="image/png"/>
  <manifest:file-entry manifest:full-path="Pictures/10000001000004290000033A89740DD0.png" manifest:media-type="image/png"/>
  <manifest:file-entry manifest:full-path="Pictures/100000010000043000000337A6D466EA.png" manifest:media-type="image/png"/>
  <manifest:file-entry manifest:full-path="Pictures/10000001000004DF000000D9E9B0E3EF.png" manifest:media-type="image/png"/>
  <manifest:file-entry manifest:full-path="Pictures/100000010000024C000000E1C67EDD4E.png" manifest:media-type="image/png"/>
  <manifest:file-entry manifest:full-path="Pictures/10000001000001EC000000BD1F60DF38.png" manifest:media-type="image/png"/>
  <manifest:file-entry manifest:full-path="Pictures/100000010000042F000003424446A4A6.png" manifest:media-type="image/png"/>
  <manifest:file-entry manifest:full-path="Pictures/10000001000008D400000540E7E1A5EC.png" manifest:media-type="image/png"/>
  <manifest:file-entry manifest:full-path="Pictures/10000001000001F4000001F4529DD0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/>
    <style:font-face style:name="Microsoft YaHei" svg:font-family="'Microsoft YaHei'"/>
    <style:font-face style:name="NSimSun" svg:font-family="NSimSun"/>
    <style:font-face style:name="OpenSymbol" svg:font-family="OpenSymbol"/>
  </office:font-face-decls>
  <office:automatic-styles>
    <style:style style:name="P1" style:family="paragraph" style:parent-style-name="Standard" style:master-page-name="MasterPage2">
      <style:paragraph-properties fo:text-align="center" style:justify-single-word="false" style:page-number="auto"/>
      <style:text-properties fo:color="#000000" loext:opacity="100%" style:font-name="Liberation Serif" fo:font-size="12pt" fo:language="it" fo:country="IT" style:font-name-asian="NSimSun" style:font-name-complex="Lucida Sans" style:font-size-complex="12pt" style:language-complex="hi" style:country-complex="IN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it" fo:country="IT" fo:font-weight="normal" style:font-name-asian="NSimSun" style:font-name-complex="Lucida Sans" style:font-size-complex="12pt" style:language-complex="hi" style:country-complex="IN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it" fo:country="IT" style:font-name-asian="NSimSun" style:font-name-complex="Lucida Sans" style:font-size-complex="12pt" style:language-complex="hi" style:country-complex="IN"/>
    </style:style>
    <style:style style:name="P4" style:family="paragraph" style:parent-style-name="Contents_20_Heading">
      <style:text-properties fo:color="#000000" loext:opacity="100%" style:font-name="Liberation Sans" fo:font-size="16pt" fo:language="it" fo:country="IT" fo:font-weight="bold" style:font-name-asian="Microsoft YaHei" style:font-name-complex="Lucida Sans" style:font-size-complex="16pt" style:language-complex="hi" style:country-complex="IN"/>
    </style:style>
    <style:style style:name="P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  <style:text-properties fo:color="#000000" loext:opacity="100%" style:font-name="Liberation Serif" fo:font-size="12pt" fo:language="it" fo:country="IT" fo:font-weight="bold" style:font-name-asian="NSimSun" style:font-name-complex="Lucida Sans" style:font-size-complex="12pt" style:language-complex="hi" style:country-complex="IN"/>
    </style:style>
    <style:style style:name="P6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  <style:text-properties fo:color="#000000" loext:opacity="100%" style:font-name="Liberation Serif" fo:font-size="12pt" fo:language="it" fo:country="IT" style:font-name-asian="NSimSun" style:font-name-complex="Lucida Sans" style:font-size-complex="12pt" style:language-complex="hi" style:country-complex="IN"/>
    </style:style>
    <style:style style:name="P7" style:family="paragraph" style:parent-style-name="Standard">
      <style:text-properties fo:color="#000000" loext:opacity="100%" style:font-name="Liberation Serif" fo:font-size="12pt" fo:language="it" fo:country="IT" fo:font-weight="bold" style:font-name-asian="NSimSun" style:font-name-complex="Lucida Sans" style:font-size-complex="12pt" style:language-complex="hi" style:country-complex="IN"/>
    </style:style>
    <style:style style:name="P8" style:family="paragraph" style:parent-style-name="Standard">
      <style:text-properties fo:color="#000000" loext:opacity="100%" style:font-name="Liberation Serif" fo:font-size="12pt" fo:language="it" fo:country="IT" style:font-name-asian="NSimSun" style:font-name-complex="Lucida Sans" style:font-size-complex="12pt" style:language-complex="hi" style:country-complex="IN"/>
    </style:style>
    <style:style style:name="P9" style:family="paragraph" style:parent-style-name="Heading_20_1" style:master-page-name="MasterPage3">
      <style:paragraph-properties style:page-number="auto" fo:break-before="page"/>
      <style:text-properties fo:color="#000000" loext:opacity="100%" style:font-name="Liberation Sans" fo:font-size="18pt" fo:language="it" fo:country="IT" fo:font-weight="bold" style:font-name-asian="Microsoft YaHei" style:font-name-complex="Lucida Sans" style:font-size-complex="18pt" style:language-complex="hi" style:country-complex="IN"/>
    </style:style>
    <style:style style:name="P10" style:family="paragraph" style:parent-style-name="Standard">
      <style:text-properties fo:color="#000000" loext:opacity="100%" style:font-name="Liberation Serif" fo:font-size="12pt" fo:language="it" fo:country="IT" style:text-underline-style="none" style:font-name-asian="NSimSun" style:font-name-complex="Lucida Sans" style:font-size-complex="12pt" style:language-complex="hi" style:country-complex="IN"/>
    </style:style>
    <style:style style:name="P11" style:family="paragraph" style:parent-style-name="Standard">
      <style:text-properties fo:color="#000000" loext:opacity="100%" style:font-name="Liberation Serif" fo:font-size="12pt" fo:language="it" fo:country="IT" fo:font-style="italic" style:font-name-asian="NSimSun" style:font-name-complex="Lucida Sans" style:font-size-complex="12pt" style:language-complex="hi" style:country-complex="IN"/>
    </style:style>
    <style:style style:name="P12" style:family="paragraph" style:parent-style-name="Heading_20_1" style:master-page-name="MasterPage4">
      <style:paragraph-properties style:page-number="auto" fo:break-before="page"/>
    </style:style>
    <style:style style:name="P13" style:family="paragraph" style:parent-style-name="Standard">
      <style:text-properties fo:color="#000000" loext:opacity="100%" style:font-name="Liberation Serif" fo:font-size="12pt" fo:language="it" fo:country="IT" fo:font-weight="normal" style:font-name-asian="NSimSun" style:font-name-complex="Lucida Sans" style:font-size-complex="12pt" style:language-complex="hi" style:country-complex="IN"/>
    </style:style>
    <style:style style:name="P14" style:family="paragraph" style:parent-style-name="Heading_20_1" style:master-page-name="MasterPage5">
      <style:paragraph-properties style:page-number="auto" fo:break-before="page"/>
    </style:style>
    <style:style style:name="P15" style:family="paragraph" style:parent-style-name="Heading_20_2" style:list-style-name="L1">
      <style:text-properties fo:color="#000000" loext:opacity="100%" style:font-name="Liberation Sans" fo:font-size="16pt" fo:language="it" fo:country="IT" fo:font-weight="bold" style:font-name-asian="Microsoft YaHei" style:font-name-complex="Lucida Sans" style:font-size-complex="16pt" style:language-complex="hi" style:country-complex="IN"/>
    </style:style>
    <style:style style:name="P16" style:family="paragraph" style:parent-style-name="Heading_20_2" style:master-page-name="MasterPage6">
      <style:paragraph-properties style:page-number="auto" fo:break-before="page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it" fo:country="IT" style:font-name-asian="NSimSun" style:font-name-complex="Lucida Sans" style:font-size-complex="12pt" style:language-complex="hi" style:country-complex="IN"/>
    </style:style>
    <style:style style:name="P18" style:family="paragraph" style:parent-style-name="Heading_20_2" style:master-page-name="MasterPage7">
      <style:paragraph-properties style:page-number="auto" fo:break-before="page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it" fo:country="IT" fo:font-weight="bold" style:font-name-asian="NSimSun" style:font-name-complex="Lucida Sans" style:font-size-complex="12pt" style:language-complex="hi" style:country-complex="IN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6pt" fo:language="it" fo:country="IT" fo:font-weight="bold" style:font-name-asian="Microsoft YaHei" style:font-name-complex="Lucida Sans" style:font-size-complex="16pt" style:language-complex="hi" style:country-complex="IN"/>
    </style:style>
    <style:style style:name="P21" style:family="paragraph" style:parent-style-name="Heading_20_2" style:master-page-name="MasterPage8">
      <style:paragraph-properties style:page-number="auto" fo:break-before="page"/>
      <style:text-properties fo:color="#000000" loext:opacity="100%" style:font-name="Liberation Sans" fo:font-size="16pt" fo:language="it" fo:country="IT" fo:font-weight="bold" style:font-name-asian="Microsoft YaHei" style:font-name-complex="Lucida Sans" style:font-size-complex="16pt" style:language-complex="hi" style:country-complex="IN"/>
    </style:style>
    <style:style style:name="P22" style:family="paragraph" style:parent-style-name="Heading_20_2" style:master-page-name="MasterPage9">
      <style:paragraph-properties style:page-number="auto" fo:break-before="page"/>
    </style:style>
    <style:style style:name="P23" style:family="paragraph" style:parent-style-name="Heading_20_2" style:list-style-name="L2">
      <style:text-properties fo:color="#000000" loext:opacity="100%" style:font-name="Liberation Sans" fo:font-size="16pt" fo:language="it" fo:country="IT" fo:font-weight="bold" style:font-name-asian="Microsoft YaHei" style:font-name-complex="Lucida Sans" style:font-size-complex="16pt" style:language-complex="hi" style:country-complex="IN"/>
    </style:style>
    <style:style style:name="P24" style:family="paragraph" style:parent-style-name="Heading_20_2" style:list-style-name="L3">
      <style:text-properties fo:color="#000000" loext:opacity="100%" style:font-name="Liberation Sans" fo:font-size="16pt" fo:language="it" fo:country="IT" fo:font-weight="bold" style:font-name-asian="Microsoft YaHei" style:font-name-complex="Lucida Sans" style:font-size-complex="16pt" style:language-complex="hi" style:country-complex="IN"/>
    </style:style>
    <style:style style:name="P25" style:family="paragraph" style:parent-style-name="Heading_20_2" style:list-style-name="L4">
      <style:text-properties fo:color="#000000" loext:opacity="100%" style:font-name="Liberation Sans" fo:font-size="16pt" fo:language="it" fo:country="IT" fo:font-weight="bold" style:font-name-asian="Microsoft YaHei" style:font-name-complex="Lucida Sans" style:font-size-complex="16pt" style:language-complex="hi" style:country-complex="IN"/>
    </style:style>
    <style:style style:name="P26" style:family="paragraph" style:parent-style-name="Heading_20_1" style:master-page-name="MasterPage10">
      <style:paragraph-properties style:page-number="auto" fo:break-before="page"/>
    </style:style>
    <style:style style:name="P27" style:family="paragraph" style:parent-style-name="Heading_20_2" style:list-style-name="L5">
      <style:text-properties fo:color="#000000" loext:opacity="100%" style:font-name="Liberation Sans" fo:font-size="16pt" fo:language="it" fo:country="IT" fo:font-weight="bold" style:font-name-asian="Microsoft YaHei" style:font-name-complex="Lucida Sans" style:font-size-complex="16pt" style:language-complex="hi" style:country-complex="IN"/>
    </style:style>
    <style:style style:name="P28" style:family="paragraph" style:parent-style-name="Heading_20_2" style:master-page-name="MasterPage11">
      <style:paragraph-properties style:page-number="auto" fo:break-before="page"/>
      <style:text-properties fo:color="#000000" loext:opacity="100%" style:font-name="Liberation Sans" fo:font-size="16pt" fo:language="it" fo:country="IT" fo:font-weight="bold" style:font-name-asian="Microsoft YaHei" style:font-name-complex="Lucida Sans" style:font-size-complex="16pt" style:language-complex="hi" style:country-complex="IN"/>
    </style:style>
    <style:style style:name="P29" style:family="paragraph" style:parent-style-name="Text_20_body">
      <style:text-properties fo:color="#000000" loext:opacity="100%" style:font-name="Liberation Serif" fo:font-size="12pt" fo:language="it" fo:country="IT" style:font-name-asian="NSimSun" style:font-name-complex="Lucida Sans" style:font-size-complex="12pt" style:language-complex="hi" style:country-complex="IN"/>
    </style:style>
    <style:style style:name="P30" style:family="paragraph" style:parent-style-name="Heading_20_2" style:master-page-name="MasterPage12">
      <style:paragraph-properties style:page-number="auto" fo:break-before="page"/>
      <style:text-properties fo:color="#000000" loext:opacity="100%" style:font-name="Liberation Sans" fo:font-size="16pt" fo:language="it" fo:country="IT" fo:font-weight="bold" style:font-name-asian="Microsoft YaHei" style:font-name-complex="Lucida Sans" style:font-size-complex="16pt" style:language-complex="hi" style:country-complex="IN"/>
    </style:style>
    <style:style style:name="P31" style:family="paragraph" style:parent-style-name="Text_20_body">
      <style:text-properties fo:color="#000000" loext:opacity="100%" style:font-name="Liberation Serif" fo:font-size="12pt" fo:language="it" fo:country="IT" fo:font-weight="normal" style:font-name-asian="NSimSun" style:font-name-complex="Lucida Sans" style:font-size-complex="12pt" style:language-complex="hi" style:country-complex="IN"/>
    </style:style>
    <style:style style:name="P32" style:family="paragraph" style:parent-style-name="Heading_20_2" style:list-style-name="L6">
      <style:text-properties fo:color="#000000" loext:opacity="100%" style:font-name="Liberation Sans" fo:font-size="16pt" fo:language="it" fo:country="IT" fo:font-weight="bold" style:font-name-asian="Microsoft YaHei" style:font-name-complex="Lucida Sans" style:font-size-complex="16pt" style:language-complex="hi" style:country-complex="IN"/>
    </style:style>
    <style:style style:name="P33" style:family="paragraph" style:parent-style-name="Heading_20_2" style:list-style-name="L7">
      <style:text-properties fo:color="#000000" loext:opacity="100%" style:font-name="Liberation Sans" fo:font-size="16pt" fo:language="it" fo:country="IT" fo:font-weight="bold" style:font-name-asian="Microsoft YaHei" style:font-name-complex="Lucida Sans" style:font-size-complex="16pt" style:language-complex="hi" style:country-complex="IN"/>
    </style:style>
    <style:style style:name="P34" style:family="paragraph" style:parent-style-name="Heading_20_2" style:list-style-name="L8">
      <style:text-properties fo:color="#000000" loext:opacity="100%" style:font-name="Liberation Sans" fo:font-size="16pt" fo:language="it" fo:country="IT" fo:font-weight="bold" style:font-name-asian="Microsoft YaHei" style:font-name-complex="Lucida Sans" style:font-size-complex="16pt" style:language-complex="hi" style:country-complex="IN"/>
    </style:style>
    <style:style style:name="P35" style:family="paragraph" style:parent-style-name="Heading_20_2" style:list-style-name="L9">
      <style:text-properties fo:color="#000000" loext:opacity="100%" style:font-name="Liberation Sans" fo:font-size="16pt" fo:language="it" fo:country="IT" style:font-name-asian="Microsoft YaHei" style:font-name-complex="Lucida Sans" style:font-size-complex="16pt" style:language-complex="hi" style:country-complex="IN"/>
    </style:style>
    <style:style style:name="P36" style:family="paragraph" style:parent-style-name="Heading_20_2" style:list-style-name="L10">
      <style:text-properties fo:color="#000000" loext:opacity="100%" style:font-name="Liberation Sans" fo:font-size="16pt" fo:language="it" fo:country="IT" fo:font-weight="bold" style:font-name-asian="Microsoft YaHei" style:font-name-complex="Lucida Sans" style:font-size-complex="16pt" style:language-complex="hi" style:country-complex="IN"/>
    </style:style>
    <style:style style:name="T10" style:family="text">
      <style:text-properties fo:font-family="'Eras Bold ITC'" fo:font-size="15pt" fo:font-weight="normal" style:font-size-complex="15pt"/>
    </style:style>
    <style:style style:name="T11" style:family="text">
      <style:text-properties fo:font-family="'Eras Bold ITC'" fo:font-size="20pt" fo:font-weight="bold" style:font-size-complex="20pt"/>
    </style:style>
    <style:style style:name="T12" style:family="text">
      <style:text-properties fo:font-family="'Eras Bold ITC'" fo:font-size="15pt" fo:font-weight="bold" style:font-size-complex="15pt"/>
    </style:style>
    <style:style style:name="T13" style:family="text">
      <style:text-properties fo:font-family="'Eras Bold ITC'" fo:font-size="10pt" style:font-size-complex="10pt"/>
    </style:style>
    <style:style style:name="T14" style:family="text">
      <style:text-properties fo:font-family="'Eras Bold ITC'" fo:font-size="10pt" fo:language="it" fo:country="IT" fo:font-weight="normal" style:font-size-complex="10pt"/>
    </style:style>
    <style:style style:name="T15" style:family="text">
      <style:text-properties fo:font-family="'Eras Bold ITC'" fo:font-size="15pt" fo:language="it" fo:country="IT" style:font-size-complex="15pt"/>
    </style:style>
    <style:style style:name="T16" style:family="text">
      <style:text-properties fo:font-size="18pt" fo:language="it" fo:country="IT" fo:font-weight="bold" style:font-size-complex="18pt"/>
    </style:style>
    <style:style style:name="T17" style:family="text">
      <style:text-properties fo:language="it" fo:country="IT"/>
    </style:style>
    <style:style style:name="T18" style:family="text">
      <style:text-properties style:text-underline-style="solid" style:text-underline-width="auto" style:text-underline-color="font-color" fo:font-weight="bold"/>
    </style:style>
    <style:style style:name="T19" style:family="text">
      <style:text-properties style:text-underline-style="none"/>
    </style:style>
    <style:style style:name="T20" style:family="text">
      <style:text-properties fo:language="it" fo:country="IT" style:text-underline-style="none"/>
    </style:style>
    <style:style style:name="T21" style:family="text">
      <style:text-properties style:text-underline-style="none" fo:font-weight="bold"/>
    </style:style>
    <style:style style:name="T22" style:family="text">
      <style:text-properties fo:font-size="10pt" style:font-size-complex="10pt"/>
    </style:style>
    <style:style style:name="T23" style:family="text">
      <style:text-properties style:font-name="Liberation Serif" fo:font-size="10pt" fo:font-style="italic" style:font-size-complex="10pt"/>
    </style:style>
    <style:style style:name="T24" style:family="text">
      <style:text-properties fo:color="#000000" loext:opacity="100%" style:font-name="Liberation Serif" fo:font-size="18pt" fo:language="it" fo:country="IT" fo:font-weight="bold" style:font-name-asian="Microsoft YaHei" style:font-name-complex="Lucida Sans" style:font-size-complex="18pt" style:language-complex="hi" style:country-complex="IN"/>
    </style:style>
    <style:style style:name="T25" style:family="text">
      <style:text-properties fo:font-weight="bold"/>
    </style:style>
    <style:style style:name="T26" style:family="text">
      <style:text-properties fo:font-weight="normal"/>
    </style:style>
    <style:style style:name="T27" style:family="text">
      <style:text-properties fo:language="it" fo:country="IT" fo:font-weight="normal"/>
    </style:style>
    <style:style style:name="T28" style:family="text">
      <style:text-properties fo:font-size="10.5pt" style:font-size-complex="10.5pt"/>
    </style:style>
    <style:style style:name="T29" style:family="text">
      <style:text-properties fo:font-size="10.5pt" fo:language="it" fo:country="IT" style:font-size-complex="10.5pt"/>
    </style:style>
    <style:style style:name="T30" style:family="text">
      <style:text-properties fo:font-size="10.5pt" fo:font-weight="bold" style:font-size-complex="10.5pt"/>
    </style:style>
    <style:style style:name="T31" style:family="text">
      <style:text-properties fo:color="#000000" loext:opacity="100%" style:font-name="Liberation Sans" fo:font-size="18pt" fo:language="it" fo:country="IT" fo:font-weight="bold" style:font-name-asian="Microsoft YaHei" style:font-name-complex="Lucida Sans" style:font-size-complex="18pt" style:language-complex="hi" style:country-complex="IN"/>
    </style:style>
    <style:style style:name="T32" style:family="text">
      <style:text-properties fo:color="#000000" loext:opacity="100%" style:font-name="Liberation Sans" fo:font-size="16pt" fo:language="it" fo:country="IT" fo:font-weight="bold" style:font-name-asian="Microsoft YaHei" style:font-name-complex="Lucida Sans" style:font-size-complex="16pt" style:language-complex="hi" style:country-complex="IN"/>
    </style:style>
    <style:style style:name="T33" style:family="text">
      <style:text-properties fo:color="#000000" loext:opacity="100%" style:font-name="Liberation Sans" fo:font-size="14pt" fo:language="it" fo:country="IT" fo:font-weight="normal" style:font-name-asian="Microsoft YaHei" style:font-name-complex="Lucida Sans" style:font-size-complex="14pt" style:language-complex="hi" style:country-complex="IN"/>
    </style:style>
    <style:style style:name="T34" style:family="text">
      <style:text-properties fo:language="it" fo:country="IT" fo:font-weight="bold"/>
    </style:style>
    <style:style style:name="T35" style:family="text">
      <style:text-properties fo:color="#000000" loext:opacity="100%" style:font-name="Liberation Sans" fo:font-size="16pt" fo:language="it" fo:country="IT" fo:font-weight="normal" style:font-name-asian="Microsoft YaHei" style:font-name-complex="Lucida Sans" style:font-size-complex="16pt" style:language-complex="hi" style:country-complex="IN"/>
    </style:style>
    <style:style style:name="T36" style:family="text">
      <style:text-properties fo:font-size="14pt" fo:language="it" fo:country="IT" fo:font-weight="bold" style:font-size-complex="14pt"/>
    </style:style>
    <style:style style:name="T37" style:family="text">
      <style:text-properties fo:font-size="14pt" fo:font-weight="normal" style:font-size-complex="14pt"/>
    </style:style>
    <style:style style:name="T38" style:family="text">
      <style:text-properties fo:font-size="12pt" fo:language="it" fo:country="IT" fo:font-weight="normal" style:font-size-complex="12pt"/>
    </style:style>
    <style:style style:name="T39" style:family="text">
      <style:text-properties fo:font-size="14pt" fo:language="it" fo:country="IT" fo:font-weight="normal" style:font-size-complex="14pt"/>
    </style:style>
    <style:style style:name="T40" style:family="text">
      <style:text-properties fo:font-size="14pt" style:font-size-complex="14pt"/>
    </style:style>
    <style:style style:name="T41" style:family="text">
      <style:text-properties fo:font-size="12pt" fo:language="it" fo:country="IT" fo:font-weight="bold" style:font-size-complex="12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top" style:vertical-rel="baseline" style:horizontal-pos="center" style:horizontal-rel="char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9" text:anchor-type="as-char" svg:width="3.45cm" svg:height="3.45cm" draw:z-index="13"><draw:image xlink:href="Pictures/10000001000001F4000001F4529DD086.png" xlink:type="simple" xlink:show="embed" xlink:actuate="onLoad" draw:mime-type="image/png"/></draw:frame><text:span text:style-name="T10"><text:tab/></text:span><text:span text:style-name="T11">Classificazione Depositi/Prelievi</text:span><text:span text:style-name="T12"> <text:s text:c="4"/></text:span></text:p>
      <text:p text:style-name="P2"><text:span text:style-name="T13"><text:s text:c="10"/>GIACENZE CRYPTO</text:span><text:span text:style-name="T14"/></text:p>
      <text:p text:style-name="P3"><text:span text:style-name="T15"/></text:p>
      <text:p text:style-name="P4">Indice</text:p>
      <text:p text:style-name="Standard"/>
      <text:table-of-content text:style-name="Sect1" text:name="Indice generale1">
        <text:table-of-content-source text:outline-level="10" text:use-index-source-styles="true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3187_1777463037" text:style-name="Internet_20_link" text:visited-style-name="Visited_20_Internet_20_Link"><text:span text:style-name="Index_20_Link">Introduzione<text:tab/>2</text:span></text:a></text:p>
          <text:p text:style-name="P5"><text:a xlink:type="simple" xlink:href="#__RefHeading___Toc3183_1777463037" text:style-name="Internet_20_link" text:visited-style-name="Visited_20_Internet_20_Link"><text:span text:style-name="Index_20_Link">Panoramica delle opzioni<text:tab/>3</text:span></text:a></text:p>
          <text:p text:style-name="P5"><text:a xlink:type="simple" xlink:href="#__RefHeading___Toc3185_1777463037" text:style-name="Internet_20_link" text:visited-style-name="Visited_20_Internet_20_Link"><text:span text:style-name="Index_20_Link">Classificazione manuale dei movimenti di DEPOSITO<text:tab/>4</text:span></text:a></text:p>
          <text:p text:style-name="P6"><text:a xlink:type="simple" xlink:href="#__RefHeading___Toc6703_1238474401" text:style-name="Internet_20_link" text:visited-style-name="Visited_20_Internet_20_Link"><text:span text:style-name="Index_20_Link">Opzione 1 – AIRDROP,CASHBACK EARN etc…<text:tab/>4</text:span></text:a></text:p>
          <text:p text:style-name="P6"><text:a xlink:type="simple" xlink:href="#__RefHeading___Toc6705_1238474401" text:style-name="Internet_20_link" text:visited-style-name="Visited_20_Internet_20_Link"><text:span text:style-name="Index_20_Link">Opzione 2 – DEPOSITO CON COSTO DI CARICO A ZERO<text:tab/>5</text:span></text:a></text:p>
          <text:p text:style-name="P6"><text:a xlink:type="simple" xlink:href="#__RefHeading___Toc6707_1238474401" text:style-name="Internet_20_link" text:visited-style-name="Visited_20_Internet_20_Link"><text:span text:style-name="Index_20_Link">Opzione 3 – TRASFERIMENTO TRA WALLET DI PROPRIETA’<text:tab/>6</text:span></text:a></text:p>
          <text:p text:style-name="P6"><text:a xlink:type="simple" xlink:href="#__RefHeading___Toc6709_1238474401" text:style-name="Internet_20_link" text:visited-style-name="Visited_20_Internet_20_Link"><text:span text:style-name="Index_20_Link">Opzione 4 – ACQUISTO CRYPTO o DONAZIONE<text:tab/>7</text:span></text:a></text:p>
          <text:p text:style-name="P6"><text:a xlink:type="simple" xlink:href="#__RefHeading___Toc6711_1238474401" text:style-name="Internet_20_link" text:visited-style-name="Visited_20_Internet_20_Link"><text:span text:style-name="Index_20_Link">Opzione 5 – SCAMBIO CRYPTO DIFFERITO<text:tab/>8</text:span></text:a></text:p>
          <text:p text:style-name="P6"><text:a xlink:type="simple" xlink:href="#__RefHeading___Toc6713_1238474401" text:style-name="Internet_20_link" text:visited-style-name="Visited_20_Internet_20_Link"><text:span text:style-name="Index_20_Link">Opzione 6 – TRASFERIMENTO DA VAULT/PIATTAFORMA A RENDITA<text:tab/>8</text:span></text:a></text:p>
          <text:p text:style-name="P6"><text:a xlink:type="simple" xlink:href="#__RefHeading___Toc6714_1238474401" text:style-name="Internet_20_link" text:visited-style-name="Visited_20_Internet_20_Link"><text:span text:style-name="Index_20_Link">Opzione 7 – PRESTITO - RICEZIONE FONDI<text:tab/>8</text:span></text:a></text:p>
          <text:p text:style-name="P6"><text:a xlink:type="simple" xlink:href="#__RefHeading___Toc6715_1238474401" text:style-name="Internet_20_link" text:visited-style-name="Visited_20_Internet_20_Link"><text:span text:style-name="Index_20_Link">Opzione 8 – PRESTITO - SBLOCCO COLLATERALE (Chiusura del prestito)<text:tab/>9</text:span></text:a></text:p>
          <text:p text:style-name="P5"><text:a xlink:type="simple" xlink:href="#__RefHeading___Toc3189_1777463037" text:style-name="Internet_20_link" text:visited-style-name="Visited_20_Internet_20_Link"><text:span text:style-name="Index_20_Link">Classificazione manuale dei movimenti di PRELIEVO<text:tab/>10</text:span></text:a></text:p>
          <text:p text:style-name="P6"><text:a xlink:type="simple" xlink:href="#__RefHeading___Toc6703_1238474401%20Copy%202" text:style-name="Internet_20_link" text:visited-style-name="Visited_20_Internet_20_Link"><text:span text:style-name="Index_20_Link">Opzione 1 – CASHOUT o SIMILARE<text:tab/>11</text:span></text:a></text:p>
          <text:p text:style-name="P6"><text:a xlink:type="simple" xlink:href="#__RefHeading___Toc6703_1238474401%20Copy%203" text:style-name="Internet_20_link" text:visited-style-name="Visited_20_Internet_20_Link"><text:span text:style-name="Index_20_Link">Opzione 2 – DONAZIONE, FURTO, BURN di Cripto-Attività<text:tab/>12</text:span></text:a></text:p>
          <text:p text:style-name="P6"><text:a xlink:type="simple" xlink:href="#__RefHeading___Toc6703_1238474401%20Copy%204" text:style-name="Internet_20_link" text:visited-style-name="Visited_20_Internet_20_Link"><text:span text:style-name="Index_20_Link">Opzione 3 – TRASFERIMENTO TRA WALLET DI PROPRIETA’<text:tab/>12</text:span></text:a></text:p>
          <text:p text:style-name="P6"><text:a xlink:type="simple" xlink:href="#__RefHeading___Toc6703_1238474401%20Copy%204%20Copy%201" text:style-name="Internet_20_link" text:visited-style-name="Visited_20_Internet_20_Link"><text:span text:style-name="Index_20_Link">Opzione 4 – SCAMBIO CRYPTO DIFFERITO<text:tab/>12</text:span></text:a></text:p>
          <text:p text:style-name="P6"><text:a xlink:type="simple" xlink:href="#__RefHeading___Toc6703_1238474401%20Copy%204%20Copy%202" text:style-name="Internet_20_link" text:visited-style-name="Visited_20_Internet_20_Link"><text:span text:style-name="Index_20_Link">Opzione 5 – TRASFERIMENTO A VAULT/PIATTAFORMA A RENDITA<text:tab/>12</text:span></text:a></text:p>
          <text:p text:style-name="P6"><text:a xlink:type="simple" xlink:href="#__RefHeading___Toc6703_1238474401%20Copy%204%20Copy%203" text:style-name="Internet_20_link" text:visited-style-name="Visited_20_Internet_20_Link"><text:span text:style-name="Index_20_Link">Opzione 6 – PRESTITO - LIQUIDAZIONE FORZATA<text:tab/>12</text:span></text:a></text:p>
          <text:p text:style-name="P6"><text:a xlink:type="simple" xlink:href="#__RefHeading___Toc6703_1238474401%20Copy%204%20Copy%204" text:style-name="Internet_20_link" text:visited-style-name="Visited_20_Internet_20_Link"><text:span text:style-name="Index_20_Link">Opzione 7 – PRESTITO - MESSA A COLLATERALE<text:tab/>13</text:span></text:a></text:p>
          <text:p text:style-name="Standard"/>
        </text:index-body>
      </text:table-of-content>
      <text:p text:style-name="P7"><text:span text:style-name="T16"/></text:p>
      <text:p text:style-name="P7"><text:span text:style-name="T16"/></text:p>
      <text:p text:style-name="P7"><text:span text:style-name="T16"/></text:p>
      <text:p text:style-name="P8"/>
      <text:h text:style-name="P9" text:outline-level="2"><text:bookmark-start text:name="__RefHeading___Toc3187_1777463037"/>Introduzione<text:bookmark-end text:name="__RefHeading___Toc3187_1777463037"/></text:h>
      <text:p text:style-name="P8"><text:span text:style-name="T17"/></text:p>
      <text:p text:style-name="P8">Affinché il calcolo delle plusvalenze avvenga in maniera corretta è <text:span text:style-name="T18">necessario</text:span><text:span text:style-name="T19"> che ogni movimento di deposito e prelievo venga classificato in maniera corretta.</text:span></text:p>
      <text:p text:style-name="P8"><text:span text:style-name="T17"/></text:p>
      <text:p text:style-name="P10">I movimenti di deposito o prelievo possono infatti portare o meno alla generazione di plus/minusvalenze a seconda della loro tipologia.<text:span text:style-name="T20"/></text:p>
      <text:p text:style-name="P8"><text:span text:style-name="T17"/></text:p>
      <text:p text:style-name="P10">Esempio : <text:span text:style-name="T20"/></text:p>
      <text:p text:style-name="P10">Un movimento di prelievo potrebbe derivare da un trasferimento su un altro vostro Wallet piuttosto che essere un cashout.<text:span text:style-name="T20"/></text:p>
      <text:p text:style-name="P10">Nel primo caso non vi è nessuna plusvalenza, nel secondo caso invece la plusvalenza viene calcolata.<text:span text:style-name="T20"/></text:p>
      <text:p text:style-name="P8"><text:span text:style-name="T17"/></text:p>
      <text:p text:style-name="P8"><text:span text:style-name="T17"/></text:p>
      <text:p text:style-name="P8"><text:span text:style-name="T21">NB</text:span><text:span text:style-name="T19">: Dalla versione 1.29 del programma tutti i </text:span><text:span text:style-name="T21">movimenti non classificati</text:span><text:span text:style-name="T19"> manualmente vengono conteggiati nel seguente modo:</text:span></text:p>
      <text:p text:style-name="P8"><text:span text:style-name="T17"/></text:p>
      <text:p text:style-name="P8"><text:span text:style-name="T19">- </text:span><text:span text:style-name="T21">Movimenti di Prelievo</text:span><text:span text:style-name="T19"> : Vengono considerati alla stregua di un </text:span><text:span text:style-name="T21">cashout</text:span><text:span text:style-name="T19">.</text:span></text:p>
      <text:p text:style-name="P8"><text:span text:style-name="T19">- </text:span><text:span text:style-name="T21">Movimenti di Deposito</text:span><text:span text:style-name="T19"> : Vengono considerati come movimenti a </text:span><text:span text:style-name="T21">costo di carico Zero</text:span><text:span text:style-name="T19">.</text:span></text:p>
      <text:p text:style-name="P8"><text:span text:style-name="T17"/></text:p>
      <text:p text:style-name="P8">Prima della versione 1.29 tutti i movimenti non classificati non venivano invece in alcun modo presi in considerazione nei calcoli sulle plusvalenze.<text:span text:style-name="T17"/></text:p>
      <text:p text:style-name="P8"><text:span text:style-name="T17"/></text:p>
      <text:p text:style-name="P8">Nelle pagine successive si andranno ad analizzare tutte le possibilità che da il programma per la classificazione dei movimenti.<text:span text:style-name="T17"/></text:p>
      <text:p text:style-name="P8"><text:span text:style-name="T17"/></text:p>
      <text:p text:style-name="P8"><text:span text:style-name="T17"/></text:p>
      <text:p text:style-name="P11"><text:span text:style-name="T22"><text:s/></text:span><text:span text:style-name="T23"/></text:p>
      <text:h text:style-name="P12" text:outline-level="2"><text:bookmark-start text:name="__RefHeading___Toc3183_1777463037"/><text:span text:style-name="T24">Panoramica delle opzioni</text:span><text:bookmark-end text:name="__RefHeading___Toc3183_1777463037"/></text:h>
      <text:p text:style-name="P8">La classificazione dei depositi/prelievi si trova nella sezione <text:span text:style-name="T25">Analisi Crypto</text:span> – <text:span text:style-name="T25">Classificazione Depositi/Prelievi</text:span><text:span text:style-name="T26">.</text:span></text:p>
      <text:p text:style-name="P8"><text:span text:style-name="T17"/></text:p>
      <text:p text:style-name="P13">Una volta entrati nella funzione ci si ritroverà davanti ad una schermata tipo questa :<text:span text:style-name="T27"/></text:p>
      <text:p text:style-name="P8"><text:span text:style-name="T17"/></text:p>
      <text:p text:style-name="P8"><draw:frame draw:style-name="fr2" draw:name="Image1" text:anchor-type="as-char" svg:width="17.59cm" svg:height="10.46cm" draw:z-index="24"><draw:image xlink:href="Pictures/10000001000008D400000540E7E1A5EC.png" xlink:type="simple" xlink:show="embed" xlink:actuate="onLoad" draw:mime-type="image/png"/></draw:frame></text:p>
      <text:p text:style-name="P8"><text:span text:style-name="T28">In tabella verranno mostrati tutti i movimenti di deposito/prelievo ancora da classificare (nel caso si voglia vederli tutti biffare l’opzione in basso “Mostra movimenti già classificati”.</text:span><text:span text:style-name="T29"/></text:p>
      <text:p text:style-name="P8"><text:span text:style-name="T29"/></text:p>
      <text:p text:style-name="P8"><text:span text:style-name="T28">Nella parte bassa invece ci sono i seguenti tasti funzione : </text:span><text:span text:style-name="T29"/></text:p>
      <text:p text:style-name="P8"><text:span text:style-name="T29"/></text:p>
      <text:p text:style-name="P8"><text:span text:style-name="T30">Vedi Documentazione</text:span><text:span text:style-name="T28"> : <text:tab/><text:tab/>Se premuto rimanderà a questa documentazione</text:span></text:p>
      <text:p text:style-name="P8"><text:span text:style-name="T29"/></text:p>
      <text:p text:style-name="P8"><text:span text:style-name="T30">Assegnazione Automatica</text:span><text:span text:style-name="T28"> : <text:tab/>Il programma cercherà in autonomia di trovare e associare gli scambi relativi a <text:tab/><text:tab/><text:tab/><text:tab/><text:tab/>wallet di proprietà, assicurarsi di aver prima censito tutti i wallet.</text:span></text:p>
      <text:p text:style-name="P8"><text:span text:style-name="T29"/></text:p>
      <text:p text:style-name="P8"><text:span text:style-name="T30">Crea Movimento Opposto su altro wallet</text:span><text:span text:style-name="T28"> : Utile nel caso in cui si vogliano inserire i movimenti manualmente.</text:span></text:p>
      <text:p text:style-name="P8"><text:span text:style-name="T29"/></text:p>
      <text:p text:style-name="P8"><text:span text:style-name="T30">Dettaglio DeFi</text:span><text:span text:style-name="T28"> : <text:tab/>In caso di transazione in DeFi aprirà l’explorer corrispondente per analizzare la transazione <text:tab/><text:tab/><text:tab/><text:tab/>più nel dettaglio (Funziona solo per le blockchain supportate)</text:span></text:p>
      <text:p text:style-name="P8"><text:span text:style-name="T29"/></text:p>
      <text:p text:style-name="P8"><text:span text:style-name="T30">Classifica Movimento</text:span><text:span text:style-name="T28"> : <text:tab/>Serve appunto per la Classificazione manuale del movimento di Deposit/Prelievo seleionato.</text:span></text:p>
      <text:p text:style-name="P8"><text:span text:style-name="T29"/></text:p>
      <text:h text:style-name="P14" text:outline-level="2"><text:bookmark-start text:name="__RefHeading___Toc3185_1777463037"/><text:span text:style-name="T31">Classificazione manuale dei movimenti di DEPOSITO</text:span><text:bookmark-end text:name="__RefHeading___Toc3185_1777463037"/></text:h>
      <text:p text:style-name="P8">Nel momento in cui si seleziona un movimento di deposito le opzioni sono quelle visualizzate di seguito: <text:span text:style-name="T17"/></text:p>
      <text:p text:style-name="P8"><text:span text:style-name="T17"/></text:p>
      <text:p text:style-name="P8"><draw:frame draw:style-name="fr1" draw:name="Image2" text:anchor-type="as-char" svg:width="13.109cm" svg:height="10.179cm" draw:z-index="14"><draw:image xlink:href="Pictures/100000010000042F000003424446A4A6.png" xlink:type="simple" xlink:show="embed" xlink:actuate="onLoad" draw:mime-type="image/png"/></draw:frame></text:p>
      <text:p text:style-name="P8"><text:span text:style-name="T17"/></text:p>
      <text:list text:style-name="L1">
        <text:list-item>
          <text:p text:style-name="P15"><text:bookmark-start text:name="__RefHeading___Toc6703_1238474401"/>Opzione 1 – <text:span text:style-name="T26">AIRDROP,CASHBACK EARN etc…</text:span><text:bookmark-end text:name="__RefHeading___Toc6703_1238474401"/></text:p>
        </text:list-item>
      </text:list>
      <text:p text:style-name="P13"><text:span text:style-name="T27"/></text:p>
      <text:p text:style-name="P13">Nel caso in in cui si scelga la prima opzione il programma proporrà la seguente maschera dove verrà chiesto nello specifico il tipo di movimento da assegnare.<text:span text:style-name="T27"/></text:p>
      <text:p text:style-name="P13"><text:span text:style-name="T27"/></text:p>
      <text:p text:style-name="P13"><draw:frame draw:style-name="fr2" draw:name="Image3" text:anchor-type="as-char" svg:width="17.59cm" svg:height="3.06cm" draw:z-index="15"><draw:image xlink:href="Pictures/10000001000004DF000000D9E9B0E3EF.png" xlink:type="simple" xlink:show="embed" xlink:actuate="onLoad" draw:mime-type="image/png"/></draw:frame></text:p>
      <text:p text:style-name="P13">Questo serve perché a seconda del tipo di movimento scelto si potrebbe generare o meno una plusvalenza immediata.<text:span text:style-name="T27"/></text:p>
      <text:p text:style-name="P13">Le opzioni personalizzabili a riguardo si trovano nella sezione <text:span text:style-name="T25">Opzioni – Opzioni Rewards.</text:span><text:span text:style-name="T27"/></text:p>
      <text:h text:style-name="P16" text:outline-level="3"><text:bookmark-start text:name="__RefHeading___Toc6705_1238474401"/><text:span text:style-name="T32">Opzione 2 – </text:span><text:span text:style-name="T33">DEPOSITO CON COSTO DI CARICO A ZERO</text:span><text:bookmark-end text:name="__RefHeading___Toc6705_1238474401"/></text:h>
      <text:p text:style-name="P7"><text:span text:style-name="T34"/></text:p>
      <text:p text:style-name="P7"><text:span text:style-name="T26">In questo caso non c’è bisogno di spiegazione, è una categoria generica in cui segnalo al programma di trattare il movimento di deposito con costo di carico Zero (alla stregua di taluni Airdrop).</text:span><text:span text:style-name="T34"/></text:p>
      <text:p text:style-name="P7"><text:span text:style-name="T34"/></text:p>
      <text:p text:style-name="P7"><text:span text:style-name="T26">Volendo nel campo note si può specificare la motivazione.</text:span><text:span text:style-name="T34"/></text:p>
      <text:p text:style-name="P7"><text:span text:style-name="T34"/></text:p>
      <text:p text:style-name="P7"><draw:frame draw:style-name="fr2" draw:name="Image4" text:anchor-type="as-char" svg:width="17.59cm" svg:height="13.501cm" draw:z-index="16"><draw:image xlink:href="Pictures/100000010000043000000337A6D466EA.png" xlink:type="simple" xlink:show="embed" xlink:actuate="onLoad" draw:mime-type="image/png"/></draw:frame></text:p>
      <text:p text:style-name="P17"/>
      <text:h text:style-name="P18" text:outline-level="3"><text:bookmark-start text:name="__RefHeading___Toc6707_1238474401"/><text:span text:style-name="T32">Opzione 3</text:span><text:span text:style-name="T35"> –</text:span><text:span text:style-name="T33">TRASFERIMENTO TRA WALLET DI PROPRIETA’</text:span><text:bookmark-end text:name="__RefHeading___Toc6707_1238474401"/></text:h>
      <text:p text:style-name="P7"><text:span text:style-name="T34"/></text:p>
      <text:p text:style-name="P13">Scegliendo questa opzione nella parte bassa il programma proporrà tutti i movimento di prelievo compatibili con un possibile trasferimento tra wallet.<text:span text:style-name="T27"/></text:p>
      <text:p text:style-name="P7"><text:span text:style-name="T34"/></text:p>
      <text:p text:style-name="P13"><draw:frame draw:style-name="fr1" draw:name="Image5" text:anchor-type="as-char" svg:width="12.501cm" svg:height="9.693cm" draw:z-index="23"><draw:image xlink:href="Pictures/10000001000004290000033A89740DD0.png" xlink:type="simple" xlink:show="embed" xlink:actuate="onLoad" draw:mime-type="image/png"/></draw:frame></text:p>
      <text:p text:style-name="P7"><text:span text:style-name="T34"/></text:p>
      <text:p text:style-name="P7"><text:span text:style-name="T26">Selezionando in basso il prelievo desiderato e premendo </text:span>OK<text:span text:style-name="T26"> poi i due movimenti verranno associati.</text:span></text:p>
      <text:p text:style-name="P7"><text:span text:style-name="T34"/></text:p>
      <text:p text:style-name="P13">Eventuali differenze di quantità verranno poi convertite in Commissioni.<text:span text:style-name="T27"/></text:p>
      <text:p text:style-name="P7"><text:span text:style-name="T34"/></text:p>
      <text:p text:style-name="P13">ESEMPIO : <text:span text:style-name="T27"/></text:p>
      <text:p text:style-name="P13">- Movimento di prelievo di 1,00 USDT<text:span text:style-name="T27"/></text:p>
      <text:p text:style-name="P13">- Movimento di deposito di 0,99 USDT<text:span text:style-name="T27"/></text:p>
      <text:p text:style-name="P7"><text:span text:style-name="T34"/></text:p>
      <text:p text:style-name="P13">Una volta associati ci sarà un movimento di deposito eprelievo di 0,99 USDT e un movimento classificato come commissione di 0,01 USDT.<text:span text:style-name="T27"/></text:p>
      <text:p text:style-name="P7"><text:span text:style-name="T34"/></text:p>
      <text:p text:style-name="P7"><text:span text:style-name="T26">A seconda poi dell’opzione scelta in </text:span>Opzioni – Opzioni di Calcolo<text:span text:style-name="T26"> il trasferimento risulterà totalmente irrilevante ai fini del calcolo della plusvalenza oppure servirà per spostare il costo di carico dal movimento di prelievo a quello di Deposito.</text:span></text:p>
      <text:p text:style-name="P19"><text:span text:style-name="T36"/></text:p>
      <text:p text:style-name="P20"/>
      <text:h text:style-name="P21" text:outline-level="3"><text:bookmark-start text:name="__RefHeading___Toc6709_1238474401"/>Opzione 4<text:span text:style-name="T26"> –</text:span><text:span text:style-name="T37">ACQUISTO CRYPTO o DONAZIONE</text:span><text:bookmark-end text:name="__RefHeading___Toc6709_1238474401"/></text:h>
      <text:p text:style-name="P7"><text:span text:style-name="T34"/></text:p>
      <text:p text:style-name="P13">Nel caso in in cui si scelga questa opzione il programma proporrà la seguente maschera dove verrà chiesto nello specifico il tipo di movimento da assegnare.<text:span text:style-name="T27"/></text:p>
      <text:p text:style-name="P13"><text:span text:style-name="T27"/></text:p>
      <text:p text:style-name="P13"><draw:frame draw:style-name="fr1" draw:name="Image10" text:anchor-type="as-char" svg:width="9.551cm" svg:height="3.295cm" draw:z-index="17"><draw:image xlink:href="Pictures/1000000100000295000000E4C1AC2374.png" xlink:type="simple" xlink:show="embed" xlink:actuate="onLoad" draw:mime-type="image/png"/></draw:frame></text:p>
      <text:p text:style-name="P13"><text:span text:style-name="T27"/></text:p>
      <text:p text:style-name="P13">Nel caso si scelga <text:span text:style-name="T25">ACQUISTO CRYPTO</text:span> si presuppone che il deposito sia in realtà un acquisto fatto ad esempio da una piattaforma esterna quale Moonpay o analoghe.</text:p>
      <text:p text:style-name="P7"><text:span text:style-name="T34"/></text:p>
      <text:p text:style-name="P13">Il programma quindi chiederà all’utente di inserire l’importo Euro usato per effettuare l’acquisto.<text:span text:style-name="T27"/></text:p>
      <text:p text:style-name="P7"><text:span text:style-name="T34"/></text:p>
      <text:p text:style-name="P13">E’ opportuno inserire l’importo al netto delle commissioni pagate per il servizio.<text:span text:style-name="T27"/></text:p>
      <text:p text:style-name="P7"><text:span text:style-name="T34"/></text:p>
      <text:p text:style-name="P13"><draw:frame draw:style-name="fr1" draw:name="Image6" text:anchor-type="as-char" svg:width="9.208cm" svg:height="3.769cm" draw:z-index="18"><draw:image xlink:href="Pictures/10000001000001C4000000B9AD8E1772.png" xlink:type="simple" xlink:show="embed" xlink:actuate="onLoad" draw:mime-type="image/png"/></draw:frame></text:p>
      <text:p text:style-name="P13"><text:span text:style-name="T27"/></text:p>
      <text:p text:style-name="P13">Nel caso si scelga <text:span text:style-name="T25">DONAZIONE</text:span> il programma proporrà una maschera analoga a quella di prima ma dove dovrò indicare il costo di carico della crypto passato dal donante.</text:p>
      <text:p text:style-name="P13"><text:span text:style-name="T27"/></text:p>
      <text:p text:style-name="P13"><draw:frame draw:style-name="fr1" draw:name="Image11" text:anchor-type="as-char" svg:width="9.26cm" svg:height="3.558cm" draw:z-index="22"><draw:image xlink:href="Pictures/10000001000001EC000000BD1F60DF38.png" xlink:type="simple" xlink:show="embed" xlink:actuate="onLoad" draw:mime-type="image/png"/></draw:frame></text:p>
      <text:p text:style-name="P13"><text:span text:style-name="T27"/></text:p>
      <text:p text:style-name="P13"><text:span text:style-name="T27"/></text:p>
      <text:p text:style-name="P13">Rimando ad articolo di cryptobooks che spiega come funzionano le donazioni : <text:span text:style-name="T27"/></text:p>
      <text:p text:style-name="P13"><text:a xlink:type="simple" xlink:href="https://cryptobooks.tax/it/blog/donazione-criptovalute" text:style-name="Internet_20_link" text:visited-style-name="Visited_20_Internet_20_Link"><text:span text:style-name="Internet_20_link">https://cryptobooks.tax/it/blog/donazione-criptovalute</text:span></text:a><text:span text:style-name="T27"/></text:p>
      <text:h text:style-name="P22" text:outline-level="3"><text:bookmark-start text:name="__RefHeading___Toc6711_1238474401"/><text:span text:style-name="T32">Opzione 5</text:span><text:span text:style-name="T35"> –</text:span><text:span text:style-name="T33">SCAMBIO CRYPTO DIFFERITO</text:span><text:bookmark-end text:name="__RefHeading___Toc6711_1238474401"/></text:h>
      <text:p text:style-name="P19"><text:span text:style-name="T36"/></text:p>
      <text:p text:style-name="P2">Può capitare che un token cambi contratto e venga chiesto agli utenti di caricarlo su una piattaforma affinché poi venga airdroppato il token nuovo nel proprio wallet.<text:span text:style-name="T38"/></text:p>
      <text:p text:style-name="P2"><text:span text:style-name="T38"/></text:p>
      <text:p text:style-name="P2">Ovviamente a livello di movimenti si vedrà, ad esempio, un movimento di prelievo del TOKEN_OLD e un movimento di deposito del TOKEN_NEW.<text:span text:style-name="T38"/></text:p>
      <text:p text:style-name="P2"><text:span text:style-name="T39"/></text:p>
      <text:p text:style-name="P2">Quello che ci interessa è indicare al programma che deve passare il costo di carico del TOKEN_OLD sul TOKEN_NEW, per far ciò bisogna scegliere, un po' come fatto nella sezione relativa al “Opzione 3 - Trasferimento tra Wallet”, il movimento di controparte da associare.<text:span text:style-name="T38"/></text:p>
      <text:p text:style-name="P2"><text:span text:style-name="T38"/></text:p>
      <text:p text:style-name="P2">Il programma quindi simulerà il caricamento del token in una piattaforma DeFi che pois si occuperà dello scambio e quindi del trasferimento sul wallet di destinazione.<text:span text:style-name="T38"/></text:p>
      <text:p text:style-name="P2">Scambio e trasferimento sul wallet di destinazione avranno la stessa data del movimento di deposito e sarà quello anche il momento in cui il costo di carico verrà spostato dal token di origine al token di destinazione.<text:span text:style-name="T38"/></text:p>
      <text:p text:style-name="P2"><text:span text:style-name="T38"/></text:p>
      <text:p text:style-name="P2"><text:span text:style-name="T38"/></text:p>
      <text:p text:style-name="P2">Altra casistica in cui è opportuno utilizzare questa opzione è quando si utilizzano dei bridge per passare da una rete ad un’altra e magari gli si da in pasto es. ETH per ricevere BNB.<text:span text:style-name="T38"/></text:p>
      <text:p text:style-name="P2"><text:span text:style-name="T38"/></text:p>
      <text:p text:style-name="P2"><text:span text:style-name="T39"/></text:p>
      <text:list text:style-name="L2">
        <text:list-item>
          <text:p text:style-name="P23"><text:bookmark-start text:name="__RefHeading___Toc6713_1238474401"/>Opzione 6<text:span text:style-name="T26"> –</text:span><text:span text:style-name="T40"> </text:span><text:span text:style-name="T37">TRASFERIMENTO DA VAULT/PIATTAFORMA A RENDITA</text:span><text:bookmark-end text:name="__RefHeading___Toc6713_1238474401"/></text:p>
        </text:list-item>
      </text:list>
      <text:p text:style-name="P7"><text:span text:style-name="T34"/></text:p>
      <text:p text:style-name="P7"><text:span text:style-name="T26">Questa funzione, studiata appositamente per la DeFi permette di specificare che quel token è un ritiro da un Vault o comunque da una piattaforma DeFi di altra natura.</text:span><text:span text:style-name="T34"/></text:p>
      <text:p text:style-name="P7"><text:span text:style-name="T34"/></text:p>
      <text:p text:style-name="P13">In questo caso è opportuno classificare prima tutti i prelievi verso la piattaforma per poi classificare i depositi affinché il programma possa fare anche il calcolo di eventuali differenze dovute alla rendita del token.<text:span text:style-name="T27"/></text:p>
      <text:p text:style-name="P7"><text:span text:style-name="T34"/></text:p>
      <text:p text:style-name="P13">Questa funzione tra l’altro per le blockchain supportate analizza il numero di contratto e va a vedere se sono presenti altri trasferimenti analoghi chiedendo quindi se vogliono classificarli allo stesso modo.<text:span text:style-name="T27"/></text:p>
      <text:list text:style-name="L3">
        <text:list-item>
          <text:p text:style-name="P24"><text:bookmark-start text:name="__RefHeading___Toc6714_1238474401"/>Opzione 7<text:span text:style-name="T26"> –</text:span><text:span text:style-name="T40"> </text:span><text:span text:style-name="T37">PRESTITO - RICEZIONE FONDI</text:span><text:bookmark-end text:name="__RefHeading___Toc6714_1238474401"/></text:p>
        </text:list-item>
      </text:list>
      <text:p text:style-name="P7"><text:span text:style-name="T34"/></text:p>
      <text:p text:style-name="P7"><text:span text:style-name="T26">Questa opzione classifica il deposito come ricezione di fondi ottenuti tramite un prestito (ad esempio stablecoin ricevute a fronte di un collaterale bloccato).</text:span><text:span text:style-name="T34"/></text:p>
      <text:p text:style-name="P7"><text:soft-page-break/><text:span text:style-name="T34"/></text:p>
      <text:p text:style-name="P13">Il programma utilizza automaticamente il valore già presente sul movimento come costo di carico, senza richiedere ulteriori conferme: il deposito viene trattato alla stregua di un acquisto crypto, quindi non genera plusvalenza immediata.<text:span text:style-name="T27"/></text:p>
      <text:list text:style-name="L4">
        <text:list-item>
          <text:p text:style-name="P25"><text:bookmark-start text:name="__RefHeading___Toc6715_1238474401"/>Opzione 8<text:span text:style-name="T26"> –</text:span><text:span text:style-name="T40"> </text:span><text:span text:style-name="T37">PRESTITO - SBLOCCO COLLATERALE (Chiusura del prestito)</text:span><text:bookmark-end text:name="__RefHeading___Toc6715_1238474401"/></text:p>
        </text:list-item>
      </text:list>
      <text:p text:style-name="P7"><text:span text:style-name="T34"/></text:p>
      <text:p text:style-name="P7"><text:span text:style-name="T26">Questa funzione permette di specificare che quel token è lo sblocco del collaterale precedentemente messo a garanzia di un prestito (chiusura del prestito).</text:span><text:span text:style-name="T34"/></text:p>
      <text:p text:style-name="P13">Il movimento è fiscalmente neutro, non genera quindi nessuna plusvalenza immediata essendo un semplice sblocco di fondi.<text:span text:style-name="T27"/></text:p>
      <text:p text:style-name="P7"><text:span text:style-name="T34"/></text:p>
      <text:p text:style-name="P13">Analogamente a quanto avviene per l’Opzione 6, è opportuno classificare prima tutti i prelievi di messa a collaterale (vedi Opzione 7 dei Prelievi) per poi classificare i depositi di sblocco, in modo che il programma possa calcolare anche eventuali differenze.<text:span text:style-name="T27"/></text:p>
      <text:p text:style-name="P7"><text:span text:style-name="T34"/></text:p>
      <text:p text:style-name="P13">Anche in questo caso, per le blockchain supportate, il programma analizza il numero di contratto e verifica se sono presenti altri trasferimenti analoghi, chiedendo quindi se vogliono classificarli allo stesso modo.<text:span text:style-name="T27"/></text:p>
      <text:h text:style-name="P26" text:outline-level="2"><text:bookmark-start text:name="__RefHeading___Toc3189_1777463037"/><text:span text:style-name="T32">Classificazione manuale dei movimenti di PRELIEVO</text:span><text:bookmark-end text:name="__RefHeading___Toc3189_1777463037"/></text:h>
      <text:p text:style-name="P19"><text:span text:style-name="T41"/></text:p>
      <text:p text:style-name="P8">Nel momento in cui si seleziona un movimento di deposito le opzioni sono quelle visualizzate di seguito: <text:span text:style-name="T17"/></text:p>
      <text:p text:style-name="P8"><text:span text:style-name="T17"/></text:p>
      <text:p text:style-name="P2"><draw:frame draw:style-name="fr1" draw:name="Image7" text:anchor-type="as-char" svg:width="15.7cm" svg:height="12.291cm" draw:z-index="19"><draw:image xlink:href="Pictures/100000010000042E0000034288A74A67.png" xlink:type="simple" xlink:show="embed" xlink:actuate="onLoad" draw:mime-type="image/png"/></draw:frame></text:p>
      <text:p text:style-name="P2"><text:span text:style-name="T38"/></text:p>
      <text:list xml:id="list231509422303796" text:style-name="L5">
        <text:list-item>
          <text:p text:style-name="P27"><text:span text:style-name="T25"/></text:p>
        </text:list-item>
      </text:list>
      <text:h text:style-name="P28" text:outline-level="3"><text:bookmark-start text:name="__RefHeading___Toc6703_1238474401 Copy 2"/>Opzione 1 – <text:span text:style-name="T26">CASHOUT o SIMILARE</text:span><text:bookmark-end text:name="__RefHeading___Toc6703_1238474401 Copy 2"/></text:h>
      <text:p text:style-name="P29"><text:span text:style-name="T26"/></text:p>
      <text:p text:style-name="P13">Nel caso in in cui si scelga la prima opzione il programma proporrà la seguente maschera dove verrà chiesto nello specifico il tipo di movimento da assegnare.<text:span text:style-name="T27"/></text:p>
      <text:p text:style-name="P13"><text:span text:style-name="T27"/></text:p>
      <text:p text:style-name="P13"><draw:frame draw:style-name="fr1" draw:name="Image8" text:anchor-type="as-char" svg:width="10.49cm" svg:height="4.013cm" draw:z-index="20"><draw:image xlink:href="Pictures/100000010000024C000000E1C67EDD4E.png" xlink:type="simple" xlink:show="embed" xlink:actuate="onLoad" draw:mime-type="image/png"/></draw:frame></text:p>
      <text:p text:style-name="P13"><text:span text:style-name="T27"/></text:p>
      <text:p text:style-name="P13">Attualmente a livello di calcoli non vi è differenza tra commissioni e cashout, in ogni caso verrà calcolata la plusvalenza.<text:span text:style-name="T27"/></text:p>
      <text:p text:style-name="P13"><text:span text:style-name="T27"/></text:p>
      <text:p text:style-name="P13">Le commissione vengono attualmente equiparate dal programma ad un acquisto di servizi e per questo considerate fiscalmente rilevanti.<text:span text:style-name="T27"/></text:p>
      <text:p text:style-name="P13"><text:span text:style-name="T27"/></text:p>
      <text:p text:style-name="P13">La differenziazione viene fatta, oltre che per identificare correttamente il movimento, per preparare i dati a possibili variazioni/opzioni future in cui sarà possibile scegliere se le commissioni devono generare o meno plusvalenza.</text:p>
      <text:h text:style-name="P30" text:outline-level="3"><text:bookmark-start text:name="__RefHeading___Toc6703_1238474401 Copy 3"/>Opzione 2 – <text:span text:style-name="T26">DONAZIONE, FURTO, BURN di Cripto-Attività</text:span><text:bookmark-end text:name="__RefHeading___Toc6703_1238474401 Copy 3"/></text:h>
      <text:p text:style-name="P29"><text:span text:style-name="T26">Questa opzione permette di poter togliere dallo stack del LiFo una determinata cripto senza che venga generata plusvalenza.</text:span></text:p>
      <text:p text:style-name="P31">Attualmente è possibile fare questo in caso di Furto, Donazione o Burn della Cripto Attività.<text:span text:style-name="T26"/></text:p>
      <text:p text:style-name="P29"><text:span text:style-name="T26">Una volta scelta questa opzione verrà proposta la seguente schermata:</text:span></text:p>
      <text:p text:style-name="P31"><draw:frame draw:style-name="fr1" draw:name="Image12" text:anchor-type="as-char" svg:width="7.814cm" svg:height="3.545cm" draw:z-index="21"><draw:image xlink:href="Pictures/10000001000001F2000000E2496A8752.png" xlink:type="simple" xlink:show="embed" xlink:actuate="onLoad" draw:mime-type="image/png"/></draw:frame></text:p>
      <text:p text:style-name="P31">Sarà sufficiente scegliere il tipo di movimento per classificare <text:s/>la transazione.<text:span text:style-name="T26"/></text:p>
      <text:p text:style-name="P13">Rimando ad articolo di cryptobooks che spiega come funzionano le donazioni : <text:span text:style-name="T27"/></text:p>
      <text:p text:style-name="P13"><text:a xlink:type="simple" xlink:href="https://cryptobooks.tax/it/blog/donazione-criptovalute" text:style-name="Internet_20_link" text:visited-style-name="Visited_20_Internet_20_Link"><text:span text:style-name="Internet_20_link">https://cryptobooks.tax/it/blog/donazione-criptovalute</text:span></text:a><text:span text:style-name="T27"/></text:p>
      <text:p text:style-name="P29"><text:span text:style-name="T26"/></text:p>
      <text:list text:style-name="L6">
        <text:list-item>
          <text:p text:style-name="P32"><text:bookmark-start text:name="__RefHeading___Toc6703_1238474401 Copy 4"/>Opzione 3 – <text:span text:style-name="T26">TRASFERIMENTO TRA WALLET DI PROPRIETA’</text:span><text:bookmark-end text:name="__RefHeading___Toc6703_1238474401 Copy 4"/></text:p>
        </text:list-item>
      </text:list>
      <text:p text:style-name="P29"><text:span text:style-name="T26">Fare riferimento all’opzione 3 dei Depositi. ( Pagina 6 )</text:span></text:p>
      <text:list text:style-name="L7">
        <text:list-item>
          <text:p text:style-name="P33"><text:bookmark-start text:name="__RefHeading___Toc6703_1238474401 Copy 4 Copy 1"/>Opzione 4 – <text:span text:style-name="T26">SCAMBIO CRYPTO DIFFERITO</text:span><text:bookmark-end text:name="__RefHeading___Toc6703_1238474401 Copy 4 Copy 1"/></text:p>
        </text:list-item>
      </text:list>
      <text:p text:style-name="P29"><text:span text:style-name="T26">Fare riferimento all’opzione 5 dei Depositi. ( Pagina 8 )</text:span></text:p>
      <text:list text:style-name="L8">
        <text:list-item>
          <text:p text:style-name="P34"><text:bookmark-start text:name="__RefHeading___Toc6703_1238474401 Copy 4 Copy 2"/>Opzione 5 – <text:span text:style-name="T37">TRASFERIMENTO A VAULT/PIATTAFORMA A RENDITA</text:span><text:bookmark-end text:name="__RefHeading___Toc6703_1238474401 Copy 4 Copy 2"/></text:p>
        </text:list-item>
      </text:list>
      <text:p text:style-name="P8"><text:span text:style-name="T26">Questa funzione, studiata appositamente per la DeFi permette di specificare che quel token è stato trasferito ad un Vault o comunque ad una piattaforma DeFi di qualche natura.</text:span></text:p>
      <text:p text:style-name="P7"><text:span text:style-name="T34"/></text:p>
      <text:p text:style-name="P29">Fare riferimento all’opzione 6 dei Depositi. ( Pagina 9 )</text:p>
      <text:list text:style-name="L9">
        <text:list-item>
          <text:p text:style-name="P35"><text:bookmark-start text:name="__RefHeading___Toc6703_1238474401 Copy 4 Copy 3"/><text:span text:style-name="T25">Opzione 6 – </text:span><text:span text:style-name="T26">PRESTITO - LIQUIDAZIONE FORZATA</text:span><text:bookmark-end text:name="__RefHeading___Toc6703_1238474401 Copy 4 Copy 3"/></text:p>
        </text:list-item>
      </text:list>
      <text:p text:style-name="P13">Questa opzione classifica il movimento come una liquidazione forzata del collaterale messo a garanzia di un prestito (ad esempio in seguito al mancato rispetto delle condizioni di garanzia).<text:span text:style-name="T27"/></text:p>
      <text:p text:style-name="P13"><text:span text:style-name="T27"/></text:p>
      <text:p text:style-name="P13">A livello di calcolo viene trattata alla stregua di un Cashout, quindi verrà calcolata l’eventuale plusvalenza o minusvalenza.</text:p>
      <text:p text:style-name="P13"><text:soft-page-break/><text:span text:style-name="T27"/></text:p>
      <text:list text:style-name="L10">
        <text:list-item>
          <text:p text:style-name="P36"><text:bookmark-start text:name="__RefHeading___Toc6703_1238474401 Copy 4 Copy 4"/>Opzione 7 – <text:span text:style-name="T37">PRESTITO - MESSA A COLLATERALE</text:span><text:bookmark-end text:name="__RefHeading___Toc6703_1238474401 Copy 4 Copy 4"/></text:p>
        </text:list-item>
      </text:list>
      <text:p text:style-name="P8"><text:span text:style-name="T26">Questa funzione, permette di specificare che quel token è stato messo a collaterale per l’apertura di un prestito.</text:span></text:p>
      <text:p text:style-name="P13">L’operazione è fiscalmente neutra e non verrà calcolata alcuna plusvalenza a riguardo, è un semplice blocco dei fondi.<text:span text:style-name="T27"/></text:p>
      <text:p text:style-name="P8"/>
      <text:p text:style-name="P2"><text:span text:style-name="T38"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/>
    <style:font-face style:name="Microsoft YaHei" svg:font-family="'Microsoft YaHei'"/>
    <style:font-face style:name="NSimSun" svg:font-family="NSimSun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0pt" fo:language="none" fo:country="none" style:font-name-asian="DejaVu Sans" style:font-size-asian="12pt" style:language-asian="none" style:country-asian="none" style:font-family-complex="'Noto Sans'" style:font-family-generic-complex="system" style:font-pitch-complex="variabl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1" fo:font-size="10pt" fo:language="it" fo:country="I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class="chapter">
      <style:paragraph-properties fo:margin-top="0.423cm" fo:margin-bottom="0.212cm" style:contextual-spacing="false"/>
      <style:text-properties style:font-name="Liberation Sans" fo:font-family="'Liberation Sans'" fo:font-size="14pt" style:font-name-asian="Microsoft YaHei" style:font-family-asian="'Microsoft YaHei'" style:font-name-complex="Lucida Sans" style:font-family-complex="'Lucida Sans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Normal" style:class="chapter">
      <style:paragraph-properties fo:margin-top="0.282cm" fo:margin-bottom="0.141cm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" style:display-name="Heading 4" style:family="paragraph" style:parent-style-name="Normal" style:class="chapter">
      <style:paragraph-properties fo:margin-top="0.141cm" fo:margin-bottom="0.071cm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chapter">
      <style:paragraph-properties fo:margin-top="0.141cm" fo:margin-bottom="0.071cm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chapter">
      <style:paragraph-properties fo:margin-top="0.071cm" fo:margin-bottom="0cm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chapter">
      <style:paragraph-properties fo:margin-top="0.071cm" fo:margin-bottom="0cm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chapter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chapter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cm" fo:margin-bottom="0.141cm" style:contextual-spacing="true" fo:line-height="100%"/>
      <style:text-properties style:font-name="Arial" fo:font-family="Arial" fo:font-size="28pt" fo:letter-spacing="-0.018cm" style:font-name-asian="Arial" style:font-family-asian="Arial" style:font-name-complex="Arial" style:font-family-complex="Arial" style:font-size-complex="28pt"/>
    </style:style>
    <style:style style:name="Subtitle" style:family="paragraph" style:parent-style-name="Normal" style:class="chapter">
      <style:text-properties fo:color="#595959" loext:opacity="100%" fo:font-size="14pt" fo:letter-spacing="0.026cm" style:font-size-complex="14pt"/>
    </style:style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it" fo:country="IT" style:font-name-asian="NSimSun" style:font-family-asian="NSimSun" style:font-name-complex="Lucida Sans" style:font-family-complex="'Lucida Sans'" style:font-size-complex="12pt" style:language-complex="hi" style:country-complex="IN"/>
    </style:style>
    <style:style style:name="List" style:family="paragraph" style:parent-style-name="Text_20_body" style:class="list">
      <style:text-properties style:font-name-complex="Lucida Sans" style:font-family-complex="'Lucida Sans'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Lucida Sans" style:font-family-complex="'Lucida Sans'" style:font-size-complex="12pt"/>
    </style:style>
    <style:style style:name="Index" style:family="paragraph" style:parent-style-name="Standard" style:class="index">
      <style:text-properties style:font-name-complex="Lucida Sans" style:font-family-complex="'Lucida Sans'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complex="16pt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/>
      <style:text-properties fo:font-size="16pt" fo:font-weight="bold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language="it" fo:country="IT" fo:font-weight="bold"/>
    </style:style>
    <style:style style:name="Heading_20_1" style:display-name="Heading 1" style:family="paragraph" style:parent-style-name="Heading" style:class="chapter">
      <style:paragraph-properties fo:margin-top="0.423cm" fo:margin-bottom="0.212cm" style:contextual-spacing="false"/>
      <style:text-properties fo:font-size="18pt" fo:font-weight="bold" style:font-size-complex="18pt"/>
    </style:style>
    <style:style style:name="Heading_20_2" style:display-name="Heading 2" style:family="paragraph" style:parent-style-name="Heading" style:class="chapter">
      <style:paragraph-properties fo:margin-top="0.353cm" fo:margin-bottom="0.212cm" style:contextual-spacing="false"/>
      <style:text-properties fo:font-size="16pt" fo:font-weight="bold" style:font-size-complex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MT1" style:family="text">
      <style:text-properties fo:font-size="8pt" fo:language="it" fo:country="IT" fo:font-weight="bold" style:font-size-complex="8pt"/>
    </style:style>
    <style:style style:name="MT2" style:family="text">
      <style:text-properties fo:font-family="'Eras Bold ITC'" fo:font-size="10pt" fo:language="it" fo:country="IT" fo:font-weight="bold" style:font-size-complex="10pt"/>
    </style:style>
    <style:style style:name="MT3" style:family="text">
      <style:text-properties fo:font-size="8pt" fo:language="it" fo:country="IT" fo:font-weight="normal" style:font-size-complex="8pt"/>
    </style:style>
    <style:style style:name="Mfr1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footer>
        <text:p text:style-name="MP1"><draw:frame draw:style-name="Mfr1" draw:name="Copia Immagine13 1" text:anchor-type="as-char" svg:width="0.619cm" svg:height="0.619cm" draw:z-index="0"><draw:image xlink:href="Pictures/10000001000001F4000001F4529DD086.png" xlink:type="simple" xlink:show="embed" xlink:actuate="onLoad" draw:mime-type="image/png"/></draw:frame><text:span text:style-name="MT1"><text:tab/>GIACENZE CRYPTO : </text:span><text:span text:style-name="MT2">Classificazione Depositi/Prelievi</text:span><text:span text:style-name="MT1"> </text:span><text:span text:style-name="MT3">(Aggiornato alla versione 1.0.58)</text:span><text:span text:style-name="MT1"><text:tab/></text:span><text:bookmark-start text:name="Copia Copia PageNumWizard_FOOTER_Stile di pagina predefinito1 4 1"/><text:page-number text:select-page="current">1</text:page-number> / <text:page-count>13</text:page-count><text:bookmark-end text:name="Copia Copia PageNumWizard_FOOTER_Stile di pagina predefinito1 4 1"/></text:p>
      </style:footer>
    </style:master-page>
    <style:master-page style:name="MasterPage3" style:page-layout-name="Mpm2" draw:style-name="Mdp1">
      <style:footer>
        <text:p text:style-name="MP1"><draw:frame draw:style-name="Mfr1" draw:name="Immagine1" text:anchor-type="as-char" svg:width="0.619cm" svg:height="0.619cm" draw:z-index="1"><draw:image xlink:href="Pictures/10000001000001F4000001F4529DD086.png" xlink:type="simple" xlink:show="embed" xlink:actuate="onLoad" draw:mime-type="image/png"/></draw:frame><text:span text:style-name="MT1"><text:tab/>GIACENZE CRYPTO : </text:span><text:span text:style-name="MT2">Classificazione Depositi/Prelievi</text:span><text:span text:style-name="MT1"> </text:span><text:span text:style-name="MT3">(Aggiornato alla versione 1.0.58)</text:span><text:span text:style-name="MT1"><text:tab/></text:span><text:bookmark-start text:name="Copia Copia Copia PageNumWizard_FOOTER_Stile di pagina predefinito1 4 1 1"/><text:page-number text:select-page="current">2</text:page-number> / <text:page-count>13</text:page-count><text:bookmark-end text:name="Copia Copia Copia PageNumWizard_FOOTER_Stile di pagina predefinito1 4 1 1"/></text:p>
      </style:footer>
    </style:master-page>
    <style:master-page style:name="MasterPage4" style:page-layout-name="Mpm2" draw:style-name="Mdp1">
      <style:footer>
        <text:p text:style-name="MP1"><draw:frame draw:style-name="Mfr1" draw:name="Immagine2" text:anchor-type="as-char" svg:width="0.619cm" svg:height="0.619cm" draw:z-index="2"><draw:image xlink:href="Pictures/10000001000001F4000001F4529DD086.png" xlink:type="simple" xlink:show="embed" xlink:actuate="onLoad" draw:mime-type="image/png"/></draw:frame><text:span text:style-name="MT1"><text:tab/>GIACENZE CRYPTO : </text:span><text:span text:style-name="MT2">Classificazione Depositi/Prelievi</text:span><text:span text:style-name="MT1"> </text:span><text:span text:style-name="MT3">(Aggiornato alla versione 1.0.58)</text:span><text:span text:style-name="MT1"><text:tab/></text:span><text:bookmark-start text:name="Copia Copia Copia PageNumWizard_FOOTER_Stile di pagina predefinito1 4 1 2"/><text:page-number text:select-page="current">3</text:page-number> / <text:page-count>13</text:page-count><text:bookmark-end text:name="Copia Copia Copia PageNumWizard_FOOTER_Stile di pagina predefinito1 4 1 2"/></text:p>
      </style:footer>
    </style:master-page>
    <style:master-page style:name="MasterPage5" style:page-layout-name="Mpm2" draw:style-name="Mdp1">
      <style:footer>
        <text:p text:style-name="MP1"><draw:frame draw:style-name="Mfr1" draw:name="Immagine3" text:anchor-type="as-char" svg:width="0.619cm" svg:height="0.619cm" draw:z-index="3"><draw:image xlink:href="Pictures/10000001000001F4000001F4529DD086.png" xlink:type="simple" xlink:show="embed" xlink:actuate="onLoad" draw:mime-type="image/png"/></draw:frame><text:span text:style-name="MT1"><text:tab/>GIACENZE CRYPTO : </text:span><text:span text:style-name="MT2">Classificazione Depositi/Prelievi</text:span><text:span text:style-name="MT1"> </text:span><text:span text:style-name="MT3">(Aggiornato alla versione 1.0.58)</text:span><text:span text:style-name="MT1"><text:tab/></text:span><text:bookmark-start text:name="Copia Copia Copia PageNumWizard_FOOTER_Stile di pagina predefinito1 4 1 3"/><text:page-number text:select-page="current">4</text:page-number> / <text:page-count>13</text:page-count><text:bookmark-end text:name="Copia Copia Copia PageNumWizard_FOOTER_Stile di pagina predefinito1 4 1 3"/></text:p>
      </style:footer>
    </style:master-page>
    <style:master-page style:name="MasterPage6" style:page-layout-name="Mpm2" draw:style-name="Mdp1">
      <style:footer>
        <text:p text:style-name="MP1"><draw:frame draw:style-name="Mfr1" draw:name="Immagine4" text:anchor-type="as-char" svg:width="0.619cm" svg:height="0.619cm" draw:z-index="4"><draw:image xlink:href="Pictures/10000001000001F4000001F4529DD086.png" xlink:type="simple" xlink:show="embed" xlink:actuate="onLoad" draw:mime-type="image/png"/></draw:frame><text:span text:style-name="MT1"><text:tab/>GIACENZE CRYPTO : </text:span><text:span text:style-name="MT2">Classificazione Depositi/Prelievi</text:span><text:span text:style-name="MT1"> </text:span><text:span text:style-name="MT3">(Aggiornato alla versione 1.0.58)</text:span><text:span text:style-name="MT1"><text:tab/></text:span><text:bookmark-start text:name="Copia Copia Copia PageNumWizard_FOOTER_Stile di pagina predefinito1 4 1 4"/><text:page-number text:select-page="current">5</text:page-number> / <text:page-count>13</text:page-count><text:bookmark-end text:name="Copia Copia Copia PageNumWizard_FOOTER_Stile di pagina predefinito1 4 1 4"/></text:p>
      </style:footer>
    </style:master-page>
    <style:master-page style:name="MasterPage7" style:page-layout-name="Mpm2" draw:style-name="Mdp1">
      <style:footer>
        <text:p text:style-name="MP1"><draw:frame draw:style-name="Mfr1" draw:name="Immagine5" text:anchor-type="as-char" svg:width="0.619cm" svg:height="0.619cm" draw:z-index="5"><draw:image xlink:href="Pictures/10000001000001F4000001F4529DD086.png" xlink:type="simple" xlink:show="embed" xlink:actuate="onLoad" draw:mime-type="image/png"/></draw:frame><text:span text:style-name="MT1"><text:tab/>GIACENZE CRYPTO : </text:span><text:span text:style-name="MT2">Classificazione Depositi/Prelievi</text:span><text:span text:style-name="MT1"> </text:span><text:span text:style-name="MT3">(Aggiornato alla versione 1.0.58)</text:span><text:span text:style-name="MT1"><text:tab/></text:span><text:bookmark-start text:name="Copia Copia Copia PageNumWizard_FOOTER_Stile di pagina predefinito1 4 1 5"/><text:page-number text:select-page="current">6</text:page-number> / <text:page-count>13</text:page-count><text:bookmark-end text:name="Copia Copia Copia PageNumWizard_FOOTER_Stile di pagina predefinito1 4 1 5"/></text:p>
      </style:footer>
    </style:master-page>
    <style:master-page style:name="MasterPage8" style:page-layout-name="Mpm2" draw:style-name="Mdp1">
      <style:footer>
        <text:p text:style-name="MP1"><draw:frame draw:style-name="Mfr1" draw:name="Immagine6" text:anchor-type="as-char" svg:width="0.619cm" svg:height="0.619cm" draw:z-index="6"><draw:image xlink:href="Pictures/10000001000001F4000001F4529DD086.png" xlink:type="simple" xlink:show="embed" xlink:actuate="onLoad" draw:mime-type="image/png"/></draw:frame><text:span text:style-name="MT1"><text:tab/>GIACENZE CRYPTO : </text:span><text:span text:style-name="MT2">Classificazione Depositi/Prelievi</text:span><text:span text:style-name="MT1"> </text:span><text:span text:style-name="MT3">(Aggiornato alla versione 1.0.58)</text:span><text:span text:style-name="MT1"><text:tab/></text:span><text:bookmark-start text:name="Copia Copia Copia PageNumWizard_FOOTER_Stile di pagina predefinito1 4 1 6"/><text:page-number text:select-page="current">7</text:page-number> / <text:page-count>13</text:page-count><text:bookmark-end text:name="Copia Copia Copia PageNumWizard_FOOTER_Stile di pagina predefinito1 4 1 6"/></text:p>
      </style:footer>
    </style:master-page>
    <style:master-page style:name="MasterPage9" style:page-layout-name="Mpm2" draw:style-name="Mdp1">
      <style:footer>
        <text:p text:style-name="MP1"><draw:frame draw:style-name="Mfr1" draw:name="Immagine7" text:anchor-type="as-char" svg:width="0.619cm" svg:height="0.619cm" draw:z-index="7"><draw:image xlink:href="Pictures/10000001000001F4000001F4529DD086.png" xlink:type="simple" xlink:show="embed" xlink:actuate="onLoad" draw:mime-type="image/png"/></draw:frame><text:span text:style-name="MT1"><text:tab/>GIACENZE CRYPTO : </text:span><text:span text:style-name="MT2">Classificazione Depositi/Prelievi</text:span><text:span text:style-name="MT1"> </text:span><text:span text:style-name="MT3">(Aggiornato alla versione 1.0.58)</text:span><text:span text:style-name="MT1"><text:tab/></text:span><text:bookmark-start text:name="Copia Copia Copia PageNumWizard_FOOTER_Stile di pagina predefinito1 4 1 7"/><text:page-number text:select-page="current">9</text:page-number> / <text:page-count>13</text:page-count><text:bookmark-end text:name="Copia Copia Copia PageNumWizard_FOOTER_Stile di pagina predefinito1 4 1 7"/></text:p>
      </style:footer>
    </style:master-page>
    <style:master-page style:name="MasterPage10" style:page-layout-name="Mpm2" draw:style-name="Mdp1">
      <style:footer>
        <text:p text:style-name="MP1"><draw:frame draw:style-name="Mfr1" draw:name="Immagine8" text:anchor-type="as-char" svg:width="0.619cm" svg:height="0.619cm" draw:z-index="9"><draw:image xlink:href="Pictures/10000001000001F4000001F4529DD086.png" xlink:type="simple" xlink:show="embed" xlink:actuate="onLoad" draw:mime-type="image/png"/></draw:frame><text:span text:style-name="MT1"><text:tab/>GIACENZE CRYPTO : </text:span><text:span text:style-name="MT2">Classificazione Depositi/Prelievi</text:span><text:span text:style-name="MT1"> </text:span><text:span text:style-name="MT3">(Aggiornato alla versione 1.0.58)</text:span><text:span text:style-name="MT1"><text:tab/></text:span><text:bookmark-start text:name="Copia Copia Copia PageNumWizard_FOOTER_Stile di pagina predefinito1 4 1 8"/><text:page-number text:select-page="current">10</text:page-number> / <text:page-count>13</text:page-count><text:bookmark-end text:name="Copia Copia Copia PageNumWizard_FOOTER_Stile di pagina predefinito1 4 1 8"/></text:p>
      </style:footer>
    </style:master-page>
    <style:master-page style:name="MasterPage11" style:page-layout-name="Mpm2" draw:style-name="Mdp1">
      <style:footer>
        <text:p text:style-name="MP1"><draw:frame draw:style-name="Mfr1" draw:name="Immagine9" text:anchor-type="as-char" svg:width="0.619cm" svg:height="0.619cm" draw:z-index="10"><draw:image xlink:href="Pictures/10000001000001F4000001F4529DD086.png" xlink:type="simple" xlink:show="embed" xlink:actuate="onLoad" draw:mime-type="image/png"/></draw:frame><text:span text:style-name="MT1"><text:tab/>GIACENZE CRYPTO : </text:span><text:span text:style-name="MT2">Classificazione Depositi/Prelievi</text:span><text:span text:style-name="MT1"> </text:span><text:span text:style-name="MT3">(Aggiornato alla versione 1.0.58)</text:span><text:span text:style-name="MT1"><text:tab/></text:span><text:bookmark-start text:name="Copia Copia Copia PageNumWizard_FOOTER_Stile di pagina predefinito1 4 1 9"/><text:page-number text:select-page="current">11</text:page-number> / <text:page-count>13</text:page-count><text:bookmark-end text:name="Copia Copia Copia PageNumWizard_FOOTER_Stile di pagina predefinito1 4 1 9"/></text:p>
      </style:footer>
    </style:master-page>
    <style:master-page style:name="MasterPage12" style:page-layout-name="Mpm2" draw:style-name="Mdp1">
      <style:footer>
        <text:p text:style-name="MP1"><draw:frame draw:style-name="Mfr1" draw:name="Immagine10" text:anchor-type="as-char" svg:width="0.619cm" svg:height="0.619cm" draw:z-index="11"><draw:image xlink:href="Pictures/10000001000001F4000001F4529DD086.png" xlink:type="simple" xlink:show="embed" xlink:actuate="onLoad" draw:mime-type="image/png"/></draw:frame><text:span text:style-name="MT1"><text:tab/>GIACENZE CRYPTO : </text:span><text:span text:style-name="MT2">Classificazione Depositi/Prelievi</text:span><text:span text:style-name="MT1"> </text:span><text:span text:style-name="MT3">(Aggiornato alla versione 1.0.58)</text:span><text:span text:style-name="MT1"><text:tab/></text:span><text:bookmark-start text:name="Copia Copia Copia PageNumWizard_FOOTER_Stile di pagina predefinito1 4 1 10"/><text:page-number text:select-page="current">13</text:page-number> / <text:page-count>13</text:page-count><text:bookmark-end text:name="Copia Copia Copia PageNumWizard_FOOTER_Stile di pagina predefinito1 4 1 10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7.3$Linux_X86_64 LibreOffice_project/a26b9a50e66725c984547fe0389e2687ecedaa0c</meta:generator>
    <meta:creation-date>2024-07-12T21:04:48Z</meta:creation-date>
    <dc:date>2026-07-12T23:17:24.539418203</dc:date>
    <meta:editing-duration>PT2M17S</meta:editing-duration>
    <meta:editing-cycles>1</meta:editing-cycles>
    <meta:document-statistic meta:table-count="0" meta:image-count="23" meta:object-count="0" meta:page-count="13" meta:paragraph-count="139" meta:word-count="1841" meta:character-count="12283" meta:non-whitespace-character-count="10498"/>
  </office:meta>
</office:document-meta>
</file>