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529DD0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enlo" svg:font-family="Menlo"/>
    <style:font-face style:name="OpenSymbol" svg:font-family="Open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1" style:family="table">
      <style:table-properties style:width="17.59cm" fo:margin-top="0.15cm" fo:margin-bottom="0.15cm" table:align="margins" table:border-model="collapsing"/>
    </style:style>
    <style:style style:name="T1.A" style:family="table-column">
      <style:table-column-properties style:column-width="5.496cm" style:rel-column-width="20481*"/>
    </style:style>
    <style:style style:name="T1.B" style:family="table-column">
      <style:table-column-properties style:column-width="12.093cm" style:rel-column-width="45054*"/>
    </style:style>
    <style:style style:name="T1.A1" style:family="table-cell">
      <style:table-cell-properties fo:padding="0.101cm" fo:border="0.05pt solid #999999"/>
    </style:style>
    <style:style style:name="T2" style:family="table">
      <style:table-properties style:width="17.59cm" fo:margin-top="0.15cm" fo:margin-bottom="0.15cm" table:align="margins" table:border-model="collapsing"/>
    </style:style>
    <style:style style:name="T2.A" style:family="table-column">
      <style:table-column-properties style:column-width="4.948cm" style:rel-column-width="18432*"/>
    </style:style>
    <style:style style:name="T2.B" style:family="table-column">
      <style:table-column-properties style:column-width="8.795cm" style:rel-column-width="32767*"/>
    </style:style>
    <style:style style:name="T2.C" style:family="table-column">
      <style:table-column-properties style:column-width="3.847cm" style:rel-column-width="14336*"/>
    </style:style>
    <style:style style:name="T2.A1" style:family="table-cell">
      <style:table-cell-properties fo:padding="0.101cm" fo:border="0.05pt solid #999999"/>
    </style:style>
    <style:style style:name="T3" style:family="table">
      <style:table-properties style:width="17.59cm" fo:margin-top="0.15cm" fo:margin-bottom="0.15cm" table:align="margins" table:border-model="collapsing"/>
    </style:style>
    <style:style style:name="T3.A" style:family="table-column">
      <style:table-column-properties style:column-width="5.496cm" style:rel-column-width="20481*"/>
    </style:style>
    <style:style style:name="T3.B" style:family="table-column">
      <style:table-column-properties style:column-width="12.093cm" style:rel-column-width="45054*"/>
    </style:style>
    <style:style style:name="T3.A1" style:family="table-cell">
      <style:table-cell-properties fo:padding="0.101cm" fo:border="0.05pt solid #999999"/>
    </style:style>
    <style:style style:name="T4" style:family="table">
      <style:table-properties style:width="17.59cm" fo:margin-top="0.15cm" fo:margin-bottom="0.15cm" table:align="margins" table:border-model="collapsing"/>
    </style:style>
    <style:style style:name="T4.A" style:family="table-column">
      <style:table-column-properties style:column-width="4.948cm" style:rel-column-width="18432*"/>
    </style:style>
    <style:style style:name="T4.B" style:family="table-column">
      <style:table-column-properties style:column-width="8.795cm" style:rel-column-width="32767*"/>
    </style:style>
    <style:style style:name="T4.C" style:family="table-column">
      <style:table-column-properties style:column-width="3.847cm" style:rel-column-width="14336*"/>
    </style:style>
    <style:style style:name="T4.A1" style:family="table-cell">
      <style:table-cell-properties fo:padding="0.101cm" fo:border="0.05pt solid #999999"/>
    </style:style>
    <style:style style:name="T5" style:family="table">
      <style:table-properties style:width="17.59cm" fo:margin-top="0.15cm" fo:margin-bottom="0.15cm" table:align="margins" table:border-model="collapsing"/>
    </style:style>
    <style:style style:name="T5.A" style:family="table-column">
      <style:table-column-properties style:column-width="4.948cm" style:rel-column-width="18432*"/>
    </style:style>
    <style:style style:name="T5.B" style:family="table-column">
      <style:table-column-properties style:column-width="8.795cm" style:rel-column-width="32767*"/>
    </style:style>
    <style:style style:name="T5.C" style:family="table-column">
      <style:table-column-properties style:column-width="3.847cm" style:rel-column-width="14336*"/>
    </style:style>
    <style:style style:name="T5.A1" style:family="table-cell">
      <style:table-cell-properties fo:padding="0.101cm" fo:border="0.05pt solid #999999"/>
    </style:style>
    <style:style style:name="P1" style:family="paragraph" style:parent-style-name="Standard">
      <style:paragraph-properties fo:margin-left="0.499cm" fo:margin-top="0.035cm" fo:margin-bottom="0.035cm" style:contextual-spacing="false" fo:text-indent="-0.349cm" style:auto-text-indent="false"/>
    </style:style>
    <style:style style:name="P2" style:family="paragraph" style:parent-style-name="Standard">
      <loext:graphic-properties draw:fill="solid" draw:fill-color="#f5f5f5" draw:opacity="100%"/>
      <style:paragraph-properties fo:margin-left="0.499cm" fo:margin-top="0cm" fo:margin-bottom="0cm" style:contextual-spacing="false" fo:background-color="#f5f5f5" fo:padding="0.079cm" fo:border="0.06pt solid #cccccc"/>
      <style:text-properties fo:color="#1a1a1a" loext:opacity="100%" style:font-name="Liberation Mono" fo:font-size="9pt" style:font-name-complex="Liberation Mono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text-properties style:font-name="Liberation Mono" fo:font-size="10pt" fo:background-color="#f0f0f0" style:font-name-complex="Liberation Mono"/>
    </style:style>
    <style:style style:name="P5" style:family="paragraph" style:parent-style-name="Standard">
      <loext:graphic-properties draw:fill="solid" draw:fill-color="#f5f5f5" draw:opacity="100%"/>
      <style:paragraph-properties fo:margin-left="0.499cm" fo:margin-top="0cm" fo:margin-bottom="0cm" style:contextual-spacing="false" fo:background-color="#f5f5f5" fo:padding="0.079cm" fo:border="0.06pt solid #cccccc"/>
      <style:text-properties fo:color="#1a1a1a" loext:opacity="100%" style:font-name="Liberation Mono" fo:font-size="9pt" officeooo:paragraph-rsid="0005cd37" style:font-name-complex="Liberation Mono"/>
    </style:style>
    <style:style style:name="T226" style:family="text">
      <style:text-properties fo:color="#555555" loext:opacity="100%" fo:font-weight="bold"/>
    </style:style>
    <style:style style:name="T227" style:family="text">
      <style:text-properties fo:font-weight="bold"/>
    </style:style>
    <style:style style:name="T228" style:family="text">
      <style:text-properties officeooo:rsid="00023871"/>
    </style:style>
    <style:style style:name="T229" style:family="text">
      <style:text-properties style:font-name="Liberation Mono" fo:font-size="10pt" fo:background-color="#f0f0f0" loext:char-shading-value="0" style:font-name-complex="Liberation Mono"/>
    </style:style>
    <style:style style:name="T230" style:family="text">
      <style:text-properties officeooo:rsid="0005cd37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ida alla configurazione JSON per l'importazione CSV generica</text:p>
      <text:p text:style-name="Subtitle">GIACENZE CRYPTO</text:p>
      <text:p text:style-name="Standard"/>
      <text:p text:style-name="Standard">Questa guida spiega come creare un file JSON per importare qualunque file CSV nella raccolta dei movimenti crypto. Il JSON descrive:</text:p>
      <text:p text:style-name="P1"><text:span text:style-name="T226">• </text:span>dove si trovano i dati nel CSV;</text:p>
      <text:p text:style-name="P1"><text:span text:style-name="T226">• </text:span>come interpretarli (date, segni, causali);</text:p>
      <text:p text:style-name="P1"><text:span text:style-name="T226">• </text:span>come trasformarli (rinomina monete, pulizia nomi, wallet).</text:p>
      <text:p text:style-name="Standard">Ogni proprieta ha un valore predefinito. Se non la inserisci nel JSON, viene usato il default indicato.</text:p>
      <text:p text:style-name="Standard"/>
      <text:p text:style-name="Heading_20_1">Struttura generale</text:p>
      <text:p text:style-name="P2">{</text:p>
      <text:p text:style-name="P2">"nomeExchange": "...",</text:p>
      <text:p text:style-name="P2">"nomeWallet": "...",</text:p>
      <text:p text:style-name="P2">"testing": false,</text:p>
      <text:p text:style-name="P2">"separatore": ",",</text:p>
      <text:p text:style-name="P2">"encoding": "UTF-8",</text:p>
      <text:p text:style-name="P2">"righeIntestazione": 1,</text:p>
      <text:p text:style-name="P2">"rigaIntestazione": 1,</text:p>
      <text:p text:style-name="P2">"autoDetectColonne": false,</text:p>
      <text:p text:style-name="P2">"mappaAutoDetect": { ... },</text:p>
      <text:p text:style-name="P2">"formatoData": "yyyy-MM-dd HH:mm:ss",</text:p>
      <text:p text:style-name="P2">"fuso": "UTC",</text:p>
      <text:p text:style-name="P2">"consolidaRigheStessaData": false,</text:p>
      <text:p text:style-name="P2">"tolleranzaSecondiConsolidamento": 2,</text:p>
      <text:p text:style-name="P2">"causaliDifferite": [],</text:p>
      <text:p text:style-name="P2">"colonne": { ... },</text:p>
      <text:p text:style-name="P2">"mappaCausali": { ... },</text:p>
      <text:p text:style-name="P2">"causaliChiuse": [ ... ],</text:p>
      <text:p text:style-name="P2">"causaliUscita": [ ... ],</text:p>
      <text:p text:style-name="P2">"causaliEntrata": [ ... ],</text:p>
      <text:p text:style-name="P2">"ricostruisciLordoSeFeeSuMonetaUscita": false,</text:p>
      <text:p text:style-name="P2">"ricostruisciLordoSeFeeSuMonetaEntrata": false,</text:p>
      <text:p text:style-name="P2">"rimuoviCaseSensitive": false,</text:p>
      <text:p text:style-name="P2">"rimuoviDaNomeMoneta": [ ... ],</text:p>
      <text:p text:style-name="P2">"rinominaMonete": { ... },</text:p>
      <text:p text:style-name="P2">"walletPerCausale": { ... },</text:p>
      <text:p text:style-name="P2">"campiExtra": { ... },</text:p>
      <text:p text:style-name="P2">"centralizzato": false,</text:p>
      <text:p text:style-name="P2">"separatoreCausale": ".",</text:p>
      <text:p text:style-name="P2">"causaliUppercase": false</text:p>
      <text:p text:style-name="P2">}</text:p>
      <text:p text:style-name="Standard"/>
      <text:p text:style-name="Heading_20_1"/>
      <text:p text:style-name="P3">1. Intestazione</text:p>
      <text:p text:style-name="P4">nomeExchange</text:p>
      <text:p text:style-name="Standard"><text:span text:style-name="T227">Tipo:</text:span> stringa | <text:span text:style-name="T227">Default:</text:span> "" (stringa vuota)</text:p>
      <text:p text:style-name="Standard">Nome dell'exchange o della piattaforma sorgente. Se lasciato vuoto, il programma chiede interattivamente il nome in fase di importazione.</text:p>
      <text:p text:style-name="P2">"nomeExchange": "Binance"</text:p>
      <text:p text:style-name="Standard"/>
      <text:p text:style-name="P4">nomeWallet</text:p>
      <text:p text:style-name="Standard"><text:span text:style-name="T227">Tipo:</text:span> stringa | <text:span text:style-name="T227">Default:</text:span> "Principale"</text:p>
      <text:p text:style-name="Standard">Nome del wallet di destinazione. Puo essere sovrascritto causale per causale tramite walletPerCausale.</text:p>
      <text:p text:style-name="P2">"nomeWallet": "Spot"</text:p>
      <text:p text:style-name="Standard"/>
      <text:p text:style-name="P4">testing</text:p>
      <text:p text:style-name="Standard"><text:span text:style-name="T227">Tipo:</text:span> booleano | <text:span text:style-name="T227">Default:</text:span> false</text:p>
      <text:p text:style-name="Standard">Se true, <text:span text:style-name="T228">segnala in fase di importazione che il file di configurazione è in fase di test e l’importazione potrebbe non essere affi</text:span>.</text:p>
      <text:p text:style-name="P2">"testing": true</text:p>
      <text:p text:style-name="Standard"/>
      <text:p text:style-name="Heading_20_1">2. Struttura fisica del CSV</text:p>
      <text:p text:style-name="P4">separatore</text:p>
      <text:p text:style-name="Standard"><text:span text:style-name="T227">Tipo:</text:span> stringa | <text:span text:style-name="T227">Default:</text:span> ","</text:p>
      <text:p text:style-name="Standard">Carattere che divide le colonne nel CSV.</text:p>
      <table:table table:name="T1" table:style-name="T1">
        <table:table-column table:style-name="T1.A"/>
        <table:table-column table:style-name="T1.B"/>
        <table:table-row>
          <table:table-cell table:style-name="T1.A1" office:value-type="string">
            <text:p text:style-name="Table_20_Heading">Valore</text:p>
          </table:table-cell>
          <table:table-cell table:style-name="T1.A1" office:value-type="string">
            <text:p text:style-name="Table_20_Heading">Quando usarlo</text:p>
          </table:table-cell>
        </table:table-row>
        <table:table-row>
          <table:table-cell table:style-name="T1.A1" office:value-type="string">
            <text:p text:style-name="Table_20_Contents">","</text:p>
          </table:table-cell>
          <table:table-cell table:style-name="T1.A1" office:value-type="string">
            <text:p text:style-name="Table_20_Contents">Standard internazionale, default.</text:p>
          </table:table-cell>
        </table:table-row>
        <table:table-row>
          <table:table-cell table:style-name="T1.A1" office:value-type="string">
            <text:p text:style-name="Table_20_Contents">";"</text:p>
          </table:table-cell>
          <table:table-cell table:style-name="T1.A1" office:value-type="string">
            <text:p text:style-name="Table_20_Contents">Export da Excel con impostazioni europee.</text:p>
          </table:table-cell>
        </table:table-row>
        <table:table-row>
          <table:table-cell table:style-name="T1.A1" office:value-type="string">
            <text:p text:style-name="Table_20_Contents">"\t"</text:p>
          </table:table-cell>
          <table:table-cell table:style-name="T1.A1" office:value-type="string">
            <text:p text:style-name="Table_20_Contents">File TSV (tab-separated).</text:p>
          </table:table-cell>
        </table:table-row>
        <table:table-row>
          <table:table-cell table:style-name="T1.A1" office:value-type="string">
            <text:p text:style-name="Table_20_Contents">"\|"</text:p>
          </table:table-cell>
          <table:table-cell table:style-name="T1.A1" office:value-type="string">
            <text:p text:style-name="Table_20_Contents">Caso raro, usato da alcuni exchange.</text:p>
          </table:table-cell>
        </table:table-row>
      </table:table>
      <text:p text:style-name="P2">"separatore": ";"</text:p>
      <text:p text:style-name="Standard"/>
      <text:p text:style-name="P4">encoding</text:p>
      <text:p text:style-name="Standard"><text:span text:style-name="T227">Tipo:</text:span> stringa | <text:span text:style-name="T227">Default:</text:span> "UTF-8"</text:p>
      <text:p text:style-name="Standard">Usa "UTF-8" nella maggior parte dei casi. Se i caratteri speciali risultano corrotti, prova "ISO-8859-1" oppure "Windows-1252".</text:p>
      <text:p text:style-name="Standard"><text:soft-page-break/></text:p>
      <text:p text:style-name="P4">righeIntestazione</text:p>
      <text:p text:style-name="Standard"><text:span text:style-name="T227">Tipo:</text:span> numero intero | <text:span text:style-name="T227">Default:</text:span> 1</text:p>
      <text:p text:style-name="Standard">Quante righe iniziali del CSV vanno saltate prima dei dati. Se il CSV non ha intestazione, imposta 0.</text:p>
      <text:p text:style-name="Standard"/>
      <text:p text:style-name="P4">rigaIntestazione</text:p>
      <text:p text:style-name="Standard"><text:span text:style-name="T227">Tipo:</text:span> numero intero | <text:span text:style-name="T227">Default:</text:span> 1</text:p>
      <text:p text:style-name="Standard">Quale riga (indice 1-based) contiene i nomi delle colonne. Usata solo se autoDetectColonne e true.</text:p>
      <text:p text:style-name="Standard"/>
      <text:p text:style-name="Heading_20_2"><text:span text:style-name="T229">autoDetectColonne</text:span> e <text:span text:style-name="T229">mappaAutoDetect</text:span></text:p>
      <text:p text:style-name="Standard"><text:span text:style-name="T227">autoDetectColonne</text:span> | <text:span text:style-name="T227">Tipo:</text:span> booleano | <text:span text:style-name="T227">Default:</text:span> false</text:p>
      <text:p text:style-name="Standard">Se true, legge i nomi delle colonne dalla riga di intestazione e assegna automaticamente gli indici tramite mappaAutoDetect.</text:p>
      <text:p text:style-name="Standard"><text:span text:style-name="T227">mappaAutoDetect</text:span> | <text:span text:style-name="T227">Tipo:</text:span> oggetto chiave-valore</text:p>
      <text:p text:style-name="Standard">Mappa il nome dell'intestazione CSV al nome del campo logico. Valori validi: data, causale, moneta, quantita, segno, valoreEuro, prezzo, monetaFee, quantitaFee, idTransazione, wallet.</text:p>
      <text:p text:style-name="P2">"autoDetectColonne": true,</text:p>
      <text:p text:style-name="P2">"mappaAutoDetect": {</text:p>
      <text:p text:style-name="P2">"Timestamp": "data",</text:p>
      <text:p text:style-name="P2">"Type": "causale",</text:p>
      <text:p text:style-name="P2">"Asset": "moneta",</text:p>
      <text:p text:style-name="P2">"Amount": "quantita",</text:p>
      <text:p text:style-name="P2">"Fee Amount": "quantitaFee",</text:p>
      <text:p text:style-name="P2">"Fee Asset": "monetaFee",</text:p>
      <text:p text:style-name="P2">"TxID": "idTransazione"</text:p>
      <text:p text:style-name="P2">}</text:p>
      <text:p text:style-name="Standard"/>
      <text:p text:style-name="P4">formatoData</text:p>
      <text:p text:style-name="Standard"><text:span text:style-name="T227">Tipo:</text:span> stringa | <text:span text:style-name="T227">Default:</text:span> "yyyy-MM-dd HH:mm:ss"</text:p>
      <text:p text:style-name="Standard">Formato della data/ora nel CSV, con i token Java di DateTimeFormatter.</text:p>
      <table:table table:name="T2" table:style-name="T2">
        <table:table-column table:style-name="T2.A"/>
        <table:table-column table:style-name="T2.B"/>
        <table:table-column table:style-name="T2.C"/>
        <table:table-row>
          <table:table-cell table:style-name="T2.A1" office:value-type="string">
            <text:p text:style-name="Table_20_Heading">Token</text:p>
          </table:table-cell>
          <table:table-cell table:style-name="T2.A1" office:value-type="string">
            <text:p text:style-name="Table_20_Heading">Significato</text:p>
          </table:table-cell>
          <table:table-cell table:style-name="T2.A1" office:value-type="string">
            <text:p text:style-name="Table_20_Heading">Esempio</text:p>
          </table:table-cell>
        </table:table-row>
        <table:table-row>
          <table:table-cell table:style-name="T2.A1" office:value-type="string">
            <text:p text:style-name="Table_20_Contents">yyyy</text:p>
          </table:table-cell>
          <table:table-cell table:style-name="T2.A1" office:value-type="string">
            <text:p text:style-name="Table_20_Contents">Anno a 4 cifre</text:p>
          </table:table-cell>
          <table:table-cell table:style-name="T2.A1" office:value-type="string">
            <text:p text:style-name="Table_20_Contents">2025</text:p>
          </table:table-cell>
        </table:table-row>
        <table:table-row>
          <table:table-cell table:style-name="T2.A1" office:value-type="string">
            <text:p text:style-name="Table_20_Contents">yy</text:p>
          </table:table-cell>
          <table:table-cell table:style-name="T2.A1" office:value-type="string">
            <text:p text:style-name="Table_20_Contents">Anno a 2 cifre</text:p>
          </table:table-cell>
          <table:table-cell table:style-name="T2.A1" office:value-type="string">
            <text:p text:style-name="Table_20_Contents">25</text:p>
          </table:table-cell>
        </table:table-row>
        <table:table-row>
          <table:table-cell table:style-name="T2.A1" office:value-type="string">
            <text:p text:style-name="Table_20_Contents">MM</text:p>
          </table:table-cell>
          <table:table-cell table:style-name="T2.A1" office:value-type="string">
            <text:p text:style-name="Table_20_Contents">Mese a 2 cifre</text:p>
          </table:table-cell>
          <table:table-cell table:style-name="T2.A1" office:value-type="string">
            <text:p text:style-name="Table_20_Contents">06</text:p>
          </table:table-cell>
        </table:table-row>
        <table:table-row>
          <table:table-cell table:style-name="T2.A1" office:value-type="string">
            <text:p text:style-name="Table_20_Contents">dd</text:p>
          </table:table-cell>
          <table:table-cell table:style-name="T2.A1" office:value-type="string">
            <text:p text:style-name="Table_20_Contents">Giorno a 2 cifre</text:p>
          </table:table-cell>
          <table:table-cell table:style-name="T2.A1" office:value-type="string">
            <text:p text:style-name="Table_20_Contents">17</text:p>
          </table:table-cell>
        </table:table-row>
        <table:table-row>
          <table:table-cell table:style-name="T2.A1" office:value-type="string">
            <text:p text:style-name="Table_20_Contents">HH</text:p>
          </table:table-cell>
          <table:table-cell table:style-name="T2.A1" office:value-type="string">
            <text:p text:style-name="Table_20_Contents">Ora 0-23</text:p>
          </table:table-cell>
          <table:table-cell table:style-name="T2.A1" office:value-type="string">
            <text:p text:style-name="Table_20_Contents">18</text:p>
          </table:table-cell>
        </table:table-row>
        <table:table-row>
          <table:table-cell table:style-name="T2.A1" office:value-type="string">
            <text:p text:style-name="Table_20_Contents">mm</text:p>
          </table:table-cell>
          <table:table-cell table:style-name="T2.A1" office:value-type="string">
            <text:p text:style-name="Table_20_Contents">Minuti</text:p>
          </table:table-cell>
          <table:table-cell table:style-name="T2.A1" office:value-type="string">
            <text:p text:style-name="Table_20_Contents">39</text:p>
          </table:table-cell>
        </table:table-row>
        <table:table-row>
          <table:table-cell table:style-name="T2.A1" office:value-type="string">
            <text:p text:style-name="Table_20_Contents">ss</text:p>
          </table:table-cell>
          <table:table-cell table:style-name="T2.A1" office:value-type="string">
            <text:p text:style-name="Table_20_Contents">Secondi</text:p>
          </table:table-cell>
          <table:table-cell table:style-name="T2.A1" office:value-type="string">
            <text:p text:style-name="Table_20_Contents">10</text:p>
          </table:table-cell>
        </table:table-row>
      </table:table>
      <text:p text:style-name="P2"><text:soft-page-break/>"formatoData": "dd.MM.yyyy HH:mm:ss"</text:p>
      <text:p text:style-name="P2">"formatoData": "MM/dd/yy HH:mm"</text:p>
      <text:p text:style-name="Standard"/>
      <text:p text:style-name="P4">fuso</text:p>
      <text:p text:style-name="Standard"><text:span text:style-name="T227">Tipo:</text:span> stringa | <text:span text:style-name="T227">Default:</text:span> "UTC"</text:p>
      <text:p text:style-name="Standard">Fuso orario delle date nel CSV. Vengono convertite nel fuso locale dell'app.</text:p>
      <text:p text:style-name="P2">"fuso": "UTC"</text:p>
      <text:p text:style-name="P2">"fuso": "Europe/Rome"</text:p>
      <text:p text:style-name="P2">"fuso": "UTC+2"</text:p>
      <text:p text:style-name="Standard"/>
      <text:p text:style-name="Heading_20_1">3. Colonne del CSV</text:p>
      <text:p text:style-name="Standard">Mappa i campi logici agli indici numerici delle colonne del CSV, contando da 0. Usa -1 per indicare che una colonna non e presente.</text:p>
      <text:p text:style-name="P2">"colonne": {</text:p>
      <text:p text:style-name="P2">"data": 0,</text:p>
      <text:p text:style-name="P2">"causale": 1,</text:p>
      <text:p text:style-name="P2">"moneta": 2,</text:p>
      <text:p text:style-name="P2">"quantita": 3,</text:p>
      <text:p text:style-name="P2">"segno": -1,</text:p>
      <text:p text:style-name="P2">"valoreEuro": -1,</text:p>
      <text:p text:style-name="P2">"prezzo": -1,</text:p>
      <text:p text:style-name="P2">"monetaFee": -1,</text:p>
      <text:p text:style-name="P2">"quantitaFee": -1,</text:p>
      <text:p text:style-name="P2">"idTransazione": -1,</text:p>
      <text:p text:style-name="P2">"wallet": -1,</text:p>
      <text:p text:style-name="P2">"monetaUscita": -1,</text:p>
      <text:p text:style-name="P2">"quantitaUscita":-1,</text:p>
      <text:p text:style-name="P2">"causale2": -1,</text:p>
      <text:p text:style-name="P2">"causale3": -1</text:p>
      <text:p text:style-name="P2">}</text:p>
      <text:p text:style-name="Standard"/>
      <text:p text:style-name="Heading_20_2">Come trovare l'indice di una colonna</text:p>
      <text:p text:style-name="Standard">Apri il CSV, guarda la riga di intestazione e conta le colonne partendo da 0.</text:p>
      <text:p text:style-name="P2">"Timestamp","Tipo","Asset","Quantita","Valore EUR"</text:p>
      <text:p text:style-name="P2">0 1 2 3 4 </text:p>
      <text:p text:style-name="Standard">Quindi: "data": 0, "causale": 1, "moneta": 2 e cosi via.</text:p>
      <text:p text:style-name="Standard"/>
      <text:p text:style-name="Heading_20_2">Campi disponibili</text:p>
      <table:table table:name="T3" table:style-name="T3">
        <table:table-column table:style-name="T3.A"/>
        <table:table-column table:style-name="T3.B"/>
        <table:table-row>
          <table:table-cell table:style-name="T3.A1" office:value-type="string">
            <text:p text:style-name="Table_20_Heading">Campo</text:p>
          </table:table-cell>
          <table:table-cell table:style-name="T3.A1" office:value-type="string">
            <text:p text:style-name="Table_20_Heading">Descrizione</text:p>
          </table:table-cell>
        </table:table-row>
        <table:table-row>
          <table:table-cell table:style-name="T3.A1" office:value-type="string">
            <text:p text:style-name="Table_20_Contents">data</text:p>
          </table:table-cell>
          <table:table-cell table:style-name="T3.A1" office:value-type="string">
            <text:p text:style-name="Table_20_Contents">Obbligatorio - data e ora del movimento.</text:p>
          </table:table-cell>
        </table:table-row>
        <table:table-row>
          <table:table-cell table:style-name="T3.A1" office:value-type="string">
            <text:p text:style-name="Table_20_Contents">causale</text:p>
          </table:table-cell>
          <table:table-cell table:style-name="T3.A1" office:value-type="string">
            <text:p text:style-name="Table_20_Contents">Tipo di operazione nel CSV (Deposit, Trade, Staking...).</text:p>
          </table:table-cell>
        </table:table-row>
        <table:table-row>
          <table:table-cell table:style-name="T3.A1" office:value-type="string">
            <text:p text:style-name="Table_20_Contents">moneta</text:p>
          </table:table-cell>
          <table:table-cell table:style-name="T3.A1" office:value-type="string">
            <text:p text:style-name="Table_20_Contents">Simbolo del token (BTC, ETH...).</text:p>
          </table:table-cell>
        </table:table-row>
        <text:soft-page-break/>
        <table:table-row>
          <table:table-cell table:style-name="T3.A1" office:value-type="string">
            <text:p text:style-name="Table_20_Contents">quantita</text:p>
          </table:table-cell>
          <table:table-cell table:style-name="T3.A1" office:value-type="string">
            <text:p text:style-name="Table_20_Contents">Quantita del movimento (negativa=uscita, positiva=entrata).</text:p>
          </table:table-cell>
        </table:table-row>
        <table:table-row>
          <table:table-cell table:style-name="T3.A1" office:value-type="string">
            <text:p text:style-name="Table_20_Contents">segno</text:p>
          </table:table-cell>
          <table:table-cell table:style-name="T3.A1" office:value-type="string">
            <text:p text:style-name="Table_20_Contents">Colonna separata che indica il segno (+ o -).</text:p>
          </table:table-cell>
        </table:table-row>
        <table:table-row>
          <table:table-cell table:style-name="T3.A1" office:value-type="string">
            <text:p text:style-name="Table_20_Contents">valoreEuro</text:p>
          </table:table-cell>
          <table:table-cell table:style-name="T3.A1" office:value-type="string">
            <text:p text:style-name="Table_20_Contents">Controvalore in euro gia calcolato nel CSV.</text:p>
          </table:table-cell>
        </table:table-row>
        <table:table-row>
          <table:table-cell table:style-name="T3.A1" office:value-type="string">
            <text:p text:style-name="Table_20_Contents">prezzo</text:p>
          </table:table-cell>
          <table:table-cell table:style-name="T3.A1" office:value-type="string">
            <text:p text:style-name="Table_20_Contents">Prezzo unitario del token al momento dell'operazione.</text:p>
          </table:table-cell>
        </table:table-row>
        <table:table-row>
          <table:table-cell table:style-name="T3.A1" office:value-type="string">
            <text:p text:style-name="Table_20_Contents">monetaFee</text:p>
          </table:table-cell>
          <table:table-cell table:style-name="T3.A1" office:value-type="string">
            <text:p text:style-name="Table_20_Contents">Simbolo della moneta usata per la commissione.</text:p>
          </table:table-cell>
        </table:table-row>
        <table:table-row>
          <table:table-cell table:style-name="T3.A1" office:value-type="string">
            <text:p text:style-name="Table_20_Contents">quantitaFee</text:p>
          </table:table-cell>
          <table:table-cell table:style-name="T3.A1" office:value-type="string">
            <text:p text:style-name="Table_20_Contents">Quantita della commissione pagata.</text:p>
          </table:table-cell>
        </table:table-row>
        <table:table-row>
          <table:table-cell table:style-name="T3.A1" office:value-type="string">
            <text:p text:style-name="Table_20_Contents">idTransazione</text:p>
          </table:table-cell>
          <table:table-cell table:style-name="T3.A1" office:value-type="string">
            <text:p text:style-name="Table_20_Contents">ID univoco per raggruppare righe correlate dello stesso trade.</text:p>
          </table:table-cell>
        </table:table-row>
        <table:table-row>
          <table:table-cell table:style-name="T3.A1" office:value-type="string">
            <text:p text:style-name="Table_20_Contents">wallet</text:p>
          </table:table-cell>
          <table:table-cell table:style-name="T3.A1" office:value-type="string">
            <text:p text:style-name="Table_20_Contents">Nome del wallet, se variabile riga per riga.</text:p>
          </table:table-cell>
        </table:table-row>
        <table:table-row>
          <table:table-cell table:style-name="T3.A1" office:value-type="string">
            <text:p text:style-name="Table_20_Contents">monetaUscita</text:p>
          </table:table-cell>
          <table:table-cell table:style-name="T3.A1" office:value-type="string">
            <text:p text:style-name="Table_20_Contents">Moneta in uscita (CSV con entrata e uscita sulla stessa riga).</text:p>
          </table:table-cell>
        </table:table-row>
        <table:table-row>
          <table:table-cell table:style-name="T3.A1" office:value-type="string">
            <text:p text:style-name="Table_20_Contents">quantitaUscita</text:p>
          </table:table-cell>
          <table:table-cell table:style-name="T3.A1" office:value-type="string">
            <text:p text:style-name="Table_20_Contents">Quantita in uscita (CSV con entrata e uscita sulla stessa riga).</text:p>
          </table:table-cell>
        </table:table-row>
      </table:table>
      <text:p text:style-name="Standard"/>
      <text:p text:style-name="Heading_20_2">Causale composita: <text:span text:style-name="T229">causale2</text:span>, <text:span text:style-name="T229">causale3</text:span>, <text:span text:style-name="T229">separatoreCausale</text:span>, <text:span text:style-name="T229">causaliUppercase</text:span></text:p>
      <text:p text:style-name="Standard">Alcuni CSV distribuiscono il tipo di operazione su piu colonne. Si possono combinare fino a 3 colonne in una causale composita concatenate da separatoreCausale.</text:p>
      <table:table table:name="T4" table:style-name="T4">
        <table:table-column table:style-name="T4.A"/>
        <table:table-column table:style-name="T4.B"/>
        <table:table-column table:style-name="T4.C"/>
        <table:table-row>
          <table:table-cell table:style-name="T4.A1" office:value-type="string">
            <text:p text:style-name="Table_20_Heading">Parametro</text:p>
          </table:table-cell>
          <table:table-cell table:style-name="T4.A1" office:value-type="string">
            <text:p text:style-name="Table_20_Heading">Default</text:p>
          </table:table-cell>
          <table:table-cell table:style-name="T4.A1" office:value-type="string">
            <text:p text:style-name="Table_20_Heading">Descrizione</text:p>
          </table:table-cell>
        </table:table-row>
        <table:table-row>
          <table:table-cell table:style-name="T4.A1" office:value-type="string">
            <text:p text:style-name="Table_20_Contents">causale2 (in colonne)</text:p>
          </table:table-cell>
          <table:table-cell table:style-name="T4.A1" office:value-type="string">
            <text:p text:style-name="Table_20_Contents">-1</text:p>
          </table:table-cell>
          <table:table-cell table:style-name="T4.A1" office:value-type="string">
            <text:p text:style-name="Table_20_Contents">Indice della seconda colonna causale.</text:p>
          </table:table-cell>
        </table:table-row>
        <table:table-row>
          <table:table-cell table:style-name="T4.A1" office:value-type="string">
            <text:p text:style-name="Table_20_Contents">causale3 (in colonne)</text:p>
          </table:table-cell>
          <table:table-cell table:style-name="T4.A1" office:value-type="string">
            <text:p text:style-name="Table_20_Contents">-1</text:p>
          </table:table-cell>
          <table:table-cell table:style-name="T4.A1" office:value-type="string">
            <text:p text:style-name="Table_20_Contents">Indice della terza colonna causale.</text:p>
          </table:table-cell>
        </table:table-row>
        <table:table-row>
          <table:table-cell table:style-name="T4.A1" office:value-type="string">
            <text:p text:style-name="Table_20_Contents">separatoreCausale</text:p>
          </table:table-cell>
          <table:table-cell table:style-name="T4.A1" office:value-type="string">
            <text:p text:style-name="Table_20_Contents">"."</text:p>
          </table:table-cell>
          <table:table-cell table:style-name="T4.A1" office:value-type="string">
            <text:p text:style-name="Table_20_Contents">Carattere di giunzione tra le parti.</text:p>
          </table:table-cell>
        </table:table-row>
        <table:table-row>
          <table:table-cell table:style-name="T4.A1" office:value-type="string">
            <text:p text:style-name="Table_20_Contents">causaliUppercase</text:p>
          </table:table-cell>
          <table:table-cell table:style-name="T4.A1" office:value-type="string">
            <text:p text:style-name="Table_20_Contents">false</text:p>
          </table:table-cell>
          <table:table-cell table:style-name="T4.A1" office:value-type="string">
            <text:p text:style-name="Table_20_Contents">Se true converte ogni parte in maiuscolo prima di concatenare.</text:p>
          </table:table-cell>
        </table:table-row>
      </table:table>
      <text:p text:style-name="Standard">Esempio: causale=1 ("Trade"), causale2=2 ("Buy"), separatoreCausale="." produce la chiave "Trade.Buy" da usare in mappaCausali.</text:p>
      <text:p text:style-name="P2">"colonne": { "causale": 1, "causale2": 2 },</text:p>
      <text:p text:style-name="P2">"separatoreCausale": ".",</text:p>
      <text:p text:style-name="P2">"mappaCausali": { "Trade.Buy": "SCAMBIO CRYPTO-CRYPTO" }</text:p>
      <text:p text:style-name="Standard"/>
      <text:p text:style-name="Heading_20_2">Entrata e uscita sulla stessa riga</text:p>
      <text:p text:style-name="Standard">Alcuni CSV (es. Koinly, CoinTracking) riportano l'intero scambio su una sola riga. In quel caso moneta/quantita = lato entrata, monetaUscita/quantitaUscita = lato uscita.</text:p>
      <text:p text:style-name="P2">"colonne": {</text:p>
      <text:p text:style-name="P2"><text:soft-page-break/>"data": 8, "causale": 0,</text:p>
      <text:p text:style-name="P2">"moneta": 2, "quantita": 1,</text:p>
      <text:p text:style-name="P2">"monetaUscita": 4, "quantitaUscita": 3,</text:p>
      <text:p text:style-name="P2">"monetaFee": 6, "quantitaFee": 5</text:p>
      <text:p text:style-name="P2">}</text:p>
      <text:p text:style-name="Standard"/>
      <text:p text:style-name="Heading_20_1">4. Mappatura delle causali</text:p>
      <text:p text:style-name="P4">mappaCausali</text:p>
      <text:p text:style-name="Standard"><text:span text:style-name="T227">Tipo:</text:span> oggetto chiave-valore</text:p>
      <text:p text:style-name="Standard">Traduce le causali originali del CSV nelle tipologie interne dell'applicazione. Ogni causale deve avere una voce qui, altrimenti la riga viene scartata. La ricerca <text:span text:style-name="T230">è</text:span> case insensitive per default.</text:p>
      <text:p text:style-name="P2">"mappaCausali": {</text:p>
      <text:p text:style-name="P2">"Deposit": "DEPOSITO-CRYPTO",</text:p>
      <text:p text:style-name="P2">"Withdrawal": "PRELIEVO-CRYPTO",</text:p>
      <text:p text:style-name="P2">"Trade": "SCAMBIO CRYPTO-CRYPTO",</text:p>
      <text:p text:style-name="P2">"Staking Rewards": "STAKING REWARDS",</text:p>
      <text:p text:style-name="P2">"Commission": "COMMISSIONI",</text:p>
      <text:p text:style-name="P5"><text:span text:style-name="T230">"earn":"EARN",</text:span></text:p>
      <text:p text:style-name="P5"><text:span text:style-name="T230">"cashback":"CASHBACK"</text:span></text:p>
      <text:p text:style-name="P2">}</text:p>
      <text:p text:style-name="Standard">Per ignorare righe senza contarle come scarti, mappa su "IGNORA":</text:p>
      <text:p text:style-name="P2">"mappaCausali": { "Internal Transfer": "IGNORA" }</text:p>
      <text:p text:style-name="Standard"/>
      <text:p text:style-name="P4">causaliChiuse</text:p>
      <text:p text:style-name="Standard"><text:span text:style-name="T227">Tipo:</text:span> array di stringhe (tipologie interne)</text:p>
      <text:p text:style-name="Standard">Tipologie interne che devono essere trattate come movimenti singoli anche se condividono l'ID transazione con altre righe. Usa per staking, cashback, commissioni, depositi e prelievi.</text:p>
      <text:p text:style-name="P2">"causaliChiuse": [</text:p>
      <text:p text:style-name="P2">"DEPOSITO-CRYPTO","PRELIEVO-CRYPTO",</text:p>
      <text:p text:style-name="P2">"STAKING REWARDS","CASHBACK","COMMISSIONI"</text:p>
      <text:p text:style-name="P2">]</text:p>
      <text:p text:style-name="Standard"/>
      <text:p text:style-name="Heading_20_1">5. Gestione del segno</text:p>
      <text:p text:style-name="Standard">Per default il segno viene letto dalla quantita (negativa=uscita, positiva=entrata). Se la quantita e sempre positiva e il verso si deduce dalla causale, usa causaliUscita e causaliEntrata.</text:p>
      <text:p text:style-name="P4">causaliUscita</text:p>
      <text:p text:style-name="Standard"><text:span text:style-name="T227">Tipo:</text:span> array di causali CSV originali</text:p>
      <text:p text:style-name="Standard">Le righe con queste causali avranno la quantita forzata negativa.</text:p>
      <text:p text:style-name="P2">"causaliUscita": ["Withdrawal","Trade Sell","Fee"]</text:p>
      <text:p text:style-name="Standard"/>
      <text:p text:style-name="P4">causaliEntrata</text:p>
      <text:p text:style-name="Standard"><text:soft-page-break/><text:span text:style-name="T227">Tipo:</text:span> array di causali CSV originali</text:p>
      <text:p text:style-name="Standard">Le righe con queste causali avranno la quantita forzata positiva.</text:p>
      <text:p text:style-name="P2">"causaliEntrata": ["Deposit","Trade Buy","Staking Rewards","Cashback"]</text:p>
      <text:p text:style-name="Standard"/>
      <text:p text:style-name="Heading_20_3">Esempio pratico</text:p>
      <text:p text:style-name="P2">"Data","Tipo","Moneta","Quantita"</text:p>
      <text:p text:style-name="P2">"2025-01-15","Deposito","BTC","0.5"</text:p>
      <text:p text:style-name="P2">"2025-01-16","Prelievo","ETH","1.2"</text:p>
      <text:p text:style-name="P2">"causaliUscita": ["Prelievo"],</text:p>
      <text:p text:style-name="P2">"causaliEntrata": ["Deposito","Staking","Cashback"]</text:p>
      <text:p text:style-name="Standard"/>
      <text:p text:style-name="Heading_20_1">6. Consolidamento righe correlate</text:p>
      <text:p text:style-name="Standard">Alcuni exchange suddividono una singola operazione in piu righe CSV (es. riga per moneta venduta + riga per moneta acquistata). Le opzioni seguenti permettono di raggrupparle.</text:p>
      <text:p text:style-name="P4">consolidaRigheStessaData</text:p>
      <text:p text:style-name="Standard"><text:span text:style-name="T227">Tipo:</text:span> booleano | <text:span text:style-name="T227">Default:</text:span> false</text:p>
      <text:p text:style-name="P1"><text:span text:style-name="T226">• </text:span>false: ogni riga e un movimento indipendente.</text:p>
      <text:p text:style-name="P1"><text:span text:style-name="T226">• </text:span>true: le righe con stesso ID transazione o timestamp vicino vengono raggruppate.</text:p>
      <text:p text:style-name="P2">"consolidaRigheStessaData": true</text:p>
      <text:p text:style-name="Standard"/>
      <text:p text:style-name="P4">tolleranzaSecondiConsolidamento</text:p>
      <text:p text:style-name="Standard"><text:span text:style-name="T227">Tipo:</text:span> numero intero | <text:span text:style-name="T227">Default:</text:span> 2</text:p>
      <text:p text:style-name="Standard">Usato solo se consolidaRigheStessaData e true. Quanti secondi di differenza sono tollerati tra due righe perche vengano considerate parte della stessa operazione.</text:p>
      <text:p text:style-name="P2">"tolleranzaSecondiConsolidamento": 5</text:p>
      <text:p text:style-name="Standard"/>
      <text:p text:style-name="P4">causaliDifferite</text:p>
      <text:p text:style-name="Standard"><text:span text:style-name="T227">Tipo:</text:span> array di causali CSV originali</text:p>
      <text:p text:style-name="Standard">Se specificato, la tolleranza temporale viene applicata solo ai gruppi che contengono almeno una riga con queste causali; per le altre viene richiesto timestamp identico.</text:p>
      <text:p text:style-name="P2">"causaliDifferite": ["Trade","Swap"]</text:p>
      <text:p text:style-name="Standard"/>
      <text:p text:style-name="Heading_20_2"><text:span text:style-name="T229">idTransazione</text:span> (nella sezione colonne)</text:p>
      <text:p text:style-name="Standard">Se il CSV ha una colonna con un ID univoco per transazione, indicarla consente di raggruppare righe anche se i timestamp differiscono oltre la tolleranza.</text:p>
      <text:p text:style-name="P2">"colonne": { "idTransazione": 5 }</text:p>
      <text:p text:style-name="Standard"/>
      <text:p text:style-name="Heading_20_1"><text:soft-page-break/>7. Gestione commissioni</text:p>
      <text:p text:style-name="P4">ricostruisciLordoSeFeeSuMonetaUscita</text:p>
      <text:p text:style-name="Standard"><text:span text:style-name="T227">Tipo:</text:span> booleano | <text:span text:style-name="T227">Default:</text:span> false</text:p>
      <text:p text:style-name="Standard">Controlla se, quando la commissione e nella stessa moneta dell'uscita, il sistema deve ricostruire il lordo del movimento principale.</text:p>
      <text:p text:style-name="P1"><text:span text:style-name="T226">• </text:span>true: ricostruisce il lordo e genera anche il movimento commissione separato.</text:p>
      <text:p text:style-name="P1"><text:span text:style-name="T226">• </text:span>false: non modifica il movimento principale, genera solo il movimento commissione.</text:p>
      <text:p text:style-name="Standard">Esempio: uscita -500 USDC e fee 1 USDC. Con true: movimento principale -499 USDC + movimento commissione -1 USDC. Usalo quando la quantita nel CSV e gia comprensiva della fee (riga unica).</text:p>
      <text:p text:style-name="P2">"ricostruisciLordoSeFeeSuMonetaUscita": true</text:p>
      <text:p text:style-name="Standard"/>
      <text:p text:style-name="P4">ricostruisciLordoSeFeeSuMonetaEntrata</text:p>
      <text:p text:style-name="Standard"><text:span text:style-name="T227">Tipo:</text:span> booleano | <text:span text:style-name="T227">Default:</text:span> false</text:p>
      <text:p text:style-name="Standard">Controlla se, quando la commissione e nella stessa moneta dell'entrata, il sistema deve ricostruire il lordo del movimento principale.</text:p>
      <text:p text:style-name="P1"><text:span text:style-name="T226">• </text:span>true: ricostruisce il lordo e genera anche il movimento commissione separato.</text:p>
      <text:p text:style-name="P1"><text:span text:style-name="T226">• </text:span>false: non modifica il movimento principale, genera solo il movimento commissione.</text:p>
      <text:p text:style-name="Standard">Esempio: entrata 500 USDC e fee 1 USDC. Con true: movimento principale 501 USDC + movimento commissione -1 USDC. Usalo quando la quantita nel CSV e al netto della fee (riga unica).</text:p>
      <text:p text:style-name="P2">"ricostruisciLordoSeFeeSuMonetaEntrata": true</text:p>
      <text:p text:style-name="Standard"/>
      <text:p text:style-name="Heading_20_1">8. Pulizia e normalizzazione nomi moneta</text:p>
      <text:p text:style-name="P4">rimuoviDaNomeMoneta</text:p>
      <text:p text:style-name="Standard"><text:span text:style-name="T227">Tipo:</text:span> array di stringhe</text:p>
      <text:p text:style-name="Standard">Rimuove testi indesiderati dal nome del token. Supporta la sintassi ? per troncare tutto cio che viene dopo o prima.</text:p>
      <table:table table:name="T5" table:style-name="T5">
        <table:table-column table:style-name="T5.A"/>
        <table:table-column table:style-name="T5.B"/>
        <table:table-column table:style-name="T5.C"/>
        <table:table-row>
          <table:table-cell table:style-name="T5.A1" office:value-type="string">
            <text:p text:style-name="Table_20_Heading">Sintassi</text:p>
          </table:table-cell>
          <table:table-cell table:style-name="T5.A1" office:value-type="string">
            <text:p text:style-name="Table_20_Heading">Effetto su BTC.STAKING@CRYPTO.COM</text:p>
          </table:table-cell>
          <table:table-cell table:style-name="T5.A1" office:value-type="string">
            <text:p text:style-name="Table_20_Heading">Risultato</text:p>
          </table:table-cell>
        </table:table-row>
        <table:table-row>
          <table:table-cell table:style-name="T5.A1" office:value-type="string">
            <text:p text:style-name="Table_20_Contents">.STAKING?</text:p>
          </table:table-cell>
          <table:table-cell table:style-name="T5.A1" office:value-type="string">
            <text:p text:style-name="Table_20_Contents">Rimuove .STAKING e tutto quello che segue</text:p>
          </table:table-cell>
          <table:table-cell table:style-name="T5.A1" office:value-type="string">
            <text:p text:style-name="Table_20_Contents">BTC</text:p>
          </table:table-cell>
        </table:table-row>
        <table:table-row>
          <table:table-cell table:style-name="T5.A1" office:value-type="string">
            <text:p text:style-name="Table_20_Contents">?.STAKING</text:p>
          </table:table-cell>
          <table:table-cell table:style-name="T5.A1" office:value-type="string">
            <text:p text:style-name="Table_20_Contents">Rimuove .STAKING e tutto quello che precede</text:p>
          </table:table-cell>
          <table:table-cell table:style-name="T5.A1" office:value-type="string">
            <text:p text:style-name="Table_20_Contents">@CRYPTO.COM</text:p>
          </table:table-cell>
        </table:table-row>
        <table:table-row>
          <table:table-cell table:style-name="T5.A1" office:value-type="string">
            <text:p text:style-name="Table_20_Contents">.STAKING</text:p>
          </table:table-cell>
          <table:table-cell table:style-name="T5.A1" office:value-type="string">
            <text:p text:style-name="Table_20_Contents">Rimuove solo la parola esatta</text:p>
          </table:table-cell>
          <table:table-cell table:style-name="T5.A1" office:value-type="string">
            <text:p text:style-name="Table_20_Contents">BTC@CRYPTO.COM</text:p>
          </table:table-cell>
        </table:table-row>
      </table:table>
      <text:p text:style-name="Standard">Le regole vengono applicate in sequenza. Prima quelle piu ampie (con ?).</text:p>
      <text:p text:style-name="P2">"rimuoviDaNomeMoneta": [".STAKING?",".EARN?",".LOCKED?","@CRYPTO.COM"]</text:p>
      <text:p text:style-name="Standard"/>
      <text:p text:style-name="P4">rimuoviCaseSensitive</text:p>
      <text:p text:style-name="Standard"><text:soft-page-break/><text:span text:style-name="T227">Tipo:</text:span> booleano | <text:span text:style-name="T227">Default:</text:span> false</text:p>
      <text:p text:style-name="P1"><text:span text:style-name="T226">• </text:span>false: la ricerca ignora maiuscole e minuscole.</text:p>
      <text:p text:style-name="P1"><text:span text:style-name="T226">• </text:span>true: la ricerca e case sensitive esatta.</text:p>
      <text:p text:style-name="Standard"/>
      <text:p text:style-name="P4">rinominaMonete</text:p>
      <text:p text:style-name="Standard"><text:span text:style-name="T227">Tipo:</text:span> oggetto chiave-valore</text:p>
      <text:p text:style-name="Standard">Rinomina un simbolo moneta. La rinomina avviene dopo la pulizia con rimuoviDaNomeMoneta.</text:p>
      <text:p text:style-name="P2">"rinominaMonete": { "IOTA": "MIOTA", "LUNA2": "LUNA", "WBTC": "BTC" }</text:p>
      <text:p text:style-name="Standard"/>
      <text:p text:style-name="Heading_20_1">9. Wallet per causale</text:p>
      <text:p text:style-name="P4">walletPerCausale</text:p>
      <text:p text:style-name="Standard"><text:span text:style-name="T227">Tipo:</text:span> oggetto chiave-valore</text:p>
      <text:p text:style-name="Standard">Permette di assegnare un wallet diverso da nomeWallet per specifiche causali. La chiave e la causale originale del CSV.</text:p>
      <text:p text:style-name="P2">"walletPerCausale": {</text:p>
      <text:p text:style-name="P2">"Staking Rewards": "Staking", "Earn": "Earn", "Lockup": "Locked"</text:p>
      <text:p text:style-name="P2">}</text:p>
      <text:p text:style-name="Standard"/>
      <text:p text:style-name="Heading_20_1">10. Campi extra</text:p>
      <text:p text:style-name="P4">campiExtra</text:p>
      <text:p text:style-name="Standard"><text:span text:style-name="T227">Tipo:</text:span> oggetto indiceMovimento -&gt; indiceColonnaCSV</text:p>
      <text:p text:style-name="Standard">Copia il contenuto di una colonna CSV in un campo specifico del movimento. Funzione avanzata e raramente necessaria.</text:p>
      <text:p text:style-name="P2">"campiExtra": { "7": 9 }</text:p>
      <text:p text:style-name="Standard"/>
      <text:p text:style-name="Heading_20_1">11. Centralizzato</text:p>
      <text:p text:style-name="P4">centralizzato</text:p>
      <text:p text:style-name="Standard"><text:span text:style-name="T227">Tipo:</text:span> booleano | <text:span text:style-name="T227">Default:</text:span> false</text:p>
      <text:p text:style-name="Standard">Indica che questo file e gestito centralmente dal repository ufficiale. All'avvio del programma, quando vengono controllati i file di configurazione da GitHub, se un file locale ha centralizzato: true e non e piu presente nel repository, viene automaticamente eliminato.</text:p>
      <text:p text:style-name="Standard">I file creati localmente dall'utente non devono avere centralizzato: true, altrimenti potrebbero essere cancellati involontariamente.</text:p>
      <text:p text:style-name="P2">"centralizzato": true</text:p>
      <text:p text:style-name="Standard"/>
      <text:p text:style-name="Heading_20_1"><text:soft-page-break/>Esempi completi</text:p>
      <text:p text:style-name="Heading_20_2">Esempio 1: Binance Spot - righe separate per ogni lato dello scambio</text:p>
      <text:p text:style-name="Heading_20_3">CSV</text:p>
      <text:p text:style-name="P2">"Date(UTC)","OrderNo","Pair","Type","Filled","Total","Fee","Fee Coin"</text:p>
      <text:p text:style-name="P2">"2025-03-10 14:22:01","123456","BTCUSDT","BUY","0.01 BTC","620.50 USDT","0.00001","BTC"</text:p>
      <text:p text:style-name="P2">"2025-03-10 14:22:01","123456","BTCUSDT","SELL","620.50 USDT","","0.62","USDT"</text:p>
      <text:p text:style-name="Heading_20_3">JSON</text:p>
      <text:p text:style-name="P2">{</text:p>
      <text:p text:style-name="P2">"nomeExchange": "Binance", "nomeWallet": "Principale",</text:p>
      <text:p text:style-name="P2">"separatore": ",", "formatoData": "yyyy-MM-dd HH:mm:ss", "fuso": "UTC",</text:p>
      <text:p text:style-name="P2">"consolidaRigheStessaData": true, "tolleranzaSecondiConsolidamento": 2,</text:p>
      <text:p text:style-name="P2">"colonne": {</text:p>
      <text:p text:style-name="P2">"data": 0, "idTransazione": 1, "causale": 3,</text:p>
      <text:p text:style-name="P2">"moneta": 2, "quantita": 4, "quantitaFee": 6, "monetaFee": 7</text:p>
      <text:p text:style-name="P2">},</text:p>
      <text:p text:style-name="P2">"mappaCausali": { "BUY": "SCAMBIO CRYPTO-CRYPTO", "SELL": "SCAMBIO CRYPTO-CRYPTO" }</text:p>
      <text:p text:style-name="P2">}</text:p>
      <text:p text:style-name="Standard"/>
      <text:p text:style-name="Heading_20_2">Esempio 2: Riga singola per movimento - es. <text:span text:style-name="T228">Tatax</text:span></text:p>
      <text:p text:style-name="Heading_20_3">CSV</text:p>
      <text:p text:style-name="P2">"Data","Tipo","Asset","Quantita"</text:p>
      <text:p text:style-name="P2">"2025-09-15 10:00:00","Deposito","BTC","0.5"</text:p>
      <text:p text:style-name="P2">"2025-09-16 11:30:00","Staking","BTC.STAKING@CRYPTO.COM","0.0001"</text:p>
      <text:p text:style-name="P2">"2025-09-17 09:00:00","Prelievo","ETH","0.1"</text:p>
      <text:p text:style-name="Heading_20_3">JSON</text:p>
      <text:p text:style-name="P2">{</text:p>
      <text:p text:style-name="P2">"nomeExchange": "Crypto.com", "nomeWallet": "Principale",</text:p>
      <text:p text:style-name="P2">"separatore": ",", "formatoData": "yyyy-MM-dd HH:mm:ss", "fuso": "UTC",</text:p>
      <text:p text:style-name="P2">"consolidaRigheStessaData": false,</text:p>
      <text:p text:style-name="P2">"colonne": { "data": 0, "causale": 1, "moneta": 2, "quantita": 3 },</text:p>
      <text:p text:style-name="P2">"mappaCausali": {</text:p>
      <text:p text:style-name="P2">"Deposito": "DEPOSITO-CRYPTO", "Prelievo": "PRELIEVO-CRYPTO",</text:p>
      <text:p text:style-name="P2">"Staking": "STAKING REWARDS"</text:p>
      <text:p text:style-name="P2">},</text:p>
      <text:p text:style-name="P2">"causaliChiuse": ["DEPOSITO-CRYPTO","PRELIEVO-CRYPTO","STAKING REWARDS"],</text:p>
      <text:p text:style-name="P2">"causaliEntrata": ["Deposito","Staking"],</text:p>
      <text:p text:style-name="P2">"causaliUscita": ["Prelievo"],</text:p>
      <text:p text:style-name="P2">"rimuoviDaNomeMoneta": [".STAKING?",".EARN?","@CRYPTO.COM"],</text:p>
      <text:p text:style-name="P2">"rimuoviCaseSensitive": false</text:p>
      <text:p text:style-name="P2">}</text:p>
      <text:p text:style-name="Standard"/>
      <text:p text:style-name="Heading_20_2"><text:soft-page-break/>Esempio 3: Scambio su riga singola - es. CoinTracking</text:p>
      <text:p text:style-name="Heading_20_3">CSV</text:p>
      <text:p text:style-name="P2">"Tipo","Acquisto","Cur.","Vendita","Cur.","Fee","Cur.Fee","Exchange","Data"</text:p>
      <text:p text:style-name="P2">"Operazione","2132","CRO","487.04","USDC","1.18","USDC","Crypto.com","17.09.2025 18:39:10"</text:p>
      <text:p text:style-name="P2">"Deposito","89.4","CRO","","","","","Crypto.com","28.08.2025 07:38:42"</text:p>
      <text:p text:style-name="P2">"Prelievo","","","24.32","USDC","","","Crypto.com","03.09.2025 18:11:09"</text:p>
      <text:p text:style-name="Heading_20_3">JSON</text:p>
      <text:p text:style-name="P2">{</text:p>
      <text:p text:style-name="P2">"nomeExchange": "Crypto.com Exchange", "nomeWallet": "Principale",</text:p>
      <text:p text:style-name="P2">"separatore": ",", "formatoData": "dd.MM.yyyy HH:mm:ss", "fuso": "UTC",</text:p>
      <text:p text:style-name="P2">"colonne": {</text:p>
      <text:p text:style-name="P2">"data": 8, "causale": 0, "moneta": 2, "quantita": 1,</text:p>
      <text:p text:style-name="P2">"monetaUscita": 4, "quantitaUscita": 3, "quantitaFee": 5, "monetaFee": 6</text:p>
      <text:p text:style-name="P2">},</text:p>
      <text:p text:style-name="P2">"mappaCausali": {</text:p>
      <text:p text:style-name="P2">"Deposito": "DEPOSITO-CRYPTO", "Prelievo": "PRELIEVO-CRYPTO",</text:p>
      <text:p text:style-name="P2">"Operazione": "SCAMBIO CRYPTO-CRYPTO"</text:p>
      <text:p text:style-name="P2">},</text:p>
      <text:p text:style-name="P2">"ricostruisciLordoSeFeeSuMonetaUscita": false,</text:p>
      <text:p text:style-name="P2">"ricostruisciLordoSeFeeSuMonetaEntrata": true</text:p>
      <text:p text:style-name="P2">}</text:p>
      <text:p text:style-name="Standard"/>
      <text:p text:style-name="Heading_20_2">Esempio 4: Causale composita su piu colonne</text:p>
      <text:p text:style-name="Heading_20_3">CSV</text:p>
      <text:p text:style-name="P2">"Date","Category","SubType","Amount","Currency"</text:p>
      <text:p text:style-name="P2">"2025-01-10","Trade","Buy","0.005","BTC"</text:p>
      <text:p text:style-name="P2">"2025-01-10","Trade","Sell","200","USDT"</text:p>
      <text:p text:style-name="P2">"2025-01-11","Earn","Staking","0.0001","ETH"</text:p>
      <text:p text:style-name="Heading_20_3">JSON</text:p>
      <text:p text:style-name="P2">{</text:p>
      <text:p text:style-name="P2">"nomeExchange": "Exchange XYZ", "separatore": ",",</text:p>
      <text:p text:style-name="P2">"formatoData": "yyyy-MM-dd", "fuso": "UTC",</text:p>
      <text:p text:style-name="P2">"consolidaRigheStessaData": true,</text:p>
      <text:p text:style-name="P2">"colonne": { "data": 0, "moneta": 4, "quantita": 3, "causale": 1, "causale2": 2 },</text:p>
      <text:p text:style-name="P2">"separatoreCausale": ".", "causaliUppercase": false,</text:p>
      <text:p text:style-name="P2">"mappaCausali": {</text:p>
      <text:p text:style-name="P2">"Trade.Buy": "SCAMBIO CRYPTO-CRYPTO",</text:p>
      <text:p text:style-name="P2">"Trade.Sell": "SCAMBIO CRYPTO-CRYPTO",</text:p>
      <text:p text:style-name="P2">"Earn.Staking": "STAKING REWARDS"</text:p>
      <text:p text:style-name="P2">},</text:p>
      <text:p text:style-name="P2">"causaliChiuse": ["STAKING REWARDS"],</text:p>
      <text:p text:style-name="P2">"causaliEntrata": [], "causaliUscita": []</text:p>
      <text:p text:style-name="P2">}</text:p>
      <text:p text:style-name="Standard"/>
      <text:p text:style-name="Heading_20_1"><text:soft-page-break/>Checklist rapida</text:p>
      <text:p text:style-name="P1"><text:span text:style-name="T226">• </text:span>Apri il CSV e conta le colonne partendo da 0.</text:p>
      <text:p text:style-name="P1"><text:span text:style-name="T226">• </text:span>Identifica data, causale, moneta e quantita; compila la sezione colonne.</text:p>
      <text:p text:style-name="P1"><text:span text:style-name="T226">• </text:span>Elenca tutte le causali presenti nel CSV e compila mappaCausali.</text:p>
      <text:p text:style-name="P1"><text:span text:style-name="T226">• </text:span>Se le quantita sono sempre positive, compila causaliUscita e causaliEntrata.</text:p>
      <text:p text:style-name="P1"><text:span text:style-name="T226">• </text:span>Se ogni riga e un movimento indipendente usa consolidaRigheStessaData: false; se piu righe appartengono allo stesso trade usa true.</text:p>
      <text:p text:style-name="P1"><text:span text:style-name="T226">• </text:span>Se i nomi moneta contengono suffissi, compila rimuoviDaNomeMoneta.</text:p>
      <text:p text:style-name="P1"><text:span text:style-name="T226">• </text:span>Se ci sono commissioni, mappa monetaFee e quantitaFee; se la quantita e gia comprensiva della fee abilita il flag ricostruisciLordo appropriato.</text:p>
      <text:p text:style-name="P1"><text:span text:style-name="T226">• </text:span>Se alcuni movimenti devono andare su wallet separati, compila walletPerCausale.</text:p>
      <text:p text:style-name="P1"><text:span text:style-name="T226">• </text:span>Se le intestazioni CSV variano versione per versione, usa autoDetectColonne con mappaAutoDetect.</text:p>
      <text:p text:style-name="P1"><text:span text:style-name="T226">• </text:span>Se il tipo di operazione e su piu colonne, usa causale2/causale3 con separatoreCausale.</text:p>
      <text:p text:style-name="Standard"/>
      <text:p text:style-name="Heading_20_1">Dove mettere il file</text:p>
      <text:p text:style-name="Standard">Nella root del programma si trova una cartella ImportConfig. I file JSON di configurazione vanno posizionati in quella cartella: una volta presenti, compariranno nella lista di importazione con il prefisso [JSON].</text:p>
      <text:p text:style-name="Standard">I file creati personalmente dall'utente vanno lasciati senza centralizzato (o con centralizzato: false): non verranno mai eliminati automaticamente dall'aggiornamento dal repository remot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enlo" svg:font-family="Menlo"/>
    <style:font-face style:name="OpenSymbol" svg:font-family="Open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1" fo:font-size="10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Liberation Serif" fo:font-family="'Liberation Serif'" fo:font-size="12pt" fo:language="it" fo:country="IT" style:font-name-complex="Liberation Serif" style:font-family-complex="'Liberation Serif'" style:font-size-complex="12pt" style:language-complex="hi" style:country-complex="IN"/>
    </style:style>
    <style:style style:name="Normal" style:family="paragraph"/>
    <style:style style:name="Heading" style:family="paragraph" style:parent-style-name="Standard" style:class="chapter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Normal" style:class="chapter">
      <style:paragraph-properties fo:margin-top="0.282cm" fo:margin-bottom="0.141c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false" fo:line-height="100%"/>
      <style:text-properties style:font-name="Arial" fo:font-family="Arial" fo:font-size="28pt" fo:letter-spacing="-0.018c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026cm" style:font-size-complex="14pt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0.776cm" fo:margin-right="0cm" fo:margin-top="0cm" fo:margin-bottom="0.176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164cm" fo:margin-right="0cm" fo:margin-top="0cm" fo:margin-bottom="0.176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1.552cm" fo:margin-right="0cm" fo:margin-top="0cm" fo:margin-bottom="0.176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1.94cm" fo:margin-right="0cm" fo:margin-top="0cm" fo:margin-bottom="0.176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2.328cm" fo:margin-right="0cm" fo:margin-top="0cm" fo:margin-bottom="0.176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2.716cm" fo:margin-right="0cm" fo:margin-top="0cm" fo:margin-bottom="0.176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3.104cm" fo:margin-right="0cm" fo:margin-top="0cm" fo:margin-bottom="0.176cm" style:contextual-spacing="false" fo:text-indent="0c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size-complex="12pt"/>
    </style:style>
    <style:style style:name="Index" style:family="paragraph" style:parent-style-name="Standard" style:class="index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language="it" fo:country="IT" fo:font-weight="bold"/>
    </style:style>
    <style:style style:name="Heading_20_1" style:display-name="Heading 1" style:family="paragraph" style:parent-style-name="Heading" style:class="chapter">
      <style:paragraph-properties fo:margin-top="0.423cm" fo:margin-bottom="0.212cm" style:contextual-spacing="false"/>
      <style:text-properties fo:font-size="18pt" fo:font-weight="bold" style:font-size-complex="18pt"/>
    </style:style>
    <style:style style:name="Heading_20_2" style:display-name="Heading 2" style:family="paragraph" style:parent-style-name="Heading" style:class="chapter">
      <style:paragraph-properties fo:margin-top="0.353cm" fo:margin-bottom="0.212cm" style:contextual-spacing="false"/>
      <style:text-properties fo:font-size="16pt" fo:font-weight="bold" style:font-size-complex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2.0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-3" style:family="paragraph">
      <style:paragraph-properties fo:margin-left="0cm" fo:margin-right="0cm" fo:margin-top="0.635cm" fo:margin-bottom="0.141cm" style:contextual-spacing="true" fo:line-height="100%" fo:text-align="start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en" fo:country="US" fo:font-style="normal" style:text-underline-style="none" fo:font-weight="normal" style:font-name-asian="Arial" style:font-family-asian="Arial" style:font-name-complex="Times New Roman" style:font-family-complex="'Times New Roman'" style:font-size-complex="12pt" style:language-complex="ar" style:country-complex="SA" text:display="none"/>
    </style:style>
    <style:style style:name="text-5" style:family="paragraph">
      <style:paragraph-properties fo:margin-left="0cm" fo:margin-right="0cm" fo:margin-top="0cm" fo:margin-bottom="0.265cm" style:contextual-spacing="true" fo:line-height="100%" fo:text-align="start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0pt" fo:letter-spacing="normal" fo:language="en" fo:country="US" fo:font-style="normal" style:text-underline-style="none" fo:font-weight="normal" style:font-name-asian="Times New Roman" style:font-family-asian="'Times New Roman'" style:font-name-complex="Times New Roman" style:font-family-complex="'Times New Roman'" style:font-size-complex="10pt" style:language-complex="ar" style:country-complex="SA" text:display="none"/>
    </style:style>
    <style:style style:name="text-8" style:family="paragraph">
      <style:paragraph-properties fo:margin-left="1.27cm" fo:margin-right="0cm" fo:margin-top="0cm" fo:margin-bottom="0.265cm" style:contextual-spacing="true" fo:line-height="100%" fo:text-align="start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en" fo:country="US" fo:font-style="normal" style:text-underline-style="none" fo:font-weight="normal" style:font-name-asian="Arial" style:font-family-asian="Arial" style:font-name-complex="Times New Roman" style:font-family-complex="'Times New Roman'" style:font-size-complex="12pt" style:language-complex="ar" style:country-complex="SA" text:display="none"/>
    </style:style>
    <style:style style:name="text-13" style:family="paragraph">
      <style:paragraph-properties fo:margin-left="0cm" fo:margin-right="0cm" fo:margin-top="0.282cm" fo:margin-bottom="0.141cm" style:contextual-spacing="true" fo:line-height="100%" fo:text-align="start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en" fo:country="US" fo:font-style="normal" style:text-underline-style="none" fo:font-weight="normal" style:font-name-asian="Arial" style:font-family-asian="Arial" style:font-name-complex="Times New Roman" style:font-family-complex="'Times New Roman'" style:font-size-complex="12pt" style:language-complex="ar" style:country-complex="SA" text:display="none"/>
    </style:style>
    <style:style style:name="text-16" style:family="paragraph">
      <loext:graphic-properties draw:fill="solid" draw:fill-color="#f8f8f8" draw:opacity="100%"/>
      <style:paragraph-properties fo:margin-left="0cm" fo:margin-right="0cm" fo:margin-top="0cm" fo:margin-bottom="0.265cm" style:contextual-spacing="true" style:line-height-at-least="0.002cm" fo:text-align="start" style:justify-single-word="false" fo:text-indent="0cm" style:auto-text-indent="false" fo:background-color="#f8f8f8" fo:padding="0cm" fo:border="0.26pt solid #ffffff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0pt" fo:letter-spacing="normal" fo:language="en" fo:country="US" fo:font-style="normal" style:text-underline-style="none" fo:font-weight="normal" style:font-name-asian="Times New Roman" style:font-family-asian="'Times New Roman'" style:font-name-complex="Times New Roman" style:font-family-complex="'Times New Roman'" style:font-size-complex="10pt" style:language-complex="ar" style:country-complex="SA" text:display="none"/>
    </style:style>
    <style:style style:name="text-20" style:family="paragraph">
      <loext:graphic-properties draw:fill="solid" draw:fill-color="#f9f2f4" draw:opacity="100%"/>
      <style:paragraph-properties fo:margin-left="0cm" fo:margin-right="0cm" fo:margin-top="0.282cm" fo:margin-bottom="0.141cm" style:contextual-spacing="true" fo:line-height="100%" fo:text-align="start" style:justify-single-word="false" fo:text-indent="0cm" style:auto-text-indent="false" fo:background-color="#f9f2f4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0pt" fo:letter-spacing="normal" fo:language="en" fo:country="US" fo:font-style="normal" style:text-underline-style="none" fo:font-weight="normal" style:font-name-asian="Times New Roman" style:font-family-asian="'Times New Roman'" style:font-name-complex="Times New Roman" style:font-family-complex="'Times New Roman'" style:font-size-complex="10pt" style:language-complex="ar" style:country-complex="SA" text:display="none"/>
    </style:style>
    <style:style style:name="text-22" style:family="paragraph">
      <style:paragraph-properties fo:margin-left="0cm" fo:margin-right="0cm" fo:margin-top="0cm" fo:margin-bottom="0.265cm" style:contextual-spacing="true" fo:line-height="100%" fo:text-align="start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0pt" fo:letter-spacing="normal" fo:language="en" fo:country="US" fo:font-style="normal" style:text-underline-style="none" fo:font-weight="normal" style:font-name-asian="Times New Roman" style:font-family-asian="'Times New Roman'" style:font-name-complex="Times New Roman" style:font-family-complex="'Times New Roman'" style:font-size-complex="10pt" style:language-complex="ar" style:country-complex="SA" text:display="none"/>
    </style:style>
    <style:style style:name="text-58" style:family="paragraph">
      <style:paragraph-properties fo:margin-left="0cm" fo:margin-right="0cm" fo:margin-top="0cm" fo:margin-bottom="0.529cm" style:contextual-spacing="true" fo:line-height="100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0pt" fo:letter-spacing="normal" fo:language="en" fo:country="US" fo:font-style="normal" style:text-underline-style="none" fo:font-weight="normal" style:font-name-asian="Times New Roman" style:font-family-asian="'Times New Roman'" style:font-name-complex="Times New Roman" style:font-family-complex="'Times New Roman'" style:font-size-complex="10pt" style:language-complex="ar" style:country-complex="SA" text:display="none"/>
    </style:style>
    <style:style style:name="text-64" style:family="paragraph">
      <style:paragraph-properties fo:margin-left="0cm" fo:margin-right="0cm" fo:margin-top="0cm" fo:margin-bottom="0.529cm" style:contextual-spacing="true" style:line-height-at-least="0.002cm" fo:text-align="start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0pt" fo:letter-spacing="normal" fo:language="en" fo:country="US" fo:font-style="normal" style:text-underline-style="none" fo:font-weight="normal" style:font-name-asian="Times New Roman" style:font-family-asian="'Times New Roman'" style:font-name-complex="Times New Roman" style:font-family-complex="'Times New Roman'" style:font-size-complex="10pt" style:language-complex="ar" style:country-complex="SA" text:display="none"/>
    </style:style>
    <style:style style:name="text-65" style:family="paragraph">
      <style:paragraph-properties fo:margin-left="0cm" fo:margin-right="0cm" fo:margin-top="0cm" fo:margin-bottom="0.529cm" style:contextual-spacing="true" style:line-height-at-least="0.002cm" fo:text-align="start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0pt" fo:letter-spacing="normal" fo:language="en" fo:country="US" fo:font-style="normal" style:text-underline-style="none" fo:font-weight="normal" style:font-name-asian="Times New Roman" style:font-family-asian="'Times New Roman'" style:font-name-complex="Times New Roman" style:font-family-complex="'Times New Roman'" style:font-size-complex="10pt" style:language-complex="ar" style:country-complex="SA" text:display="none"/>
    </style:style>
    <style:style style:name="text-186" style:family="paragraph">
      <style:paragraph-properties fo:margin-left="0cm" fo:margin-right="0cm" fo:margin-top="0.282cm" fo:margin-bottom="0.141cm" style:contextual-spacing="true" fo:line-height="100%" fo:text-align="start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en" fo:country="US" fo:font-style="normal" style:text-underline-style="none" fo:font-weight="normal" style:font-name-asian="Arial" style:font-family-asian="Arial" style:font-name-complex="Times New Roman" style:font-family-complex="'Times New Roman'" style:font-size-complex="12pt" style:language-complex="ar" style:country-complex="SA" text:display="none"/>
    </style:style>
    <style:style style:name="text-247" style:family="paragraph">
      <loext:graphic-properties draw:fill="solid" draw:fill-color="#f9f2f4" draw:opacity="100%"/>
      <style:paragraph-properties fo:margin-left="0cm" fo:margin-right="0cm" fo:margin-top="0cm" fo:margin-bottom="0.265cm" style:contextual-spacing="true" fo:line-height="100%" fo:text-align="start" style:justify-single-word="false" fo:text-indent="0cm" style:auto-text-indent="false" fo:background-color="#f9f2f4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0pt" fo:letter-spacing="normal" fo:language="en" fo:country="US" fo:font-style="normal" style:text-underline-style="none" fo:font-weight="normal" style:font-name-asian="Times New Roman" style:font-family-asian="'Times New Roman'" style:font-name-complex="Times New Roman" style:font-family-complex="'Times New Roman'" style:font-size-complex="10pt" style:language-complex="ar" style:country-complex="SA" text:display="none"/>
    </style:style>
    <style:style style:name="text-483" style:family="paragraph">
      <style:paragraph-properties fo:margin-left="1.27cm" fo:margin-right="0cm" fo:margin-top="0.176cm" fo:margin-bottom="0.176cm" style:contextual-spacing="true" fo:line-height="100%" fo:text-align="start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en" fo:country="US" fo:font-style="normal" style:text-underline-style="none" fo:font-weight="normal" style:font-name-asian="Arial" style:font-family-asian="Arial" style:font-name-complex="Times New Roman" style:font-family-complex="'Times New Roman'" style:font-size-complex="12pt" style:language-complex="ar" style:country-complex="SA" text:display="none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Numbering_20_Symbols" style:display-name="Numbering Symbols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>
      <style:text-properties style:font-name="Courier New" fo:font-family="'Courier New'" style:font-name-complex="Courier New" style:font-family-complex="'Courier New'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Symbol" fo:font-family="Symbol" style:font-name-complex="Symbol" style:font-family-complex="Symbol"/>
    </style:style>
    <style:style style:name="T149" style:family="text">
      <style:text-properties style:font-name="Courier New" fo:font-family="'Courier New'" style:font-name-complex="Courier New" style:font-family-complex="'Courier New'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Symbol" fo:font-family="Symbol" style:font-name-complex="Symbol" style:font-family-complex="Symbol"/>
    </style:style>
    <style:style style:name="T152" style:family="text">
      <style:text-properties style:font-name="Courier New" fo:font-family="'Courier New'" style:font-name-complex="Courier New" style:font-family-complex="'Courier New'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Symbol" fo:font-family="Symbol" style:font-name-complex="Symbol" style:font-family-complex="Symbol"/>
    </style:style>
    <style:style style:name="T155" style:family="text">
      <style:text-properties style:font-name="Courier New" fo:font-family="'Courier New'" style:font-name-complex="Courier New" style:font-family-complex="'Courier New'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Symbol" fo:font-family="Symbol" style:font-name-complex="Symbol" style:font-family-complex="Symbol"/>
    </style:style>
    <style:style style:name="T158" style:family="text">
      <style:text-properties style:font-name="Courier New" fo:font-family="'Courier New'" style:font-name-complex="Courier New" style:font-family-complex="'Courier New'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Symbol" fo:font-family="Symbol" style:font-name-complex="Symbol" style:font-family-complex="Symbol"/>
    </style:style>
    <style:style style:name="T161" style:family="text">
      <style:text-properties style:font-name="Courier New" fo:font-family="'Courier New'" style:font-name-complex="Courier New" style:font-family-complex="'Courier New'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Symbol" fo:font-family="Symbol" fo:font-weight="bold" style:font-name-complex="Symbol" style:font-family-complex="Symbol"/>
    </style:style>
    <style:style style:name="T164" style:family="text">
      <style:text-properties style:font-name="Symbol" fo:font-family="Symbol" style:font-name-complex="Symbol" style:font-family-complex="Symbol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Symbol" fo:font-family="Symbol" style:font-name-complex="Symbol" style:font-family-complex="Symbol"/>
    </style:style>
    <style:style style:name="T167" style:family="text">
      <style:text-properties style:font-name="Courier New" fo:font-family="'Courier New'" style:font-name-complex="Courier New" style:font-family-complex="'Courier New'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Symbol" fo:font-family="Symbol" style:font-name-complex="Symbol" style:font-family-complex="Symbol"/>
    </style:style>
    <style:style style:name="T170" style:family="text">
      <style:text-properties style:font-name="Courier New" fo:font-family="'Courier New'" style:font-name-complex="Courier New" style:font-family-complex="'Courier New'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Symbol" fo:font-family="Symbol" style:font-name-complex="Symbol" style:font-family-complex="Symbol"/>
    </style:style>
    <style:style style:name="T173" style:family="text">
      <style:text-properties style:font-name="Courier New" fo:font-family="'Courier New'" style:font-name-complex="Courier New" style:font-family-complex="'Courier New'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Symbol" fo:font-family="Symbol" style:font-name-complex="Symbol" style:font-family-complex="Symbol"/>
    </style:style>
    <style:style style:name="T176" style:family="text">
      <style:text-properties style:font-name="Courier New" fo:font-family="'Courier New'" style:font-name-complex="Courier New" style:font-family-complex="'Courier New'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Symbol" fo:font-family="Symbol" style:font-name-complex="Symbol" style:font-family-complex="Symbol"/>
    </style:style>
    <style:style style:name="T179" style:family="text">
      <style:text-properties style:font-name="Courier New" fo:font-family="'Courier New'" style:font-name-complex="Courier New" style:font-family-complex="'Courier New'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>
      <style:text-properties style:font-name="Symbol" fo:font-family="Symbol" style:font-name-complex="Symbol" style:font-family-complex="Symbol"/>
    </style:style>
    <style:style style:name="T182" style:family="text"/>
    <style:style style:name="T183" style:family="text">
      <style:text-properties style:font-name="Wingdings" fo:font-family="Wingdings" style:font-name-complex="Wingdings" style:font-family-complex="Wingdings"/>
    </style:style>
    <style:style style:name="T184" style:family="text">
      <style:text-properties style:font-name="Symbol" fo:font-family="Symbol" style:font-name-complex="Symbol" style:font-family-complex="Symbol"/>
    </style:style>
    <style:style style:name="T185" style:family="text">
      <style:text-properties style:font-name="Courier New" fo:font-family="'Courier New'" style:font-name-complex="Courier New" style:font-family-complex="'Courier New'"/>
    </style:style>
    <style:style style:name="T186" style:family="text">
      <style:text-properties style:font-name="Wingdings" fo:font-family="Wingdings" style:font-name-complex="Wingdings" style:font-family-complex="Wingdings"/>
    </style:style>
    <style:style style:name="T187" style:family="text">
      <style:text-properties style:font-name="Symbol" fo:font-family="Symbol" style:font-name-complex="Symbol" style:font-family-complex="Symbol"/>
    </style:style>
    <style:style style:name="T188" style:family="text">
      <style:text-properties style:font-name="Courier New" fo:font-family="'Courier New'" style:font-name-complex="Courier New" style:font-family-complex="'Courier New'"/>
    </style:style>
    <style:style style:name="T189" style:family="text">
      <style:text-properties style:font-name="Wingdings" fo:font-family="Wingdings" style:font-name-complex="Wingdings" style:font-family-complex="Wingdings"/>
    </style:style>
    <style:style style:name="T190" style:family="text">
      <style:text-properties style:font-name="Symbol" fo:font-family="Symbol" style:font-name-complex="Symbol" style:font-family-complex="Symbol"/>
    </style:style>
    <style:style style:name="T191" style:family="text"/>
    <style:style style:name="T192" style:family="text">
      <style:text-properties style:font-name="Wingdings" fo:font-family="Wingdings" style:font-name-complex="Wingdings" style:font-family-complex="Wingdings"/>
    </style:style>
    <style:style style:name="T193" style:family="text">
      <style:text-properties style:font-name="Symbol" fo:font-family="Symbol" style:font-name-complex="Symbol" style:font-family-complex="Symbol"/>
    </style:style>
    <style:style style:name="T194" style:family="text">
      <style:text-properties style:font-name="Courier New" fo:font-family="'Courier New'" style:font-name-complex="Courier New" style:font-family-complex="'Courier New'"/>
    </style:style>
    <style:style style:name="T195" style:family="text">
      <style:text-properties style:font-name="Wingdings" fo:font-family="Wingdings" style:font-name-complex="Wingdings" style:font-family-complex="Wingdings"/>
    </style:style>
    <style:style style:name="T196" style:family="text">
      <style:text-properties style:font-name="Symbol" fo:font-family="Symbol" style:font-name-complex="Symbol" style:font-family-complex="Symbol"/>
    </style:style>
    <style:style style:name="T197" style:family="text">
      <style:text-properties style:font-name="Courier New" fo:font-family="'Courier New'" style:font-name-complex="Courier New" style:font-family-complex="'Courier New'"/>
    </style:style>
    <style:style style:name="T198" style:family="text">
      <style:text-properties style:font-name="Wingdings" fo:font-family="Wingdings" style:font-name-complex="Wingdings" style:font-family-complex="Wingdings"/>
    </style:style>
    <style:style style:name="text-3-c" style:family="text">
      <style:text-properties fo:color="#0f4761" loext:opacity="100%" style:font-name="Arial" fo:font-family="Arial" fo:font-size="20pt" fo:font-weight="bold" style:font-name-asian="Arial" style:font-family-asian="Arial" style:font-name-complex="Arial" style:font-family-complex="Arial" style:font-size-complex="20pt"/>
    </style:style>
    <style:style style:name="text-5-c" style:family="text">
      <style:text-properties fo:color="#000000" loext:opacity="100%" style:font-name="Arial" fo:font-family="Arial" style:font-name-asian="Arial" style:font-family-asian="Arial" style:font-name-complex="Arial" style:font-family-complex="Arial"/>
    </style:style>
    <style:style style:name="text-8-c" style:family="text">
      <style:text-properties fo:color="#000000" loext:opacity="100%" style:font-name="Arial" fo:font-family="Arial" style:font-name-asian="Arial" style:font-family-asian="Arial" style:font-name-complex="Arial" style:font-family-complex="Arial"/>
    </style:style>
    <style:style style:name="text-13-c" style:family="text">
      <style:text-properties fo:color="#0f4761" loext:opacity="100%" style:font-name="Arial" fo:font-family="Arial" fo:font-size="16pt" fo:font-weight="bold" style:font-name-asian="Arial" style:font-family-asian="Arial" style:font-name-complex="Arial" style:font-family-complex="Arial" style:font-size-complex="16pt"/>
    </style:style>
    <style:style style:name="text-16-c" style:family="text">
      <style:text-properties fo:color="#000000" loext:opacity="100%" style:font-name="Menlo" fo:font-family="Menlo" fo:font-size="11pt" fo:background-color="#f8f8f8" style:font-name-asian="Menlo" style:font-family-asian="Menlo" style:font-name-complex="Menlo" style:font-family-complex="Menlo" style:font-size-complex="11pt"/>
    </style:style>
    <style:style style:name="text-20-c" style:family="text">
      <style:text-properties fo:color="#c7254e" loext:opacity="100%" style:font-name="Menlo" fo:font-family="Menlo" fo:font-size="12.5pt" fo:background-color="#f9f2f4" style:font-name-asian="Menlo" style:font-family-asian="Menlo" style:font-name-complex="Menlo" style:font-family-complex="Menlo" style:font-size-complex="12.5pt"/>
    </style:style>
    <style:style style:name="text-22-c" style:family="text">
      <style:text-properties fo:color="#000000" loext:opacity="100%" style:font-name="Arial" fo:font-family="Arial" fo:font-weight="bold" style:font-name-asian="Arial" style:font-family-asian="Arial" style:font-name-complex="Arial" style:font-family-complex="Arial"/>
    </style:style>
    <style:style style:name="text-29-c" style:family="text">
      <style:text-properties fo:color="#c7254e" loext:opacity="100%" style:font-name="Menlo" fo:font-family="Menlo" fo:font-size="11pt" fo:background-color="#f9f2f4" style:font-name-asian="Menlo" style:font-family-asian="Menlo" style:font-name-complex="Menlo" style:font-family-complex="Menlo" style:font-size-complex="11pt"/>
    </style:style>
    <style:style style:name="text-58-c" style:family="text">
      <style:text-properties fo:color="#000000" loext:opacity="100%" style:font-name="Arial" fo:font-family="Arial" fo:font-weight="bold" style:font-name-asian="Arial" style:font-family-asian="Arial" style:font-name-complex="Arial" style:font-family-complex="Arial"/>
    </style:style>
    <style:style style:name="text-64-c" style:family="text">
      <style:text-properties fo:color="#c7254e" loext:opacity="100%" style:font-name="Menlo" fo:font-family="Menlo" fo:font-size="11pt" style:font-name-asian="Menlo" style:font-family-asian="Menlo" style:font-name-complex="Menlo" style:font-family-complex="Menlo" style:font-size-complex="11pt"/>
    </style:style>
    <style:style style:name="text-65-c" style:family="text">
      <style:text-properties fo:color="#000000" loext:opacity="100%" style:font-name="Arial" fo:font-family="Arial" style:font-name-asian="Arial" style:font-family-asian="Arial" style:font-name-complex="Arial" style:font-family-complex="Arial"/>
    </style:style>
    <style:style style:name="text-186-c" style:family="text">
      <style:text-properties fo:color="#0f4761" loext:opacity="100%" style:font-name="Arial" fo:font-family="Arial" fo:font-size="14pt" fo:font-weight="bold" style:font-name-asian="Arial" style:font-family-asian="Arial" style:font-name-complex="Arial" style:font-family-complex="Arial" style:font-size-complex="14pt"/>
    </style:style>
    <style:style style:name="text-247-c" style:family="text">
      <style:text-properties fo:color="#c7254e" loext:opacity="100%" style:font-name="Menlo" fo:font-family="Menlo" fo:font-size="11pt" fo:background-color="#f9f2f4" style:font-name-asian="Menlo" style:font-family-asian="Menlo" style:font-name-complex="Menlo" style:font-family-complex="Menlo" style:font-size-complex="11pt"/>
    </style:style>
    <style:style style:name="text-405-c" style:family="text">
      <style:text-properties fo:color="#c7254e" loext:opacity="100%" style:font-name="Menlo" fo:font-family="Menlo" fo:font-size="11pt" fo:font-weight="bold" style:font-name-asian="Menlo" style:font-family-asian="Menlo" style:font-name-complex="Menlo" style:font-family-complex="Menlo" style:font-size-complex="11pt"/>
    </style:style>
    <style:style style:name="text-483-c" style:family="text">
      <style:text-properties fo:color="#000000" loext:opacity="100%" style:font-name="Arial" fo:font-family="Arial" style:font-name-asian="Arial" style:font-family-asian="Arial" style:font-name-complex="Arial" style:font-family-complex="Arial"/>
    </style:style>
    <style:style style:name="text-485-c" style:family="text">
      <style:text-properties fo:color="#c7254e" loext:opacity="100%" style:font-name="Menlo" fo:font-family="Menlo" fo:font-size="11pt" fo:background-color="#f9f2f4" style:font-name-asian="Menlo" style:font-family-asian="Menlo" style:font-name-complex="Menlo" style:font-family-complex="Menlo" style:font-size-complex="11pt"/>
    </style:style>
    <style:style style:name="T19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0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0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0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0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0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0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0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0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12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15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18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T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T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30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33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36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48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51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54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T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T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T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T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T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T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T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66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69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72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T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T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T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T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T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T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T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T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T84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T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T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T87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T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T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T90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T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T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T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T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T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T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T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T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T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102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105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108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T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T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T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T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T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T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T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T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T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120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123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126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T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T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T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T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T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T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T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T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T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138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141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144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T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bullet text:level="2" text:style-name="T146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47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48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9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0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51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52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53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55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56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57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58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9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0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61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62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64" loext:num-list-format="%2%" text:bullet-char="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T165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66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67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68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9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7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71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73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74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75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76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77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78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9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0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T18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number text:level="2" text:style-name="T18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T183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84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8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86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87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8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89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T19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number text:level="2" text:style-name="T19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T192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93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9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95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96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9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98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T199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0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201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202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0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204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05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0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207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20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210" loext:num-list-format="%3%." style:num-suffix="." style:num-format="1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21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213" loext:num-list-format="%6%." style:num-suffix="." style:num-format="1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21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216" loext:num-list-format="%9%." style:num-suffix="." style:num-format="1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218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221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222" loext:num-list-format="%6%." style:num-suffix="." style:num-format="1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224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225" loext:num-list-format="%9%." style:num-suffix="." style:num-format="1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T1" style:family="text">
      <style:text-properties fo:font-size="8pt" fo:language="it" fo:country="IT" fo:font-weight="bold" style:font-size-complex="8pt"/>
    </style:style>
    <style:style style:name="MT2" style:family="text">
      <style:text-properties fo:font-family="'Eras Bold ITC'" fo:font-size="10pt" fo:language="it" fo:country="IT" fo:font-weight="bold" style:font-family-complex="'Eras Bold ITC'" style:font-size-complex="10pt"/>
    </style:style>
    <style:style style:name="MT3" style:family="text">
      <style:text-properties fo:font-size="8pt" fo:language="it" fo:country="IT" fo:font-weight="normal" style:font-size-complex="8pt"/>
    </style:style>
    <style:style style:name="MT4" style:family="text">
      <style:text-properties fo:font-size="8pt" fo:language="it" fo:country="IT" fo:font-weight="normal" officeooo:rsid="0006b779" style:font-size-complex="8pt"/>
    </style:style>
    <style:style style:name="M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opia Immagine13 1" text:anchor-type="as-char" svg:width="0.619cm" svg:height="0.619cm" draw:z-index="11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Esportazione files CSV</text:span><text:span text:style-name="MT1"> </text:span><text:span text:style-name="MT3">(Aggiornato alla versione 1.0.5</text:span><text:span text:style-name="MT4">7</text:span><text:span text:style-name="MT3">)</text:span><text:span text:style-name="MT1"><text:tab/></text:span><text:bookmark-start text:name="Copia Copia PageNumWizard_FOOTER_Stile di pagina predefinito1 4 1"/><text:page-number text:select-page="current">12</text:page-number> / <text:page-count>12</text:page-count><text:bookmark-end text:name="Copia Copia PageNumWizard_FOOTER_Stile di pagina predefinito1 4 1"/></text:p>
      </style:footer>
    </style:master-page>
    <style:master-page style:name="MasterPage2" style:page-layout-name="Mpm1" draw:style-name="Mdp1">
      <style:footer>
        <text:p text:style-name="MP1"><draw:frame draw:style-name="Mfr1" draw:name="Immagine1" text:anchor-type="as-char" svg:width="0.619cm" svg:height="0.619cm" draw:z-index="0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onf. JSON per l'importazione CSV generica</text:span><text:span text:style-name="MT1"> </text:span><text:span text:style-name="MT3">(Agg. alla v. 1.0.56)</text:span><text:span text:style-name="MT1"><text:tab/></text:span><text:bookmark-start text:name="Copia Copia Copia PageNumWizard_FOOTER_Stile di pagina predefinito1 4 1 1"/><text:page-number text:select-page="current">0</text:page-number> / <text:page-count>12</text:page-count><text:bookmark-end text:name="Copia Copia Copia PageNumWizard_FOOTER_Stile di pagina predefinito1 4 1 1"/></text:p>
      </style:footer>
    </style:master-page>
    <style:master-page style:name="MasterPage3" style:page-layout-name="Mpm1" draw:style-name="Mdp1">
      <style:footer>
        <text:p text:style-name="MP1"><draw:frame draw:style-name="Mfr1" draw:name="Immagine2" text:anchor-type="as-char" svg:width="0.619cm" svg:height="0.619cm" draw:z-index="0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Esportazione files CSV</text:span><text:span text:style-name="MT1"> </text:span><text:span text:style-name="MT3">(Aggiornato alla versione 1.0.56)</text:span><text:span text:style-name="MT1"><text:tab/></text:span><text:bookmark-start text:name="Copia Copia Copia PageNumWizard_FOOTER_Stile di pagina predefinito1 4 1 2"/><text:page-number text:select-page="current">0</text:page-number> / <text:page-count>12</text:page-count><text:bookmark-end text:name="Copia Copia Copia PageNumWizard_FOOTER_Stile di pagina predefinito1 4 1 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7.3$Linux_X86_64 LibreOffice_project/d7b8600dfe4e9dbeb18e6240c1ae9939a7c755a9</meta:generator>
    <meta:creation-date>2024-07-12T21:04:48Z</meta:creation-date>
    <dc:date>2026-06-22T21:36:52.252259483</dc:date>
    <meta:editing-duration>PT10M36S</meta:editing-duration>
    <meta:editing-cycles>4</meta:editing-cycles>
    <meta:document-statistic meta:table-count="5" meta:image-count="3" meta:object-count="0" meta:page-count="12" meta:paragraph-count="421" meta:word-count="2140" meta:character-count="16774" meta:non-whitespace-character-count="15051"/>
  </office:meta>
</office:document-meta>
</file>