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71" style:master-page-name="MasterPage2" style:family="paragraph" style:name="P69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2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5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2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8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1" style:family="paragraph" style:name="P71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8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71" style:family="paragraph" style:name="P72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830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1831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183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8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71" style:family="paragraph" style:name="P7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3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8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1" style:family="paragraph" style:name="P7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3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8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1" style:family="paragraph" style:name="P75">
      <style:paragraph-properties fo:text-align="left" fo:margin-left="0cm" fo:margin-right="0cm" fo:text-indent="1.235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41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8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1" style:family="paragraph" style:name="P7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4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8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80" style:family="paragraph" style:name="P77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847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848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849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850">
      <style:text-properties fo:font-family="Liberation Sans" style:font-family-complex="Liberation Sans"/>
    </style:style>
    <style:style style:family="text" style:name="T1851">
      <style:text-properties fo:font-family="Liberation Sans" style:font-family-complex="Liberation Sans"/>
    </style:style>
    <style:style style:family="text" style:name="T1852">
      <style:text-properties fo:font-family="Liberation Sans" style:font-family-complex="Liberation Sans"/>
    </style:style>
    <style:style style:family="text" style:name="T1853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paragraph" style:name="P78">
      <style:paragraph-properties/>
      <style:text-properties/>
    </style:style>
    <style:style style:family="paragraph" style:name="P79">
      <style:paragraph-properties/>
      <style:text-properties/>
    </style:style>
    <style:style style:parent-style-name="1059" style:family="paragraph" style:name="P8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54">
      <style:text-properties/>
    </style:style>
    <style:style style:parent-style-name="1047" style:family="text" style:name="T1855">
      <style:text-properties/>
    </style:style>
    <style:style style:parent-style-name="1047" style:family="text" style:name="T1856">
      <style:text-properties/>
    </style:style>
    <style:style style:parent-style-name="1059" style:family="paragraph" style:name="P8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57">
      <style:text-properties/>
    </style:style>
    <style:style style:parent-style-name="1047" style:family="text" style:name="T1858">
      <style:text-properties/>
    </style:style>
    <style:style style:parent-style-name="1047" style:family="text" style:name="T1859">
      <style:text-properties/>
    </style:style>
    <style:style style:parent-style-name="1059" style:family="paragraph" style:name="P8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60">
      <style:text-properties/>
    </style:style>
    <style:style style:parent-style-name="1047" style:family="text" style:name="T1861">
      <style:text-properties/>
    </style:style>
    <style:style style:parent-style-name="1047" style:family="text" style:name="T1862">
      <style:text-properties/>
    </style:style>
    <style:style style:parent-style-name="1059" style:family="paragraph" style:name="P8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63">
      <style:text-properties/>
    </style:style>
    <style:style style:parent-style-name="1047" style:family="text" style:name="T1864">
      <style:text-properties/>
    </style:style>
    <style:style style:parent-style-name="1047" style:family="text" style:name="T1865">
      <style:text-properties/>
    </style:style>
    <style:style style:parent-style-name="1060" style:family="paragraph" style:name="P8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66">
      <style:text-properties/>
    </style:style>
    <style:style style:parent-style-name="1047" style:family="text" style:name="T1867">
      <style:text-properties/>
    </style:style>
    <style:style style:parent-style-name="1047" style:family="text" style:name="T1868">
      <style:text-properties/>
    </style:style>
    <style:style style:parent-style-name="1060" style:family="paragraph" style:name="P8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69">
      <style:text-properties/>
    </style:style>
    <style:style style:parent-style-name="1047" style:family="text" style:name="T1870">
      <style:text-properties/>
    </style:style>
    <style:style style:parent-style-name="1047" style:family="text" style:name="T1871">
      <style:text-properties/>
    </style:style>
    <style:style style:parent-style-name="1060" style:family="paragraph" style:name="P8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72">
      <style:text-properties/>
    </style:style>
    <style:style style:parent-style-name="1047" style:family="text" style:name="T1873">
      <style:text-properties/>
    </style:style>
    <style:style style:parent-style-name="1047" style:family="text" style:name="T1874">
      <style:text-properties/>
    </style:style>
    <style:style style:parent-style-name="1059" style:family="paragraph" style:name="P8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75">
      <style:text-properties/>
    </style:style>
    <style:style style:parent-style-name="1047" style:family="text" style:name="T1876">
      <style:text-properties/>
    </style:style>
    <style:style style:parent-style-name="1047" style:family="text" style:name="T1877">
      <style:text-properties/>
    </style:style>
    <style:style style:parent-style-name="1059" style:family="paragraph" style:name="P8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78">
      <style:text-properties/>
    </style:style>
    <style:style style:parent-style-name="1047" style:family="text" style:name="T1879">
      <style:text-properties/>
    </style:style>
    <style:style style:parent-style-name="1047" style:family="text" style:name="T1880">
      <style:text-properties/>
    </style:style>
    <style:style style:parent-style-name="1060" style:family="paragraph" style:name="P8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81">
      <style:text-properties/>
    </style:style>
    <style:style style:parent-style-name="1047" style:family="text" style:name="T1882">
      <style:text-properties/>
    </style:style>
    <style:style style:parent-style-name="1047" style:family="text" style:name="T1883">
      <style:text-properties/>
    </style:style>
    <style:style style:parent-style-name="1059" style:family="paragraph" style:name="P9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84">
      <style:text-properties/>
    </style:style>
    <style:style style:parent-style-name="1047" style:family="text" style:name="T1885">
      <style:text-properties/>
    </style:style>
    <style:style style:parent-style-name="1047" style:family="text" style:name="T1886">
      <style:text-properties/>
    </style:style>
    <style:style style:parent-style-name="1059" style:family="paragraph" style:name="P9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87">
      <style:text-properties/>
    </style:style>
    <style:style style:parent-style-name="1047" style:family="text" style:name="T1888">
      <style:text-properties/>
    </style:style>
    <style:style style:parent-style-name="1047" style:family="text" style:name="T1889">
      <style:text-properties/>
    </style:style>
    <style:style style:parent-style-name="1059" style:family="paragraph" style:name="P9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90">
      <style:text-properties/>
    </style:style>
    <style:style style:parent-style-name="1047" style:family="text" style:name="T1891">
      <style:text-properties/>
    </style:style>
    <style:style style:parent-style-name="1047" style:family="text" style:name="T1892">
      <style:text-properties/>
    </style:style>
    <style:style style:parent-style-name="1059" style:family="paragraph" style:name="P9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93">
      <style:text-properties/>
    </style:style>
    <style:style style:parent-style-name="1047" style:family="text" style:name="T1894">
      <style:text-properties/>
    </style:style>
    <style:style style:parent-style-name="1047" style:family="text" style:name="T1895">
      <style:text-properties/>
    </style:style>
    <style:style style:parent-style-name="1059" style:family="paragraph" style:name="P9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96">
      <style:text-properties/>
    </style:style>
    <style:style style:parent-style-name="1047" style:family="text" style:name="T1897">
      <style:text-properties/>
    </style:style>
    <style:style style:parent-style-name="1047" style:family="text" style:name="T1898">
      <style:text-properties/>
    </style:style>
    <style:style style:parent-style-name="1059" style:family="paragraph" style:name="P9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899">
      <style:text-properties/>
    </style:style>
    <style:style style:parent-style-name="1047" style:family="text" style:name="T1900">
      <style:text-properties/>
    </style:style>
    <style:style style:parent-style-name="1047" style:family="text" style:name="T1901">
      <style:text-properties fo:language="it" fo:country="IT"/>
    </style:style>
    <style:style style:parent-style-name="1047" style:family="text" style:name="T1902">
      <style:text-properties/>
    </style:style>
    <style:style style:parent-style-name="1060" style:family="paragraph" style:name="P9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903">
      <style:text-properties/>
    </style:style>
    <style:style style:parent-style-name="1047" style:family="text" style:name="T1904">
      <style:text-properties/>
    </style:style>
    <style:style style:parent-style-name="1047" style:family="text" style:name="T1905">
      <style:text-properties/>
    </style:style>
    <style:style style:parent-style-name="1060" style:family="paragraph" style:name="P9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906">
      <style:text-properties/>
    </style:style>
    <style:style style:parent-style-name="1047" style:family="text" style:name="T1907">
      <style:text-properties/>
    </style:style>
    <style:style style:parent-style-name="1047" style:family="text" style:name="T1908">
      <style:text-properties/>
    </style:style>
    <style:style style:parent-style-name="1060" style:family="paragraph" style:name="P9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909">
      <style:text-properties/>
    </style:style>
    <style:style style:parent-style-name="1047" style:family="text" style:name="T1910">
      <style:text-properties/>
    </style:style>
    <style:style style:parent-style-name="1047" style:family="text" style:name="T1911">
      <style:text-properties/>
    </style:style>
    <style:style style:parent-style-name="1059" style:family="paragraph" style:name="P9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912">
      <style:text-properties/>
    </style:style>
    <style:style style:parent-style-name="1047" style:family="text" style:name="T1913">
      <style:text-properties/>
    </style:style>
    <style:style style:parent-style-name="1047" style:family="text" style:name="T1914">
      <style:text-properties/>
    </style:style>
    <style:style style:parent-style-name="1059" style:family="paragraph" style:name="P10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7" style:family="text" style:name="T1915">
      <style:text-properties/>
    </style:style>
    <style:style style:parent-style-name="1047" style:family="text" style:name="T1916">
      <style:text-properties fo:language="it" fo:country="IT"/>
    </style:style>
    <style:style style:parent-style-name="1047" style:family="text" style:name="T1917">
      <style:text-properties/>
    </style:style>
    <style:style style:family="paragraph" style:name="P101">
      <style:paragraph-properties/>
      <style:text-properties/>
    </style:style>
    <style:style style:parent-style-name="1071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8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9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71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1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9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71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4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9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_10" style:family="paragraph" style:name="P10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27">
      <style:text-properties/>
    </style:style>
    <style:style style:parent-style-name="1_12" style:list-style-name="WWNum23" style:family="paragraph" style:name="P106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3" style:family="text" style:name="T1928">
      <style:text-properties/>
    </style:style>
    <style:style style:parent-style-name="1_12" style:list-style-name="WWNum23" style:family="paragraph" style:name="P107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3" style:family="text" style:name="T1929">
      <style:text-properties/>
    </style:style>
    <style:style style:parent-style-name="1_12" style:list-style-name="WWNum23" style:family="paragraph" style:name="P108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3" style:family="text" style:name="T1930">
      <style:text-properties/>
    </style:style>
    <style:style style:parent-style-name="1_10" style:family="paragraph" style:name="P10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31">
      <style:text-properties/>
    </style:style>
    <style:style style:parent-style-name="1_14" style:family="paragraph" style:name="P110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1932">
      <style:text-properties/>
    </style:style>
    <style:style style:parent-style-name="1_16" style:family="paragraph" style:name="P11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1933">
      <style:text-properties/>
    </style:style>
    <style:style style:parent-style-name="1_17" style:family="text" style:name="T1934">
      <style:text-properties/>
    </style:style>
    <style:style style:parent-style-name="1_17" style:family="text" style:name="T1935">
      <style:text-properties/>
    </style:style>
    <style:style style:parent-style-name="1_14" style:family="paragraph" style:name="P112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1936">
      <style:text-properties/>
    </style:style>
    <style:style style:parent-style-name="1_18" style:family="paragraph" style:name="P11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1937">
      <style:text-properties/>
    </style:style>
    <style:style style:parent-style-name="1_20" style:family="paragraph" style:name="P11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1938">
      <style:text-properties/>
    </style:style>
    <style:style style:parent-style-name="1_11" style:family="text" style:name="T1939">
      <style:text-properties/>
    </style:style>
    <style:style style:parent-style-name="1_11" style:family="text" style:name="T1940">
      <style:text-properties/>
    </style:style>
    <style:style style:parent-style-name="1_21" style:family="text" style:name="T1941">
      <style:text-properties/>
    </style:style>
    <style:style style:parent-style-name="1_11" style:family="text" style:name="T1942">
      <style:text-properties/>
    </style:style>
    <style:style style:parent-style-name="1_22" style:family="text" style:name="T1943">
      <style:text-properties/>
    </style:style>
    <style:style style:parent-style-name="1_10" style:family="paragraph" style:name="P11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44">
      <style:text-properties/>
    </style:style>
    <style:style style:parent-style-name="1_10" style:family="paragraph" style:name="P11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45">
      <style:text-properties/>
    </style:style>
    <style:style style:parent-style-name="1_16" style:family="paragraph" style:name="P11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1946">
      <style:text-properties/>
    </style:style>
    <style:style style:parent-style-name="1_18" style:family="paragraph" style:name="P11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1947">
      <style:text-properties/>
    </style:style>
    <style:style style:parent-style-name="1_20" style:family="paragraph" style:name="P11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1948">
      <style:text-properties/>
    </style:style>
    <style:style style:parent-style-name="1_11" style:family="text" style:name="T1949">
      <style:text-properties/>
    </style:style>
    <style:style style:parent-style-name="1_11" style:family="text" style:name="T1950">
      <style:text-properties/>
    </style:style>
    <style:style style:parent-style-name="1_21" style:family="text" style:name="T1951">
      <style:text-properties/>
    </style:style>
    <style:style style:parent-style-name="1_11" style:family="text" style:name="T1952">
      <style:text-properties/>
    </style:style>
    <style:style style:parent-style-name="1_22" style:family="text" style:name="T1953">
      <style:text-properties/>
    </style:style>
    <style:style style:parent-style-name="1_10" style:family="paragraph" style:name="P12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54">
      <style:text-properties/>
    </style:style>
    <style:style style:parent-style-name="1_22" style:family="text" style:name="T1955">
      <style:text-properties/>
    </style:style>
    <style:style style:parent-style-name="1_11" style:family="text" style:name="T1956">
      <style:text-properties/>
    </style:style>
    <style:style style:parent-style-name="1_10" style:family="paragraph" style:name="P12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57">
      <style:text-properties/>
    </style:style>
    <style:style style:parent-style-name="1_16" style:family="paragraph" style:name="P12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1958">
      <style:text-properties/>
    </style:style>
    <style:style style:parent-style-name="1_14" style:family="paragraph" style:name="P123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1959">
      <style:text-properties/>
    </style:style>
    <style:style style:parent-style-name="1_18" style:family="paragraph" style:name="P12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1960">
      <style:text-properties/>
    </style:style>
    <style:style style:parent-style-name="1_20" style:family="paragraph" style:name="P12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1961">
      <style:text-properties/>
    </style:style>
    <style:style style:parent-style-name="1_11" style:family="text" style:name="T1962">
      <style:text-properties/>
    </style:style>
    <style:style style:parent-style-name="1_11" style:family="text" style:name="T1963">
      <style:text-properties/>
    </style:style>
    <style:style style:parent-style-name="1_21" style:family="text" style:name="T1964">
      <style:text-properties/>
    </style:style>
    <style:style style:parent-style-name="1_11" style:family="text" style:name="T1965">
      <style:text-properties/>
    </style:style>
    <style:style style:parent-style-name="1_22" style:family="text" style:name="T1966">
      <style:text-properties/>
    </style:style>
    <style:style style:parent-style-name="1_10" style:family="paragraph" style:name="P12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67">
      <style:text-properties/>
    </style:style>
    <style:style style:family="table" style:name="ta1">
      <style:table-properties style:width="4.131cm"/>
    </style:style>
    <style:style style:family="table-column" style:name="co1">
      <style:table-column-properties style:column-width="2.066cm"/>
    </style:style>
    <style:style style:family="table-column" style:name="co2">
      <style:table-column-properties style:column-width="2.066cm"/>
    </style:style>
    <style:style style:family="table-row" style:name="ro1">
      <style:table-row-properties/>
    </style:style>
    <style:style style:family="table-cell" style:name="ce2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2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1968">
      <style:text-properties/>
    </style:style>
    <style:style style:family="table-cell" style:name="ce3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2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1969">
      <style:text-properties/>
    </style:style>
    <style:style style:family="table-row" style:name="ro2">
      <style:table-row-properties/>
    </style:style>
    <style:style style:family="table-cell" style:name="ce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2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1970">
      <style:text-properties/>
    </style:style>
    <style:style style:family="table-cell" style:name="ce5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3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1971">
      <style:text-properties/>
    </style:style>
    <style:style style:family="table-row" style:name="ro3">
      <style:table-row-properties/>
    </style:style>
    <style:style style:family="table-cell" style:name="ce6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3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1972">
      <style:text-properties/>
    </style:style>
    <style:style style:family="table-cell" style:name="ce7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3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1973">
      <style:text-properties/>
    </style:style>
    <style:style style:family="table-row" style:name="ro4">
      <style:table-row-properties/>
    </style:style>
    <style:style style:family="table-cell" style:name="ce8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3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1974">
      <style:text-properties/>
    </style:style>
    <style:style style:family="table-cell" style:name="ce9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3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1975">
      <style:text-properties/>
    </style:style>
    <style:style style:family="table-row" style:name="ro5">
      <style:table-row-properties/>
    </style:style>
    <style:style style:family="table-cell" style:name="ce1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3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1976">
      <style:text-properties/>
    </style:style>
    <style:style style:family="table-cell" style:name="ce1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3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1977">
      <style:text-properties/>
    </style:style>
    <style:style style:family="paragraph" style:name="P137">
      <style:paragraph-properties/>
      <style:text-properties style:font-family-asian="Times New Roman" fo:font-size="1pt" style:font-size-complex="1pt" text:display="none"/>
    </style:style>
    <style:style style:family="text" style:name="T1978">
      <style:text-properties style:font-family-asian="Times New Roman" fo:font-size="1pt" style:font-size-complex="1pt" text:display="none"/>
    </style:style>
    <style:style style:family="text" style:name="T1979">
      <style:text-properties style:font-family-asian="Times New Roman" fo:font-size="1pt" style:font-size-complex="1pt" text:display="none"/>
    </style:style>
    <style:style style:family="text" style:name="T1980">
      <style:text-properties style:font-family-asian="Times New Roman" fo:font-size="1pt" style:font-size-complex="1pt" text:display="none"/>
    </style:style>
    <style:style style:parent-style-name="1_16" style:family="paragraph" style:name="P13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1981">
      <style:text-properties/>
    </style:style>
    <style:style style:parent-style-name="1_18" style:family="paragraph" style:name="P13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1982">
      <style:text-properties/>
    </style:style>
    <style:style style:parent-style-name="1_20" style:family="paragraph" style:name="P14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1983">
      <style:text-properties/>
    </style:style>
    <style:style style:parent-style-name="1_11" style:family="text" style:name="T1984">
      <style:text-properties/>
    </style:style>
    <style:style style:parent-style-name="1_11" style:family="text" style:name="T1985">
      <style:text-properties/>
    </style:style>
    <style:style style:parent-style-name="1_21" style:family="text" style:name="T1986">
      <style:text-properties/>
    </style:style>
    <style:style style:parent-style-name="1_11" style:family="text" style:name="T1987">
      <style:text-properties/>
    </style:style>
    <style:style style:parent-style-name="1_22" style:family="text" style:name="T1988">
      <style:text-properties/>
    </style:style>
    <style:style style:parent-style-name="1_10" style:family="paragraph" style:name="P14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1989">
      <style:text-properties/>
    </style:style>
    <style:style style:parent-style-name="1_22" style:family="text" style:name="T1990">
      <style:text-properties/>
    </style:style>
    <style:style style:parent-style-name="1_11" style:family="text" style:name="T1991">
      <style:text-properties/>
    </style:style>
    <style:style style:parent-style-name="1_22" style:family="text" style:name="T1992">
      <style:text-properties/>
    </style:style>
    <style:style style:parent-style-name="1_11" style:family="text" style:name="T1993">
      <style:text-properties/>
    </style:style>
    <style:style style:parent-style-name="1_22" style:family="text" style:name="T1994">
      <style:text-properties/>
    </style:style>
    <style:style style:parent-style-name="1_11" style:family="text" style:name="T1995">
      <style:text-properties/>
    </style:style>
    <style:style style:parent-style-name="1_16" style:family="paragraph" style:name="P14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1996">
      <style:text-properties/>
    </style:style>
    <style:style style:parent-style-name="1_18" style:family="paragraph" style:name="P14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1997">
      <style:text-properties/>
    </style:style>
    <style:style style:parent-style-name="1_20" style:family="paragraph" style:name="P14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1998">
      <style:text-properties/>
    </style:style>
    <style:style style:parent-style-name="1_11" style:family="text" style:name="T1999">
      <style:text-properties/>
    </style:style>
    <style:style style:parent-style-name="1_11" style:family="text" style:name="T2000">
      <style:text-properties/>
    </style:style>
    <style:style style:parent-style-name="1_21" style:family="text" style:name="T2001">
      <style:text-properties/>
    </style:style>
    <style:style style:parent-style-name="1_11" style:family="text" style:name="T2002">
      <style:text-properties/>
    </style:style>
    <style:style style:parent-style-name="1_22" style:family="text" style:name="T2003">
      <style:text-properties/>
    </style:style>
    <style:style style:parent-style-name="1_10" style:family="paragraph" style:name="P14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04">
      <style:text-properties/>
    </style:style>
    <style:style style:parent-style-name="1_22" style:family="text" style:name="T2005">
      <style:text-properties/>
    </style:style>
    <style:style style:parent-style-name="1_11" style:family="text" style:name="T2006">
      <style:text-properties/>
    </style:style>
    <style:style style:parent-style-name="1_10" style:family="paragraph" style:name="P14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07">
      <style:text-properties/>
    </style:style>
    <style:style style:parent-style-name="1_22" style:family="text" style:name="T2008">
      <style:text-properties/>
    </style:style>
    <style:style style:parent-style-name="1_11" style:family="text" style:name="T2009">
      <style:text-properties/>
    </style:style>
    <style:style style:parent-style-name="1_16" style:family="paragraph" style:name="P14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010">
      <style:text-properties/>
    </style:style>
    <style:style style:parent-style-name="1_18" style:family="paragraph" style:name="P14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011">
      <style:text-properties/>
    </style:style>
    <style:style style:parent-style-name="1_20" style:family="paragraph" style:name="P14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012">
      <style:text-properties/>
    </style:style>
    <style:style style:parent-style-name="1_11" style:family="text" style:name="T2013">
      <style:text-properties/>
    </style:style>
    <style:style style:parent-style-name="1_11" style:family="text" style:name="T2014">
      <style:text-properties/>
    </style:style>
    <style:style style:parent-style-name="1_21" style:family="text" style:name="T2015">
      <style:text-properties/>
    </style:style>
    <style:style style:parent-style-name="1_11" style:family="text" style:name="T2016">
      <style:text-properties/>
    </style:style>
    <style:style style:parent-style-name="1_22" style:family="text" style:name="T2017">
      <style:text-properties/>
    </style:style>
    <style:style style:parent-style-name="1_10" style:family="paragraph" style:name="P15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18">
      <style:text-properties/>
    </style:style>
    <style:style style:parent-style-name="1_22" style:family="text" style:name="T2019">
      <style:text-properties/>
    </style:style>
    <style:style style:parent-style-name="1_11" style:family="text" style:name="T2020">
      <style:text-properties/>
    </style:style>
    <style:style style:parent-style-name="1_22" style:family="text" style:name="T2021">
      <style:text-properties/>
    </style:style>
    <style:style style:parent-style-name="1_11" style:family="text" style:name="T2022">
      <style:text-properties/>
    </style:style>
    <style:style style:parent-style-name="1_22" style:family="text" style:name="T2023">
      <style:text-properties/>
    </style:style>
    <style:style style:parent-style-name="1_11" style:family="text" style:name="T2024">
      <style:text-properties/>
    </style:style>
    <style:style style:parent-style-name="1_18" style:family="paragraph" style:name="P15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025">
      <style:text-properties/>
    </style:style>
    <style:style style:parent-style-name="1_20" style:family="paragraph" style:name="P15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026">
      <style:text-properties/>
    </style:style>
    <style:style style:parent-style-name="1_11" style:family="text" style:name="T2027">
      <style:text-properties/>
    </style:style>
    <style:style style:parent-style-name="1_11" style:family="text" style:name="T2028">
      <style:text-properties/>
    </style:style>
    <style:style style:parent-style-name="1_21" style:family="text" style:name="T2029">
      <style:text-properties/>
    </style:style>
    <style:style style:parent-style-name="1_11" style:family="text" style:name="T2030">
      <style:text-properties/>
    </style:style>
    <style:style style:parent-style-name="1_22" style:family="text" style:name="T2031">
      <style:text-properties/>
    </style:style>
    <style:style style:parent-style-name="1_10" style:family="paragraph" style:name="P15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32">
      <style:text-properties/>
    </style:style>
    <style:style style:parent-style-name="1_22" style:family="text" style:name="T2033">
      <style:text-properties/>
    </style:style>
    <style:style style:parent-style-name="1_11" style:family="text" style:name="T2034">
      <style:text-properties/>
    </style:style>
    <style:style style:parent-style-name="1_18" style:family="paragraph" style:name="P15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035">
      <style:text-properties/>
    </style:style>
    <style:style style:parent-style-name="1_20" style:family="paragraph" style:name="P15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036">
      <style:text-properties/>
    </style:style>
    <style:style style:parent-style-name="1_11" style:family="text" style:name="T2037">
      <style:text-properties/>
    </style:style>
    <style:style style:parent-style-name="1_11" style:family="text" style:name="T2038">
      <style:text-properties/>
    </style:style>
    <style:style style:parent-style-name="1_21" style:family="text" style:name="T2039">
      <style:text-properties/>
    </style:style>
    <style:style style:parent-style-name="1_11" style:family="text" style:name="T2040">
      <style:text-properties/>
    </style:style>
    <style:style style:parent-style-name="1_22" style:family="text" style:name="T2041">
      <style:text-properties/>
    </style:style>
    <style:style style:parent-style-name="1_10" style:family="paragraph" style:name="P15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42">
      <style:text-properties/>
    </style:style>
    <style:style style:parent-style-name="1_22" style:family="text" style:name="T2043">
      <style:text-properties/>
    </style:style>
    <style:style style:parent-style-name="1_11" style:family="text" style:name="T2044">
      <style:text-properties/>
    </style:style>
    <style:style style:family="table" style:name="ta2">
      <style:table-properties style:width="6.197cm"/>
    </style:style>
    <style:style style:family="table-column" style:name="co3">
      <style:table-column-properties style:column-width="2.066cm"/>
    </style:style>
    <style:style style:family="table-column" style:name="co4">
      <style:table-column-properties style:column-width="2.066cm"/>
    </style:style>
    <style:style style:family="table-column" style:name="co5">
      <style:table-column-properties style:column-width="2.066cm"/>
    </style:style>
    <style:style style:family="table-row" style:name="ro6">
      <style:table-row-properties/>
    </style:style>
    <style:style style:family="table-cell" style:name="ce13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5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045">
      <style:text-properties/>
    </style:style>
    <style:style style:family="table-cell" style:name="ce14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5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046">
      <style:text-properties/>
    </style:style>
    <style:style style:family="table-cell" style:name="ce15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5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047">
      <style:text-properties/>
    </style:style>
    <style:style style:family="table-row" style:name="ro7">
      <style:table-row-properties/>
    </style:style>
    <style:style style:family="table-cell" style:name="ce16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48">
      <style:text-properties/>
    </style:style>
    <style:style style:family="table-cell" style:name="ce17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6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49">
      <style:text-properties/>
    </style:style>
    <style:style style:family="table-cell" style:name="ce18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50">
      <style:text-properties/>
    </style:style>
    <style:style style:parent-style-name="1_28" style:family="text" style:name="T2051">
      <style:text-properties/>
    </style:style>
    <style:style style:family="table-row" style:name="ro8">
      <style:table-row-properties/>
    </style:style>
    <style:style style:family="table-cell" style:name="ce19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52">
      <style:text-properties/>
    </style:style>
    <style:style style:family="table-cell" style:name="ce2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6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53">
      <style:text-properties/>
    </style:style>
    <style:style style:family="table-cell" style:name="ce2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54">
      <style:text-properties/>
    </style:style>
    <style:style style:parent-style-name="1_28" style:family="text" style:name="T2055">
      <style:text-properties/>
    </style:style>
    <style:style style:family="table-row" style:name="ro9">
      <style:table-row-properties/>
    </style:style>
    <style:style style:family="table-cell" style:name="ce22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56">
      <style:text-properties/>
    </style:style>
    <style:style style:family="table-cell" style:name="ce23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6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57">
      <style:text-properties/>
    </style:style>
    <style:style style:family="table-cell" style:name="ce2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58">
      <style:text-properties/>
    </style:style>
    <style:style style:parent-style-name="1_28" style:family="text" style:name="T2059">
      <style:text-properties/>
    </style:style>
    <style:style style:family="table-row" style:name="ro10">
      <style:table-row-properties/>
    </style:style>
    <style:style style:family="table-cell" style:name="ce25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6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60">
      <style:text-properties/>
    </style:style>
    <style:style style:family="table-cell" style:name="ce26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7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61">
      <style:text-properties/>
    </style:style>
    <style:style style:family="table-cell" style:name="ce27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7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62">
      <style:text-properties/>
    </style:style>
    <style:style style:parent-style-name="1_28" style:family="text" style:name="T2063">
      <style:text-properties/>
    </style:style>
    <style:style style:family="table-row" style:name="ro11">
      <style:table-row-properties/>
    </style:style>
    <style:style style:family="table-cell" style:name="ce28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7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64">
      <style:text-properties/>
    </style:style>
    <style:style style:family="table-cell" style:name="ce29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7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65">
      <style:text-properties/>
    </style:style>
    <style:style style:family="table-cell" style:name="ce3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7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66">
      <style:text-properties/>
    </style:style>
    <style:style style:parent-style-name="1_28" style:family="text" style:name="T2067">
      <style:text-properties/>
    </style:style>
    <style:style style:family="table-row" style:name="ro12">
      <style:table-row-properties/>
    </style:style>
    <style:style style:family="table-cell" style:name="ce3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7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68">
      <style:text-properties/>
    </style:style>
    <style:style style:family="table-cell" style:name="ce32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7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69">
      <style:text-properties/>
    </style:style>
    <style:style style:family="table-cell" style:name="ce33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7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70">
      <style:text-properties/>
    </style:style>
    <style:style style:parent-style-name="1_28" style:family="text" style:name="T2071">
      <style:text-properties/>
    </style:style>
    <style:style style:family="table-row" style:name="ro13">
      <style:table-row-properties/>
    </style:style>
    <style:style style:family="table-cell" style:name="ce3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7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72">
      <style:text-properties/>
    </style:style>
    <style:style style:family="table-cell" style:name="ce35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7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073">
      <style:text-properties/>
    </style:style>
    <style:style style:family="table-cell" style:name="ce36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8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074">
      <style:text-properties/>
    </style:style>
    <style:style style:parent-style-name="1_28" style:family="text" style:name="T2075">
      <style:text-properties/>
    </style:style>
    <style:style style:family="paragraph" style:name="P181">
      <style:paragraph-properties/>
      <style:text-properties style:font-family-asian="Times New Roman" fo:font-size="1pt" style:font-size-complex="1pt" text:display="none"/>
    </style:style>
    <style:style style:family="text" style:name="T2076">
      <style:text-properties style:font-family-asian="Times New Roman" fo:font-size="1pt" style:font-size-complex="1pt" text:display="none"/>
    </style:style>
    <style:style style:family="text" style:name="T2077">
      <style:text-properties style:font-family-asian="Times New Roman" fo:font-size="1pt" style:font-size-complex="1pt" text:display="none"/>
    </style:style>
    <style:style style:family="text" style:name="T2078">
      <style:text-properties style:font-family-asian="Times New Roman" fo:font-size="1pt" style:font-size-complex="1pt" text:display="none"/>
    </style:style>
    <style:style style:parent-style-name="1_16" style:family="paragraph" style:name="P18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079">
      <style:text-properties/>
    </style:style>
    <style:style style:parent-style-name="1_18" style:family="paragraph" style:name="P18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080">
      <style:text-properties/>
    </style:style>
    <style:style style:parent-style-name="1_20" style:family="paragraph" style:name="P18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081">
      <style:text-properties/>
    </style:style>
    <style:style style:parent-style-name="1_11" style:family="text" style:name="T2082">
      <style:text-properties/>
    </style:style>
    <style:style style:parent-style-name="1_11" style:family="text" style:name="T2083">
      <style:text-properties/>
    </style:style>
    <style:style style:parent-style-name="1_21" style:family="text" style:name="T2084">
      <style:text-properties/>
    </style:style>
    <style:style style:parent-style-name="1_11" style:family="text" style:name="T2085">
      <style:text-properties/>
    </style:style>
    <style:style style:parent-style-name="1_22" style:family="text" style:name="T2086">
      <style:text-properties/>
    </style:style>
    <style:style style:parent-style-name="1_10" style:family="paragraph" style:name="P18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87">
      <style:text-properties/>
    </style:style>
    <style:style style:parent-style-name="1_16" style:family="paragraph" style:name="P18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088">
      <style:text-properties/>
    </style:style>
    <style:style style:parent-style-name="1_14" style:family="paragraph" style:name="P187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089">
      <style:text-properties/>
    </style:style>
    <style:style style:parent-style-name="1_10" style:family="paragraph" style:name="P18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90">
      <style:text-properties/>
    </style:style>
    <style:style style:parent-style-name="1_22" style:family="text" style:name="T2091">
      <style:text-properties/>
    </style:style>
    <style:style style:parent-style-name="1_11" style:family="text" style:name="T2092">
      <style:text-properties/>
    </style:style>
    <style:style style:parent-style-name="1_22" style:family="text" style:name="T2093">
      <style:text-properties/>
    </style:style>
    <style:style style:parent-style-name="1_11" style:family="text" style:name="T2094">
      <style:text-properties/>
    </style:style>
    <style:style style:parent-style-name="1_22" style:family="text" style:name="T2095">
      <style:text-properties/>
    </style:style>
    <style:style style:parent-style-name="1_11" style:family="text" style:name="T2096">
      <style:text-properties/>
    </style:style>
    <style:style style:parent-style-name="1_16" style:family="paragraph" style:name="P18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097">
      <style:text-properties/>
    </style:style>
    <style:style style:parent-style-name="1_29" style:family="paragraph" style:name="P190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098">
      <style:text-properties/>
    </style:style>
    <style:style style:parent-style-name="1_10" style:family="paragraph" style:name="P19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099">
      <style:text-properties/>
    </style:style>
    <style:style style:parent-style-name="1_22" style:family="text" style:name="T2100">
      <style:text-properties/>
    </style:style>
    <style:style style:parent-style-name="1_11" style:family="text" style:name="T2101">
      <style:text-properties/>
    </style:style>
    <style:style style:parent-style-name="1_16" style:family="paragraph" style:name="P19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102">
      <style:text-properties/>
    </style:style>
    <style:style style:parent-style-name="1_10" style:family="paragraph" style:name="P19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03">
      <style:text-properties/>
    </style:style>
    <style:style style:parent-style-name="1_22" style:family="text" style:name="T2104">
      <style:text-properties/>
    </style:style>
    <style:style style:parent-style-name="1_11" style:family="text" style:name="T2105">
      <style:text-properties/>
    </style:style>
    <style:style style:parent-style-name="1_22" style:family="text" style:name="T2106">
      <style:text-properties/>
    </style:style>
    <style:style style:parent-style-name="1_11" style:family="text" style:name="T2107">
      <style:text-properties/>
    </style:style>
    <style:style style:parent-style-name="1_22" style:family="text" style:name="T2108">
      <style:text-properties/>
    </style:style>
    <style:style style:parent-style-name="1_11" style:family="text" style:name="T2109">
      <style:text-properties/>
    </style:style>
    <style:style style:parent-style-name="1_29" style:family="paragraph" style:name="P194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110">
      <style:text-properties/>
    </style:style>
    <style:style style:family="table" style:name="ta3">
      <style:table-properties style:width="4.131cm"/>
    </style:style>
    <style:style style:family="table-column" style:name="co6">
      <style:table-column-properties style:column-width="2.066cm"/>
    </style:style>
    <style:style style:family="table-column" style:name="co7">
      <style:table-column-properties style:column-width="2.066cm"/>
    </style:style>
    <style:style style:family="table-row" style:name="ro14">
      <style:table-row-properties/>
    </style:style>
    <style:style style:family="table-cell" style:name="ce38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9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111">
      <style:text-properties/>
    </style:style>
    <style:style style:family="table-cell" style:name="ce39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19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112">
      <style:text-properties/>
    </style:style>
    <style:style style:family="table-row" style:name="ro15">
      <style:table-row-properties/>
    </style:style>
    <style:style style:family="table-cell" style:name="ce4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9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13">
      <style:text-properties/>
    </style:style>
    <style:style style:family="table-cell" style:name="ce4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19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14">
      <style:text-properties/>
    </style:style>
    <style:style style:family="table-row" style:name="ro16">
      <style:table-row-properties/>
    </style:style>
    <style:style style:family="table-cell" style:name="ce42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19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15">
      <style:text-properties/>
    </style:style>
    <style:style style:family="table-cell" style:name="ce43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0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16">
      <style:text-properties/>
    </style:style>
    <style:style style:parent-style-name="1_26" style:family="text" style:name="T2117">
      <style:text-properties/>
    </style:style>
    <style:style style:parent-style-name="1_28" style:family="text" style:name="T2118">
      <style:text-properties/>
    </style:style>
    <style:style style:parent-style-name="1_26" style:family="text" style:name="T2119">
      <style:text-properties/>
    </style:style>
    <style:style style:parent-style-name="1_28" style:family="text" style:name="T2120">
      <style:text-properties/>
    </style:style>
    <style:style style:parent-style-name="1_26" style:family="text" style:name="T2121">
      <style:text-properties/>
    </style:style>
    <style:style style:parent-style-name="1_28" style:family="text" style:name="T2122">
      <style:text-properties/>
    </style:style>
    <style:style style:family="table-row" style:name="ro17">
      <style:table-row-properties/>
    </style:style>
    <style:style style:family="table-cell" style:name="ce4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0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23">
      <style:text-properties/>
    </style:style>
    <style:style style:family="table-cell" style:name="ce45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0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24">
      <style:text-properties/>
    </style:style>
    <style:style style:parent-style-name="1_26" style:family="text" style:name="T2125">
      <style:text-properties/>
    </style:style>
    <style:style style:parent-style-name="1_28" style:family="text" style:name="T2126">
      <style:text-properties/>
    </style:style>
    <style:style style:parent-style-name="1_26" style:family="text" style:name="T2127">
      <style:text-properties/>
    </style:style>
    <style:style style:parent-style-name="1_28" style:family="text" style:name="T2128">
      <style:text-properties/>
    </style:style>
    <style:style style:family="table-row" style:name="ro18">
      <style:table-row-properties/>
    </style:style>
    <style:style style:family="table-cell" style:name="ce46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0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29">
      <style:text-properties/>
    </style:style>
    <style:style style:family="table-cell" style:name="ce47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0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30">
      <style:text-properties/>
    </style:style>
    <style:style style:family="table-row" style:name="ro19">
      <style:table-row-properties/>
    </style:style>
    <style:style style:family="table-cell" style:name="ce48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0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31">
      <style:text-properties/>
    </style:style>
    <style:style style:family="table-cell" style:name="ce49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0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32">
      <style:text-properties/>
    </style:style>
    <style:style style:parent-style-name="1_26" style:family="text" style:name="T2133">
      <style:text-properties/>
    </style:style>
    <style:style style:parent-style-name="1_28" style:family="text" style:name="T2134">
      <style:text-properties/>
    </style:style>
    <style:style style:parent-style-name="1_26" style:family="text" style:name="T2135">
      <style:text-properties/>
    </style:style>
    <style:style style:parent-style-name="1_28" style:family="text" style:name="T2136">
      <style:text-properties/>
    </style:style>
    <style:style style:family="table-row" style:name="ro20">
      <style:table-row-properties/>
    </style:style>
    <style:style style:family="table-cell" style:name="ce5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0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37">
      <style:text-properties/>
    </style:style>
    <style:style style:family="table-cell" style:name="ce5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0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38">
      <style:text-properties/>
    </style:style>
    <style:style style:family="table-row" style:name="ro21">
      <style:table-row-properties/>
    </style:style>
    <style:style style:family="table-cell" style:name="ce52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0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39">
      <style:text-properties/>
    </style:style>
    <style:style style:family="table-cell" style:name="ce53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1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40">
      <style:text-properties/>
    </style:style>
    <style:style style:family="table-row" style:name="ro22">
      <style:table-row-properties/>
    </style:style>
    <style:style style:family="table-cell" style:name="ce5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1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41">
      <style:text-properties/>
    </style:style>
    <style:style style:family="table-cell" style:name="ce55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1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42">
      <style:text-properties/>
    </style:style>
    <style:style style:family="table-row" style:name="ro23">
      <style:table-row-properties/>
    </style:style>
    <style:style style:family="table-cell" style:name="ce56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1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43">
      <style:text-properties/>
    </style:style>
    <style:style style:family="table-cell" style:name="ce57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1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44">
      <style:text-properties/>
    </style:style>
    <style:style style:family="table-row" style:name="ro24">
      <style:table-row-properties/>
    </style:style>
    <style:style style:family="table-cell" style:name="ce58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1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45">
      <style:text-properties/>
    </style:style>
    <style:style style:family="table-cell" style:name="ce59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1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46">
      <style:text-properties/>
    </style:style>
    <style:style style:family="table-row" style:name="ro25">
      <style:table-row-properties/>
    </style:style>
    <style:style style:family="table-cell" style:name="ce6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1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47">
      <style:text-properties/>
    </style:style>
    <style:style style:family="table-cell" style:name="ce6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1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48">
      <style:text-properties/>
    </style:style>
    <style:style style:family="table-row" style:name="ro26">
      <style:table-row-properties/>
    </style:style>
    <style:style style:family="table-cell" style:name="ce62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1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49">
      <style:text-properties/>
    </style:style>
    <style:style style:family="table-cell" style:name="ce63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2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50">
      <style:text-properties/>
    </style:style>
    <style:style style:family="table-row" style:name="ro27">
      <style:table-row-properties/>
    </style:style>
    <style:style style:family="table-cell" style:name="ce6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2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151">
      <style:text-properties/>
    </style:style>
    <style:style style:family="table-cell" style:name="ce65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2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152">
      <style:text-properties/>
    </style:style>
    <style:style style:family="paragraph" style:name="P223">
      <style:paragraph-properties/>
      <style:text-properties style:font-family-asian="Times New Roman" fo:font-size="1pt" style:font-size-complex="1pt" text:display="none"/>
    </style:style>
    <style:style style:family="text" style:name="T2153">
      <style:text-properties style:font-family-asian="Times New Roman" fo:font-size="1pt" style:font-size-complex="1pt" text:display="none"/>
    </style:style>
    <style:style style:family="text" style:name="T2154">
      <style:text-properties style:font-family-asian="Times New Roman" fo:font-size="1pt" style:font-size-complex="1pt" text:display="none"/>
    </style:style>
    <style:style style:family="text" style:name="T2155">
      <style:text-properties style:font-family-asian="Times New Roman" fo:font-size="1pt" style:font-size-complex="1pt" text:display="none"/>
    </style:style>
    <style:style style:parent-style-name="1_29" style:family="paragraph" style:name="P224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156">
      <style:text-properties/>
    </style:style>
    <style:style style:parent-style-name="1_10" style:family="paragraph" style:name="P22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57">
      <style:text-properties/>
    </style:style>
    <style:style style:parent-style-name="1_16" style:family="paragraph" style:name="P22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158">
      <style:text-properties/>
    </style:style>
    <style:style style:parent-style-name="1_10" style:family="paragraph" style:name="P22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59">
      <style:text-properties/>
    </style:style>
    <style:style style:parent-style-name="1_31" style:list-style-name="WWNum23" style:family="paragraph" style:name="P22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160">
      <style:text-properties/>
    </style:style>
    <style:style style:parent-style-name="1_13" style:family="text" style:name="T2161">
      <style:text-properties/>
    </style:style>
    <style:style style:parent-style-name="1_32" style:family="text" style:name="T2162">
      <style:text-properties/>
    </style:style>
    <style:style style:parent-style-name="1_13" style:family="text" style:name="T2163">
      <style:text-properties/>
    </style:style>
    <style:style style:parent-style-name="1_31" style:list-style-name="WWNum23" style:family="paragraph" style:name="P22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164">
      <style:text-properties/>
    </style:style>
    <style:style style:parent-style-name="1_13" style:family="text" style:name="T2165">
      <style:text-properties/>
    </style:style>
    <style:style style:parent-style-name="1_32" style:family="text" style:name="T2166">
      <style:text-properties/>
    </style:style>
    <style:style style:parent-style-name="1_13" style:family="text" style:name="T2167">
      <style:text-properties/>
    </style:style>
    <style:style style:parent-style-name="1_16" style:family="paragraph" style:name="P23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168">
      <style:text-properties/>
    </style:style>
    <style:style style:parent-style-name="1_14" style:family="paragraph" style:name="P231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169">
      <style:text-properties/>
    </style:style>
    <style:style style:parent-style-name="1_18" style:family="paragraph" style:name="P23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170">
      <style:text-properties/>
    </style:style>
    <style:style style:parent-style-name="1_20" style:family="paragraph" style:name="P23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171">
      <style:text-properties/>
    </style:style>
    <style:style style:parent-style-name="1_11" style:family="text" style:name="T2172">
      <style:text-properties/>
    </style:style>
    <style:style style:parent-style-name="1_10" style:family="paragraph" style:name="P23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73">
      <style:text-properties/>
    </style:style>
    <style:style style:parent-style-name="1_16" style:family="paragraph" style:name="P23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174">
      <style:text-properties/>
    </style:style>
    <style:style style:parent-style-name="1_10" style:family="paragraph" style:name="P23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75">
      <style:text-properties/>
    </style:style>
    <style:style style:parent-style-name="1_22" style:family="text" style:name="T2176">
      <style:text-properties/>
    </style:style>
    <style:style style:parent-style-name="1_11" style:family="text" style:name="T2177">
      <style:text-properties/>
    </style:style>
    <style:style style:parent-style-name="1_16" style:family="paragraph" style:name="P23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178">
      <style:text-properties/>
    </style:style>
    <style:style style:parent-style-name="1_10" style:family="paragraph" style:name="P23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79">
      <style:text-properties/>
    </style:style>
    <style:style style:parent-style-name="1_22" style:family="text" style:name="T2180">
      <style:text-properties/>
    </style:style>
    <style:style style:parent-style-name="1_11" style:family="text" style:name="T2181">
      <style:text-properties/>
    </style:style>
    <style:style style:parent-style-name="1_22" style:family="text" style:name="T2182">
      <style:text-properties/>
    </style:style>
    <style:style style:parent-style-name="1_11" style:family="text" style:name="T2183">
      <style:text-properties/>
    </style:style>
    <style:style style:parent-style-name="1_22" style:family="text" style:name="T2184">
      <style:text-properties/>
    </style:style>
    <style:style style:parent-style-name="1_11" style:family="text" style:name="T2185">
      <style:text-properties/>
    </style:style>
    <style:style style:parent-style-name="1_18" style:family="paragraph" style:name="P23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186">
      <style:text-properties/>
    </style:style>
    <style:style style:parent-style-name="1_20" style:family="paragraph" style:name="P24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187">
      <style:text-properties/>
    </style:style>
    <style:style style:parent-style-name="1_11" style:family="text" style:name="T2188">
      <style:text-properties/>
    </style:style>
    <style:style style:parent-style-name="1_10" style:family="paragraph" style:name="P24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89">
      <style:text-properties/>
    </style:style>
    <style:style style:parent-style-name="1_22" style:family="text" style:name="T2190">
      <style:text-properties/>
    </style:style>
    <style:style style:parent-style-name="1_11" style:family="text" style:name="T2191">
      <style:text-properties/>
    </style:style>
    <style:style style:parent-style-name="1_10" style:family="paragraph" style:name="P24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92">
      <style:text-properties/>
    </style:style>
    <style:style style:parent-style-name="1_16" style:family="paragraph" style:name="P24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193">
      <style:text-properties/>
    </style:style>
    <style:style style:parent-style-name="1_14" style:family="paragraph" style:name="P244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194">
      <style:text-properties/>
    </style:style>
    <style:style style:parent-style-name="1_10" style:family="paragraph" style:name="P24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95">
      <style:text-properties/>
    </style:style>
    <style:style style:parent-style-name="1_10" style:family="paragraph" style:name="P24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196">
      <style:text-properties/>
    </style:style>
    <style:style style:parent-style-name="1_22" style:family="text" style:name="T2197">
      <style:text-properties/>
    </style:style>
    <style:style style:parent-style-name="1_11" style:family="text" style:name="T2198">
      <style:text-properties/>
    </style:style>
    <style:style style:parent-style-name="1_22" style:family="text" style:name="T2199">
      <style:text-properties/>
    </style:style>
    <style:style style:parent-style-name="1_11" style:family="text" style:name="T2200">
      <style:text-properties/>
    </style:style>
    <style:style style:parent-style-name="1_18" style:family="paragraph" style:name="P24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01">
      <style:text-properties/>
    </style:style>
    <style:style style:parent-style-name="1_20" style:family="paragraph" style:name="P24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02">
      <style:text-properties/>
    </style:style>
    <style:style style:parent-style-name="1_11" style:family="text" style:name="T2203">
      <style:text-properties/>
    </style:style>
    <style:style style:parent-style-name="1_10" style:family="paragraph" style:name="P24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04">
      <style:text-properties/>
    </style:style>
    <style:style style:parent-style-name="1_16" style:family="paragraph" style:name="P25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05">
      <style:text-properties/>
    </style:style>
    <style:style style:parent-style-name="1_18" style:family="paragraph" style:name="P25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06">
      <style:text-properties/>
    </style:style>
    <style:style style:parent-style-name="1_20" style:family="paragraph" style:name="P25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07">
      <style:text-properties/>
    </style:style>
    <style:style style:parent-style-name="1_11" style:family="text" style:name="T2208">
      <style:text-properties/>
    </style:style>
    <style:style style:parent-style-name="1_10" style:family="paragraph" style:name="P25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09">
      <style:text-properties/>
    </style:style>
    <style:style style:parent-style-name="1_16" style:family="paragraph" style:name="P25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10">
      <style:text-properties/>
    </style:style>
    <style:style style:parent-style-name="1_29" style:family="paragraph" style:name="P255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211">
      <style:text-properties/>
    </style:style>
    <style:style style:parent-style-name="1_16" style:family="paragraph" style:name="P25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12">
      <style:text-properties/>
    </style:style>
    <style:style style:parent-style-name="1_16" style:family="paragraph" style:name="P25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13">
      <style:text-properties/>
    </style:style>
    <style:style style:parent-style-name="1_14" style:family="paragraph" style:name="P258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214">
      <style:text-properties/>
    </style:style>
    <style:style style:parent-style-name="1_10" style:family="paragraph" style:name="P25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15">
      <style:text-properties/>
    </style:style>
    <style:style style:parent-style-name="1_18" style:family="paragraph" style:name="P26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16">
      <style:text-properties/>
    </style:style>
    <style:style style:parent-style-name="1_20" style:family="paragraph" style:name="P26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17">
      <style:text-properties/>
    </style:style>
    <style:style style:parent-style-name="1_11" style:family="text" style:name="T2218">
      <style:text-properties/>
    </style:style>
    <style:style style:parent-style-name="1_11" style:family="text" style:name="T2219">
      <style:text-properties/>
    </style:style>
    <style:style style:parent-style-name="1_21" style:family="text" style:name="T2220">
      <style:text-properties/>
    </style:style>
    <style:style style:parent-style-name="1_11" style:family="text" style:name="T2221">
      <style:text-properties/>
    </style:style>
    <style:style style:parent-style-name="1_22" style:family="text" style:name="T2222">
      <style:text-properties/>
    </style:style>
    <style:style style:parent-style-name="1_31" style:list-style-name="WWNum23" style:family="paragraph" style:name="P26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223">
      <style:text-properties/>
    </style:style>
    <style:style style:parent-style-name="1_13" style:family="text" style:name="T2224">
      <style:text-properties/>
    </style:style>
    <style:style style:parent-style-name="1_31" style:list-style-name="WWNum23" style:family="paragraph" style:name="P26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225">
      <style:text-properties/>
    </style:style>
    <style:style style:parent-style-name="1_13" style:family="text" style:name="T2226">
      <style:text-properties/>
    </style:style>
    <style:style style:parent-style-name="1_16" style:family="paragraph" style:name="P26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27">
      <style:text-properties/>
    </style:style>
    <style:style style:parent-style-name="1_18" style:family="paragraph" style:name="P26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28">
      <style:text-properties/>
    </style:style>
    <style:style style:parent-style-name="1_20" style:family="paragraph" style:name="P26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29">
      <style:text-properties/>
    </style:style>
    <style:style style:parent-style-name="1_11" style:family="text" style:name="T2230">
      <style:text-properties/>
    </style:style>
    <style:style style:parent-style-name="1_11" style:family="text" style:name="T2231">
      <style:text-properties/>
    </style:style>
    <style:style style:parent-style-name="1_21" style:family="text" style:name="T2232">
      <style:text-properties/>
    </style:style>
    <style:style style:parent-style-name="1_11" style:family="text" style:name="T2233">
      <style:text-properties/>
    </style:style>
    <style:style style:parent-style-name="1_22" style:family="text" style:name="T2234">
      <style:text-properties/>
    </style:style>
    <style:style style:parent-style-name="1_10" style:family="paragraph" style:name="P26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35">
      <style:text-properties/>
    </style:style>
    <style:style style:parent-style-name="1_22" style:family="text" style:name="T2236">
      <style:text-properties/>
    </style:style>
    <style:style style:parent-style-name="1_11" style:family="text" style:name="T2237">
      <style:text-properties/>
    </style:style>
    <style:style style:parent-style-name="1_22" style:family="text" style:name="T2238">
      <style:text-properties/>
    </style:style>
    <style:style style:parent-style-name="1_11" style:family="text" style:name="T2239">
      <style:text-properties/>
    </style:style>
    <style:style style:parent-style-name="1_16" style:family="paragraph" style:name="P26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40">
      <style:text-properties/>
    </style:style>
    <style:style style:parent-style-name="1_18" style:family="paragraph" style:name="P26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41">
      <style:text-properties/>
    </style:style>
    <style:style style:parent-style-name="1_20" style:family="paragraph" style:name="P27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42">
      <style:text-properties/>
    </style:style>
    <style:style style:parent-style-name="1_11" style:family="text" style:name="T2243">
      <style:text-properties/>
    </style:style>
    <style:style style:parent-style-name="1_10" style:family="paragraph" style:name="P27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44">
      <style:text-properties/>
    </style:style>
    <style:style style:parent-style-name="1_22" style:family="text" style:name="T2245">
      <style:text-properties/>
    </style:style>
    <style:style style:parent-style-name="1_11" style:family="text" style:name="T2246">
      <style:text-properties/>
    </style:style>
    <style:style style:parent-style-name="1_22" style:family="text" style:name="T2247">
      <style:text-properties/>
    </style:style>
    <style:style style:parent-style-name="1_11" style:family="text" style:name="T2248">
      <style:text-properties/>
    </style:style>
    <style:style style:parent-style-name="1_16" style:family="paragraph" style:name="P27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49">
      <style:text-properties/>
    </style:style>
    <style:style style:parent-style-name="1_18" style:family="paragraph" style:name="P27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50">
      <style:text-properties/>
    </style:style>
    <style:style style:parent-style-name="1_30" style:family="text" style:name="T2251">
      <style:text-properties/>
    </style:style>
    <style:style style:parent-style-name="1_19" style:family="text" style:name="T2252">
      <style:text-properties/>
    </style:style>
    <style:style style:parent-style-name="1_10" style:family="paragraph" style:name="P27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53">
      <style:text-properties/>
    </style:style>
    <style:style style:parent-style-name="1_16" style:family="paragraph" style:name="P27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254">
      <style:text-properties/>
    </style:style>
    <style:style style:parent-style-name="1_14" style:family="paragraph" style:name="P276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255">
      <style:text-properties/>
    </style:style>
    <style:style style:parent-style-name="1_18" style:family="paragraph" style:name="P27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56">
      <style:text-properties/>
    </style:style>
    <style:style style:parent-style-name="1_20" style:family="paragraph" style:name="P27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57">
      <style:text-properties/>
    </style:style>
    <style:style style:parent-style-name="1_11" style:family="text" style:name="T2258">
      <style:text-properties/>
    </style:style>
    <style:style style:parent-style-name="1_11" style:family="text" style:name="T2259">
      <style:text-properties/>
    </style:style>
    <style:style style:parent-style-name="1_21" style:family="text" style:name="T2260">
      <style:text-properties/>
    </style:style>
    <style:style style:parent-style-name="1_11" style:family="text" style:name="T2261">
      <style:text-properties/>
    </style:style>
    <style:style style:parent-style-name="1_22" style:family="text" style:name="T2262">
      <style:text-properties/>
    </style:style>
    <style:style style:parent-style-name="1_10" style:family="paragraph" style:name="P27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63">
      <style:text-properties/>
    </style:style>
    <style:style style:parent-style-name="1_31" style:list-style-name="WWNum23" style:family="paragraph" style:name="P28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264">
      <style:text-properties/>
    </style:style>
    <style:style style:parent-style-name="1_13" style:family="text" style:name="T2265">
      <style:text-properties/>
    </style:style>
    <style:style style:parent-style-name="1_31" style:list-style-name="WWNum23" style:family="paragraph" style:name="P28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266">
      <style:text-properties/>
    </style:style>
    <style:style style:parent-style-name="1_13" style:family="text" style:name="T2267">
      <style:text-properties/>
    </style:style>
    <style:style style:parent-style-name="1_10" style:family="paragraph" style:name="P28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68">
      <style:text-properties/>
    </style:style>
    <style:style style:parent-style-name="1_22" style:family="text" style:name="T2269">
      <style:text-properties/>
    </style:style>
    <style:style style:parent-style-name="1_11" style:family="text" style:name="T2270">
      <style:text-properties/>
    </style:style>
    <style:style style:parent-style-name="1_22" style:family="text" style:name="T2271">
      <style:text-properties/>
    </style:style>
    <style:style style:parent-style-name="1_11" style:family="text" style:name="T2272">
      <style:text-properties/>
    </style:style>
    <style:style style:parent-style-name="1_22" style:family="text" style:name="T2273">
      <style:text-properties/>
    </style:style>
    <style:style style:parent-style-name="1_11" style:family="text" style:name="T2274">
      <style:text-properties/>
    </style:style>
    <style:style style:parent-style-name="1_22" style:family="text" style:name="T2275">
      <style:text-properties/>
    </style:style>
    <style:style style:parent-style-name="1_11" style:family="text" style:name="T2276">
      <style:text-properties/>
    </style:style>
    <style:style style:parent-style-name="1_22" style:family="text" style:name="T2277">
      <style:text-properties/>
    </style:style>
    <style:style style:parent-style-name="1_11" style:family="text" style:name="T2278">
      <style:text-properties/>
    </style:style>
    <style:style style:parent-style-name="1_22" style:family="text" style:name="T2279">
      <style:text-properties/>
    </style:style>
    <style:style style:parent-style-name="1_11" style:family="text" style:name="T2280">
      <style:text-properties/>
    </style:style>
    <style:style style:parent-style-name="1_10" style:family="paragraph" style:name="P28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81">
      <style:text-properties/>
    </style:style>
    <style:style style:parent-style-name="1_18" style:family="paragraph" style:name="P28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282">
      <style:text-properties/>
    </style:style>
    <style:style style:parent-style-name="1_20" style:family="paragraph" style:name="P28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283">
      <style:text-properties/>
    </style:style>
    <style:style style:parent-style-name="1_11" style:family="text" style:name="T2284">
      <style:text-properties/>
    </style:style>
    <style:style style:parent-style-name="1_11" style:family="text" style:name="T2285">
      <style:text-properties/>
    </style:style>
    <style:style style:parent-style-name="1_21" style:family="text" style:name="T2286">
      <style:text-properties/>
    </style:style>
    <style:style style:parent-style-name="1_11" style:family="text" style:name="T2287">
      <style:text-properties/>
    </style:style>
    <style:style style:parent-style-name="1_22" style:family="text" style:name="T2288">
      <style:text-properties/>
    </style:style>
    <style:style style:parent-style-name="1_10" style:family="paragraph" style:name="P28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89">
      <style:text-properties/>
    </style:style>
    <style:style style:parent-style-name="1_31" style:list-style-name="WWNum23" style:family="paragraph" style:name="P28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290">
      <style:text-properties/>
    </style:style>
    <style:style style:parent-style-name="1_13" style:family="text" style:name="T2291">
      <style:text-properties/>
    </style:style>
    <style:style style:parent-style-name="1_31" style:list-style-name="WWNum23" style:family="paragraph" style:name="P28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292">
      <style:text-properties/>
    </style:style>
    <style:style style:parent-style-name="1_13" style:family="text" style:name="T2293">
      <style:text-properties/>
    </style:style>
    <style:style style:parent-style-name="1_10" style:family="paragraph" style:name="P28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294">
      <style:text-properties/>
    </style:style>
    <style:style style:parent-style-name="1_22" style:family="text" style:name="T2295">
      <style:text-properties/>
    </style:style>
    <style:style style:parent-style-name="1_11" style:family="text" style:name="T2296">
      <style:text-properties/>
    </style:style>
    <style:style style:parent-style-name="1_22" style:family="text" style:name="T2297">
      <style:text-properties/>
    </style:style>
    <style:style style:parent-style-name="1_11" style:family="text" style:name="T2298">
      <style:text-properties/>
    </style:style>
    <style:style style:parent-style-name="1_22" style:family="text" style:name="T2299">
      <style:text-properties/>
    </style:style>
    <style:style style:parent-style-name="1_11" style:family="text" style:name="T2300">
      <style:text-properties/>
    </style:style>
    <style:style style:parent-style-name="1_22" style:family="text" style:name="T2301">
      <style:text-properties/>
    </style:style>
    <style:style style:parent-style-name="1_11" style:family="text" style:name="T2302">
      <style:text-properties/>
    </style:style>
    <style:style style:parent-style-name="1_22" style:family="text" style:name="T2303">
      <style:text-properties/>
    </style:style>
    <style:style style:parent-style-name="1_11" style:family="text" style:name="T2304">
      <style:text-properties/>
    </style:style>
    <style:style style:parent-style-name="1_22" style:family="text" style:name="T2305">
      <style:text-properties/>
    </style:style>
    <style:style style:parent-style-name="1_11" style:family="text" style:name="T2306">
      <style:text-properties/>
    </style:style>
    <style:style style:parent-style-name="1_10" style:family="paragraph" style:name="P29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07">
      <style:text-properties/>
    </style:style>
    <style:style style:parent-style-name="1_14" style:family="paragraph" style:name="P291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308">
      <style:text-properties/>
    </style:style>
    <style:style style:parent-style-name="1_18" style:family="paragraph" style:name="P29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309">
      <style:text-properties/>
    </style:style>
    <style:style style:parent-style-name="1_20" style:family="paragraph" style:name="P29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310">
      <style:text-properties/>
    </style:style>
    <style:style style:parent-style-name="1_11" style:family="text" style:name="T2311">
      <style:text-properties/>
    </style:style>
    <style:style style:parent-style-name="1_10" style:family="paragraph" style:name="P29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12">
      <style:text-properties/>
    </style:style>
    <style:style style:parent-style-name="1_22" style:family="text" style:name="T2313">
      <style:text-properties/>
    </style:style>
    <style:style style:parent-style-name="1_11" style:family="text" style:name="T2314">
      <style:text-properties/>
    </style:style>
    <style:style style:family="table" style:name="ta4">
      <style:table-properties style:width="4.131cm"/>
    </style:style>
    <style:style style:family="table-column" style:name="co8">
      <style:table-column-properties style:column-width="2.066cm"/>
    </style:style>
    <style:style style:family="table-column" style:name="co9">
      <style:table-column-properties style:column-width="2.066cm"/>
    </style:style>
    <style:style style:family="table-row" style:name="ro28">
      <style:table-row-properties/>
    </style:style>
    <style:style style:family="table-cell" style:name="ce67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29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315">
      <style:text-properties/>
    </style:style>
    <style:style style:family="table-cell" style:name="ce68">
      <style:table-cell-properties style:vertical-align="middle" fo:border-bottom="0.05292cm solid #DDDDDD" fo:padding-top="0.02646cm" fo:padding-bottom="0.02646cm" fo:padding-left="0.02646cm" fo:padding-right="0.02646cm"/>
    </style:style>
    <style:style style:parent-style-name="1_23" style:family="paragraph" style:name="P29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4" style:family="text" style:name="T2316">
      <style:text-properties/>
    </style:style>
    <style:style style:parent-style-name="1_33" style:family="text" style:name="T2317">
      <style:text-properties/>
    </style:style>
    <style:style style:family="table-row" style:name="ro29">
      <style:table-row-properties/>
    </style:style>
    <style:style style:family="table-cell" style:name="ce69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9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318">
      <style:text-properties/>
    </style:style>
    <style:style style:family="table-cell" style:name="ce70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29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319">
      <style:text-properties/>
    </style:style>
    <style:style style:parent-style-name="1_26" style:family="text" style:name="T2320">
      <style:text-properties/>
    </style:style>
    <style:style style:parent-style-name="1_28" style:family="text" style:name="T2321">
      <style:text-properties/>
    </style:style>
    <style:style style:parent-style-name="1_26" style:family="text" style:name="T2322">
      <style:text-properties/>
    </style:style>
    <style:style style:parent-style-name="1_28" style:family="text" style:name="T2323">
      <style:text-properties/>
    </style:style>
    <style:style style:family="table-row" style:name="ro30">
      <style:table-row-properties/>
    </style:style>
    <style:style style:family="table-cell" style:name="ce71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29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324">
      <style:text-properties/>
    </style:style>
    <style:style style:family="table-cell" style:name="ce72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30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325">
      <style:text-properties/>
    </style:style>
    <style:style style:parent-style-name="1_26" style:family="text" style:name="T2326">
      <style:text-properties/>
    </style:style>
    <style:style style:parent-style-name="1_28" style:family="text" style:name="T2327">
      <style:text-properties/>
    </style:style>
    <style:style style:parent-style-name="1_26" style:family="text" style:name="T2328">
      <style:text-properties/>
    </style:style>
    <style:style style:parent-style-name="1_28" style:family="text" style:name="T2329">
      <style:text-properties/>
    </style:style>
    <style:style style:family="table-row" style:name="ro31">
      <style:table-row-properties/>
    </style:style>
    <style:style style:family="table-cell" style:name="ce73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5" style:family="paragraph" style:name="P30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6" style:family="text" style:name="T2330">
      <style:text-properties/>
    </style:style>
    <style:style style:family="table-cell" style:name="ce74">
      <style:table-cell-properties style:vertical-align="middle" fo:border-top="0.02646cm solid #DDDDDD" fo:padding-top="0.02646cm" fo:padding-bottom="0.02646cm" fo:padding-left="0.02646cm" fo:padding-right="0.02646cm"/>
    </style:style>
    <style:style style:parent-style-name="1_27" style:family="paragraph" style:name="P30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8" style:family="text" style:name="T2331">
      <style:text-properties/>
    </style:style>
    <style:style style:parent-style-name="1_26" style:family="text" style:name="T2332">
      <style:text-properties/>
    </style:style>
    <style:style style:parent-style-name="1_28" style:family="text" style:name="T2333">
      <style:text-properties/>
    </style:style>
    <style:style style:family="paragraph" style:name="P303">
      <style:paragraph-properties/>
      <style:text-properties style:font-family-asian="Times New Roman" fo:font-size="1pt" style:font-size-complex="1pt" text:display="none"/>
    </style:style>
    <style:style style:family="text" style:name="T2334">
      <style:text-properties style:font-family-asian="Times New Roman" fo:font-size="1pt" style:font-size-complex="1pt" text:display="none"/>
    </style:style>
    <style:style style:family="text" style:name="T2335">
      <style:text-properties style:font-family-asian="Times New Roman" fo:font-size="1pt" style:font-size-complex="1pt" text:display="none"/>
    </style:style>
    <style:style style:family="text" style:name="T2336">
      <style:text-properties style:font-family-asian="Times New Roman" fo:font-size="1pt" style:font-size-complex="1pt" text:display="none"/>
    </style:style>
    <style:style style:parent-style-name="1_10" style:family="paragraph" style:name="P30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37">
      <style:text-properties/>
    </style:style>
    <style:style style:parent-style-name="1_22" style:family="text" style:name="T2338">
      <style:text-properties/>
    </style:style>
    <style:style style:parent-style-name="1_11" style:family="text" style:name="T2339">
      <style:text-properties/>
    </style:style>
    <style:style style:parent-style-name="1_16" style:family="paragraph" style:name="P30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40">
      <style:text-properties/>
    </style:style>
    <style:style style:parent-style-name="1_18" style:family="paragraph" style:name="P30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341">
      <style:text-properties/>
    </style:style>
    <style:style style:parent-style-name="1_20" style:family="paragraph" style:name="P30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342">
      <style:text-properties/>
    </style:style>
    <style:style style:parent-style-name="1_11" style:family="text" style:name="T2343">
      <style:text-properties/>
    </style:style>
    <style:style style:parent-style-name="1_11" style:family="text" style:name="T2344">
      <style:text-properties/>
    </style:style>
    <style:style style:parent-style-name="1_21" style:family="text" style:name="T2345">
      <style:text-properties/>
    </style:style>
    <style:style style:parent-style-name="1_11" style:family="text" style:name="T2346">
      <style:text-properties/>
    </style:style>
    <style:style style:parent-style-name="1_22" style:family="text" style:name="T2347">
      <style:text-properties/>
    </style:style>
    <style:style style:parent-style-name="1_31" style:list-style-name="WWNum23" style:family="paragraph" style:name="P30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348">
      <style:text-properties/>
    </style:style>
    <style:style style:parent-style-name="1_13" style:family="text" style:name="T2349">
      <style:text-properties/>
    </style:style>
    <style:style style:parent-style-name="1_31" style:list-style-name="WWNum23" style:family="paragraph" style:name="P30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2" style:family="text" style:name="T2350">
      <style:text-properties/>
    </style:style>
    <style:style style:parent-style-name="1_13" style:family="text" style:name="T2351">
      <style:text-properties/>
    </style:style>
    <style:style style:parent-style-name="1_16" style:family="paragraph" style:name="P31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52">
      <style:text-properties/>
    </style:style>
    <style:style style:parent-style-name="1_18" style:family="paragraph" style:name="P31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353">
      <style:text-properties/>
    </style:style>
    <style:style style:parent-style-name="1_20" style:family="paragraph" style:name="P31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354">
      <style:text-properties/>
    </style:style>
    <style:style style:parent-style-name="1_11" style:family="text" style:name="T2355">
      <style:text-properties/>
    </style:style>
    <style:style style:parent-style-name="1_10" style:family="paragraph" style:name="P31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56">
      <style:text-properties/>
    </style:style>
    <style:style style:parent-style-name="1_22" style:family="text" style:name="T2357">
      <style:text-properties/>
    </style:style>
    <style:style style:parent-style-name="1_11" style:family="text" style:name="T2358">
      <style:text-properties/>
    </style:style>
    <style:style style:parent-style-name="1_16" style:family="paragraph" style:name="P31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59">
      <style:text-properties/>
    </style:style>
    <style:style style:parent-style-name="1_14" style:family="paragraph" style:name="P315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360">
      <style:text-properties/>
    </style:style>
    <style:style style:parent-style-name="1_18" style:family="paragraph" style:name="P31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361">
      <style:text-properties/>
    </style:style>
    <style:style style:parent-style-name="1_20" style:family="paragraph" style:name="P31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362">
      <style:text-properties/>
    </style:style>
    <style:style style:parent-style-name="1_11" style:family="text" style:name="T2363">
      <style:text-properties/>
    </style:style>
    <style:style style:parent-style-name="1_10" style:family="paragraph" style:name="P31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64">
      <style:text-properties/>
    </style:style>
    <style:style style:parent-style-name="1_22" style:family="text" style:name="T2365">
      <style:text-properties/>
    </style:style>
    <style:style style:parent-style-name="1_11" style:family="text" style:name="T2366">
      <style:text-properties/>
    </style:style>
    <style:style style:parent-style-name="1_16" style:family="paragraph" style:name="P31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67">
      <style:text-properties/>
    </style:style>
    <style:style style:parent-style-name="1_14" style:family="paragraph" style:name="P320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368">
      <style:text-properties/>
    </style:style>
    <style:style style:parent-style-name="1_18" style:family="paragraph" style:name="P32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9" style:family="text" style:name="T2369">
      <style:text-properties/>
    </style:style>
    <style:style style:parent-style-name="1_20" style:family="paragraph" style:name="P32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21" style:family="text" style:name="T2370">
      <style:text-properties/>
    </style:style>
    <style:style style:parent-style-name="1_11" style:family="text" style:name="T2371">
      <style:text-properties/>
    </style:style>
    <style:style style:parent-style-name="1_22" style:family="text" style:name="T2372">
      <style:text-properties/>
    </style:style>
    <style:style style:parent-style-name="1_10" style:family="paragraph" style:name="P32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73">
      <style:text-properties/>
    </style:style>
    <style:style style:parent-style-name="1_22" style:family="text" style:name="T2374">
      <style:text-properties/>
    </style:style>
    <style:style style:parent-style-name="1_11" style:family="text" style:name="T2375">
      <style:text-properties/>
    </style:style>
    <style:style style:parent-style-name="1_16" style:family="paragraph" style:name="P32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76">
      <style:text-properties/>
    </style:style>
    <style:style style:parent-style-name="1_10" style:family="paragraph" style:name="P32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77">
      <style:text-properties/>
    </style:style>
    <style:style style:parent-style-name="1_22" style:family="text" style:name="T2378">
      <style:text-properties/>
    </style:style>
    <style:style style:parent-style-name="1_11" style:family="text" style:name="T2379">
      <style:text-properties/>
    </style:style>
    <style:style style:parent-style-name="1_22" style:family="text" style:name="T2380">
      <style:text-properties/>
    </style:style>
    <style:style style:parent-style-name="1_11" style:family="text" style:name="T2381">
      <style:text-properties/>
    </style:style>
    <style:style style:parent-style-name="1_14" style:family="paragraph" style:name="P326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382">
      <style:text-properties/>
    </style:style>
    <style:style style:family="text" style:name="T2383">
      <style:text-properties fo:language="it" fo:country="IT"/>
    </style:style>
    <style:style style:parent-style-name="1_29" style:family="paragraph" style:name="P327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384">
      <style:text-properties/>
    </style:style>
    <style:style style:parent-style-name="1_10" style:family="paragraph" style:name="P32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385">
      <style:text-properties/>
    </style:style>
    <style:style style:parent-style-name="1_16" style:family="paragraph" style:name="P32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86">
      <style:text-properties/>
    </style:style>
    <style:style style:parent-style-name="1_17" style:family="text" style:name="T2387">
      <style:text-properties/>
    </style:style>
    <style:style style:parent-style-name="1_17" style:family="text" style:name="T2388">
      <style:text-properties/>
    </style:style>
    <style:style style:parent-style-name="1_16" style:family="paragraph" style:name="P330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89">
      <style:text-properties fo:language="it" fo:country="IT"/>
    </style:style>
    <style:style style:parent-style-name="1_17" style:family="text" style:name="T2390">
      <style:text-properties/>
    </style:style>
    <style:style style:parent-style-name="1_16" style:family="paragraph" style:name="P33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91">
      <style:text-properties/>
    </style:style>
    <style:style style:parent-style-name="1_17" style:family="text" style:name="T2392">
      <style:text-properties/>
    </style:style>
    <style:style style:parent-style-name="1_16" style:family="paragraph" style:name="P33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93">
      <style:text-properties fo:language="it" fo:country="IT"/>
    </style:style>
    <style:style style:parent-style-name="1_17" style:family="text" style:name="T2394">
      <style:text-properties/>
    </style:style>
    <style:style style:parent-style-name="1_17" style:family="text" style:name="T2395">
      <style:text-properties/>
    </style:style>
    <style:style style:parent-style-name="1_16" style:family="paragraph" style:name="P33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396">
      <style:text-properties/>
    </style:style>
    <style:style style:parent-style-name="1_17" style:family="text" style:name="T2397">
      <style:text-properties fo:language="it" fo:country="IT"/>
    </style:style>
    <style:style style:parent-style-name="1_17" style:family="text" style:name="T2398">
      <style:text-properties/>
    </style:style>
    <style:style style:parent-style-name="1_17" style:family="text" style:name="T2399">
      <style:text-properties/>
    </style:style>
    <style:style style:parent-style-name="1_17" style:family="text" style:name="T2400">
      <style:text-properties/>
    </style:style>
    <style:style style:parent-style-name="1_29" style:family="paragraph" style:name="P334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401">
      <style:text-properties/>
    </style:style>
    <style:style style:parent-style-name="1_10" style:family="paragraph" style:name="P33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402">
      <style:text-properties/>
    </style:style>
    <style:style style:parent-style-name="1_16" style:family="paragraph" style:name="P33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03">
      <style:text-properties fo:language="it" fo:country="IT"/>
    </style:style>
    <style:style style:parent-style-name="1_17" style:family="text" style:name="T2404">
      <style:text-properties/>
    </style:style>
    <style:style style:parent-style-name="1_17" style:family="text" style:name="T2405">
      <style:text-properties/>
    </style:style>
    <style:style style:parent-style-name="1_16" style:family="paragraph" style:name="P33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06">
      <style:text-properties/>
    </style:style>
    <style:style style:parent-style-name="1_16" style:family="paragraph" style:name="P338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07">
      <style:text-properties fo:language="it" fo:country="IT"/>
    </style:style>
    <style:style style:parent-style-name="1_17" style:family="text" style:name="T2408">
      <style:text-properties/>
    </style:style>
    <style:style style:parent-style-name="1_17" style:family="text" style:name="T2409">
      <style:text-properties/>
    </style:style>
    <style:style style:parent-style-name="1_16" style:family="paragraph" style:name="P339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10">
      <style:text-properties/>
    </style:style>
    <style:style style:parent-style-name="1_17" style:family="text" style:name="T2411">
      <style:text-properties/>
    </style:style>
    <style:style style:parent-style-name="1_17" style:family="text" style:name="T2412">
      <style:text-properties/>
    </style:style>
    <style:style style:parent-style-name="1_29" style:family="paragraph" style:name="P340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0" style:family="text" style:name="T2413">
      <style:text-properties/>
    </style:style>
    <style:style style:parent-style-name="1_10" style:family="paragraph" style:name="P341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1" style:family="text" style:name="T2414">
      <style:text-properties/>
    </style:style>
    <style:style style:parent-style-name="1_16" style:family="paragraph" style:name="P342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15">
      <style:text-properties fo:language="it" fo:country="IT"/>
    </style:style>
    <style:style style:parent-style-name="1_17" style:family="text" style:name="T2416">
      <style:text-properties/>
    </style:style>
    <style:style style:parent-style-name="1_17" style:family="text" style:name="T2417">
      <style:text-properties/>
    </style:style>
    <style:style style:parent-style-name="1_16" style:family="paragraph" style:name="P34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18">
      <style:text-properties/>
    </style:style>
    <style:style style:parent-style-name="1_17" style:family="text" style:name="T2419">
      <style:text-properties/>
    </style:style>
    <style:style style:parent-style-name="1_17" style:family="text" style:name="T2420">
      <style:text-properties/>
    </style:style>
    <style:style style:parent-style-name="1_16" style:family="paragraph" style:name="P344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21">
      <style:text-properties fo:language="it" fo:country="IT"/>
    </style:style>
    <style:style style:parent-style-name="1_17" style:family="text" style:name="T2422">
      <style:text-properties/>
    </style:style>
    <style:style style:parent-style-name="1_17" style:family="text" style:name="T2423">
      <style:text-properties/>
    </style:style>
    <style:style style:parent-style-name="1_16" style:family="paragraph" style:name="P345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24">
      <style:text-properties/>
    </style:style>
    <style:style style:parent-style-name="1_17" style:family="text" style:name="T2425">
      <style:text-properties/>
    </style:style>
    <style:style style:parent-style-name="1_17" style:family="text" style:name="T2426">
      <style:text-properties/>
    </style:style>
    <style:style style:parent-style-name="1_16" style:family="paragraph" style:name="P346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27">
      <style:text-properties/>
    </style:style>
    <style:style style:parent-style-name="1_17" style:family="text" style:name="T2428">
      <style:text-properties/>
    </style:style>
    <style:style style:parent-style-name="1_17" style:family="text" style:name="T2429">
      <style:text-properties/>
    </style:style>
    <style:style style:parent-style-name="1_17" style:family="text" style:name="T2430">
      <style:text-properties/>
    </style:style>
    <style:style style:parent-style-name="1_17" style:family="text" style:name="T2431">
      <style:text-properties/>
    </style:style>
    <style:style style:parent-style-name="1_16" style:family="paragraph" style:name="P347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7" style:family="text" style:name="T2432">
      <style:text-properties/>
    </style:style>
    <style:style style:parent-style-name="1_17" style:family="text" style:name="T2433">
      <style:text-properties/>
    </style:style>
    <style:style style:parent-style-name="1_17" style:family="text" style:name="T2434">
      <style:text-properties/>
    </style:style>
    <style:style style:parent-style-name="1_17" style:family="text" style:name="T2435">
      <style:text-properties/>
    </style:style>
    <style:style style:parent-style-name="1_17" style:family="text" style:name="T2436">
      <style:text-properties/>
    </style:style>
    <style:style style:parent-style-name="1_14" style:family="paragraph" style:name="P348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437">
      <style:text-properties/>
    </style:style>
    <style:style style:parent-style-name="1_34" style:list-style-name="WWNum24" style:family="paragraph" style:name="P349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38">
      <style:text-properties/>
    </style:style>
    <style:style style:parent-style-name="1_36" style:family="text" style:name="T2439">
      <style:text-properties/>
    </style:style>
    <style:style style:parent-style-name="1_35" style:family="text" style:name="T2440">
      <style:text-properties/>
    </style:style>
    <style:style style:parent-style-name="1_34" style:list-style-name="WWNum24" style:family="paragraph" style:name="P350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41">
      <style:text-properties/>
    </style:style>
    <style:style style:parent-style-name="1_36" style:family="text" style:name="T2442">
      <style:text-properties/>
    </style:style>
    <style:style style:parent-style-name="1_35" style:family="text" style:name="T2443">
      <style:text-properties/>
    </style:style>
    <style:style style:parent-style-name="1_34" style:list-style-name="WWNum24" style:family="paragraph" style:name="P351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44">
      <style:text-properties/>
    </style:style>
    <style:style style:parent-style-name="1_36" style:family="text" style:name="T2445">
      <style:text-properties/>
    </style:style>
    <style:style style:parent-style-name="1_35" style:family="text" style:name="T2446">
      <style:text-properties/>
    </style:style>
    <style:style style:parent-style-name="1_34" style:list-style-name="WWNum24" style:family="paragraph" style:name="P352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47">
      <style:text-properties/>
    </style:style>
    <style:style style:parent-style-name="1_36" style:family="text" style:name="T2448">
      <style:text-properties/>
    </style:style>
    <style:style style:parent-style-name="1_35" style:family="text" style:name="T2449">
      <style:text-properties/>
    </style:style>
    <style:style style:parent-style-name="1_36" style:family="text" style:name="T2450">
      <style:text-properties/>
    </style:style>
    <style:style style:parent-style-name="1_35" style:family="text" style:name="T2451">
      <style:text-properties/>
    </style:style>
    <style:style style:parent-style-name="1_34" style:list-style-name="WWNum24" style:family="paragraph" style:name="P353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52">
      <style:text-properties/>
    </style:style>
    <style:style style:parent-style-name="1_36" style:family="text" style:name="T2453">
      <style:text-properties/>
    </style:style>
    <style:style style:parent-style-name="1_35" style:family="text" style:name="T2454">
      <style:text-properties/>
    </style:style>
    <style:style style:parent-style-name="1_36" style:family="text" style:name="T2455">
      <style:text-properties/>
    </style:style>
    <style:style style:parent-style-name="1_35" style:family="text" style:name="T2456">
      <style:text-properties/>
    </style:style>
    <style:style style:parent-style-name="1_34" style:list-style-name="WWNum24" style:family="paragraph" style:name="P354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57">
      <style:text-properties/>
    </style:style>
    <style:style style:parent-style-name="1_36" style:family="text" style:name="T2458">
      <style:text-properties/>
    </style:style>
    <style:style style:parent-style-name="1_35" style:family="text" style:name="T2459">
      <style:text-properties/>
    </style:style>
    <style:style style:parent-style-name="1_34" style:list-style-name="WWNum24" style:family="paragraph" style:name="P355">
      <style:paragraph-properties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35" style:family="text" style:name="T2460">
      <style:text-properties/>
    </style:style>
    <style:style style:parent-style-name="1_36" style:family="text" style:name="T2461">
      <style:text-properties/>
    </style:style>
    <style:style style:parent-style-name="1_35" style:family="text" style:name="T2462">
      <style:text-properties/>
    </style:style>
    <style:style style:parent-style-name="1_36" style:family="text" style:name="T2463">
      <style:text-properties/>
    </style:style>
    <style:style style:parent-style-name="1_35" style:family="text" style:name="T2464">
      <style:text-properties/>
    </style:style>
    <style:style style:parent-style-name="1_36" style:family="text" style:name="T2465">
      <style:text-properties/>
    </style:style>
    <style:style style:parent-style-name="1_35" style:family="text" style:name="T2466">
      <style:text-properties/>
    </style:style>
    <style:style style:parent-style-name="1071" style:family="paragraph" style:name="P3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_35" style:family="text" style:name="T2467">
      <style:text-properties/>
    </style:style>
    <style:style style:family="text" style:name="T24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_35" style:family="text" style:name="T2471">
      <style:text-properties/>
    </style:style>
    <style:style style:parent-style-name="1_36" style:family="text" style:name="T2472">
      <style:text-properties/>
    </style:style>
    <style:style style:parent-style-name="1_35" style:family="text" style:name="T2473">
      <style:text-properties/>
    </style:style>
    <style:style style:family="text" style:name="T24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paragraph" style:name="P357">
      <style:paragraph-properties/>
      <style:text-properties fo:language="it" style:language-complex="hi" fo:country="IT" style:country-complex="IN"/>
    </style:style>
    <style:style style:family="text" style:name="T2476">
      <style:text-properties fo:language="it" style:language-complex="hi" fo:country="IT" style:country-complex="IN"/>
    </style:style>
    <style:style style:family="text" style:name="T2477">
      <style:text-properties fo:language="it" style:language-complex="hi" fo:country="IT" style:country-complex="IN"/>
    </style:style>
    <style:style style:family="text" style:name="T2478">
      <style:text-properties fo:language="it" style:language-complex="hi" fo:country="IT" style:country-complex="IN"/>
    </style:style>
    <style:style style:family="paragraph" style:name="P358">
      <style:paragraph-properties/>
      <style:text-properties fo:language="it" style:language-complex="hi" fo:country="IT" style:country-complex="IN"/>
    </style:style>
    <style:style style:family="text" style:name="T2479">
      <style:text-properties fo:language="it" style:language-complex="hi" fo:country="IT" style:country-complex="IN"/>
    </style:style>
    <style:style style:family="text" style:name="T2480">
      <style:text-properties fo:language="it" style:language-complex="hi" fo:country="IT" style:country-complex="IN"/>
    </style:style>
    <style:style style:family="text" style:name="T2481">
      <style:text-properties fo:language="it" style:language-complex="hi" fo:country="IT" style:country-complex="IN"/>
    </style:style>
    <style:style style:family="paragraph" style:name="P359">
      <style:paragraph-properties/>
      <style:text-properties fo:language="it" style:language-complex="hi" fo:country="IT" style:country-complex="IN"/>
    </style:style>
    <style:style style:family="text" style:name="T2482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2483">
      <style:text-properties fo:language="it" fo:country="IT"/>
    </style:style>
    <style:style style:master-page-name="MasterPage3" style:family="paragraph" style:name="P360">
      <style:paragraph-properties/>
      <style:text-properties/>
    </style:style>
    <style:style style:family="text" style:name="T2498">
      <style:text-properties/>
    </style:style>
    <style:style style:family="text" style:name="T2499">
      <style:text-properties/>
    </style:style>
    <style:style style:family="text" style:name="T2500">
      <style:text-properties/>
    </style:style>
    <style:style style:parent-style-name="1_14" style:family="paragraph" style:name="P363">
      <style:paragraph-properties fo:break-before="page"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1_15" style:family="text" style:name="T2501">
      <style:text-properties fo:language="it" fo:country="IT"/>
    </style:style>
    <style:style style:family="paragraph" style:name="P364">
      <style:paragraph-properties/>
      <style:text-properties fo:font-family="Arial" style:font-family-complex="Arial" fo:font-size="10pt" style:font-size-complex="10pt"/>
    </style:style>
    <style:style style:family="text" style:name="T2502">
      <style:text-properties fo:font-family="Arial" style:font-family-asian="Arial" style:font-family-complex="Arial" fo:font-size="10pt" style:font-size-complex="10pt"/>
    </style:style>
    <style:style style:family="text" style:name="T2503">
      <style:text-properties fo:font-family="Arial" style:font-family-asian="Arial" style:font-family-complex="Arial" fo:font-size="10pt" style:font-size-complex="10pt" fo:language="it" fo:country="IT"/>
    </style:style>
    <style:style style:family="text" style:name="T2504">
      <style:text-properties fo:font-family="Arial" style:font-family-asian="Arial" style:font-family-complex="Arial" fo:font-size="10pt" style:font-size-complex="10pt"/>
    </style:style>
    <style:style style:family="text" style:name="T2505">
      <style:text-properties fo:font-family="Arial" style:font-family-asian="Arial" style:font-family-complex="Arial" fo:font-size="10pt" style:font-size-complex="10pt" fo:language="it" fo:country="IT"/>
    </style:style>
    <style:style style:family="text" style:name="T2506">
      <style:text-properties fo:font-family="Arial" style:font-family-asian="Arial" style:font-family-complex="Arial" fo:font-size="10pt" style:font-size-complex="10pt"/>
    </style:style>
    <style:style style:family="text" style:name="T2507">
      <style:text-properties fo:font-family="Arial" style:font-family-asian="Arial" style:font-family-complex="Arial" fo:font-size="10pt" style:font-size-complex="10pt"/>
    </style:style>
    <style:style style:family="paragraph" style:name="P365">
      <style:paragraph-properties fo:margin-left="0cm" fo:margin-right="0cm" fo:text-indent="0cm" fo:margin-top="0pt" fo:margin-bottom="0pt" fo:border="none"/>
      <style:text-properties fo:font-family="Arial" style:font-family-complex="Arial" fo:font-size="12pt" style:font-size-complex="12pt"/>
    </style:style>
    <style:style style:family="text" style:name="T2508">
      <style:text-properties fo:font-family="Arial" style:font-family-asian="Arial" style:font-family-complex="Arial" fo:font-size="12pt" style:font-size-complex="12pt" fo:language="it" fo:country="IT"/>
    </style:style>
    <style:style style:family="text" style:name="T2509">
      <style:text-properties fo:font-family="Arial" style:font-family-asian="Arial" style:font-family-complex="Arial" fo:font-size="12pt" style:font-size-complex="12pt" fo:language="it" fo:country="IT"/>
    </style:style>
    <style:style style:family="text" style:name="T2510">
      <style:text-properties fo:font-family="Arial" style:font-family-asian="Arial" style:font-family-complex="Arial" fo:font-size="12pt" style:font-size-complex="12pt" fo:language="it" fo:country="IT"/>
    </style:style>
    <style:style style:family="paragraph" style:name="P366">
      <style:paragraph-properties fo:margin-left="0cm" fo:margin-right="0cm" fo:text-indent="0cm" fo:margin-top="0pt" fo:margin-bottom="0pt" fo:border="none"/>
      <style:text-properties fo:font-family="Times New Roman" style:font-family-asian="Times New Roman" style:font-family-complex="Times New Roman" fo:font-size="12pt" style:font-size-complex="12pt"/>
    </style:style>
    <style:style style:family="text" style:name="T2511">
      <style:text-properties fo:language="it" fo:country="IT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12">
      <style:text-properties fo:language="it" fo:country="IT"/>
    </style:style>
    <style:style style:family="text" style:name="T2513">
      <style:text-properties fo:language="it" fo:country="IT"/>
    </style:style>
    <style:style style:family="text" style:name="T2514">
      <style:text-properties fo:language="it" fo:country="IT"/>
    </style:style>
    <style:style style:family="paragraph" style:name="P367">
      <style:paragraph-properties/>
      <style:text-properties/>
    </style:style>
    <style:style style:family="text" style:name="T2515">
      <style:text-properties fo:language="it" fo:country="IT"/>
    </style:style>
  </office:automatic-styles>
  <office:body>
    <office:text text:use-soft-page-breaks="true">
      <text:p text:style-name="P69"><text:span text:style-name="T1822"/><text:span/><draw:frame draw:name="Image9" draw:style-name="gr5" draw:z-index="3100" text:anchor-type="paragraph" svg:width="3.45cm" svg:height="3.45cm" svg:x="1.267cm" svg:y="0cm"><draw:image xlink:href="Pictures/image2.png" xlink:type="simple" xlink:show="embed" xlink:actuate="onLoad"/></draw:frame><text:span text:style-name="T1823"><text:tab/></text:span><text:span text:style-name="T1824"/><text:span text:style-name="T1825"/></text:p>
      <text:p text:style-name="P71"><text:span text:style-name="T1826"/><text:span text:style-name="T1827"/><text:span text:style-name="T1828"/></text:p>
      <text:p text:style-name="P72"><text:span text:style-name="T1829"/><text:span text:style-name="T1830"/><text:span text:style-name="T1831">Guida alla configurazione JSON per l'importazione CSV generica</text:span><text:span text:style-name="T1832"><text:s text:c="2"/></text:span><text:span text:style-name="T1833"/><text:span text:style-name="T1834"/></text:p>
      <text:p text:style-name="P73"><text:span text:style-name="T1835"><text:s text:c="10"/></text:span><text:span text:style-name="T1836"/><text:span text:style-name="T1837"/></text:p>
      <text:p text:style-name="P74"><text:span text:style-name="T1838"/><text:span text:style-name="T1839"/><text:span text:style-name="T1840"/></text:p>
      <text:p text:style-name="P75"><text:span text:style-name="T1841">GIACENZE CRYPTO</text:span><text:span text:style-name="T1842"/><text:span text:style-name="T1843"/></text:p>
      <text:p text:style-name="P76"><text:span text:style-name="T1844"/><text:span text:style-name="T1845"/><text:span text:style-name="T1846"/></text:p>
      <text:p text:style-name="P77"><text:span text:style-name="T1847">Indice</text:span><text:span text:style-name="T1848"/><text:span text:style-name="T1849"/><text:span text:style-name="T1850"/><text:span text:style-name="T1851"/><text:span text:style-name="T1852"/><text:span text:style-name="T1853"/></text:p>
      <text:p text:style-name="P78"><text:span/><text:span/></text:p>
      <text:p text:style-name="P79"><text:span/><text:span/></text:p>
      <text:p text:style-name="P80"><text:span/><text:span/><text:span/><text:span/></text:p>
      <text:table-of-content text:name="">
        <text:table-of-content-source/>
        <text:index-body>
          <text:p text:style-name="P80"><text:a xlink:href="#_Toc1" xlink:type="simple"><text:span text:style-name="T1854"/><text:span text:style-name="T1855">Struttura generale</text:span><text:span text:style-name="T1856"/><text:span><text:tab/></text:span><text:span>2</text:span></text:a><text:span/></text:p>
          <text:p text:style-name="P81"><text:a xlink:href="#_Toc2" xlink:type="simple"><text:span text:style-name="T1857"/><text:span text:style-name="T1858">1. Intestazione</text:span><text:span text:style-name="T1859"/><text:span><text:tab/></text:span><text:span>2</text:span></text:a><text:span/></text:p>
          <text:p text:style-name="P82"><text:a xlink:href="#_Toc3" xlink:type="simple"><text:span text:style-name="T1860"/><text:span text:style-name="T1861">2. Struttura fisica del CSV</text:span><text:span text:style-name="T1862"/><text:span><text:tab/></text:span><text:span>3</text:span></text:a><text:span/></text:p>
          <text:p text:style-name="P83"><text:a xlink:href="#_Toc4" xlink:type="simple"><text:span text:style-name="T1863"/><text:span text:style-name="T1864">3. Colonne del CSV</text:span><text:span text:style-name="T1865"/><text:span><text:tab/></text:span><text:span>5</text:span></text:a><text:span/></text:p>
          <text:p text:style-name="P84"><text:a xlink:href="#_Toc5" xlink:type="simple"><text:span text:style-name="T1866"/><text:span text:style-name="T1867">Come trovare l'indice di una colonna</text:span><text:span text:style-name="T1868"/><text:span><text:tab/></text:span><text:span>6</text:span></text:a><text:span/></text:p>
          <text:p text:style-name="P85"><text:a xlink:href="#_Toc6" xlink:type="simple"><text:span text:style-name="T1869"/><text:span text:style-name="T1870">Campi disponibili</text:span><text:span text:style-name="T1871"/><text:span><text:tab/></text:span><text:span>6</text:span></text:a><text:span/></text:p>
          <text:p text:style-name="P86"><text:a xlink:href="#_Toc7" xlink:type="simple"><text:span text:style-name="T1872"/><text:span text:style-name="T1873">Esempio: entrata e uscita sulla stessa riga</text:span><text:span text:style-name="T1874"/><text:span><text:tab/></text:span><text:span>6</text:span></text:a><text:span/></text:p>
          <text:p text:style-name="P87"><text:a xlink:href="#_Toc8" xlink:type="simple"><text:span text:style-name="T1875"/><text:span text:style-name="T1876">4. Mappatura delle causali</text:span><text:span text:style-name="T1877"/><text:span><text:tab/></text:span><text:span>7</text:span></text:a><text:span/></text:p>
          <text:p text:style-name="P88"><text:a xlink:href="#_Toc9" xlink:type="simple"><text:span text:style-name="T1878"/><text:span text:style-name="T1879">5. Gestione del segno</text:span><text:span text:style-name="T1880"/><text:span><text:tab/></text:span><text:span>8</text:span></text:a><text:span/></text:p>
          <text:p text:style-name="P89"><text:a xlink:href="#_Toc10" xlink:type="simple"><text:span text:style-name="T1881"/><text:span text:style-name="T1882">Esempio pratico</text:span><text:span text:style-name="T1883"/><text:span><text:tab/></text:span><text:span>8</text:span></text:a><text:span/></text:p>
          <text:p text:style-name="P90"><text:a xlink:href="#_Toc11" xlink:type="simple"><text:span text:style-name="T1884"/><text:span text:style-name="T1885">6. Consolidamento righe correlate</text:span><text:span text:style-name="T1886"/><text:span><text:tab/></text:span><text:span>9</text:span></text:a><text:span/></text:p>
          <text:p text:style-name="P91"><text:a xlink:href="#_Toc12" xlink:type="simple"><text:span text:style-name="T1887"/><text:span text:style-name="T1888">7. Gestione commissioni</text:span><text:span text:style-name="T1889"/><text:span><text:tab/></text:span><text:span>10</text:span></text:a><text:span/></text:p>
          <text:p text:style-name="P92"><text:a xlink:href="#_Toc13" xlink:type="simple"><text:span text:style-name="T1890"/><text:span text:style-name="T1891">8. Pulizia e normalizzazione nomi moneta</text:span><text:span text:style-name="T1892"/><text:span><text:tab/></text:span><text:span>11</text:span></text:a><text:span/></text:p>
          <text:p text:style-name="P93"><text:a xlink:href="#_Toc14" xlink:type="simple"><text:span text:style-name="T1893"/><text:span text:style-name="T1894">9. Wallet per causale</text:span><text:span text:style-name="T1895"/><text:span><text:tab/></text:span><text:span>12</text:span></text:a><text:span/></text:p>
          <text:p text:style-name="P94"><text:a xlink:href="#_Toc15" xlink:type="simple"><text:span text:style-name="T1896"/><text:span text:style-name="T1897">10. Campi extra</text:span><text:span text:style-name="T1898"/><text:span><text:tab/></text:span><text:span>12</text:span></text:a><text:span/></text:p>
          <text:p text:style-name="P95"><text:a xlink:href="#_Toc16" xlink:type="simple"><text:span text:style-name="T1899"/><text:span text:style-name="T1900">Esempi completi</text:span><text:span text:style-name="T1901"> (potrebbero contenere errori)</text:span><text:span text:style-name="T1902"/><text:span><text:tab/></text:span><text:span>12</text:span></text:a><text:span/></text:p>
          <text:p text:style-name="P96"><text:a xlink:href="#_Toc17" xlink:type="simple"><text:span text:style-name="T1903"/><text:span text:style-name="T1904">Esempio 1: Binance Spot</text:span><text:span text:style-name="T1905"/><text:span><text:tab/></text:span><text:span>12</text:span></text:a><text:span/></text:p>
          <text:p text:style-name="P97"><text:a xlink:href="#_Toc18" xlink:type="simple"><text:span text:style-name="T1906"/><text:span text:style-name="T1907">Esempio 2: riga singola per movimento</text:span><text:span text:style-name="T1908"/><text:span><text:tab/></text:span><text:span>13</text:span></text:a><text:span/></text:p>
          <text:p text:style-name="P98"><text:a xlink:href="#_Toc19" xlink:type="simple"><text:span text:style-name="T1909"/><text:span text:style-name="T1910">Esempio 3: scambio su riga singola</text:span><text:span text:style-name="T1911"/><text:span><text:tab/></text:span><text:span>14</text:span></text:a><text:span/></text:p>
          <text:p text:style-name="P99"><text:a xlink:href="#_Toc20" xlink:type="simple"><text:span text:style-name="T1912"/><text:span text:style-name="T1913">Checklist rapida</text:span><text:span text:style-name="T1914"/><text:span><text:tab/></text:span><text:span>15</text:span></text:a><text:span/></text:p>
          <text:p text:style-name="P100"><text:a xlink:href="#_Toc21" xlink:type="simple"><text:span text:style-name="T1915"/><text:span text:style-name="T1916">Dove Mettere il File</text:span><text:span text:style-name="T1917"/><text:span><text:tab/></text:span><text:span>15</text:span></text:a><text:span/></text:p>
          <text:p text:style-name="P101"><text:span/><text:span/><text:span/><text:span/></text:p>
        </text:index-body>
      </text:table-of-content>
      <text:p text:style-name="P102"><text:span text:style-name="T1918"/><text:span text:style-name="T1919"/><text:span text:style-name="T1920"/></text:p>
      <text:p text:style-name="P103"><text:span text:style-name="T1921"/><text:span text:style-name="T1922"/><text:span text:style-name="T1923"/></text:p>
      <text:p text:style-name="P104"><text:span text:style-name="T1924"/><text:span text:style-name="T1925"/><text:span text:style-name="T1926"/></text:p>
      <text:p text:style-name="P105"><text:span text:style-name="T1927"><text:line-break/>Questa guida spiega come creare un file JSON per importare qualunque file CSV nella raccolta dei movimenti crypto. Il JSON descrive:</text:span><text:span/><text:span/></text:p>
      <text:list text:style-name="WWNum23" text:continue-numbering="true">
        <text:list-item>
          <text:p text:style-name="P106"><text:span text:style-name="T1928">dove si trovano i dati nel CSV;</text:span><text:span/><text:span/></text:p>
        </text:list-item>
        <text:list-item>
          <text:p text:style-name="P107"><text:span text:style-name="T1929">come interpretarli, ad esempio date, segni e causali;</text:span><text:span/><text:span/></text:p>
        </text:list-item>
        <text:list-item>
          <text:p text:style-name="P108"><text:span text:style-name="T1930">come trasformarli, ad esempio rinomina monete, pulizia nomi e wallet.</text:span><text:span/><text:span/></text:p>
        </text:list-item>
      </text:list>
      <text:p text:style-name="P109"><text:span text:style-name="T1931">Ogni proprietà ha un valore predefinito. Se non la inserisci nel JSON, viene usato il default indicato. Per questo puoi partire da un file minimo e aggiungere solo ciò che serve. </text:span><text:span/><text:span/></text:p>
      <text:p text:style-name="P110"><text:span/><text:bookmark-start text:name="_Toc1"/><text:span text:style-name="T1932">Struttura generale</text:span><text:span/><text:bookmark-end text:name="_Toc1"/><text:span/><text:span/></text:p>
      <text:p text:style-name="P111"><text:span text:style-name="T1933">{<text:s text:c="2"/>"nomeExchange": "...",<text:s text:c="2"/>"nomeWallet": "...",<text:s text:c="2"/>"separatore": ",",<text:s text:c="2"/>"encoding": "</text:span><text:span text:style-name="T1934">UTF-8",<text:s text:c="2"/>"righeIntestazione": 1,<text:s text:c="2"/>"formatoData": "yyyy-MM-dd HH:mm:ss",<text:s text:c="2"/>"fuso": "UTC",<text:s text:c="2"/>"consolidaRigheStessaData": false,<text:s text:c="2"/>"tolleranzaSecondiConsolidamento": 2,<text:s text:c="2"/>"causaliDifferite": [],<text:s text:c="2"/>"colonne": { ... },<text:s text:c="2"/>"mappaCausali": { ... },<text:s text:c="2"/>"causali</text:span><text:span text:style-name="T1935">Chiuse": [ ... ],<text:s text:c="2"/>"causaliUscita": [ ... ],<text:s text:c="2"/>"causaliEntrata": [ ... ],<text:s text:c="2"/>"modalitaFee": "AUTO",<text:s text:c="2"/>"rimuoviCaseSensitive": false,<text:s text:c="2"/>"rimuoviDaNomeMoneta": [ ... ],<text:s text:c="2"/>"rinominaMonete": { ... },<text:s text:c="2"/>"walletPerCausale": { ... },<text:s text:c="2"/>"campiExtra": { ... }}</text:span><text:span/><text:span/></text:p>
      <text:p text:style-name="P112"><text:span/><text:bookmark-start text:name="_Toc2"/><text:span text:style-name="T1936">1. Intestazione</text:span><text:span/><text:bookmark-end text:name="_Toc2"/><text:span/><text:span/></text:p>
      <text:p text:style-name="P113"><text:span text:style-name="T1937">nomeExchange</text:span><text:span/><text:span/></text:p>
      <text:p text:style-name="P114"><text:span text:style-name="T1938">Tipo:</text:span><text:span text:style-name="T1939"> stringa</text:span><text:span><text:line-break/></text:span><text:span text:style-name="T1940"><text:line-break/></text:span><text:span text:style-name="T1941">Default:</text:span><text:span text:style-name="T1942"><text:s/></text:span><text:span text:style-name="T1943">"Exchange Generico"</text:span><text:span/><text:span/></text:p>
      <text:p text:style-name="P115"><text:span text:style-name="T1944">Nome dell'exchange o della piattaforma sorgente. Viene salvato su ogni movimento importato come identificativo della fonte. </text:span><text:span/><text:span/></text:p>
      <text:p text:style-name="P116"><text:span text:style-name="T1945">Se viene lasciato vuoto, sarà il programma a chiedere in fase di importazione con quale nome impostare il wallet. </text:span><text:span/><text:span/></text:p>
      <text:p text:style-name="P117"><text:span text:style-name="T1946">"nomeExchange": "Binance"</text:span><text:span/><text:span/></text:p>
      <text:p text:style-name="P118"><text:span text:style-name="T1947">nomeWallet</text:span><text:span/><text:span/></text:p>
      <text:p text:style-name="P119"><text:span text:style-name="T1948">Tipo:</text:span><text:span text:style-name="T1949"> stringa</text:span><text:span><text:line-break/></text:span><text:span text:style-name="T1950"><text:line-break/></text:span><text:span text:style-name="T1951">Default:</text:span><text:span text:style-name="T1952"><text:s/></text:span><text:span text:style-name="T1953">"Principale"</text:span><text:span/><text:span/></text:p>
      <text:p text:style-name="P120"><text:span text:style-name="T1954">Nome del wallet di destinazione per i movimenti importati. Può essere sovrascritto causale per causale tramite </text:span><text:span text:style-name="T1955">walletPerCausale</text:span><text:span text:style-name="T1956">. </text:span><text:span/><text:span/></text:p>
      <text:p text:style-name="P121"><text:span text:style-name="T1957">Questa è una sottocategoria utile solo in casi rari, quindi spesso si può omettere. </text:span><text:span/><text:span/></text:p>
      <text:p text:style-name="P122"><text:span text:style-name="T1958">"nomeWallet": "Spot"</text:span><text:span/><text:span/></text:p>
      <text:p text:style-name="P123"><text:span/><text:bookmark-start text:name="_Toc3"/><text:span text:style-name="T1959">2. Struttura fisica del CSV</text:span><text:span/><text:bookmark-end text:name="_Toc3"/><text:span/><text:span/></text:p>
      <text:p text:style-name="P124"><text:span text:style-name="T1960">separatore</text:span><text:span/><text:span/></text:p>
      <text:p text:style-name="P125"><text:span text:style-name="T1961">Tipo:</text:span><text:span text:style-name="T1962"> stringa</text:span><text:span><text:line-break/></text:span><text:span text:style-name="T1963"><text:line-break/></text:span><text:span text:style-name="T1964">Default:</text:span><text:span text:style-name="T1965"><text:s/></text:span><text:span text:style-name="T1966">","</text:span><text:span/><text:span/></text:p>
      <text:p text:style-name="P126"><text:span text:style-name="T1967">Carattere che divide le colonne nel CSV. </text:span><text:span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127"><text:span text:style-name="T1968">Valore</text:span><text:span/><text:span/></text:p>
          </table:table-cell>
          <table:table-cell table:style-name="ce3">
            <text:p text:style-name="P128"><text:span text:style-name="T1969">Quando usarlo</text:span><text:span/><text:span/></text:p>
          </table:table-cell>
        </table:table-row>
        <table:table-row table:style-name="ro2" table:default-cell-style-name="ce1">
          <table:table-cell table:style-name="ce4">
            <text:p text:style-name="P129"><text:span text:style-name="T1970">","</text:span><text:span/><text:span/></text:p>
          </table:table-cell>
          <table:table-cell table:style-name="ce5">
            <text:p text:style-name="P130"><text:span text:style-name="T1971">Standard internazionale, default. </text:span><text:span/><text:span/></text:p>
          </table:table-cell>
        </table:table-row>
        <table:table-row table:style-name="ro3" table:default-cell-style-name="ce1">
          <table:table-cell table:style-name="ce6">
            <text:p text:style-name="P131"><text:span text:style-name="T1972">";"</text:span><text:span/><text:span/></text:p>
          </table:table-cell>
          <table:table-cell table:style-name="ce7">
            <text:p text:style-name="P132"><text:span text:style-name="T1973">Export da Excel con impostazioni europee. </text:span><text:span/><text:span/></text:p>
          </table:table-cell>
        </table:table-row>
        <table:table-row table:style-name="ro4" table:default-cell-style-name="ce1">
          <table:table-cell table:style-name="ce8">
            <text:p text:style-name="P133"><text:span text:style-name="T1974">"\t"</text:span><text:span/><text:span/></text:p>
          </table:table-cell>
          <table:table-cell table:style-name="ce9">
            <text:p text:style-name="P134"><text:span text:style-name="T1975">File TSV, cioè tab-separated. </text:span><text:span/><text:span/></text:p>
          </table:table-cell>
        </table:table-row>
        <table:table-row table:style-name="ro5" table:default-cell-style-name="ce1">
          <table:table-cell table:style-name="ce10">
            <text:p text:style-name="P135"><text:span text:style-name="T1976">"\|"</text:span><text:span/><text:span/></text:p>
          </table:table-cell>
          <table:table-cell table:style-name="ce11">
            <text:p text:style-name="P136"><text:span text:style-name="T1977">Caso raro, usato da alcuni exchange. </text:span><text:span/><text:span/></text:p>
          </table:table-cell>
        </table:table-row>
      </table:table>
      <text:p text:style-name="P137"><text:span text:style-name="T1978"/><text:span text:style-name="T1979"/><text:span text:style-name="T1980"/></text:p>
      <text:p text:style-name="P138"><text:span text:style-name="T1981">"separatore": ";"</text:span><text:span/><text:span/></text:p>
      <text:p text:style-name="P139"><text:span text:style-name="T1982">encoding</text:span><text:span/><text:span/></text:p>
      <text:p text:style-name="P140"><text:span text:style-name="T1983">Tipo:</text:span><text:span text:style-name="T1984"> stringa</text:span><text:span><text:line-break/></text:span><text:span text:style-name="T1985"><text:line-break/></text:span><text:span text:style-name="T1986">Default:</text:span><text:span text:style-name="T1987"><text:s/></text:span><text:span text:style-name="T1988">"UTF-8"</text:span><text:span/><text:span/></text:p>
      <text:p text:style-name="P141"><text:span text:style-name="T1989">Usa </text:span><text:span text:style-name="T1990">"UTF-8"</text:span><text:span text:style-name="T1991"> nella maggior parte dei casi. Se i caratteri speciali, come accenti o simboli, risultano corrotti, prova </text:span><text:span text:style-name="T1992">"ISO-8859-1"</text:span><text:span text:style-name="T1993"> oppure </text:span><text:span text:style-name="T1994">"Windows-1252"</text:span><text:span text:style-name="T1995">. </text:span><text:span/><text:span/></text:p>
      <text:p text:style-name="P142"><text:span text:style-name="T1996">"encoding": "UTF-8"</text:span><text:span/><text:span/></text:p>
      <text:p text:style-name="P143"><text:span text:style-name="T1997">righeIntestazione</text:span><text:span/><text:span/></text:p>
      <text:p text:style-name="P144"><text:span text:style-name="T1998">Tipo:</text:span><text:span text:style-name="T1999"> numero intero</text:span><text:span><text:line-break/></text:span><text:span text:style-name="T2000"><text:line-break/></text:span><text:span text:style-name="T2001">Default:</text:span><text:span text:style-name="T2002"><text:s/></text:span><text:span text:style-name="T2003">1</text:span><text:span/><text:span/></text:p>
      <text:p text:style-name="P145"><text:span text:style-name="T2004">Indica quante righe iniziali del CSV vanno saltate. Se il CSV non ha intestazione, imposta </text:span><text:span text:style-name="T2005">0</text:span><text:span text:style-name="T2006">. </text:span><text:span/><text:span/></text:p>
      <text:p text:style-name="P146"><text:span text:style-name="T2007">Se imposti </text:span><text:span text:style-name="T2008">0</text:span><text:span text:style-name="T2009"> ma nel file è presente una riga di intestazione, la riga verrà semplicemente scartata e potresti vedere un avviso a fine importazione. </text:span><text:span/><text:span/></text:p>
      <text:p text:style-name="P147"><text:span text:style-name="T2010">"righeIntestazione": 1</text:span><text:span/><text:span/></text:p>
      <text:p text:style-name="P148"><text:span text:style-name="T2011">rigaIntestazione</text:span><text:span/><text:span/></text:p>
      <text:p text:style-name="P149"><text:span text:style-name="T2012">Tipo:</text:span><text:span text:style-name="T2013"> numero intero</text:span><text:span><text:line-break/></text:span><text:span text:style-name="T2014"><text:line-break/></text:span><text:span text:style-name="T2015">Default:</text:span><text:span text:style-name="T2016"><text:s/></text:span><text:span text:style-name="T2017">1</text:span><text:span/><text:span/></text:p>
      <text:p text:style-name="P150"><text:span text:style-name="T2018">Indica quale riga, con indice 1-based, contiene i nomi delle colonne. Viene usata solo se </text:span><text:span text:style-name="T2019">autoDetectColonne</text:span><text:span text:style-name="T2020"> è </text:span><text:span text:style-name="T2021">true</text:span><text:span text:style-name="T2022"> e nella maggior parte dei casi coincide con </text:span><text:span text:style-name="T2023">righeIntestazione</text:span><text:span text:style-name="T2024">. </text:span><text:span/><text:span/></text:p>
      <text:p text:style-name="P151"><text:span text:style-name="T2025">autoDetectColonne</text:span><text:span/><text:span/></text:p>
      <text:p text:style-name="P152"><text:span text:style-name="T2026">Tipo:</text:span><text:span text:style-name="T2027"> booleano</text:span><text:span><text:line-break/></text:span><text:span text:style-name="T2028"><text:line-break/></text:span><text:span text:style-name="T2029">Default:</text:span><text:span text:style-name="T2030"><text:s/></text:span><text:span text:style-name="T2031">false</text:span><text:span/><text:span/></text:p>
      <text:p text:style-name="P153"><text:span text:style-name="T2032">Se impostato a </text:span><text:span text:style-name="T2033">true</text:span><text:span text:style-name="T2034">, il sistema legge i nomi delle colonne dalla riga di intestazione e li usa per la mappatura automatica. È una funzione avanzata e in genere non serve quando si mappano le colonne tramite indice numerico. </text:span><text:span/><text:span/></text:p>
      <text:p text:style-name="P154"><text:span text:style-name="T2035">formatoData</text:span><text:span/><text:span/></text:p>
      <text:p text:style-name="P155"><text:span text:style-name="T2036">Tipo:</text:span><text:span text:style-name="T2037"> stringa</text:span><text:span><text:line-break/></text:span><text:span text:style-name="T2038"><text:line-break/></text:span><text:span text:style-name="T2039">Default:</text:span><text:span text:style-name="T2040"><text:s/></text:span><text:span text:style-name="T2041">"yyyy-MM-dd HH:mm:ss"</text:span><text:span/><text:span/></text:p>
      <text:p text:style-name="P156"><text:span text:style-name="T2042">Formato della data/ora nel CSV, espresso con i token Java di </text:span><text:span text:style-name="T2043">DateTimeFormatter</text:span><text:span text:style-name="T2044">. </text:span><text:span/><text:span/></text:p>
      <table:table table:style-name="ta2">
        <table:table-columns>
          <table:table-column table:style-name="co3"/>
          <table:table-column table:style-name="co4"/>
          <table:table-column table:style-name="co5"/>
        </table:table-columns>
        <table:table-row table:style-name="ro6" table:default-cell-style-name="ce12">
          <table:table-cell table:style-name="ce13">
            <text:p text:style-name="P157"><text:span text:style-name="T2045">Token</text:span><text:span/><text:span/></text:p>
          </table:table-cell>
          <table:table-cell table:style-name="ce14">
            <text:p text:style-name="P158"><text:span text:style-name="T2046">Significato</text:span><text:span/><text:span/></text:p>
          </table:table-cell>
          <table:table-cell table:style-name="ce15">
            <text:p text:style-name="P159"><text:span text:style-name="T2047">Esempio</text:span><text:span/><text:span/></text:p>
          </table:table-cell>
        </table:table-row>
        <table:table-row table:style-name="ro7" table:default-cell-style-name="ce12">
          <table:table-cell table:style-name="ce16">
            <text:p text:style-name="P160"><text:span text:style-name="T2048">yyyy</text:span><text:span/><text:span/></text:p>
          </table:table-cell>
          <table:table-cell table:style-name="ce17">
            <text:p text:style-name="P161"><text:span text:style-name="T2049">Anno a 4 cifre</text:span><text:span/><text:span/></text:p>
          </table:table-cell>
          <table:table-cell table:style-name="ce18">
            <text:p text:style-name="P162"><text:span text:style-name="T2050">2025</text:span><text:span text:style-name="T2051"><text:s/></text:span><text:span/><text:span/></text:p>
          </table:table-cell>
        </table:table-row>
        <table:table-row table:style-name="ro8" table:default-cell-style-name="ce12">
          <table:table-cell table:style-name="ce19">
            <text:p text:style-name="P163"><text:span text:style-name="T2052">yy</text:span><text:span/><text:span/></text:p>
          </table:table-cell>
          <table:table-cell table:style-name="ce20">
            <text:p text:style-name="P164"><text:span text:style-name="T2053">Anno a 2 cifre</text:span><text:span/><text:span/></text:p>
          </table:table-cell>
          <table:table-cell table:style-name="ce21">
            <text:p text:style-name="P165"><text:span text:style-name="T2054">25</text:span><text:span text:style-name="T2055"><text:s/></text:span><text:span/><text:span/></text:p>
          </table:table-cell>
        </table:table-row>
        <table:table-row table:style-name="ro9" table:default-cell-style-name="ce12">
          <table:table-cell table:style-name="ce22">
            <text:p text:style-name="P166"><text:span text:style-name="T2056">MM</text:span><text:span/><text:span/></text:p>
          </table:table-cell>
          <table:table-cell table:style-name="ce23">
            <text:p text:style-name="P167"><text:span text:style-name="T2057">Mese a 2 cifre</text:span><text:span/><text:span/></text:p>
          </table:table-cell>
          <table:table-cell table:style-name="ce24">
            <text:p text:style-name="P168"><text:span text:style-name="T2058">06</text:span><text:span text:style-name="T2059"><text:s/></text:span><text:span/><text:span/></text:p>
          </table:table-cell>
        </table:table-row>
        <table:table-row table:style-name="ro10" table:default-cell-style-name="ce12">
          <table:table-cell table:style-name="ce25">
            <text:p text:style-name="P169"><text:span text:style-name="T2060">dd</text:span><text:span/><text:span/></text:p>
          </table:table-cell>
          <table:table-cell table:style-name="ce26">
            <text:p text:style-name="P170"><text:span text:style-name="T2061">Giorno a 2 cifre</text:span><text:span/><text:span/></text:p>
          </table:table-cell>
          <table:table-cell table:style-name="ce27">
            <text:p text:style-name="P171"><text:span text:style-name="T2062">17</text:span><text:span text:style-name="T2063"><text:s/></text:span><text:span/><text:span/></text:p>
          </table:table-cell>
        </table:table-row>
        <table:table-row table:style-name="ro11" table:default-cell-style-name="ce12">
          <table:table-cell table:style-name="ce28">
            <text:p text:style-name="P172"><text:span text:style-name="T2064">HH</text:span><text:span/><text:span/></text:p>
          </table:table-cell>
          <table:table-cell table:style-name="ce29">
            <text:p text:style-name="P173"><text:span text:style-name="T2065">Ora da 0 a 23</text:span><text:span/><text:span/></text:p>
          </table:table-cell>
          <table:table-cell table:style-name="ce30">
            <text:p text:style-name="P174"><text:span text:style-name="T2066">18</text:span><text:span text:style-name="T2067"><text:s/></text:span><text:span/><text:span/></text:p>
          </table:table-cell>
        </table:table-row>
        <table:table-row table:style-name="ro12" table:default-cell-style-name="ce12">
          <table:table-cell table:style-name="ce31">
            <text:p text:style-name="P175"><text:span text:style-name="T2068">mm</text:span><text:span/><text:span/></text:p>
          </table:table-cell>
          <table:table-cell table:style-name="ce32">
            <text:p text:style-name="P176"><text:span text:style-name="T2069">Minuti</text:span><text:span/><text:span/></text:p>
          </table:table-cell>
          <table:table-cell table:style-name="ce33">
            <text:p text:style-name="P177"><text:span text:style-name="T2070">39</text:span><text:span text:style-name="T2071"><text:s/></text:span><text:span/><text:span/></text:p>
          </table:table-cell>
        </table:table-row>
        <table:table-row table:style-name="ro13" table:default-cell-style-name="ce12">
          <table:table-cell table:style-name="ce34">
            <text:p text:style-name="P178"><text:span text:style-name="T2072">ss</text:span><text:span/><text:span/></text:p>
          </table:table-cell>
          <table:table-cell table:style-name="ce35">
            <text:p text:style-name="P179"><text:span text:style-name="T2073">Secondi</text:span><text:span/><text:span/></text:p>
          </table:table-cell>
          <table:table-cell table:style-name="ce36">
            <text:p text:style-name="P180"><text:span text:style-name="T2074">10</text:span><text:span text:style-name="T2075"><text:s/></text:span><text:span/><text:span/></text:p>
          </table:table-cell>
        </table:table-row>
      </table:table>
      <text:p text:style-name="P181"><text:span text:style-name="T2076"/><text:span text:style-name="T2077"/><text:span text:style-name="T2078"/></text:p>
      <text:p text:style-name="P182"><text:span text:style-name="T2079">"formatoData": "dd.MM.yyyy HH:mm:ss""formatoData": "MM/dd/yy HH:mm"</text:span><text:span/><text:span/></text:p>
      <text:p text:style-name="P183"><text:span text:style-name="T2080">fuso</text:span><text:span/><text:span/></text:p>
      <text:p text:style-name="P184"><text:span text:style-name="T2081">Tipo:</text:span><text:span text:style-name="T2082"> stringa</text:span><text:span><text:line-break/></text:span><text:span text:style-name="T2083"><text:line-break/></text:span><text:span text:style-name="T2084">Default:</text:span><text:span text:style-name="T2085"><text:s/></text:span><text:span text:style-name="T2086">"UTC"</text:span><text:span/><text:span/></text:p>
      <text:p text:style-name="P185"><text:span text:style-name="T2087">Fuso orario in cui sono espresse le date nel CSV. Le date vengono convertite automaticamente nel fuso locale dell'applicazione. </text:span><text:span/><text:span/></text:p>
      <text:p text:style-name="P186"><text:span text:style-name="T2088">"fuso": "UTC""fuso": "Europe/Rome""fuso": "UTC+2"</text:span><text:span/><text:span/></text:p>
      <text:p text:style-name="P187"><text:span/><text:bookmark-start text:name="_Toc4"/><text:span text:style-name="T2089">3. Colonne del CSV</text:span><text:span/><text:bookmark-end text:name="_Toc4"/><text:span/><text:span/></text:p>
      <text:p text:style-name="P188"><text:span text:style-name="T2090">La sezione </text:span><text:span text:style-name="T2091">colonne</text:span><text:span text:style-name="T2092"> mappa i campi logici agli indici numerici delle colonne nel CSV, contando da </text:span><text:span text:style-name="T2093">0</text:span><text:span text:style-name="T2094">. Usa </text:span><text:span text:style-name="T2095">-1</text:span><text:span text:style-name="T2096"> per indicare che una colonna non è presente nel CSV. </text:span><text:span/><text:span/></text:p>
      <text:p text:style-name="P189"><text:span text:style-name="T2097">"colonne": {<text:s text:c="2"/>"data": 0,<text:s text:c="2"/>"causale": 1,<text:s text:c="2"/>"moneta": 2,<text:s text:c="2"/>"quantita": 3,<text:s text:c="2"/>"segno": -1,<text:s text:c="2"/>"valoreEuro": -1,<text:s text:c="2"/>"prezzo": -1,<text:s text:c="2"/>"monetaFee": -1,<text:s text:c="2"/>"quantitaFee": -1,<text:s text:c="2"/>"idTransazione": -1,<text:s text:c="2"/>"wallet": -1,<text:s text:c="2"/>"monetaUscita": -1,<text:s text:c="2"/>"quantitaUscita": -1}</text:span><text:span/><text:span/></text:p>
      <text:p text:style-name="P190"><text:span/><text:bookmark-start text:name="_Toc5"/><text:span text:style-name="T2098">Come trovare l'indice di una colonna</text:span><text:span/><text:bookmark-end text:name="_Toc5"/><text:span/><text:span/></text:p>
      <text:p text:style-name="P191"><text:span text:style-name="T2099">Apri il CSV, guarda la riga di intestazione e conta le colonne partendo da </text:span><text:span text:style-name="T2100">0</text:span><text:span text:style-name="T2101">. </text:span><text:span/><text:span/></text:p>
      <text:p text:style-name="P192"><text:span text:style-name="T2102">"Timestamp","Tipo","Asset","Quantità","Valore EUR"<text:s text:c="5"/>0<text:s text:c="10"/>1<text:s text:c="6"/>2<text:s text:c="8"/>3<text:s text:c="11"/>4</text:span><text:span/><text:span/></text:p>
      <text:p text:style-name="P193"><text:span text:style-name="T2103">Quindi avrai, ad esempio, </text:span><text:span text:style-name="T2104">"data": 0</text:span><text:span text:style-name="T2105">, </text:span><text:span text:style-name="T2106">"causale": 1</text:span><text:span text:style-name="T2107">, </text:span><text:span text:style-name="T2108">"moneta": 2</text:span><text:span text:style-name="T2109"> e così via. </text:span><text:span/><text:span/></text:p>
      <text:p text:style-name="P194"><text:span/><text:bookmark-start text:name="_Toc6"/><text:span text:style-name="T2110">Campi disponibili</text:span><text:span/><text:bookmark-end text:name="_Toc6"/><text:span/><text:span/></text:p>
      <table:table table:style-name="ta3">
        <table:table-columns>
          <table:table-column table:style-name="co6"/>
          <table:table-column table:style-name="co7"/>
        </table:table-columns>
        <table:table-row table:style-name="ro14" table:default-cell-style-name="ce37">
          <table:table-cell table:style-name="ce38">
            <text:p text:style-name="P195"><text:span text:style-name="T2111">Campo</text:span><text:span/><text:span/></text:p>
          </table:table-cell>
          <table:table-cell table:style-name="ce39">
            <text:p text:style-name="P196"><text:span text:style-name="T2112">Descrizione</text:span><text:span/><text:span/></text:p>
          </table:table-cell>
        </table:table-row>
        <table:table-row table:style-name="ro15" table:default-cell-style-name="ce37">
          <table:table-cell table:style-name="ce40">
            <text:p text:style-name="P197"><text:span text:style-name="T2113">data</text:span><text:span/><text:span/></text:p>
          </table:table-cell>
          <table:table-cell table:style-name="ce41">
            <text:p text:style-name="P198"><text:span text:style-name="T2114">Obbligatorio, data e ora del movimento. </text:span><text:span/><text:span/></text:p>
          </table:table-cell>
        </table:table-row>
        <table:table-row table:style-name="ro16" table:default-cell-style-name="ce37">
          <table:table-cell table:style-name="ce42">
            <text:p text:style-name="P199"><text:span text:style-name="T2115">causale</text:span><text:span/><text:span/></text:p>
          </table:table-cell>
          <table:table-cell table:style-name="ce43">
            <text:p text:style-name="P200"><text:span text:style-name="T2116">Tipo di operazione nel CSV, ad esempio </text:span><text:span text:style-name="T2117">Deposit</text:span><text:span text:style-name="T2118">, </text:span><text:span text:style-name="T2119">Trade</text:span><text:span text:style-name="T2120">, </text:span><text:span text:style-name="T2121">Staking</text:span><text:span text:style-name="T2122">. </text:span><text:span/><text:span/></text:p>
          </table:table-cell>
        </table:table-row>
        <table:table-row table:style-name="ro17" table:default-cell-style-name="ce37">
          <table:table-cell table:style-name="ce44">
            <text:p text:style-name="P201"><text:span text:style-name="T2123">moneta</text:span><text:span/><text:span/></text:p>
          </table:table-cell>
          <table:table-cell table:style-name="ce45">
            <text:p text:style-name="P202"><text:span text:style-name="T2124">Simbolo del token o della moneta, ad esempio </text:span><text:span text:style-name="T2125">BTC</text:span><text:span text:style-name="T2126">, </text:span><text:span text:style-name="T2127">ETH</text:span><text:span text:style-name="T2128">. </text:span><text:span/><text:span/></text:p>
          </table:table-cell>
        </table:table-row>
        <table:table-row table:style-name="ro18" table:default-cell-style-name="ce37">
          <table:table-cell table:style-name="ce46">
            <text:p text:style-name="P203"><text:span text:style-name="T2129">quantita</text:span><text:span/><text:span/></text:p>
          </table:table-cell>
          <table:table-cell table:style-name="ce47">
            <text:p text:style-name="P204"><text:span text:style-name="T2130">Quantità del movimento, negativa per uscita o positiva per entrata. </text:span><text:span/><text:span/></text:p>
          </table:table-cell>
        </table:table-row>
        <table:table-row table:style-name="ro19" table:default-cell-style-name="ce37">
          <table:table-cell table:style-name="ce48">
            <text:p text:style-name="P205"><text:span text:style-name="T2131">segno</text:span><text:span/><text:span/></text:p>
          </table:table-cell>
          <table:table-cell table:style-name="ce49">
            <text:p text:style-name="P206"><text:span text:style-name="T2132">Colonna separata che indica il segno, ad esempio </text:span><text:span text:style-name="T2133">+</text:span><text:span text:style-name="T2134"> o </text:span><text:span text:style-name="T2135">-</text:span><text:span text:style-name="T2136">. </text:span><text:span/><text:span/></text:p>
          </table:table-cell>
        </table:table-row>
        <table:table-row table:style-name="ro20" table:default-cell-style-name="ce37">
          <table:table-cell table:style-name="ce50">
            <text:p text:style-name="P207"><text:span text:style-name="T2137">valoreEuro</text:span><text:span/><text:span/></text:p>
          </table:table-cell>
          <table:table-cell table:style-name="ce51">
            <text:p text:style-name="P208"><text:span text:style-name="T2138">Controvalore in euro già calcolato nel CSV. </text:span><text:span/><text:span/></text:p>
          </table:table-cell>
        </table:table-row>
        <table:table-row table:style-name="ro21" table:default-cell-style-name="ce37">
          <table:table-cell table:style-name="ce52">
            <text:p text:style-name="P209"><text:span text:style-name="T2139">prezzo</text:span><text:span/><text:span/></text:p>
          </table:table-cell>
          <table:table-cell table:style-name="ce53">
            <text:p text:style-name="P210"><text:span text:style-name="T2140">Prezzo unitario del token al momento dell'operazione. </text:span><text:span/><text:span/></text:p>
          </table:table-cell>
        </table:table-row>
        <table:table-row table:style-name="ro22" table:default-cell-style-name="ce37">
          <table:table-cell table:style-name="ce54">
            <text:p text:style-name="P211"><text:span text:style-name="T2141">monetaFee</text:span><text:span/><text:span/></text:p>
          </table:table-cell>
          <table:table-cell table:style-name="ce55">
            <text:p text:style-name="P212"><text:span text:style-name="T2142">Simbolo della moneta usata per la commissione. </text:span><text:span/><text:span/></text:p>
          </table:table-cell>
        </table:table-row>
        <table:table-row table:style-name="ro23" table:default-cell-style-name="ce37">
          <table:table-cell table:style-name="ce56">
            <text:p text:style-name="P213"><text:span text:style-name="T2143">quantitaFee</text:span><text:span/><text:span/></text:p>
          </table:table-cell>
          <table:table-cell table:style-name="ce57">
            <text:p text:style-name="P214"><text:span text:style-name="T2144">Quantità della commissione pagata. </text:span><text:span/><text:span/></text:p>
          </table:table-cell>
        </table:table-row>
        <table:table-row table:style-name="ro24" table:default-cell-style-name="ce37">
          <table:table-cell table:style-name="ce58">
            <text:p text:style-name="P215"><text:span text:style-name="T2145">idTransazione</text:span><text:span/><text:span/></text:p>
          </table:table-cell>
          <table:table-cell table:style-name="ce59">
            <text:p text:style-name="P216"><text:span text:style-name="T2146">ID univoco della transazione, utile per raggruppare righe correlate. </text:span><text:span/><text:span/></text:p>
          </table:table-cell>
        </table:table-row>
        <table:table-row table:style-name="ro25" table:default-cell-style-name="ce37">
          <table:table-cell table:style-name="ce60">
            <text:p text:style-name="P217"><text:span text:style-name="T2147">wallet</text:span><text:span/><text:span/></text:p>
          </table:table-cell>
          <table:table-cell table:style-name="ce61">
            <text:p text:style-name="P218"><text:span text:style-name="T2148">Colonna che contiene il nome del wallet, se variabile riga per riga. </text:span><text:span/><text:span/></text:p>
          </table:table-cell>
        </table:table-row>
        <table:table-row table:style-name="ro26" table:default-cell-style-name="ce37">
          <table:table-cell table:style-name="ce62">
            <text:p text:style-name="P219"><text:span text:style-name="T2149">monetaUscita</text:span><text:span/><text:span/></text:p>
          </table:table-cell>
          <table:table-cell table:style-name="ce63">
            <text:p text:style-name="P220"><text:span text:style-name="T2150">Moneta in uscita, nei CSV che hanno entrata e uscita sulla stessa riga. </text:span><text:span/><text:span/></text:p>
          </table:table-cell>
        </table:table-row>
        <table:table-row table:style-name="ro27" table:default-cell-style-name="ce37">
          <table:table-cell table:style-name="ce64">
            <text:p text:style-name="P221"><text:span text:style-name="T2151">quantitaUscita</text:span><text:span/><text:span/></text:p>
          </table:table-cell>
          <table:table-cell table:style-name="ce65">
            <text:p text:style-name="P222"><text:span text:style-name="T2152">Quantità in uscita, nei CSV che hanno entrata e uscita sulla stessa riga. </text:span><text:span/><text:span/></text:p>
          </table:table-cell>
        </table:table-row>
      </table:table>
      <text:p text:style-name="P223"><text:span text:style-name="T2153"/><text:span text:style-name="T2154"/><text:span text:style-name="T2155"/></text:p>
      <text:p text:style-name="P224"><text:span/><text:bookmark-start text:name="_Toc7"/><text:span text:style-name="T2156">Esempio: entrata e uscita sulla stessa riga</text:span><text:span/><text:bookmark-end text:name="_Toc7"/><text:span/><text:span/></text:p>
      <text:p text:style-name="P225"><text:span text:style-name="T2157">Alcuni CSV, per esempio Koinly o CoinTracking, riportano l'intero scambio su una sola riga. </text:span><text:span/><text:span/></text:p>
      <text:p text:style-name="P226"><text:span text:style-name="T2158">"Tipo","Acquisto","Cur.","Vendita","Cur.","Fee","Cur.Fee","Data""Trade","2132","CRO","487","USDC","1.18","USDC","17.09.2025 18:39"</text:span><text:span/><text:span/></text:p>
      <text:p text:style-name="P227"><text:span text:style-name="T2159">In quel caso:</text:span><text:span/><text:span/></text:p>
      <text:list text:style-name="WWNum23" text:continue-numbering="true">
        <text:list-item>
          <text:p text:style-name="P228"><text:span text:style-name="T2160">moneta</text:span><text:span text:style-name="T2161"> e </text:span><text:span text:style-name="T2162">quantita</text:span><text:span text:style-name="T2163"> rappresentano il lato in entrata. </text:span><text:span/><text:span/></text:p>
        </text:list-item>
        <text:list-item>
          <text:p text:style-name="P229"><text:span text:style-name="T2164">monetaUscita</text:span><text:span text:style-name="T2165"> e </text:span><text:span text:style-name="T2166">quantitaUscita</text:span><text:span text:style-name="T2167"> rappresentano il lato in uscita. </text:span><text:span/><text:span/></text:p>
        </text:list-item>
      </text:list>
      <text:p text:style-name="P230"><text:span text:style-name="T2168">"colonne": {<text:s text:c="2"/>"data": 7,<text:s text:c="2"/>"causale": 0,<text:s text:c="2"/>"moneta": 2,<text:s text:c="2"/>"quantita": 1,<text:s text:c="2"/>"monetaUscita": 4,<text:s text:c="2"/>"quantitaUscita": 3,<text:s text:c="2"/>"monetaFee": 6,<text:s text:c="2"/>"quantitaFee": 5}</text:span><text:span/><text:span/></text:p>
      <text:p text:style-name="P231"><text:span/><text:bookmark-start text:name="_Toc8"/><text:span text:style-name="T2169">4. Mappatura delle causali</text:span><text:span/><text:bookmark-end text:name="_Toc8"/><text:span/><text:span/></text:p>
      <text:p text:style-name="P232"><text:span text:style-name="T2170">mappaCausali</text:span><text:span/><text:span/></text:p>
      <text:p text:style-name="P233"><text:span text:style-name="T2171">Tipo:</text:span><text:span text:style-name="T2172"> oggetto chiave-valore</text:span><text:span/><text:span/></text:p>
      <text:p text:style-name="P234"><text:span text:style-name="T2173">Traduce le causali originali del CSV nelle tipologie interne dell'applicazione. Ogni causale presente nel CSV deve avere una voce qui, altrimenti la riga viene scartata. </text:span><text:span/><text:span/></text:p>
      <text:p text:style-name="P235"><text:span text:style-name="T2174">"mappaCausali": {<text:s text:c="2"/>"Deposit": "DEPOSITO-CRYPTO",<text:s text:c="2"/>"Withdrawal": "PRELIEVO-CRYPTO",<text:s text:c="2"/>"Trade": "SCAMBIO CRYPTO-CRYPTO",<text:s text:c="2"/>"Staking Rewards": "STAKING REWARDS",<text:s text:c="2"/>"Commission": "COMMISSIONI",<text:s text:c="2"/>"Cashback": "CASHBACK"}</text:span><text:span/><text:span/></text:p>
      <text:p text:style-name="P236"><text:span text:style-name="T2175">Per ignorare completamente alcune righe, senza contarle come scarti, mappa la causale su </text:span><text:span text:style-name="T2176">"IGNORA"</text:span><text:span text:style-name="T2177">. </text:span><text:span/><text:span/></text:p>
      <text:p text:style-name="P237"><text:span text:style-name="T2178">"mappaCausali": {<text:s text:c="2"/>"Internal Transfer": "IGNORA",<text:s text:c="2"/>"Dust Conversion": "IGNORA"}</text:span><text:span/><text:span/></text:p>
      <text:p text:style-name="P238"><text:span text:style-name="T2179">La ricerca è case insensitive per default, quindi </text:span><text:span text:style-name="T2180">deposit</text:span><text:span text:style-name="T2181">, </text:span><text:span text:style-name="T2182">Deposit</text:span><text:span text:style-name="T2183"> e </text:span><text:span text:style-name="T2184">DEPOSIT</text:span><text:span text:style-name="T2185"> vengono trovate tutte correttamente. </text:span><text:span/><text:span/></text:p>
      <text:p text:style-name="P239"><text:span text:style-name="T2186">causaliChiuse</text:span><text:span/><text:span/></text:p>
      <text:p text:style-name="P240"><text:span text:style-name="T2187">Tipo:</text:span><text:span text:style-name="T2188"> array di stringhe</text:span><text:span/><text:span/></text:p>
      <text:p text:style-name="P241"><text:span text:style-name="T2189">Contiene le tipologie interne, cioè i valori di </text:span><text:span text:style-name="T2190">mappaCausali</text:span><text:span text:style-name="T2191">, che devono essere trattate come movimenti singoli e indipendenti anche se arrivano insieme ad altre righe con lo stesso ID transazione. </text:span><text:span/><text:span/></text:p>
      <text:p text:style-name="P242"><text:span text:style-name="T2192">Usa questa lista per causali che non partecipano mai a uno scambio composto, ad esempio staking, cashback, commissioni, depositi e prelievi. </text:span><text:span/><text:span/></text:p>
      <text:p text:style-name="P243"><text:span text:style-name="T2193">"causaliChiuse": [<text:s text:c="2"/>"DEPOSITO-CRYPTO",<text:s text:c="2"/>"PRELIEVO-CRYPTO",<text:s text:c="2"/>"STAKING REWARDS",<text:s text:c="2"/>"CASHBACK",<text:s text:c="2"/>"COMMISSIONI"]</text:span><text:span/><text:span/></text:p>
      <text:p text:style-name="P244"><text:span/><text:bookmark-start text:name="_Toc9"/><text:span text:style-name="T2194">5. Gestione del segno</text:span><text:span/><text:bookmark-end text:name="_Toc9"/><text:span/><text:span/></text:p>
      <text:p text:style-name="P245"><text:span text:style-name="T2195">Per default, il segno viene letto direttamente dalla quantità nel CSV: quantità negativa significa uscita, quantità positiva significa entrata. </text:span><text:span/><text:span/></text:p>
      <text:p text:style-name="P246"><text:span text:style-name="T2196">Se nel CSV la quantità è sempre positiva e il verso del movimento si deduce solo dalla causale, usa </text:span><text:span text:style-name="T2197">causaliUscita</text:span><text:span text:style-name="T2198"> e </text:span><text:span text:style-name="T2199">causaliEntrata</text:span><text:span text:style-name="T2200">. </text:span><text:span/><text:span/></text:p>
      <text:p text:style-name="P247"><text:span text:style-name="T2201">causaliUscita</text:span><text:span/><text:span/></text:p>
      <text:p text:style-name="P248"><text:span text:style-name="T2202">Tipo:</text:span><text:span text:style-name="T2203"> array di stringhe, con causali CSV originali</text:span><text:span/><text:span/></text:p>
      <text:p text:style-name="P249"><text:span text:style-name="T2204">Le righe con queste causali avranno la quantità forzata negativa. </text:span><text:span/><text:span/></text:p>
      <text:p text:style-name="P250"><text:span text:style-name="T2205">"causaliUscita": ["Withdrawal", "Trade Sell", "Fee"]</text:span><text:span/><text:span/></text:p>
      <text:p text:style-name="P251"><text:span text:style-name="T2206">causaliEntrata</text:span><text:span/><text:span/></text:p>
      <text:p text:style-name="P252"><text:span text:style-name="T2207">Tipo:</text:span><text:span text:style-name="T2208"> array di stringhe, con causali CSV originali</text:span><text:span/><text:span/></text:p>
      <text:p text:style-name="P253"><text:span text:style-name="T2209">Le righe con queste causali avranno la quantità forzata positiva. </text:span><text:span/><text:span/></text:p>
      <text:p text:style-name="P254"><text:span text:style-name="T2210">"causaliEntrata": ["Deposit", "Trade Buy", "Staking Rewards", "Cashback"]</text:span><text:span/><text:span/></text:p>
      <text:p text:style-name="P255"><text:span/><text:bookmark-start text:name="_Toc10"/><text:span text:style-name="T2211">Esempio pratico</text:span><text:span/><text:bookmark-end text:name="_Toc10"/><text:span/><text:span/></text:p>
      <text:p text:style-name="P256"><text:span text:style-name="T2212">"Data","Tipo","Moneta","Quantità""2025-01-15","Deposito","BTC","0.5""2025-01-16","Prelievo","ETH","1.2"</text:span><text:span/><text:span/></text:p>
      <text:p text:style-name="P257"><text:span text:style-name="T2213">"causaliUscita": ["Prelievo"],"causaliEntrata": ["Deposito", "Staking", "Cashback"]</text:span><text:span/><text:span/></text:p>
      <text:p text:style-name="P258"><text:span/><text:bookmark-start text:name="_Toc11"/><text:span text:style-name="T2214">6. Consolidamento righe correlate</text:span><text:span/><text:bookmark-end text:name="_Toc11"/><text:span/><text:span/></text:p>
      <text:p text:style-name="P259"><text:span text:style-name="T2215">Alcuni exchange suddividono una singola operazione in più righe del CSV, ad esempio una riga per la moneta venduta e una per quella acquistata nello stesso trade. </text:span><text:span/><text:span/></text:p>
      <text:p text:style-name="P260"><text:span text:style-name="T2216">consolidaRigheStessaData</text:span><text:span/><text:span/></text:p>
      <text:p text:style-name="P261"><text:span text:style-name="T2217">Tipo:</text:span><text:span text:style-name="T2218"> booleano</text:span><text:span><text:line-break/></text:span><text:span text:style-name="T2219"><text:line-break/></text:span><text:span text:style-name="T2220">Default:</text:span><text:span text:style-name="T2221"><text:s/></text:span><text:span text:style-name="T2222">false</text:span><text:span/><text:span/></text:p>
      <text:list text:style-name="WWNum23" text:continue-numbering="true">
        <text:list-item>
          <text:p text:style-name="P262"><text:span text:style-name="T2223">false</text:span><text:span text:style-name="T2224">: ogni riga è un movimento indipendente. </text:span><text:span/><text:span/></text:p>
        </text:list-item>
        <text:list-item>
          <text:p text:style-name="P263"><text:span text:style-name="T2225">true</text:span><text:span text:style-name="T2226">: le righe con stesso ID transazione o timestamp vicino vengono raggruppate e consolidate in un unico scambio. </text:span><text:span/><text:span/></text:p>
        </text:list-item>
      </text:list>
      <text:p text:style-name="P264"><text:span text:style-name="T2227">"consolidaRigheStessaData": true</text:span><text:span/><text:span/></text:p>
      <text:p text:style-name="P265"><text:span text:style-name="T2228">tolleranzaSecondiConsolidamento</text:span><text:span/><text:span/></text:p>
      <text:p text:style-name="P266"><text:span text:style-name="T2229">Tipo:</text:span><text:span text:style-name="T2230"> numero intero</text:span><text:span><text:line-break/></text:span><text:span text:style-name="T2231"><text:line-break/></text:span><text:span text:style-name="T2232">Default:</text:span><text:span text:style-name="T2233"><text:s/></text:span><text:span text:style-name="T2234">2</text:span><text:span/><text:span/></text:p>
      <text:p text:style-name="P267"><text:span text:style-name="T2235">Usato solo se </text:span><text:span text:style-name="T2236">consolidaRigheStessaData</text:span><text:span text:style-name="T2237"> è </text:span><text:span text:style-name="T2238">true</text:span><text:span text:style-name="T2239">. Indica quanti secondi di differenza sono tollerati tra due righe perché vengano considerate parte della stessa operazione. </text:span><text:span/><text:span/></text:p>
      <text:p text:style-name="P268"><text:span text:style-name="T2240">"tolleranzaSecondiConsolidamento": 5</text:span><text:span/><text:span/></text:p>
      <text:p text:style-name="P269"><text:span text:style-name="T2241">causaliDifferite</text:span><text:span/><text:span/></text:p>
      <text:p text:style-name="P270"><text:span text:style-name="T2242">Tipo:</text:span><text:span text:style-name="T2243"> array di stringhe, con causali CSV originali</text:span><text:span/><text:span/></text:p>
      <text:p text:style-name="P271"><text:span text:style-name="T2244">Usato solo se </text:span><text:span text:style-name="T2245">consolidaRigheStessaData</text:span><text:span text:style-name="T2246"> è </text:span><text:span text:style-name="T2247">true</text:span><text:span text:style-name="T2248">. Se specificato, la tolleranza temporale viene applicata solo ai gruppi che contengono almeno una riga con queste causali. Per tutte le altre causali viene richiesto timestamp identico. </text:span><text:span/><text:span/></text:p>
      <text:p text:style-name="P272"><text:span text:style-name="T2249">"causaliDifferite": ["Trade", "Swap"]</text:span><text:span/><text:span/></text:p>
      <text:p text:style-name="P273"><text:span text:style-name="T2250">idTransazione</text:span><text:span text:style-name="T2251"> nella sezione </text:span><text:span text:style-name="T2252">colonne</text:span><text:span/><text:span/></text:p>
      <text:p text:style-name="P274"><text:span text:style-name="T2253">Se il CSV ha una colonna con un ID univoco per transazione, indicarla consente di raggruppare righe anche se i timestamp differiscono oltre la tolleranza, purché condividano lo stesso ID. </text:span><text:span/><text:span/></text:p>
      <text:p text:style-name="P275"><text:span text:style-name="T2254">"colonne": {<text:s text:c="2"/>"idTransazione": 5}</text:span><text:span/><text:span/></text:p>
      <text:p text:style-name="P276"><text:span/><text:bookmark-start text:name="_Toc12"/><text:span text:style-name="T2255">7. Gestione commissioni</text:span><text:span/><text:bookmark-end text:name="_Toc12"/><text:span/><text:span/></text:p>
      <text:p text:style-name="P277"><text:span text:style-name="T2256">ricostruisciLordoSeFeeSuMonetaUscita</text:span><text:span/><text:span/></text:p>
      <text:p text:style-name="P278"><text:span text:style-name="T2257">Tipo:</text:span><text:span text:style-name="T2258"> booleano</text:span><text:span><text:line-break/></text:span><text:span text:style-name="T2259"><text:line-break/></text:span><text:span text:style-name="T2260">Default:</text:span><text:span text:style-name="T2261"><text:s/></text:span><text:span text:style-name="T2262">false</text:span><text:span/><text:span/></text:p>
      <text:p text:style-name="P279"><text:span text:style-name="T2263">Controlla se, quando la commissione è nella stessa moneta dell'uscita, il sistema deve ricostruire il lordo del movimento principale. </text:span><text:span/><text:span/></text:p>
      <text:list text:style-name="WWNum23" text:continue-numbering="true">
        <text:list-item>
          <text:p text:style-name="P280"><text:span text:style-name="T2264">true</text:span><text:span text:style-name="T2265">: ricostruisce il lordo del movimento principale e genera anche il movimento commissione separato. </text:span><text:span/><text:span/></text:p>
        </text:list-item>
        <text:list-item>
          <text:p text:style-name="P281"><text:span text:style-name="T2266">false</text:span><text:span text:style-name="T2267">: non modifica il movimento principale e genera solo il movimento commissione separato. </text:span><text:span/><text:span/></text:p>
        </text:list-item>
      </text:list>
      <text:p text:style-name="P282"><text:span text:style-name="T2268">Esempio: se il CSV riporta uscita </text:span><text:span text:style-name="T2269">-500 USDC</text:span><text:span text:style-name="T2270"> e fee </text:span><text:span text:style-name="T2271">1 USDC</text:span><text:span text:style-name="T2272">, con questa opzione a </text:span><text:span text:style-name="T2273">true</text:span><text:span text:style-name="T2274"> il movimento principale viene portato a </text:span><text:span text:style-name="T2275">-499 USDC</text:span><text:span text:style-name="T2276"> e in più viene creato un movimento </text:span><text:span text:style-name="T2277">-1 USDC</text:span><text:span text:style-name="T2278"> con causale </text:span><text:span text:style-name="T2279">COMMISSIONI</text:span><text:span text:style-name="T2280">. </text:span><text:span/><text:span/></text:p>
      <text:p text:style-name="P283"><text:span text:style-name="T2281">Usalo quando la quantità in uscita riportata nel CSV è già comprensiva delle fee, tipicamente nei CSV che riportano tutto su un unico rigo. </text:span><text:span/><text:span/></text:p>
      <text:p text:style-name="P284"><text:span text:style-name="T2282">ricostruisciLordoSeFeeSuMonetaEntrata</text:span><text:span/><text:span/></text:p>
      <text:p text:style-name="P285"><text:span text:style-name="T2283">Tipo:</text:span><text:span text:style-name="T2284"> booleano</text:span><text:span><text:line-break/></text:span><text:span text:style-name="T2285"><text:line-break/></text:span><text:span text:style-name="T2286">Default:</text:span><text:span text:style-name="T2287"><text:s/></text:span><text:span text:style-name="T2288">false</text:span><text:span/><text:span/></text:p>
      <text:p text:style-name="P286"><text:span text:style-name="T2289">Controlla se, quando la commissione è nella stessa moneta dell'entrata, il sistema deve ricostruire il lordo del movimento principale. </text:span><text:span/><text:span/></text:p>
      <text:list text:style-name="WWNum23" text:continue-numbering="true">
        <text:list-item>
          <text:p text:style-name="P287"><text:span text:style-name="T2290">true</text:span><text:span text:style-name="T2291">: ricostruisce il lordo del movimento principale e genera anche il movimento commissione separato. </text:span><text:span/><text:span/></text:p>
        </text:list-item>
        <text:list-item>
          <text:p text:style-name="P288"><text:span text:style-name="T2292">false</text:span><text:span text:style-name="T2293">: non modifica il movimento principale e genera solo il movimento commissione separato. </text:span><text:span/><text:span/></text:p>
        </text:list-item>
      </text:list>
      <text:p text:style-name="P289"><text:span text:style-name="T2294">Esempio: se il CSV riporta entrata </text:span><text:span text:style-name="T2295">500 USDC</text:span><text:span text:style-name="T2296"> e fee </text:span><text:span text:style-name="T2297">1 USDC</text:span><text:span text:style-name="T2298">, con questa opzione a </text:span><text:span text:style-name="T2299">true</text:span><text:span text:style-name="T2300"> il movimento principale viene portato a </text:span><text:span text:style-name="T2301">501 USDC</text:span><text:span text:style-name="T2302"> e in più viene creato un movimento </text:span><text:span text:style-name="T2303">-1 USDC</text:span><text:span text:style-name="T2304"> con causale </text:span><text:span text:style-name="T2305">COMMISSIONI</text:span><text:span text:style-name="T2306">. </text:span><text:span/><text:span/></text:p>
      <text:p text:style-name="P290"><text:span text:style-name="T2307">Usalo quando il CSV riporta nella quantità in entrata un valore già al netto delle fee, sempre nei casi di riga unica. </text:span><text:span/><text:span/></text:p>
      <text:p text:style-name="P291"><text:span/><text:bookmark-start text:name="_Toc13"/><text:span text:style-name="T2308">8. Pulizia e normalizzazione nomi moneta</text:span><text:span/><text:bookmark-end text:name="_Toc13"/><text:span/><text:span/></text:p>
      <text:p text:style-name="P292"><text:span text:style-name="T2309">rimuoviDaNomeMoneta</text:span><text:span/><text:span/></text:p>
      <text:p text:style-name="P293"><text:span text:style-name="T2310">Tipo:</text:span><text:span text:style-name="T2311"> array di stringhe</text:span><text:span/><text:span/></text:p>
      <text:p text:style-name="P294"><text:span text:style-name="T2312">Rimuove testi indesiderati dal nome del token letto dal CSV. Supporta anche la sintassi </text:span><text:span text:style-name="T2313">?</text:span><text:span text:style-name="T2314"> per troncare tutto ciò che viene dopo o prima. </text:span><text:span/><text:span/></text:p>
      <table:table table:style-name="ta4">
        <table:table-columns>
          <table:table-column table:style-name="co8"/>
          <table:table-column table:style-name="co9"/>
        </table:table-columns>
        <table:table-row table:style-name="ro28" table:default-cell-style-name="ce66">
          <table:table-cell table:style-name="ce67">
            <text:p text:style-name="P295"><text:span text:style-name="T2315">Sintassi</text:span><text:span/><text:span/></text:p>
          </table:table-cell>
          <table:table-cell table:style-name="ce68">
            <text:p text:style-name="P296"><text:span text:style-name="T2316">Effetto su </text:span><text:span text:style-name="T2317">BTC.STAKING@CRYPTO.COM</text:span><text:span/><text:span/></text:p>
          </table:table-cell>
        </table:table-row>
        <table:table-row table:style-name="ro29" table:default-cell-style-name="ce66">
          <table:table-cell table:style-name="ce69">
            <text:p text:style-name="P297"><text:span text:style-name="T2318">.STAKING?</text:span><text:span/><text:span/></text:p>
          </table:table-cell>
          <table:table-cell table:style-name="ce70">
            <text:p text:style-name="P298"><text:span text:style-name="T2319">Rimuove </text:span><text:span text:style-name="T2320">.STAKING</text:span><text:span text:style-name="T2321"> e tutto quello che segue, ottenendo </text:span><text:span text:style-name="T2322">BTC</text:span><text:span text:style-name="T2323">. </text:span><text:span/><text:span/></text:p>
          </table:table-cell>
        </table:table-row>
        <table:table-row table:style-name="ro30" table:default-cell-style-name="ce66">
          <table:table-cell table:style-name="ce71">
            <text:p text:style-name="P299"><text:span text:style-name="T2324">?.STAKING</text:span><text:span/><text:span/></text:p>
          </table:table-cell>
          <table:table-cell table:style-name="ce72">
            <text:p text:style-name="P300"><text:span text:style-name="T2325">Rimuove </text:span><text:span text:style-name="T2326">.STAKING</text:span><text:span text:style-name="T2327"> e tutto quello che precede, ottenendo </text:span><text:span text:style-name="T2328">@CRYPTO.COM</text:span><text:span text:style-name="T2329">. </text:span><text:span/><text:span/></text:p>
          </table:table-cell>
        </table:table-row>
        <table:table-row table:style-name="ro31" table:default-cell-style-name="ce66">
          <table:table-cell table:style-name="ce73">
            <text:p text:style-name="P301"><text:span text:style-name="T2330">.STAKING</text:span><text:span/><text:span/></text:p>
          </table:table-cell>
          <table:table-cell table:style-name="ce74">
            <text:p text:style-name="P302"><text:span text:style-name="T2331">Rimuove solo la parola esatta, ottenendo </text:span><text:span text:style-name="T2332">BTC@CRYPTO.COM</text:span><text:span text:style-name="T2333">. </text:span><text:span/><text:span/></text:p>
          </table:table-cell>
        </table:table-row>
      </table:table>
      <text:p text:style-name="P303"><text:span text:style-name="T2334"/><text:span text:style-name="T2335"/><text:span text:style-name="T2336"/></text:p>
      <text:p text:style-name="P304"><text:span text:style-name="T2337">Le regole vengono applicate in sequenza, nell'ordine in cui compaiono nell'array. Conviene mettere prima quelle più ampie, cioè quelle con </text:span><text:span text:style-name="T2338">?</text:span><text:span text:style-name="T2339">. </text:span><text:span/><text:span/></text:p>
      <text:p text:style-name="P305"><text:span text:style-name="T2340">"rimuoviDaNomeMoneta": [<text:s text:c="2"/>".STAKING?",<text:s text:c="2"/>".EARN?",<text:s text:c="2"/>".LOCKED?",<text:s text:c="2"/>"@CRYPTO.COM"]</text:span><text:span/><text:span/></text:p>
      <text:p text:style-name="P306"><text:span text:style-name="T2341">rimuoviCaseSensitive</text:span><text:span/><text:span/></text:p>
      <text:p text:style-name="P307"><text:span text:style-name="T2342">Tipo:</text:span><text:span text:style-name="T2343"> booleano</text:span><text:span><text:line-break/></text:span><text:span text:style-name="T2344"><text:line-break/></text:span><text:span text:style-name="T2345">Default:</text:span><text:span text:style-name="T2346"><text:s/></text:span><text:span text:style-name="T2347">false</text:span><text:span/><text:span/></text:p>
      <text:list text:style-name="WWNum23" text:continue-numbering="true">
        <text:list-item>
          <text:p text:style-name="P308"><text:span text:style-name="T2348">false</text:span><text:span text:style-name="T2349">: la ricerca ignora maiuscole e minuscole. </text:span><text:span/><text:span/></text:p>
        </text:list-item>
        <text:list-item>
          <text:p text:style-name="P309"><text:span text:style-name="T2350">true</text:span><text:span text:style-name="T2351">: la ricerca è case sensitive esatta. </text:span><text:span/><text:span/></text:p>
        </text:list-item>
      </text:list>
      <text:p text:style-name="P310"><text:span text:style-name="T2352">"rimuoviCaseSensitive": false</text:span><text:span/><text:span/></text:p>
      <text:p text:style-name="P311"><text:span text:style-name="T2353">rinominaMonete</text:span><text:span/><text:span/></text:p>
      <text:p text:style-name="P312"><text:span text:style-name="T2354">Tipo:</text:span><text:span text:style-name="T2355"> oggetto chiave-valore</text:span><text:span/><text:span/></text:p>
      <text:p text:style-name="P313"><text:span text:style-name="T2356">Rinomina un simbolo moneta nel simbolo corretto usato dall'applicazione. La rinomina avviene dopo la pulizia con </text:span><text:span text:style-name="T2357">rimuoviDaNomeMoneta</text:span><text:span text:style-name="T2358">. </text:span><text:span/><text:span/></text:p>
      <text:p text:style-name="P314"><text:span text:style-name="T2359">"rinominaMonete": {<text:s text:c="2"/>"IOTA": "MIOTA",<text:s text:c="2"/>"LUNA2": "LUNA",<text:s text:c="2"/>"WBTC": "BTC"}</text:span><text:span/><text:span/></text:p>
      <text:p text:style-name="P315"><text:span/><text:bookmark-start text:name="_Toc14"/><text:span text:style-name="T2360">9. Wallet per causale</text:span><text:span/><text:bookmark-end text:name="_Toc14"/><text:span/><text:span/></text:p>
      <text:p text:style-name="P316"><text:span text:style-name="T2361">walletPerCausale</text:span><text:span/><text:span/></text:p>
      <text:p text:style-name="P317"><text:span text:style-name="T2362">Tipo:</text:span><text:span text:style-name="T2363"> oggetto chiave-valore</text:span><text:span/><text:span/></text:p>
      <text:p text:style-name="P318"><text:span text:style-name="T2364">Permette di assegnare un wallet diverso da </text:span><text:span text:style-name="T2365">nomeWallet</text:span><text:span text:style-name="T2366"> per specifiche causali CSV. La chiave è la causale originale del CSV. </text:span><text:span/><text:span/></text:p>
      <text:p text:style-name="P319"><text:span text:style-name="T2367">"walletPerCausale": {<text:s text:c="2"/>"Staking Rewards": "Staking",<text:s text:c="2"/>"Earn": "Earn",<text:s text:c="2"/>"Lockup": "Locked"}</text:span><text:span/><text:span/></text:p>
      <text:p text:style-name="P320"><text:span/><text:bookmark-start text:name="_Toc15"/><text:span text:style-name="T2368">10. Campi extra</text:span><text:span/><text:bookmark-end text:name="_Toc15"/><text:span/><text:span/></text:p>
      <text:p text:style-name="P321"><text:span text:style-name="T2369">campiExtra</text:span><text:span/><text:span/></text:p>
      <text:p text:style-name="P322"><text:span text:style-name="T2370">Tipo:</text:span><text:span text:style-name="T2371"> oggetto </text:span><text:span text:style-name="T2372">indiceMovimento -&gt; indiceColonnaCSV</text:span><text:span/><text:span/></text:p>
      <text:p text:style-name="P323"><text:span text:style-name="T2373">Copia il contenuto di una colonna CSV in un campo specifico del movimento interno, indicato dal suo indice numerico nell'array </text:span><text:span text:style-name="T2374">rt[]</text:span><text:span text:style-name="T2375">. È una funzione avanzata e raramente necessaria. </text:span><text:span/><text:span/></text:p>
      <text:p text:style-name="P324"><text:span text:style-name="T2376">"campiExtra": {<text:s text:c="2"/>"7": 9}</text:span><text:span/><text:span/></text:p>
      <text:p text:style-name="P325"><text:span text:style-name="T2377">Significa che il contenuto della colonna </text:span><text:span text:style-name="T2378">9</text:span><text:span text:style-name="T2379"> del CSV viene copiato nel campo </text:span><text:span text:style-name="T2380">7</text:span><text:span text:style-name="T2381"> del movimento. </text:span><text:span/><text:span/></text:p>
      <text:p text:style-name="P326"><text:span/><text:bookmark-start text:name="_Toc16"/><text:span text:style-name="T2382">Esempi completi</text:span><text:span text:style-name="T2383"> (potrebbero contenere errori)</text:span><text:span/><text:bookmark-end text:name="_Toc16"/><text:span/><text:span/></text:p>
      <text:p text:style-name="P327"><text:span/><text:bookmark-start text:name="_Toc17"/><text:span text:style-name="T2384">Esempio 1: Binance Spot</text:span><text:span/><text:bookmark-end text:name="_Toc17"/><text:span/><text:span/></text:p>
      <text:p text:style-name="P328"><text:span text:style-name="T2385">Caso con righe separate per ogni lato dello scambio. </text:span><text:span/><text:span/></text:p>
      <text:p text:style-name="P329"><text:span text:style-name="T2386"/><text:span text:style-name="T2387"/><text:span text:style-name="T2388"/></text:p>
      <text:p text:style-name="P330"><text:span text:style-name="T2389">ESEMPIO CSV</text:span><text:span text:style-name="T2390"/></text:p>
      <text:p text:style-name="P331"><text:span text:style-name="T2391">"Date(UTC)","OrderNo","Pair","Type","Filled","Total","Fee","Fee Coin""2025-03-10 14:22:01","123456","BTCUSDT","BUY","0.01","620.50","0.00001","BTC""2025-03-10 14:22:01","123456","BTCUSDT","SELL","620.50","","0.62","USDT"</text:span><text:span text:style-name="T2392"/></text:p>
      <text:p text:style-name="P332"><text:span text:style-name="T2393">ESEMPIO JSON</text:span><text:span text:style-name="T2394"/><text:span text:style-name="T2395"/></text:p>
      <text:p text:style-name="P333"><text:span text:style-name="T2396">{<text:s text:c="2"/>"nomeExchange": "Binance",<text:s text:c="2"/>"nomeWallet": "</text:span><text:span text:style-name="T2397">Principale</text:span><text:span text:style-name="T2398">"</text:span><text:span text:style-name="T2399">,<text:s text:c="2"/>"separatore": ",",<text:s text:c="2"/>"formatoData": "yyyy-MM-dd HH:mm:ss",<text:s text:c="2"/>"fuso": "UTC",<text:s text:c="2"/>"consolidaRigheStessaData": true,<text:s text:c="2"/>"tolleranzaSecondiConsolidamento": 2,<text:s text:c="2"/>"colonne": {<text:s text:c="4"/>"data": 0,<text:s text:c="4"/>"idTransazione": 1,<text:s text:c="4"/>"causale": 3,<text:s text:c="4"/>"moneta": 4,<text:s text:c="4"/>"quanti</text:span><text:span text:style-name="T2400">ta": 4,<text:s text:c="4"/>"valoreEuro": 5,<text:s text:c="4"/>"quantitaFee": 6,<text:s text:c="4"/>"monetaFee": 7<text:s text:c="2"/>},<text:s text:c="2"/>"mappaCausali": {<text:s text:c="4"/>"BUY": "SCAMBIO CRYPTO-CRYPTO",<text:s text:c="4"/>"SELL": "SCAMBIO CRYPTO-CRYPTO"<text:s text:c="2"/>},<text:s text:c="2"/>"causaliEntrata": [],<text:s text:c="2"/>"causaliUscita": [],}</text:span><text:span/><text:span/></text:p>
      <text:p text:style-name="P334"><text:span/><text:bookmark-start text:name="_Toc18"/><text:span text:style-name="T2401">Esempio 2: riga singola per movimento</text:span><text:span/><text:bookmark-end text:name="_Toc18"/><text:span/><text:span/></text:p>
      <text:p text:style-name="P335"><text:span text:style-name="T2402">Caso tipico, ad esempio Tatax. </text:span><text:span/><text:span/></text:p>
      <text:p text:style-name="P336"><text:span text:style-name="T2403">ESEMPIO CSV</text:span><text:span text:style-name="T2404"/><text:span text:style-name="T2405"/></text:p>
      <text:p text:style-name="P337"><text:span text:style-name="T2406">"Data","Tipo","Asset","Quantità""2025-09-15 10:00:00","Deposito","BTC","0.5""2025-09-16 11:30:00","Staking","BTC.STAKING@CRYPTO.COM","0.0001""2025-09-17 09:00:00","Prelievo","ETH","0.1"</text:span><text:span/><text:span/></text:p>
      <text:p text:style-name="P338"><text:span text:style-name="T2407">ESEMPIO JSON</text:span><text:span text:style-name="T2408"/><text:span text:style-name="T2409"/></text:p>
      <text:p text:style-name="P339"><text:span text:style-name="T2410">{<text:s text:c="2"/>"nomeExchange": "Crypto.com",<text:s text:c="2"/>"nomeWallet": "Principale",<text:s text:c="2"/>"separatore": ",",<text:s text:c="2"/>"formatoData": "yyyy-MM-dd HH:mm:ss",<text:s text:c="2"/>"fuso": "UTC",<text:s text:c="2"/>"consolida</text:span><text:span text:style-name="T2411">RigheStessaData": false,<text:s text:c="2"/>"colonne": {<text:s text:c="4"/>"data": 0,<text:s text:c="4"/>"causale": 1,<text:s text:c="4"/>"moneta": 2,<text:s text:c="4"/>"quantita": 3<text:s text:c="2"/>},<text:s text:c="2"/>"mappaCausali": {<text:s text:c="4"/>"Deposito": "DEPOSITO-CRYPTO",<text:s text:c="4"/>"Prelievo": "PRELIEVO-CRYPTO",<text:s text:c="4"/>"Staking": "STAKING REWARDS"<text:s text:c="2"/>},<text:s text:c="2"/>"causaliChius</text:span><text:span text:style-name="T2412">e": [<text:s text:c="4"/>"DEPOSITO-CRYPTO",<text:s text:c="4"/>"PRELIEVO-CRYPTO",<text:s text:c="4"/>"STAKING REWARDS"<text:s text:c="2"/>],<text:s text:c="2"/>"causaliEntrata": ["Deposito", "Staking"],<text:s text:c="2"/>"causaliUscita": ["Prelievo"],<text:s text:c="2"/>"rimuoviDaNomeMoneta": [".STAKING?", ".EARN?", "@CRYPTO.COM"],<text:s text:c="2"/>"rimuoviCaseSensitive": false}</text:span><text:span/><text:span/></text:p>
      <text:p text:style-name="P340"><text:span/><text:bookmark-start text:name="_Toc19"/><text:span text:style-name="T2413">Esempio 3: scambio su riga singola</text:span><text:span/><text:bookmark-end text:name="_Toc19"/><text:span/><text:span/></text:p>
      <text:p text:style-name="P341"><text:span text:style-name="T2414">Caso tipico, ad esempio CoinTracking. </text:span><text:span/><text:span/></text:p>
      <text:p text:style-name="P342"><text:span text:style-name="T2415">ESEMPIO CSV</text:span><text:span text:style-name="T2416"/><text:span text:style-name="T2417"/></text:p>
      <text:p text:style-name="P343"><text:span text:style-name="T2418">"Tipo","Acquisto","Cur.","Vendita","Cur.","Fee","Cur.Fe</text:span><text:span text:style-name="T2419">e","Exchange","Data""Operazione","2132","CRO","487.04","USDC","1.18","USDC","Crypto.com","17.09.2025 18:39:10""Deposito","89.4","CRO","","","","","Crypto.com","28.08.2025 07:38:42""Prelievo","","","24.32","USDC","","","Crypto.com","03.09.2025 18:11:09"</text:span><text:span text:style-name="T2420"/></text:p>
      <text:p text:style-name="P344"><text:span text:style-name="T2421">ESEMPIO JSON</text:span><text:span text:style-name="T2422"/><text:span text:style-name="T2423"/></text:p>
      <text:p text:style-name="P345"><text:span text:style-name="T2424">{<text:s text:c="2"/>"nomeExchange": "Crypto.com Exchange",<text:s text:c="2"/>"nomeWallet": "Principale",<text:s text:c="2"/>"separatore":</text:span><text:span text:style-name="T2425"> ",",<text:s text:c="2"/>"formatoData": "dd.MM.yyyy HH:mm:ss",<text:s text:c="2"/>"fuso": "UTC",<text:s text:c="2"/>"consolidaRigheStessaData": false,<text:s text:c="2"/>"colonne": {<text:s text:c="4"/>"data": 8,<text:s text:c="4"/>"causale": 0,<text:s text:c="4"/>"moneta": 2,<text:s text:c="4"/>"quantita": 1,<text:s text:c="4"/>"monetaUscita": 4,<text:s text:c="4"/>"quantitaUscita": 3,<text:s text:c="4"/>"quantitaFee": 5,<text:s text:c="2"/></text:span><text:span text:style-name="T2426"><text:s text:c="2"/>"monetaFee": 6<text:s text:c="2"/>},</text:span><text:span/></text:p>
      <text:p text:style-name="P346"><text:span text:style-name="T2427"><text:s text:c="2"/>"mappaCausali": {<text:s text:c="4"/>"Deposito": "DEPOSITO-CRYPTO",<text:s text:c="4"/>"Prelievo": "PRELIEVO-CRYPTO",<text:s text:c="4"/>"Operazione": "SCAMBIO CRYPTO-CRYPTO"<text:s text:c="2"/>},</text:span><text:span text:style-name="T2428"/><text:span text:style-name="T2429">"ricostruisciLordoSeFeeSuMonetaUscita":<text:s text:c="2"/>false,</text:span><text:span text:style-name="T2430"/><text:span text:style-name="T2431"/></text:p>
      <text:p text:style-name="P347"><text:span text:style-name="T2432"/><text:span text:style-name="T2433">"ricostruisciLordoSeFeeSuMonetaEntrata": true</text:span><text:span text:style-name="T2434"/><text:span text:style-name="T2435"><text:line-break/>}</text:span><text:span/><text:span/><text:span text:style-name="T2436"/></text:p>
      <text:p text:style-name="P348"><text:span/><text:bookmark-start text:name="_Toc20"/><text:span text:style-name="T2437">Checklist rapida</text:span><text:span/><text:bookmark-end text:name="_Toc20"/><text:span/><text:span/></text:p>
      <text:list text:style-name="WWNum24" text:continue-numbering="true">
        <text:list-item>
          <text:p text:style-name="P349"><text:span text:style-name="T2438">Apri il CSV e conta le colonne partendo da </text:span><text:span text:style-name="T2439">0</text:span><text:span text:style-name="T2440">. </text:span><text:span/><text:span/></text:p>
        </text:list-item>
        <text:list-item>
          <text:p text:style-name="P350"><text:span text:style-name="T2441">Identifica data, causale, moneta e quantità, poi compila </text:span><text:span text:style-name="T2442">colonne</text:span><text:span text:style-name="T2443">. </text:span><text:span/><text:span/></text:p>
        </text:list-item>
        <text:list-item>
          <text:p text:style-name="P351"><text:span text:style-name="T2444">Elenca tutte le causali presenti nel CSV e compila </text:span><text:span text:style-name="T2445">mappaCausali</text:span><text:span text:style-name="T2446">. </text:span><text:span/><text:span/></text:p>
        </text:list-item>
        <text:list-item>
          <text:p text:style-name="P352"><text:span text:style-name="T2447">Se le quantità sono sempre positive, compila </text:span><text:span text:style-name="T2448">causaliUscita</text:span><text:span text:style-name="T2449"> e </text:span><text:span text:style-name="T2450">causaliEntrata</text:span><text:span text:style-name="T2451">. </text:span><text:span/><text:span/></text:p>
        </text:list-item>
        <text:list-item>
          <text:p text:style-name="P353"><text:span text:style-name="T2452">Se ogni riga è un movimento indipendente, usa </text:span><text:span text:style-name="T2453">consolidaRigheStessaData: false</text:span><text:span text:style-name="T2454">; se più righe appartengono allo stesso trade, usa </text:span><text:span text:style-name="T2455">true</text:span><text:span text:style-name="T2456">. </text:span><text:span/><text:span/></text:p>
        </text:list-item>
        <text:list-item>
          <text:p text:style-name="P354"><text:span text:style-name="T2457">Se i nomi moneta contengono suffissi, compila </text:span><text:span text:style-name="T2458">rimuoviDaNomeMoneta</text:span><text:span text:style-name="T2459">. </text:span><text:span/><text:span/></text:p>
        </text:list-item>
        <text:list-item>
          <text:p text:style-name="P355"><text:span text:style-name="T2460">Se ci sono commissioni, mappa </text:span><text:span text:style-name="T2461">monetaFee</text:span><text:span text:style-name="T2462"> e </text:span><text:span text:style-name="T2463">quantitaFee</text:span><text:span text:style-name="T2464"> e scegli </text:span><text:span text:style-name="T2465">modalitaFee</text:span><text:span text:style-name="T2466">. </text:span><text:span/><text:span/></text:p>
        </text:list-item>
      </text:list>
      <text:p text:style-name="P356"><text:span text:style-name="T2467">Se alcuni movimenti devono finire su wallet separati, compila </text:span><text:span/><text:span/><text:span text:style-name="T2468"/><text:span text:style-name="T2469"/><text:span text:style-name="T2470"/><text:span text:style-name="T2471"><text:s/></text:span><text:span text:style-name="T2472">walletPerCausale</text:span><text:span text:style-name="T2473">. </text:span><text:span/><text:span text:style-name="T2474"/><text:span text:style-name="T2475"/></text:p>
      <text:p text:style-name="P357"><text:span text:style-name="T2476"/><text:span text:style-name="T2477"/><text:span text:style-name="T2478"/></text:p>
      <text:p text:style-name="P358"><text:span text:style-name="T2479"/><text:span text:style-name="T2480"/><text:span text:style-name="T2481"/></text:p>
      <text:p text:style-name="P359"><text:span text:style-name="T2482"/><text:span text:style-name="T2483"/></text:p>
      <text:p text:style-name="P360"><text:span text:style-name="T2498"><text:soft-page-break/></text:span><text:span text:style-name="T2499"/><text:span text:style-name="T2500"/></text:p>
      <text:p text:style-name="P363"><text:span text:style-name="T2501">Dove Mettere il File</text:span><text:span/><text:span/><text:span/></text:p>
      <text:p text:style-name="P364"><text:span text:style-name="T2502"/><text:span text:style-name="T2503">Nella root del programma troverete una cartella </text:span><text:span text:style-name="T2504">ImportConfig</text:span><text:span text:style-name="T2505">, li dentro vanno messi i file di configurazione, una volta fatto compariranno in fase di importazione con il Tag [JSON] all’inizio.</text:span><text:span text:style-name="T2506"/><text:span text:style-name="T2507"/></text:p>
      <text:p text:style-name="P365"><text:span text:style-name="T2508"/><text:span text:style-name="T2509"/><text:span text:style-name="T2510"/></text:p>
      <text:p text:style-name="P366"><text:span text:style-name="T2511"/><text:span/><draw:frame draw:style-name="gr8" text:anchor-type="as-char" svg:width="10.24cm" svg:height="12.75cm" svg:x="0cm" svg:y="0cm"><draw:image xlink:href="Pictures/image3.png" xlink:type="simple" xlink:show="embed" xlink:actuate="onLoad"/></draw:frame><text:span text:style-name="T2512"/><text:span text:style-name="T2513"/><text:span text:style-name="T2514"/></text:p>
      <text:p text:style-name="P367"><text:span text:style-name="T2515"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987">
      <style:paragraph-properties/>
      <style:text-properties fo:font-size="10pt"/>
    </style:style>
    <style:style style:display-name="DStyle_text" style:family="text" style:name="988">
      <style:paragraph-properties/>
    </style:style>
    <style:style style:parent-style-name="987" style:display-name="DStyle_paragraph" style:family="paragraph" style:name="989">
      <style:paragraph-properties/>
      <style:text-properties fo:font-size="10pt"/>
    </style:style>
    <style:style style:parent-style-name="987" style:display-name="DStyle_text" style:family="text" style:name="990">
      <style:paragraph-properties/>
    </style:style>
    <style:style style:parent-style-name="989" style:display-name="DStyle_paragraph" style:family="paragraph" style:name="991">
      <style:paragraph-properties/>
      <style:text-properties fo:font-size="10pt"/>
    </style:style>
    <style:style style:parent-style-name="987" style:display-name="DStyle_text" style:family="text" style:name="992">
      <style:paragraph-properties/>
    </style:style>
    <style:style style:parent-style-name="991" style:display-name="DStyle_paragraph" style:family="paragraph" style:name="993">
      <style:paragraph-properties/>
      <style:text-properties fo:font-size="10pt"/>
    </style:style>
    <style:style style:parent-style-name="987" style:display-name="DStyle_text" style:family="text" style:name="994">
      <style:paragraph-properties/>
    </style:style>
    <style:style style:parent-style-name="993" style:display-name="DStyle_paragraph" style:family="paragraph" style:name="995">
      <style:paragraph-properties/>
      <style:text-properties fo:font-size="10pt"/>
    </style:style>
    <style:style style:parent-style-name="987" style:display-name="DStyle_text" style:family="text" style:name="996">
      <style:paragraph-properties/>
    </style:style>
    <style:style style:parent-style-name="995" style:display-name="DStyle_paragraph" style:family="paragraph" style:name="997">
      <style:paragraph-properties/>
      <style:text-properties fo:font-size="10pt"/>
    </style:style>
    <style:style style:parent-style-name="987" style:display-name="DStyle_text" style:family="text" style:name="998">
      <style:paragraph-properties/>
    </style:style>
    <style:style style:parent-style-name="997" style:display-name="DStyle_paragraph" style:family="paragraph" style:name="999">
      <style:paragraph-properties/>
      <style:text-properties fo:font-size="10pt"/>
    </style:style>
    <style:style style:parent-style-name="987" style:display-name="DStyle_text" style:family="text" style:name="1000">
      <style:paragraph-properties/>
    </style:style>
    <style:style style:parent-style-name="999" style:display-name="DStyle_paragraph" style:family="paragraph" style:name="1001">
      <style:paragraph-properties/>
      <style:text-properties fo:font-size="10pt"/>
    </style:style>
    <style:style style:parent-style-name="987" style:display-name="DStyle_text" style:family="text" style:name="1002">
      <style:paragraph-properties/>
    </style:style>
    <style:style style:parent-style-name="1001" style:display-name="DStyle_paragraph" style:family="paragraph" style:name="1003">
      <style:paragraph-properties/>
      <style:text-properties fo:font-size="10pt"/>
    </style:style>
    <style:style style:parent-style-name="987" style:display-name="DStyle_text" style:family="text" style:name="1004">
      <style:paragraph-properties/>
    </style:style>
    <style:style style:class="default" style:display-name="Normal" style:family="paragraph" style:name="1005">
      <style:paragraph-properties/>
      <style:text-properties/>
    </style:style>
    <style:style style:parent-style-name="1005" style:display-name="Heading 3" style:family="paragraph" style:name="1006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1005" style:display-name="Heading 4" style:family="paragraph" style:name="1007">
      <style:paragraph-properties fo:margin-top="4pt" fo:margin-bottom="2pt"/>
      <style:text-properties fo:color="#0f4761" fo:font-family="Arial" style:font-family-complex="Arial" fo:font-style="italic"/>
    </style:style>
    <style:style style:parent-style-name="1005" style:display-name="Heading 5" style:family="paragraph" style:name="1008">
      <style:paragraph-properties fo:margin-top="4pt" fo:margin-bottom="2pt"/>
      <style:text-properties fo:color="#0f4761" fo:font-family="Arial" style:font-family-complex="Arial"/>
    </style:style>
    <style:style style:parent-style-name="1005" style:display-name="Heading 6" style:family="paragraph" style:name="1009">
      <style:paragraph-properties fo:margin-top="2pt" fo:margin-bottom="0pt"/>
      <style:text-properties fo:color="#595959" fo:font-family="Arial" style:font-family-complex="Arial" fo:font-style="italic"/>
    </style:style>
    <style:style style:parent-style-name="1005" style:display-name="Heading 7" style:family="paragraph" style:name="1010">
      <style:paragraph-properties fo:margin-top="2pt" fo:margin-bottom="0pt"/>
      <style:text-properties fo:color="#595959" fo:font-family="Arial" style:font-family-complex="Arial"/>
    </style:style>
    <style:style style:parent-style-name="1005" style:display-name="Heading 8" style:family="paragraph" style:name="1011">
      <style:paragraph-properties fo:margin-bottom="0pt"/>
      <style:text-properties fo:color="#272727" fo:font-family="Arial" style:font-family-complex="Arial" fo:font-style="italic"/>
    </style:style>
    <style:style style:parent-style-name="1005" style:display-name="Heading 9" style:family="paragraph" style:name="1012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1013">
      <style:paragraph-properties/>
      <style:text-properties/>
    </style:style>
    <style:style style:parent-style-name="1013" style:display-name="Heading 1 Char" style:family="text" style:name="1014">
      <style:paragraph-properties/>
      <style:text-properties fo:color="#0f4761" fo:font-family="Arial" style:font-family-complex="Arial" fo:font-size="20pt" style:font-size-complex="20pt"/>
    </style:style>
    <style:style style:parent-style-name="1013" style:display-name="Heading 2 Char" style:family="text" style:name="1015">
      <style:paragraph-properties/>
      <style:text-properties fo:color="#0f4761" fo:font-family="Arial" style:font-family-complex="Arial" fo:font-size="16pt" style:font-size-complex="16pt"/>
    </style:style>
    <style:style style:parent-style-name="1013" style:display-name="Heading 3 Char" style:family="text" style:name="1016">
      <style:paragraph-properties/>
      <style:text-properties fo:color="#0f4761" fo:font-family="Arial" style:font-family-complex="Arial" fo:font-size="14pt" style:font-size-complex="14pt"/>
    </style:style>
    <style:style style:parent-style-name="1013" style:display-name="Heading 4 Char" style:family="text" style:name="1017">
      <style:paragraph-properties/>
      <style:text-properties fo:color="#0f4761" fo:font-family="Arial" style:font-family-complex="Arial" fo:font-style="italic"/>
    </style:style>
    <style:style style:parent-style-name="1013" style:display-name="Heading 5 Char" style:family="text" style:name="1018">
      <style:paragraph-properties/>
      <style:text-properties fo:color="#0f4761" fo:font-family="Arial" style:font-family-complex="Arial"/>
    </style:style>
    <style:style style:parent-style-name="1013" style:display-name="Heading 6 Char" style:family="text" style:name="1019">
      <style:paragraph-properties/>
      <style:text-properties fo:color="#595959" fo:font-family="Arial" style:font-family-complex="Arial" fo:font-style="italic"/>
    </style:style>
    <style:style style:parent-style-name="1013" style:display-name="Heading 7 Char" style:family="text" style:name="1020">
      <style:paragraph-properties/>
      <style:text-properties fo:color="#595959" fo:font-family="Arial" style:font-family-complex="Arial"/>
    </style:style>
    <style:style style:parent-style-name="1013" style:display-name="Heading 8 Char" style:family="text" style:name="1021">
      <style:paragraph-properties/>
      <style:text-properties fo:color="#272727" fo:font-family="Arial" style:font-family-complex="Arial" fo:font-style="italic"/>
    </style:style>
    <style:style style:parent-style-name="1013" style:display-name="Heading 9 Char" style:family="text" style:name="1022">
      <style:paragraph-properties/>
      <style:text-properties fo:color="#272727" fo:font-family="Arial" style:font-family-complex="Arial" fo:font-style="italic"/>
    </style:style>
    <style:style style:parent-style-name="1005" style:display-name="Title" style:family="paragraph" style:name="1023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1013" style:display-name="Title Char" style:family="text" style:name="1024">
      <style:paragraph-properties/>
      <style:text-properties fo:font-family="Arial" style:font-family-complex="Arial" fo:font-size="28pt" style:font-size-complex="28pt" fo:letter-spacing="-0.5pt"/>
    </style:style>
    <style:style style:parent-style-name="1005" style:display-name="Subtitle" style:family="paragraph" style:name="1025">
      <style:paragraph-properties/>
      <style:text-properties fo:color="#595959" fo:font-size="14pt" style:font-size-complex="14pt" fo:letter-spacing="0.75pt"/>
    </style:style>
    <style:style style:parent-style-name="1013" style:display-name="Subtitle Char" style:family="text" style:name="1026">
      <style:paragraph-properties/>
      <style:text-properties fo:color="#595959" fo:font-size="14pt" style:font-size-complex="14pt" fo:letter-spacing="0.75pt"/>
    </style:style>
    <style:style style:parent-style-name="1005" style:display-name="Quote" style:family="paragraph" style:name="1027">
      <style:paragraph-properties fo:text-align="center" fo:margin-top="8pt"/>
      <style:text-properties fo:color="#404040" fo:font-style="italic"/>
    </style:style>
    <style:style style:parent-style-name="1013" style:display-name="Quote Char" style:family="text" style:name="1028">
      <style:paragraph-properties/>
      <style:text-properties fo:color="#404040" fo:font-style="italic"/>
    </style:style>
    <style:style style:parent-style-name="1005" style:display-name="List Paragraph" style:family="paragraph" style:name="1029">
      <style:paragraph-properties fo:margin-left="1.27cm" fo:margin-right="0cm" fo:text-indent="0cm"/>
    </style:style>
    <style:style style:parent-style-name="1013" style:display-name="Intense Emphasis" style:family="text" style:name="1030">
      <style:paragraph-properties/>
      <style:text-properties fo:color="#0f4761" fo:font-style="italic"/>
    </style:style>
    <style:style style:parent-style-name="1005" style:display-name="Intense Quote" style:family="paragraph" style:name="1031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1013" style:display-name="Intense Quote Char" style:family="text" style:name="1032">
      <style:paragraph-properties/>
      <style:text-properties fo:color="#0f4761" fo:font-style="italic"/>
    </style:style>
    <style:style style:parent-style-name="1013" style:display-name="Intense Reference" style:family="text" style:name="1033">
      <style:paragraph-properties/>
      <style:text-properties fo:font-variant="small-caps" fo:color="#0f4761" fo:letter-spacing="0.25pt" fo:font-weight="bold"/>
    </style:style>
    <style:style style:parent-style-name="1005" style:display-name="No Spacing" style:family="paragraph" style:name="1034">
      <style:paragraph-properties fo:line-height="100%" fo:margin-bottom="0pt"/>
    </style:style>
    <style:style style:parent-style-name="1013" style:display-name="Subtle Emphasis" style:family="text" style:name="1035">
      <style:paragraph-properties/>
      <style:text-properties fo:color="#404040" fo:font-style="italic"/>
    </style:style>
    <style:style style:parent-style-name="1013" style:display-name="Strong" style:family="text" style:name="1036">
      <style:paragraph-properties/>
      <style:text-properties fo:font-weight="bold"/>
    </style:style>
    <style:style style:parent-style-name="1013" style:display-name="Subtle Reference" style:family="text" style:name="1037">
      <style:paragraph-properties/>
      <style:text-properties fo:font-variant="small-caps" fo:color="#5a5a5a"/>
    </style:style>
    <style:style style:parent-style-name="1013" style:display-name="Book Title" style:family="text" style:name="1038">
      <style:paragraph-properties/>
      <style:text-properties fo:letter-spacing="0.25pt" fo:font-style="italic" fo:font-weight="bold"/>
    </style:style>
    <style:style style:parent-style-name="1013" style:display-name="Header Char" style:family="text" style:name="1039">
      <style:paragraph-properties/>
    </style:style>
    <style:style style:parent-style-name="1013" style:display-name="Footer Char" style:family="text" style:name="1040">
      <style:paragraph-properties/>
    </style:style>
    <style:style style:parent-style-name="1005" style:display-name="footnote text" style:family="paragraph" style:name="1041">
      <style:paragraph-properties fo:line-height="100%" fo:margin-bottom="0pt"/>
      <style:text-properties fo:font-size="10pt" style:font-size-complex="10pt"/>
    </style:style>
    <style:style style:parent-style-name="1013" style:display-name="Footnote Text Char" style:family="text" style:name="1042">
      <style:paragraph-properties/>
      <style:text-properties fo:font-size="10pt" style:font-size-complex="10pt"/>
    </style:style>
    <style:style style:parent-style-name="1013" style:display-name="footnote reference" style:family="text" style:name="1043">
      <style:paragraph-properties/>
      <style:text-properties style:text-position="super 58%"/>
    </style:style>
    <style:style style:parent-style-name="1005" style:display-name="endnote text" style:family="paragraph" style:name="1044">
      <style:paragraph-properties fo:line-height="100%" fo:margin-bottom="0pt"/>
      <style:text-properties fo:font-size="10pt" style:font-size-complex="10pt"/>
    </style:style>
    <style:style style:parent-style-name="1013" style:display-name="Endnote Text Char" style:family="text" style:name="1045">
      <style:paragraph-properties/>
      <style:text-properties fo:font-size="10pt" style:font-size-complex="10pt"/>
    </style:style>
    <style:style style:parent-style-name="1013" style:display-name="endnote reference" style:family="text" style:name="1046">
      <style:paragraph-properties/>
      <style:text-properties style:text-position="super 58%"/>
    </style:style>
    <style:style style:parent-style-name="1013" style:display-name="Hyperlink" style:family="text" style:name="104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4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4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5" style:display-name="Internet link" style:family="text" style:name="105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13" style:display-name="FollowedHyperlink" style:family="text" style:name="105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005" style:display-name="toc 1" style:family="paragraph" style:name="1058">
      <style:paragraph-properties fo:margin-bottom="5pt"/>
    </style:style>
    <style:style style:parent-style-name="1005" style:display-name="toc 2" style:family="paragraph" style:name="1059">
      <style:paragraph-properties fo:margin-left="0.3881cm" fo:margin-right="0cm" fo:text-indent="0cm" fo:margin-bottom="5pt"/>
      <style:text-properties/>
    </style:style>
    <style:style style:parent-style-name="1005" style:display-name="toc 3" style:family="paragraph" style:name="1060">
      <style:paragraph-properties fo:margin-left="0.7762cm" fo:margin-right="0cm" fo:text-indent="0cm" fo:margin-bottom="5pt"/>
      <style:text-properties/>
    </style:style>
    <style:style style:parent-style-name="1005" style:display-name="toc 4" style:family="paragraph" style:name="1061">
      <style:paragraph-properties fo:margin-left="1.164cm" fo:margin-right="0cm" fo:text-indent="0cm" fo:margin-bottom="5pt"/>
    </style:style>
    <style:style style:parent-style-name="1005" style:display-name="toc 5" style:family="paragraph" style:name="1062">
      <style:paragraph-properties fo:margin-left="1.552cm" fo:margin-right="0cm" fo:text-indent="0cm" fo:margin-bottom="5pt"/>
    </style:style>
    <style:style style:parent-style-name="1005" style:display-name="toc 6" style:family="paragraph" style:name="1063">
      <style:paragraph-properties fo:margin-left="1.94cm" fo:margin-right="0cm" fo:text-indent="0cm" fo:margin-bottom="5pt"/>
    </style:style>
    <style:style style:parent-style-name="1005" style:display-name="toc 7" style:family="paragraph" style:name="1064">
      <style:paragraph-properties fo:margin-left="2.328cm" fo:margin-right="0cm" fo:text-indent="0cm" fo:margin-bottom="5pt"/>
    </style:style>
    <style:style style:parent-style-name="1005" style:display-name="toc 8" style:family="paragraph" style:name="1065">
      <style:paragraph-properties fo:margin-left="2.717cm" fo:margin-right="0cm" fo:text-indent="0cm" fo:margin-bottom="5pt"/>
    </style:style>
    <style:style style:parent-style-name="1005" style:display-name="toc 9" style:family="paragraph" style:name="1066">
      <style:paragraph-properties fo:margin-left="3.105cm" fo:margin-right="0cm" fo:text-indent="0cm" fo:margin-bottom="5pt"/>
    </style:style>
    <style:style style:parent-style-name="1013" style:display-name="Placeholder Text" style:family="text" style:name="1067">
      <style:paragraph-properties/>
      <style:text-properties fo:color="#666666"/>
    </style:style>
    <style:style style:parent-style-name="1005" style:display-name="TOC Heading" style:family="paragraph" style:name="1068">
      <style:paragraph-properties/>
    </style:style>
    <style:style style:parent-style-name="1005" style:display-name="table of figures" style:family="paragraph" style:name="1069">
      <style:paragraph-properties fo:margin-bottom="0pt"/>
    </style:style>
    <style:style style:parent-style-name="1005" style:display-name="DStyle_paragraph" style:family="paragraph" style:name="10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display-name="Standard" style:family="paragraph" style:name="1071">
      <style:paragraph-properties/>
      <style:text-properties/>
    </style:style>
    <style:style style:parent-style-name="1071" style:display-name="Heading" style:family="paragraph" style:name="1072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1071" style:display-name="Text body" style:family="paragraph" style:name="1073">
      <style:paragraph-properties fo:line-height="115%" fo:margin-top="0pt" fo:margin-bottom="7pt"/>
    </style:style>
    <style:style style:parent-style-name="1073" style:display-name="List" style:family="paragraph" style:name="1074">
      <style:paragraph-properties/>
    </style:style>
    <style:style style:parent-style-name="1071" style:display-name="Caption" style:family="paragraph" style:name="1075">
      <style:paragraph-properties fo:margin-top="6pt" fo:margin-bottom="6pt"/>
      <style:text-properties fo:font-size="12pt" style:font-size-complex="12pt" fo:font-style="italic"/>
    </style:style>
    <style:style style:parent-style-name="1071" style:display-name="Index" style:family="paragraph" style:name="1076">
      <style:paragraph-properties/>
    </style:style>
    <style:style style:parent-style-name="1071" style:display-name="Table Contents" style:family="paragraph" style:name="1077">
      <style:paragraph-properties/>
    </style:style>
    <style:style style:parent-style-name="1077" style:display-name="Table Heading" style:family="paragraph" style:name="1078">
      <style:paragraph-properties fo:text-align="center"/>
      <style:text-properties fo:font-weight="bold"/>
    </style:style>
    <style:style style:parent-style-name="1072" style:display-name="Index Heading" style:family="paragraph" style:name="1079">
      <style:paragraph-properties fo:margin-left="0cm" fo:margin-right="0cm" fo:text-indent="0cm"/>
      <style:text-properties fo:font-size="16pt" style:font-size-complex="16pt" fo:font-weight="bold"/>
    </style:style>
    <style:style style:parent-style-name="1079" style:display-name="Contents Heading" style:family="paragraph" style:name="1080">
      <style:paragraph-properties fo:margin-left="0cm" fo:margin-right="0cm" fo:text-indent="0cm"/>
      <style:text-properties fo:font-size="16pt" style:font-size-complex="16pt" fo:font-weight="bold"/>
    </style:style>
    <style:style style:parent-style-name="1076" style:display-name="Contents 1" style:family="paragraph" style:name="1081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1072" style:display-name="Heading 1" style:family="paragraph" style:name="1082">
      <style:paragraph-properties fo:margin-top="12pt" fo:margin-bottom="6pt"/>
      <style:text-properties fo:font-size="18pt" style:font-size-complex="18pt" fo:font-weight="bold"/>
    </style:style>
    <style:style style:parent-style-name="1072" style:display-name="Heading 2" style:family="paragraph" style:name="1083">
      <style:paragraph-properties fo:margin-top="10pt" fo:margin-bottom="6pt"/>
      <style:text-properties fo:font-size="16pt" style:font-size-complex="16pt" fo:font-weight="bold"/>
    </style:style>
    <style:style style:parent-style-name="1076" style:display-name="Contents 2" style:family="paragraph" style:name="1084">
      <style:paragraph-properties fo:margin-left="0.4992cm" fo:margin-right="0cm" fo:text-indent="0cm">
        <style:tab-stops>
          <style:tab-stop style:position="22.09cm" style:type="right" style:leader-type="dotted" style:leader-style="dotted"/>
        </style:tab-stops>
      </style:paragraph-properties>
    </style:style>
    <style:style style:parent-style-name="1071" style:display-name="Header and Footer" style:family="paragraph" style:name="1085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85" style:display-name="Footer" style:family="paragraph" style:name="1086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85" style:display-name="Header" style:family="paragraph" style:name="1087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05" style:display-name="Emphasis" style:family="text" style:name="1088">
      <style:paragraph-properties/>
      <style:text-properties fo:font-style="italic"/>
    </style:style>
    <style:style style:parent-style-name="1005" style:display-name="Strong Emphasis" style:family="text" style:name="1089">
      <style:paragraph-properties/>
      <style:text-properties fo:font-weight="bold"/>
    </style:style>
    <style:style style:parent-style-name="1005" style:display-name="Internet link" style:family="text" style:name="1090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1005" style:display-name="Index Link" style:family="text" style:name="1091">
      <style:paragraph-properties/>
    </style:style>
    <style:style style:parent-style-name="1005" style:display-name="Bullet Symbols" style:family="text" style:name="1092">
      <style:paragraph-properties/>
      <style:text-properties fo:font-family="OpenSymbol" style:font-family-complex="OpenSymbol"/>
    </style:style>
    <style:style style:parent-style-name="1005" style:display-name="Numbering Symbols" style:family="text" style:name="1093">
      <style:paragraph-properties/>
    </style:style>
    <style:style style:parent-style-name="1005" style:display-name="T1" style:family="text" style:name="1094">
      <style:paragraph-properties/>
    </style:style>
    <style:style style:parent-style-name="1005" style:display-name="T2" style:family="text" style:name="1095">
      <style:paragraph-properties/>
    </style:style>
    <style:style style:parent-style-name="1005" style:display-name="T3" style:family="text" style:name="1096">
      <style:paragraph-properties/>
    </style:style>
    <style:style style:parent-style-name="1005" style:display-name="T4" style:family="text" style:name="1097">
      <style:paragraph-properties/>
    </style:style>
    <style:style style:parent-style-name="1005" style:display-name="T5" style:family="text" style:name="1098">
      <style:paragraph-properties/>
    </style:style>
    <style:style style:parent-style-name="1005" style:display-name="T6" style:family="text" style:name="1099">
      <style:paragraph-properties/>
    </style:style>
    <style:style style:parent-style-name="1005" style:display-name="T7" style:family="text" style:name="1100">
      <style:paragraph-properties/>
    </style:style>
    <style:style style:parent-style-name="1005" style:display-name="T8" style:family="text" style:name="1101">
      <style:paragraph-properties/>
    </style:style>
    <style:style style:parent-style-name="1005" style:display-name="T9" style:family="text" style:name="1102">
      <style:paragraph-properties/>
    </style:style>
    <style:style style:parent-style-name="1005" style:display-name="T10" style:family="text" style:name="1103">
      <style:paragraph-properties/>
    </style:style>
    <style:style style:parent-style-name="1005" style:display-name="T11" style:family="text" style:name="1104">
      <style:paragraph-properties/>
    </style:style>
    <style:style style:parent-style-name="1005" style:display-name="T12" style:family="text" style:name="1105">
      <style:paragraph-properties/>
    </style:style>
    <style:style style:parent-style-name="1005" style:display-name="T13" style:family="text" style:name="1106">
      <style:paragraph-properties/>
    </style:style>
    <style:style style:parent-style-name="1005" style:display-name="T14" style:family="text" style:name="1107">
      <style:paragraph-properties/>
    </style:style>
    <style:style style:parent-style-name="1005" style:display-name="T15" style:family="text" style:name="1108">
      <style:paragraph-properties/>
    </style:style>
    <style:style style:parent-style-name="1005" style:display-name="T16" style:family="text" style:name="1109">
      <style:paragraph-properties/>
    </style:style>
    <style:style style:parent-style-name="1005" style:display-name="T17" style:family="text" style:name="1110">
      <style:paragraph-properties/>
    </style:style>
    <style:style style:parent-style-name="1005" style:display-name="T18" style:family="text" style:name="1111">
      <style:paragraph-properties/>
    </style:style>
    <style:style style:parent-style-name="1005" style:display-name="T19" style:family="text" style:name="1112">
      <style:paragraph-properties/>
    </style:style>
    <style:style style:parent-style-name="1005" style:display-name="T20" style:family="text" style:name="1113">
      <style:paragraph-properties/>
    </style:style>
    <style:style style:parent-style-name="1005" style:display-name="T21" style:family="text" style:name="1114">
      <style:paragraph-properties/>
    </style:style>
    <style:style style:parent-style-name="1005" style:display-name="T22" style:family="text" style:name="1115">
      <style:paragraph-properties/>
    </style:style>
    <style:style style:parent-style-name="1005" style:display-name="T23" style:family="text" style:name="1116">
      <style:paragraph-properties/>
    </style:style>
    <style:style style:parent-style-name="1005" style:display-name="T24" style:family="text" style:name="1117">
      <style:paragraph-properties/>
    </style:style>
    <style:style style:parent-style-name="1005" style:display-name="T25" style:family="text" style:name="1118">
      <style:paragraph-properties/>
    </style:style>
    <style:style style:parent-style-name="1005" style:display-name="T26" style:family="text" style:name="1119">
      <style:paragraph-properties/>
    </style:style>
    <style:style style:parent-style-name="1005" style:display-name="T27" style:family="text" style:name="1120">
      <style:paragraph-properties/>
    </style:style>
    <style:style style:parent-style-name="1005" style:display-name="T28" style:family="text" style:name="1121">
      <style:paragraph-properties/>
    </style:style>
    <style:style style:parent-style-name="1005" style:display-name="T29" style:family="text" style:name="1122">
      <style:paragraph-properties/>
    </style:style>
    <style:style style:parent-style-name="1005" style:display-name="T30" style:family="text" style:name="1123">
      <style:paragraph-properties/>
    </style:style>
    <style:style style:parent-style-name="1005" style:display-name="T31" style:family="text" style:name="1124">
      <style:paragraph-properties/>
    </style:style>
    <style:style style:parent-style-name="1005" style:display-name="T32" style:family="text" style:name="1125">
      <style:paragraph-properties/>
    </style:style>
    <style:style style:parent-style-name="1005" style:display-name="T33" style:family="text" style:name="1126">
      <style:paragraph-properties/>
    </style:style>
    <style:style style:parent-style-name="1005" style:display-name="T34" style:family="text" style:name="1127">
      <style:paragraph-properties/>
    </style:style>
    <style:style style:parent-style-name="1005" style:display-name="T35" style:family="text" style:name="1128">
      <style:paragraph-properties/>
    </style:style>
    <style:style style:parent-style-name="1005" style:display-name="T36" style:family="text" style:name="1129">
      <style:paragraph-properties/>
    </style:style>
    <style:style style:parent-style-name="1005" style:display-name="T37" style:family="text" style:name="1130">
      <style:paragraph-properties/>
    </style:style>
    <style:style style:parent-style-name="1005" style:display-name="T38" style:family="text" style:name="1131">
      <style:paragraph-properties/>
    </style:style>
    <style:style style:parent-style-name="1005" style:display-name="T39" style:family="text" style:name="1132">
      <style:paragraph-properties/>
    </style:style>
    <style:style style:parent-style-name="1005" style:display-name="T40" style:family="text" style:name="1133">
      <style:paragraph-properties/>
    </style:style>
    <style:style style:parent-style-name="1005" style:display-name="T41" style:family="text" style:name="1134">
      <style:paragraph-properties/>
    </style:style>
    <style:style style:parent-style-name="1005" style:display-name="T42" style:family="text" style:name="1135">
      <style:paragraph-properties/>
    </style:style>
    <style:style style:parent-style-name="1005" style:display-name="T43" style:family="text" style:name="1136">
      <style:paragraph-properties/>
    </style:style>
    <style:style style:parent-style-name="1005" style:display-name="T44" style:family="text" style:name="1137">
      <style:paragraph-properties/>
    </style:style>
    <style:style style:parent-style-name="1005" style:display-name="T45" style:family="text" style:name="1138">
      <style:paragraph-properties/>
    </style:style>
    <style:style style:parent-style-name="1005" style:display-name="T46" style:family="text" style:name="1139">
      <style:paragraph-properties/>
    </style:style>
    <style:style style:parent-style-name="1005" style:display-name="T47" style:family="text" style:name="1140">
      <style:paragraph-properties/>
    </style:style>
    <style:style style:parent-style-name="1005" style:display-name="T48" style:family="text" style:name="1141">
      <style:paragraph-properties/>
    </style:style>
    <style:style style:parent-style-name="1005" style:display-name="T49" style:family="text" style:name="1142">
      <style:paragraph-properties/>
    </style:style>
    <style:style style:parent-style-name="1005" style:display-name="T50" style:family="text" style:name="1143">
      <style:paragraph-properties/>
    </style:style>
    <style:style style:parent-style-name="1005" style:display-name="T51" style:family="text" style:name="1144">
      <style:paragraph-properties/>
    </style:style>
    <style:style style:parent-style-name="1005" style:display-name="T52" style:family="text" style:name="1145">
      <style:paragraph-properties/>
    </style:style>
    <style:style style:parent-style-name="1005" style:display-name="T53" style:family="text" style:name="1146">
      <style:paragraph-properties/>
    </style:style>
    <style:style style:parent-style-name="1005" style:display-name="T54" style:family="text" style:name="1147">
      <style:paragraph-properties/>
    </style:style>
    <style:style style:parent-style-name="1005" style:display-name="T55" style:family="text" style:name="1148">
      <style:paragraph-properties/>
    </style:style>
    <style:style style:parent-style-name="1005" style:display-name="T56" style:family="text" style:name="1149">
      <style:paragraph-properties/>
    </style:style>
    <style:style style:parent-style-name="1005" style:display-name="T57" style:family="text" style:name="1150">
      <style:paragraph-properties/>
    </style:style>
    <style:style style:parent-style-name="1005" style:display-name="T58" style:family="text" style:name="1151">
      <style:paragraph-properties/>
    </style:style>
    <style:style style:parent-style-name="1005" style:display-name="T59" style:family="text" style:name="1152">
      <style:paragraph-properties/>
    </style:style>
    <style:style style:parent-style-name="1005" style:display-name="T60" style:family="text" style:name="1153">
      <style:paragraph-properties/>
    </style:style>
    <style:style style:parent-style-name="1005" style:display-name="T61" style:family="text" style:name="1154">
      <style:paragraph-properties/>
    </style:style>
    <style:style style:parent-style-name="1005" style:display-name="T62" style:family="text" style:name="1155">
      <style:paragraph-properties/>
    </style:style>
    <style:style style:parent-style-name="1005" style:display-name="T63" style:family="text" style:name="1156">
      <style:paragraph-properties/>
    </style:style>
    <style:style style:parent-style-name="1005" style:display-name="T1" style:family="text" style:name="1157">
      <style:paragraph-properties/>
    </style:style>
    <style:style style:parent-style-name="1005" style:display-name="T2" style:family="text" style:name="1158">
      <style:paragraph-properties/>
    </style:style>
    <style:style style:parent-style-name="1005" style:display-name="T3" style:family="text" style:name="1159">
      <style:paragraph-properties/>
    </style:style>
    <style:style style:parent-style-name="1005" style:display-name="T4" style:family="text" style:name="1160">
      <style:paragraph-properties/>
    </style:style>
    <style:style style:parent-style-name="1005" style:display-name="T5" style:family="text" style:name="1161">
      <style:paragraph-properties/>
    </style:style>
    <style:style style:parent-style-name="1005" style:display-name="T6" style:family="text" style:name="1162">
      <style:paragraph-properties/>
    </style:style>
    <style:style style:parent-style-name="1005" style:display-name="T7" style:family="text" style:name="1163">
      <style:paragraph-properties/>
    </style:style>
    <style:style style:parent-style-name="1005" style:display-name="T8" style:family="text" style:name="1164">
      <style:paragraph-properties/>
    </style:style>
    <style:style style:parent-style-name="1005" style:display-name="T9" style:family="text" style:name="1165">
      <style:paragraph-properties/>
    </style:style>
    <style:style style:parent-style-name="1005" style:display-name="T10" style:family="text" style:name="1166">
      <style:paragraph-properties/>
    </style:style>
    <style:style style:parent-style-name="1005" style:display-name="T11" style:family="text" style:name="1167">
      <style:paragraph-properties/>
    </style:style>
    <style:style style:parent-style-name="1005" style:display-name="T12" style:family="text" style:name="1168">
      <style:paragraph-properties/>
    </style:style>
    <style:style style:parent-style-name="1005" style:display-name="T13" style:family="text" style:name="1169">
      <style:paragraph-properties/>
    </style:style>
    <style:style style:parent-style-name="1005" style:display-name="T14" style:family="text" style:name="1170">
      <style:paragraph-properties/>
    </style:style>
    <style:style style:parent-style-name="1005" style:display-name="T15" style:family="text" style:name="1171">
      <style:paragraph-properties/>
    </style:style>
    <style:style style:parent-style-name="1005" style:display-name="T16" style:family="text" style:name="1172">
      <style:paragraph-properties/>
    </style:style>
    <style:style style:parent-style-name="1005" style:display-name="T17" style:family="text" style:name="1173">
      <style:paragraph-properties/>
    </style:style>
    <style:style style:parent-style-name="1005" style:display-name="T18" style:family="text" style:name="1174">
      <style:paragraph-properties/>
    </style:style>
    <style:style style:parent-style-name="1005" style:display-name="T19" style:family="text" style:name="1175">
      <style:paragraph-properties/>
    </style:style>
    <style:style style:parent-style-name="1005" style:display-name="T20" style:family="text" style:name="1176">
      <style:paragraph-properties/>
    </style:style>
    <style:style style:parent-style-name="1005" style:display-name="T21" style:family="text" style:name="1177">
      <style:paragraph-properties/>
    </style:style>
    <style:style style:parent-style-name="1005" style:display-name="T22" style:family="text" style:name="1178">
      <style:paragraph-properties/>
    </style:style>
    <style:style style:parent-style-name="1005" style:display-name="T23" style:family="text" style:name="1179">
      <style:paragraph-properties/>
    </style:style>
    <style:style style:parent-style-name="1005" style:display-name="T24" style:family="text" style:name="1180">
      <style:paragraph-properties/>
    </style:style>
    <style:style style:parent-style-name="1005" style:display-name="T25" style:family="text" style:name="1181">
      <style:paragraph-properties/>
    </style:style>
    <style:style style:parent-style-name="1005" style:display-name="T26" style:family="text" style:name="1182">
      <style:paragraph-properties/>
    </style:style>
    <style:style style:parent-style-name="1005" style:display-name="T27" style:family="text" style:name="1183">
      <style:paragraph-properties/>
    </style:style>
    <style:style style:parent-style-name="1005" style:display-name="T28" style:family="text" style:name="1184">
      <style:paragraph-properties/>
    </style:style>
    <style:style style:parent-style-name="1005" style:display-name="T29" style:family="text" style:name="1185">
      <style:paragraph-properties/>
    </style:style>
    <style:style style:parent-style-name="1005" style:display-name="T30" style:family="text" style:name="1186">
      <style:paragraph-properties/>
    </style:style>
    <style:style style:parent-style-name="1005" style:display-name="T31" style:family="text" style:name="1187">
      <style:paragraph-properties/>
    </style:style>
    <style:style style:parent-style-name="1005" style:display-name="T32" style:family="text" style:name="1188">
      <style:paragraph-properties/>
    </style:style>
    <style:style style:parent-style-name="1005" style:display-name="T33" style:family="text" style:name="1189">
      <style:paragraph-properties/>
    </style:style>
    <style:style style:parent-style-name="1005" style:display-name="T34" style:family="text" style:name="1190">
      <style:paragraph-properties/>
    </style:style>
    <style:style style:parent-style-name="1005" style:display-name="T35" style:family="text" style:name="1191">
      <style:paragraph-properties/>
    </style:style>
    <style:style style:parent-style-name="1005" style:display-name="T36" style:family="text" style:name="1192">
      <style:paragraph-properties/>
    </style:style>
    <style:style style:parent-style-name="1005" style:display-name="T37" style:family="text" style:name="1193">
      <style:paragraph-properties/>
    </style:style>
    <style:style style:parent-style-name="1005" style:display-name="T38" style:family="text" style:name="1194">
      <style:paragraph-properties/>
    </style:style>
    <style:style style:parent-style-name="1005" style:display-name="T39" style:family="text" style:name="1195">
      <style:paragraph-properties/>
    </style:style>
    <style:style style:parent-style-name="1005" style:display-name="T40" style:family="text" style:name="1196">
      <style:paragraph-properties/>
    </style:style>
    <style:style style:parent-style-name="1005" style:display-name="T41" style:family="text" style:name="1197">
      <style:paragraph-properties/>
    </style:style>
    <style:style style:parent-style-name="1005" style:display-name="T42" style:family="text" style:name="1198">
      <style:paragraph-properties/>
    </style:style>
    <style:style style:parent-style-name="1005" style:display-name="T43" style:family="text" style:name="1199">
      <style:paragraph-properties/>
    </style:style>
    <style:style style:parent-style-name="1005" style:display-name="T44" style:family="text" style:name="1200">
      <style:paragraph-properties/>
    </style:style>
    <style:style style:parent-style-name="1005" style:display-name="T45" style:family="text" style:name="1201">
      <style:paragraph-properties/>
    </style:style>
    <style:style style:parent-style-name="1005" style:display-name="T46" style:family="text" style:name="1202">
      <style:paragraph-properties/>
    </style:style>
    <style:style style:parent-style-name="1005" style:display-name="T47" style:family="text" style:name="1203">
      <style:paragraph-properties/>
    </style:style>
    <style:style style:parent-style-name="1005" style:display-name="T48" style:family="text" style:name="1204">
      <style:paragraph-properties/>
    </style:style>
    <style:style style:parent-style-name="1005" style:display-name="T49" style:family="text" style:name="1205">
      <style:paragraph-properties/>
    </style:style>
    <style:style style:parent-style-name="1005" style:display-name="T50" style:family="text" style:name="1206">
      <style:paragraph-properties/>
    </style:style>
    <style:style style:parent-style-name="1005" style:display-name="T51" style:family="text" style:name="1207">
      <style:paragraph-properties/>
    </style:style>
    <style:style style:parent-style-name="1005" style:display-name="T52" style:family="text" style:name="1208">
      <style:paragraph-properties/>
    </style:style>
    <style:style style:parent-style-name="1005" style:display-name="T53" style:family="text" style:name="1209">
      <style:paragraph-properties/>
    </style:style>
    <style:style style:parent-style-name="1005" style:display-name="T54" style:family="text" style:name="1210">
      <style:paragraph-properties/>
    </style:style>
    <style:style style:parent-style-name="1005" style:display-name="T55" style:family="text" style:name="1211">
      <style:paragraph-properties/>
    </style:style>
    <style:style style:parent-style-name="1005" style:display-name="T56" style:family="text" style:name="1212">
      <style:paragraph-properties/>
    </style:style>
    <style:style style:parent-style-name="1005" style:display-name="T57" style:family="text" style:name="1213">
      <style:paragraph-properties/>
    </style:style>
    <style:style style:parent-style-name="1005" style:display-name="T58" style:family="text" style:name="1214">
      <style:paragraph-properties/>
    </style:style>
    <style:style style:parent-style-name="1005" style:display-name="T59" style:family="text" style:name="1215">
      <style:paragraph-properties/>
    </style:style>
    <style:style style:parent-style-name="1005" style:display-name="T60" style:family="text" style:name="1216">
      <style:paragraph-properties/>
    </style:style>
    <style:style style:parent-style-name="1005" style:display-name="T61" style:family="text" style:name="1217">
      <style:paragraph-properties/>
    </style:style>
    <style:style style:parent-style-name="1005" style:display-name="T62" style:family="text" style:name="1218">
      <style:paragraph-properties/>
    </style:style>
    <style:style style:parent-style-name="1005" style:display-name="T63" style:family="text" style:name="1219">
      <style:paragraph-properties/>
    </style:style>
    <style:style style:parent-style-name="1005" style:display-name="T64" style:family="text" style:name="1220">
      <style:paragraph-properties/>
    </style:style>
    <style:style style:parent-style-name="1005" style:display-name="T65" style:family="text" style:name="1221">
      <style:paragraph-properties/>
    </style:style>
    <style:style style:parent-style-name="1005" style:display-name="T66" style:family="text" style:name="1222">
      <style:paragraph-properties/>
    </style:style>
    <style:style style:parent-style-name="1005" style:display-name="T67" style:family="text" style:name="1223">
      <style:paragraph-properties/>
    </style:style>
    <style:style style:parent-style-name="1005" style:display-name="T68" style:family="text" style:name="1224">
      <style:paragraph-properties/>
    </style:style>
    <style:style style:parent-style-name="1005" style:display-name="T69" style:family="text" style:name="1225">
      <style:paragraph-properties/>
    </style:style>
    <style:style style:parent-style-name="1005" style:display-name="T70" style:family="text" style:name="1226">
      <style:paragraph-properties/>
    </style:style>
    <style:style style:parent-style-name="1005" style:display-name="T71" style:family="text" style:name="1227">
      <style:paragraph-properties/>
    </style:style>
    <style:style style:parent-style-name="1005" style:display-name="T72" style:family="text" style:name="1228">
      <style:paragraph-properties/>
    </style:style>
    <style:style style:parent-style-name="1005" style:display-name="T73" style:family="text" style:name="1229">
      <style:paragraph-properties/>
    </style:style>
    <style:style style:parent-style-name="1005" style:display-name="T74" style:family="text" style:name="1230">
      <style:paragraph-properties/>
    </style:style>
    <style:style style:parent-style-name="1005" style:display-name="T75" style:family="text" style:name="1231">
      <style:paragraph-properties/>
    </style:style>
    <style:style style:parent-style-name="1005" style:display-name="T76" style:family="text" style:name="1232">
      <style:paragraph-properties/>
    </style:style>
    <style:style style:parent-style-name="1005" style:display-name="T77" style:family="text" style:name="1233">
      <style:paragraph-properties/>
    </style:style>
    <style:style style:parent-style-name="1005" style:display-name="T78" style:family="text" style:name="1234">
      <style:paragraph-properties/>
    </style:style>
    <style:style style:parent-style-name="1005" style:display-name="T79" style:family="text" style:name="1235">
      <style:paragraph-properties/>
    </style:style>
    <style:style style:parent-style-name="1005" style:display-name="T80" style:family="text" style:name="1236">
      <style:paragraph-properties/>
    </style:style>
    <style:style style:parent-style-name="1005" style:display-name="T81" style:family="text" style:name="1237">
      <style:paragraph-properties/>
    </style:style>
    <style:style style:parent-style-name="1005" style:display-name="T82" style:family="text" style:name="1238">
      <style:paragraph-properties/>
    </style:style>
    <style:style style:parent-style-name="1005" style:display-name="T83" style:family="text" style:name="1239">
      <style:paragraph-properties/>
    </style:style>
    <style:style style:parent-style-name="1005" style:display-name="T84" style:family="text" style:name="1240">
      <style:paragraph-properties/>
    </style:style>
    <style:style style:parent-style-name="1005" style:display-name="T85" style:family="text" style:name="1241">
      <style:paragraph-properties/>
    </style:style>
    <style:style style:parent-style-name="1005" style:display-name="T86" style:family="text" style:name="1242">
      <style:paragraph-properties/>
    </style:style>
    <style:style style:parent-style-name="1005" style:display-name="T87" style:family="text" style:name="1243">
      <style:paragraph-properties/>
    </style:style>
    <style:style style:parent-style-name="1005" style:display-name="T88" style:family="text" style:name="1244">
      <style:paragraph-properties/>
    </style:style>
    <style:style style:parent-style-name="1005" style:display-name="T89" style:family="text" style:name="1245">
      <style:paragraph-properties/>
    </style:style>
    <style:style style:parent-style-name="1005" style:display-name="T90" style:family="text" style:name="1246">
      <style:paragraph-properties/>
    </style:style>
    <style:style style:parent-style-name="1005" style:display-name="T91" style:family="text" style:name="1247">
      <style:paragraph-properties/>
    </style:style>
    <style:style style:parent-style-name="1005" style:display-name="T92" style:family="text" style:name="1248">
      <style:paragraph-properties/>
    </style:style>
    <style:style style:parent-style-name="1005" style:display-name="T93" style:family="text" style:name="1249">
      <style:paragraph-properties/>
    </style:style>
    <style:style style:parent-style-name="1005" style:display-name="T94" style:family="text" style:name="1250">
      <style:paragraph-properties/>
    </style:style>
    <style:style style:parent-style-name="1005" style:display-name="T95" style:family="text" style:name="1251">
      <style:paragraph-properties/>
    </style:style>
    <style:style style:parent-style-name="1005" style:display-name="T96" style:family="text" style:name="1252">
      <style:paragraph-properties/>
    </style:style>
    <style:style style:parent-style-name="1005" style:display-name="T97" style:family="text" style:name="1253">
      <style:paragraph-properties/>
    </style:style>
    <style:style style:parent-style-name="1005" style:display-name="T98" style:family="text" style:name="1254">
      <style:paragraph-properties/>
    </style:style>
    <style:style style:parent-style-name="1005" style:display-name="T99" style:family="text" style:name="1255">
      <style:paragraph-properties/>
    </style:style>
    <style:style style:parent-style-name="1005" style:display-name="T100" style:family="text" style:name="1256">
      <style:paragraph-properties/>
    </style:style>
    <style:style style:parent-style-name="1005" style:display-name="T101" style:family="text" style:name="1257">
      <style:paragraph-properties/>
    </style:style>
    <style:style style:parent-style-name="1005" style:display-name="T102" style:family="text" style:name="1258">
      <style:paragraph-properties/>
    </style:style>
    <style:style style:parent-style-name="1005" style:display-name="T103" style:family="text" style:name="1259">
      <style:paragraph-properties/>
    </style:style>
    <style:style style:parent-style-name="1005" style:display-name="T104" style:family="text" style:name="1260">
      <style:paragraph-properties/>
    </style:style>
    <style:style style:parent-style-name="1005" style:display-name="T105" style:family="text" style:name="1261">
      <style:paragraph-properties/>
    </style:style>
    <style:style style:parent-style-name="1005" style:display-name="T106" style:family="text" style:name="1262">
      <style:paragraph-properties/>
    </style:style>
    <style:style style:parent-style-name="1005" style:display-name="T107" style:family="text" style:name="1263">
      <style:paragraph-properties/>
    </style:style>
    <style:style style:parent-style-name="1005" style:display-name="T108" style:family="text" style:name="1264">
      <style:paragraph-properties/>
    </style:style>
    <style:style style:parent-style-name="1005" style:display-name="T109" style:family="text" style:name="1265">
      <style:paragraph-properties/>
    </style:style>
    <style:style style:parent-style-name="1005" style:display-name="T110" style:family="text" style:name="1266">
      <style:paragraph-properties/>
    </style:style>
    <style:style style:parent-style-name="1005" style:display-name="T111" style:family="text" style:name="1267">
      <style:paragraph-properties/>
    </style:style>
    <style:style style:parent-style-name="1005" style:display-name="T112" style:family="text" style:name="1268">
      <style:paragraph-properties/>
    </style:style>
    <style:style style:parent-style-name="1005" style:display-name="T113" style:family="text" style:name="1269">
      <style:paragraph-properties/>
    </style:style>
    <style:style style:parent-style-name="1005" style:display-name="T114" style:family="text" style:name="1270">
      <style:paragraph-properties/>
    </style:style>
    <style:style style:parent-style-name="1005" style:display-name="T115" style:family="text" style:name="1271">
      <style:paragraph-properties/>
    </style:style>
    <style:style style:parent-style-name="1005" style:display-name="T116" style:family="text" style:name="1272">
      <style:paragraph-properties/>
    </style:style>
    <style:style style:parent-style-name="1005" style:display-name="T117" style:family="text" style:name="1273">
      <style:paragraph-properties/>
    </style:style>
    <style:style style:parent-style-name="1005" style:display-name="T1" style:family="text" style:name="1274">
      <style:paragraph-properties/>
    </style:style>
    <style:style style:parent-style-name="1005" style:display-name="T2" style:family="text" style:name="1275">
      <style:paragraph-properties/>
    </style:style>
    <style:style style:parent-style-name="1005" style:display-name="T3" style:family="text" style:name="1276">
      <style:paragraph-properties/>
    </style:style>
    <style:style style:parent-style-name="1005" style:display-name="T4" style:family="text" style:name="1277">
      <style:paragraph-properties/>
    </style:style>
    <style:style style:parent-style-name="1005" style:display-name="T5" style:family="text" style:name="1278">
      <style:paragraph-properties/>
    </style:style>
    <style:style style:parent-style-name="1005" style:display-name="T6" style:family="text" style:name="1279">
      <style:paragraph-properties/>
    </style:style>
    <style:style style:parent-style-name="1005" style:display-name="T7" style:family="text" style:name="1280">
      <style:paragraph-properties/>
    </style:style>
    <style:style style:parent-style-name="1005" style:display-name="T8" style:family="text" style:name="1281">
      <style:paragraph-properties/>
    </style:style>
    <style:style style:parent-style-name="1005" style:display-name="T9" style:family="text" style:name="1282">
      <style:paragraph-properties/>
    </style:style>
    <style:style style:parent-style-name="1005" style:display-name="T10" style:family="text" style:name="1283">
      <style:paragraph-properties/>
    </style:style>
    <style:style style:parent-style-name="1005" style:display-name="T11" style:family="text" style:name="1284">
      <style:paragraph-properties/>
    </style:style>
    <style:style style:parent-style-name="1005" style:display-name="T12" style:family="text" style:name="1285">
      <style:paragraph-properties/>
    </style:style>
    <style:style style:parent-style-name="1005" style:display-name="T13" style:family="text" style:name="1286">
      <style:paragraph-properties/>
    </style:style>
    <style:style style:parent-style-name="1005" style:display-name="T14" style:family="text" style:name="1287">
      <style:paragraph-properties/>
    </style:style>
    <style:style style:parent-style-name="1005" style:display-name="T15" style:family="text" style:name="1288">
      <style:paragraph-properties/>
    </style:style>
    <style:style style:parent-style-name="1005" style:display-name="T16" style:family="text" style:name="1289">
      <style:paragraph-properties/>
    </style:style>
    <style:style style:parent-style-name="1005" style:display-name="T17" style:family="text" style:name="1290">
      <style:paragraph-properties/>
    </style:style>
    <style:style style:parent-style-name="1005" style:display-name="T18" style:family="text" style:name="1291">
      <style:paragraph-properties/>
    </style:style>
    <style:style style:parent-style-name="1005" style:display-name="T19" style:family="text" style:name="1292">
      <style:paragraph-properties/>
    </style:style>
    <style:style style:parent-style-name="1005" style:display-name="T20" style:family="text" style:name="1293">
      <style:paragraph-properties/>
    </style:style>
    <style:style style:parent-style-name="1005" style:display-name="T21" style:family="text" style:name="1294">
      <style:paragraph-properties/>
    </style:style>
    <style:style style:parent-style-name="1005" style:display-name="T22" style:family="text" style:name="1295">
      <style:paragraph-properties/>
    </style:style>
    <style:style style:parent-style-name="1005" style:display-name="T23" style:family="text" style:name="1296">
      <style:paragraph-properties/>
    </style:style>
    <style:style style:parent-style-name="1005" style:display-name="T24" style:family="text" style:name="1297">
      <style:paragraph-properties/>
    </style:style>
    <style:style style:parent-style-name="1005" style:display-name="T25" style:family="text" style:name="1298">
      <style:paragraph-properties/>
    </style:style>
    <style:style style:parent-style-name="1005" style:display-name="T26" style:family="text" style:name="1299">
      <style:paragraph-properties/>
    </style:style>
    <style:style style:parent-style-name="1005" style:display-name="T27" style:family="text" style:name="1300">
      <style:paragraph-properties/>
    </style:style>
    <style:style style:parent-style-name="1005" style:display-name="T28" style:family="text" style:name="1301">
      <style:paragraph-properties/>
    </style:style>
    <style:style style:parent-style-name="1005" style:display-name="T29" style:family="text" style:name="1302">
      <style:paragraph-properties/>
    </style:style>
    <style:style style:parent-style-name="1005" style:display-name="T30" style:family="text" style:name="1303">
      <style:paragraph-properties/>
    </style:style>
    <style:style style:parent-style-name="1005" style:display-name="T31" style:family="text" style:name="1304">
      <style:paragraph-properties/>
    </style:style>
    <style:style style:parent-style-name="1005" style:display-name="T32" style:family="text" style:name="1305">
      <style:paragraph-properties/>
    </style:style>
    <style:style style:parent-style-name="1005" style:display-name="T33" style:family="text" style:name="1306">
      <style:paragraph-properties/>
    </style:style>
    <style:style style:parent-style-name="1005" style:display-name="T34" style:family="text" style:name="1307">
      <style:paragraph-properties/>
    </style:style>
    <style:style style:parent-style-name="1005" style:display-name="T35" style:family="text" style:name="1308">
      <style:paragraph-properties/>
    </style:style>
    <style:style style:parent-style-name="1005" style:display-name="T36" style:family="text" style:name="1309">
      <style:paragraph-properties/>
    </style:style>
    <style:style style:parent-style-name="1005" style:display-name="T37" style:family="text" style:name="1310">
      <style:paragraph-properties/>
    </style:style>
    <style:style style:parent-style-name="1005" style:display-name="T38" style:family="text" style:name="1311">
      <style:paragraph-properties/>
    </style:style>
    <style:style style:parent-style-name="1005" style:display-name="T39" style:family="text" style:name="1312">
      <style:paragraph-properties/>
    </style:style>
    <style:style style:parent-style-name="1005" style:display-name="T40" style:family="text" style:name="1313">
      <style:paragraph-properties/>
    </style:style>
    <style:style style:parent-style-name="1005" style:display-name="T41" style:family="text" style:name="1314">
      <style:paragraph-properties/>
    </style:style>
    <style:style style:parent-style-name="1005" style:display-name="T42" style:family="text" style:name="1315">
      <style:paragraph-properties/>
    </style:style>
    <style:style style:parent-style-name="1005" style:display-name="T43" style:family="text" style:name="1316">
      <style:paragraph-properties/>
    </style:style>
    <style:style style:parent-style-name="1005" style:display-name="T44" style:family="text" style:name="1317">
      <style:paragraph-properties/>
    </style:style>
    <style:style style:parent-style-name="1005" style:display-name="T45" style:family="text" style:name="1318">
      <style:paragraph-properties/>
    </style:style>
    <style:style style:parent-style-name="1005" style:display-name="T46" style:family="text" style:name="1319">
      <style:paragraph-properties/>
    </style:style>
    <style:style style:parent-style-name="1005" style:display-name="T47" style:family="text" style:name="1320">
      <style:paragraph-properties/>
    </style:style>
    <style:style style:parent-style-name="1005" style:display-name="T48" style:family="text" style:name="1321">
      <style:paragraph-properties/>
    </style:style>
    <style:style style:parent-style-name="1005" style:display-name="T49" style:family="text" style:name="1322">
      <style:paragraph-properties/>
    </style:style>
    <style:style style:parent-style-name="1005" style:display-name="T50" style:family="text" style:name="1323">
      <style:paragraph-properties/>
    </style:style>
    <style:style style:parent-style-name="1005" style:display-name="T51" style:family="text" style:name="1324">
      <style:paragraph-properties/>
    </style:style>
    <style:style style:parent-style-name="1005" style:display-name="T52" style:family="text" style:name="1325">
      <style:paragraph-properties/>
    </style:style>
    <style:style style:parent-style-name="1005" style:display-name="T53" style:family="text" style:name="1326">
      <style:paragraph-properties/>
    </style:style>
    <style:style style:parent-style-name="1005" style:display-name="T54" style:family="text" style:name="1327">
      <style:paragraph-properties/>
    </style:style>
    <style:style style:parent-style-name="1005" style:display-name="T55" style:family="text" style:name="1328">
      <style:paragraph-properties/>
    </style:style>
    <style:style style:parent-style-name="1005" style:display-name="T56" style:family="text" style:name="1329">
      <style:paragraph-properties/>
    </style:style>
    <style:style style:parent-style-name="1005" style:display-name="T57" style:family="text" style:name="1330">
      <style:paragraph-properties/>
    </style:style>
    <style:style style:parent-style-name="1005" style:display-name="T58" style:family="text" style:name="1331">
      <style:paragraph-properties/>
    </style:style>
    <style:style style:parent-style-name="1005" style:display-name="T59" style:family="text" style:name="1332">
      <style:paragraph-properties/>
    </style:style>
    <style:style style:parent-style-name="1005" style:display-name="T60" style:family="text" style:name="1333">
      <style:paragraph-properties/>
    </style:style>
    <style:style style:parent-style-name="1005" style:display-name="T61" style:family="text" style:name="1334">
      <style:paragraph-properties/>
    </style:style>
    <style:style style:parent-style-name="1005" style:display-name="T62" style:family="text" style:name="1335">
      <style:paragraph-properties/>
    </style:style>
    <style:style style:parent-style-name="1005" style:display-name="T63" style:family="text" style:name="1336">
      <style:paragraph-properties/>
    </style:style>
    <style:style style:parent-style-name="1005" style:display-name="T64" style:family="text" style:name="1337">
      <style:paragraph-properties/>
    </style:style>
    <style:style style:parent-style-name="1005" style:display-name="T65" style:family="text" style:name="1338">
      <style:paragraph-properties/>
    </style:style>
    <style:style style:parent-style-name="1005" style:display-name="T66" style:family="text" style:name="1339">
      <style:paragraph-properties/>
    </style:style>
    <style:style style:parent-style-name="1005" style:display-name="T67" style:family="text" style:name="1340">
      <style:paragraph-properties/>
    </style:style>
    <style:style style:parent-style-name="1005" style:display-name="T68" style:family="text" style:name="1341">
      <style:paragraph-properties/>
    </style:style>
    <style:style style:parent-style-name="1005" style:display-name="T69" style:family="text" style:name="1342">
      <style:paragraph-properties/>
    </style:style>
    <style:style style:parent-style-name="1005" style:display-name="T70" style:family="text" style:name="1343">
      <style:paragraph-properties/>
    </style:style>
    <style:style style:parent-style-name="1005" style:display-name="T71" style:family="text" style:name="1344">
      <style:paragraph-properties/>
    </style:style>
    <style:style style:parent-style-name="1005" style:display-name="T72" style:family="text" style:name="1345">
      <style:paragraph-properties/>
    </style:style>
    <style:style style:parent-style-name="1005" style:display-name="T73" style:family="text" style:name="1346">
      <style:paragraph-properties/>
    </style:style>
    <style:style style:parent-style-name="1005" style:display-name="T74" style:family="text" style:name="1347">
      <style:paragraph-properties/>
    </style:style>
    <style:style style:parent-style-name="1005" style:display-name="T75" style:family="text" style:name="1348">
      <style:paragraph-properties/>
    </style:style>
    <style:style style:parent-style-name="1005" style:display-name="T76" style:family="text" style:name="1349">
      <style:paragraph-properties/>
    </style:style>
    <style:style style:parent-style-name="1005" style:display-name="T77" style:family="text" style:name="1350">
      <style:paragraph-properties/>
    </style:style>
    <style:style style:parent-style-name="1005" style:display-name="T78" style:family="text" style:name="1351">
      <style:paragraph-properties/>
    </style:style>
    <style:style style:parent-style-name="1005" style:display-name="T79" style:family="text" style:name="1352">
      <style:paragraph-properties/>
    </style:style>
    <style:style style:parent-style-name="1005" style:display-name="T80" style:family="text" style:name="1353">
      <style:paragraph-properties/>
    </style:style>
    <style:style style:parent-style-name="1005" style:display-name="T81" style:family="text" style:name="1354">
      <style:paragraph-properties/>
    </style:style>
    <style:style style:parent-style-name="1005" style:display-name="T82" style:family="text" style:name="1355">
      <style:paragraph-properties/>
    </style:style>
    <style:style style:parent-style-name="1005" style:display-name="T83" style:family="text" style:name="1356">
      <style:paragraph-properties/>
    </style:style>
    <style:style style:parent-style-name="1005" style:display-name="T84" style:family="text" style:name="1357">
      <style:paragraph-properties/>
    </style:style>
    <style:style style:parent-style-name="1005" style:display-name="T85" style:family="text" style:name="1358">
      <style:paragraph-properties/>
    </style:style>
    <style:style style:parent-style-name="1005" style:display-name="T86" style:family="text" style:name="1359">
      <style:paragraph-properties/>
    </style:style>
    <style:style style:parent-style-name="1005" style:display-name="T87" style:family="text" style:name="1360">
      <style:paragraph-properties/>
    </style:style>
    <style:style style:parent-style-name="1005" style:display-name="T88" style:family="text" style:name="1361">
      <style:paragraph-properties/>
    </style:style>
    <style:style style:parent-style-name="1005" style:display-name="T89" style:family="text" style:name="1362">
      <style:paragraph-properties/>
    </style:style>
    <style:style style:parent-style-name="1005" style:display-name="T90" style:family="text" style:name="1363">
      <style:paragraph-properties/>
    </style:style>
    <style:style style:parent-style-name="1005" style:display-name="T91" style:family="text" style:name="1364">
      <style:paragraph-properties/>
    </style:style>
    <style:style style:parent-style-name="1005" style:display-name="T92" style:family="text" style:name="1365">
      <style:paragraph-properties/>
    </style:style>
    <style:style style:parent-style-name="1005" style:display-name="T93" style:family="text" style:name="1366">
      <style:paragraph-properties/>
    </style:style>
    <style:style style:parent-style-name="1005" style:display-name="T94" style:family="text" style:name="1367">
      <style:paragraph-properties/>
    </style:style>
    <style:style style:parent-style-name="1005" style:display-name="T95" style:family="text" style:name="1368">
      <style:paragraph-properties/>
    </style:style>
    <style:style style:parent-style-name="1005" style:display-name="T96" style:family="text" style:name="1369">
      <style:paragraph-properties/>
    </style:style>
    <style:style style:parent-style-name="1005" style:display-name="T97" style:family="text" style:name="1370">
      <style:paragraph-properties/>
    </style:style>
    <style:style style:parent-style-name="1005" style:display-name="T98" style:family="text" style:name="1371">
      <style:paragraph-properties/>
    </style:style>
    <style:style style:parent-style-name="1005" style:display-name="T99" style:family="text" style:name="1372">
      <style:paragraph-properties/>
    </style:style>
    <style:style style:parent-style-name="1005" style:display-name="T100" style:family="text" style:name="1373">
      <style:paragraph-properties/>
    </style:style>
    <style:style style:parent-style-name="1005" style:display-name="T101" style:family="text" style:name="1374">
      <style:paragraph-properties/>
    </style:style>
    <style:style style:parent-style-name="1005" style:display-name="T102" style:family="text" style:name="1375">
      <style:paragraph-properties/>
    </style:style>
    <style:style style:parent-style-name="1005" style:display-name="T103" style:family="text" style:name="1376">
      <style:paragraph-properties/>
    </style:style>
    <style:style style:parent-style-name="1005" style:display-name="T104" style:family="text" style:name="1377">
      <style:paragraph-properties/>
    </style:style>
    <style:style style:parent-style-name="1005" style:display-name="T105" style:family="text" style:name="1378">
      <style:paragraph-properties/>
    </style:style>
    <style:style style:parent-style-name="1005" style:display-name="T106" style:family="text" style:name="1379">
      <style:paragraph-properties/>
    </style:style>
    <style:style style:parent-style-name="1005" style:display-name="T107" style:family="text" style:name="1380">
      <style:paragraph-properties/>
    </style:style>
    <style:style style:parent-style-name="1005" style:display-name="T108" style:family="text" style:name="1381">
      <style:paragraph-properties/>
    </style:style>
    <style:style style:parent-style-name="1005" style:display-name="T109" style:family="text" style:name="1382">
      <style:paragraph-properties/>
    </style:style>
    <style:style style:parent-style-name="1005" style:display-name="T110" style:family="text" style:name="1383">
      <style:paragraph-properties/>
    </style:style>
    <style:style style:parent-style-name="1005" style:display-name="T111" style:family="text" style:name="1384">
      <style:paragraph-properties/>
    </style:style>
    <style:style style:parent-style-name="1005" style:display-name="T112" style:family="text" style:name="1385">
      <style:paragraph-properties/>
    </style:style>
    <style:style style:parent-style-name="1005" style:display-name="T113" style:family="text" style:name="1386">
      <style:paragraph-properties/>
    </style:style>
    <style:style style:parent-style-name="1005" style:display-name="T114" style:family="text" style:name="1387">
      <style:paragraph-properties/>
    </style:style>
    <style:style style:parent-style-name="1005" style:display-name="T115" style:family="text" style:name="1388">
      <style:paragraph-properties/>
    </style:style>
    <style:style style:parent-style-name="1005" style:display-name="T116" style:family="text" style:name="1389">
      <style:paragraph-properties/>
    </style:style>
    <style:style style:parent-style-name="1005" style:display-name="T117" style:family="text" style:name="1390">
      <style:paragraph-properties/>
    </style:style>
    <style:style style:parent-style-name="1005" style:display-name="T118" style:family="text" style:name="1391">
      <style:paragraph-properties/>
    </style:style>
    <style:style style:parent-style-name="1005" style:display-name="T119" style:family="text" style:name="1392">
      <style:paragraph-properties/>
    </style:style>
    <style:style style:parent-style-name="1005" style:display-name="T120" style:family="text" style:name="1393">
      <style:paragraph-properties/>
    </style:style>
    <style:style style:parent-style-name="1005" style:display-name="T121" style:family="text" style:name="1394">
      <style:paragraph-properties/>
    </style:style>
    <style:style style:parent-style-name="1005" style:display-name="T122" style:family="text" style:name="1395">
      <style:paragraph-properties/>
    </style:style>
    <style:style style:parent-style-name="1005" style:display-name="T123" style:family="text" style:name="1396">
      <style:paragraph-properties/>
    </style:style>
    <style:style style:parent-style-name="1005" style:display-name="T124" style:family="text" style:name="1397">
      <style:paragraph-properties/>
    </style:style>
    <style:style style:parent-style-name="1005" style:display-name="T125" style:family="text" style:name="1398">
      <style:paragraph-properties/>
    </style:style>
    <style:style style:parent-style-name="1005" style:display-name="T126" style:family="text" style:name="1399">
      <style:paragraph-properties/>
    </style:style>
    <style:style style:parent-style-name="1005" style:display-name="T127" style:family="text" style:name="1400">
      <style:paragraph-properties/>
    </style:style>
    <style:style style:parent-style-name="1005" style:display-name="T128" style:family="text" style:name="1401">
      <style:paragraph-properties/>
    </style:style>
    <style:style style:parent-style-name="1005" style:display-name="T129" style:family="text" style:name="1402">
      <style:paragraph-properties/>
    </style:style>
    <style:style style:parent-style-name="1005" style:display-name="T130" style:family="text" style:name="1403">
      <style:paragraph-properties/>
    </style:style>
    <style:style style:parent-style-name="1005" style:display-name="T131" style:family="text" style:name="1404">
      <style:paragraph-properties/>
    </style:style>
    <style:style style:parent-style-name="1005" style:display-name="T132" style:family="text" style:name="1405">
      <style:paragraph-properties/>
    </style:style>
    <style:style style:parent-style-name="1005" style:display-name="T133" style:family="text" style:name="1406">
      <style:paragraph-properties/>
    </style:style>
    <style:style style:parent-style-name="1005" style:display-name="T134" style:family="text" style:name="1407">
      <style:paragraph-properties/>
    </style:style>
    <style:style style:parent-style-name="1005" style:display-name="T135" style:family="text" style:name="1408">
      <style:paragraph-properties/>
    </style:style>
    <style:style style:parent-style-name="1005" style:display-name="T136" style:family="text" style:name="1409">
      <style:paragraph-properties/>
    </style:style>
    <style:style style:parent-style-name="1005" style:display-name="T137" style:family="text" style:name="1410">
      <style:paragraph-properties/>
    </style:style>
    <style:style style:parent-style-name="1005" style:display-name="T138" style:family="text" style:name="1411">
      <style:paragraph-properties/>
    </style:style>
    <style:style style:parent-style-name="1005" style:display-name="T139" style:family="text" style:name="1412">
      <style:paragraph-properties/>
    </style:style>
    <style:style style:parent-style-name="1005" style:display-name="T140" style:family="text" style:name="1413">
      <style:paragraph-properties/>
    </style:style>
    <style:style style:parent-style-name="1005" style:display-name="T141" style:family="text" style:name="1414">
      <style:paragraph-properties/>
    </style:style>
    <style:style style:parent-style-name="1005" style:display-name="T142" style:family="text" style:name="1415">
      <style:paragraph-properties/>
    </style:style>
    <style:style style:parent-style-name="1005" style:display-name="T143" style:family="text" style:name="1416">
      <style:paragraph-properties/>
    </style:style>
    <style:style style:parent-style-name="1005" style:display-name="T144" style:family="text" style:name="1417">
      <style:paragraph-properties/>
    </style:style>
    <style:style style:parent-style-name="1005" style:display-name="T1" style:family="text" style:name="1418">
      <style:paragraph-properties/>
    </style:style>
    <style:style style:parent-style-name="1005" style:display-name="T2" style:family="text" style:name="1419">
      <style:paragraph-properties/>
    </style:style>
    <style:style style:parent-style-name="1005" style:display-name="T3" style:family="text" style:name="1420">
      <style:paragraph-properties/>
    </style:style>
    <style:style style:parent-style-name="1005" style:display-name="T4" style:family="text" style:name="1421">
      <style:paragraph-properties/>
    </style:style>
    <style:style style:parent-style-name="1005" style:display-name="T5" style:family="text" style:name="1422">
      <style:paragraph-properties/>
    </style:style>
    <style:style style:parent-style-name="1005" style:display-name="T6" style:family="text" style:name="1423">
      <style:paragraph-properties/>
    </style:style>
    <style:style style:parent-style-name="1005" style:display-name="T7" style:family="text" style:name="1424">
      <style:paragraph-properties/>
    </style:style>
    <style:style style:parent-style-name="1005" style:display-name="T8" style:family="text" style:name="1425">
      <style:paragraph-properties/>
    </style:style>
    <style:style style:parent-style-name="1005" style:display-name="T9" style:family="text" style:name="1426">
      <style:paragraph-properties/>
    </style:style>
    <style:style style:parent-style-name="1005" style:display-name="T10" style:family="text" style:name="1427">
      <style:paragraph-properties/>
    </style:style>
    <style:style style:parent-style-name="1005" style:display-name="T11" style:family="text" style:name="1428">
      <style:paragraph-properties/>
    </style:style>
    <style:style style:parent-style-name="1005" style:display-name="T12" style:family="text" style:name="1429">
      <style:paragraph-properties/>
    </style:style>
    <style:style style:parent-style-name="1005" style:display-name="T13" style:family="text" style:name="1430">
      <style:paragraph-properties/>
    </style:style>
    <style:style style:parent-style-name="1005" style:display-name="T14" style:family="text" style:name="1431">
      <style:paragraph-properties/>
    </style:style>
    <style:style style:parent-style-name="1005" style:display-name="T15" style:family="text" style:name="1432">
      <style:paragraph-properties/>
    </style:style>
    <style:style style:parent-style-name="1005" style:display-name="T16" style:family="text" style:name="1433">
      <style:paragraph-properties/>
    </style:style>
    <style:style style:parent-style-name="1005" style:display-name="T17" style:family="text" style:name="1434">
      <style:paragraph-properties/>
    </style:style>
    <style:style style:parent-style-name="1005" style:display-name="T18" style:family="text" style:name="1435">
      <style:paragraph-properties/>
    </style:style>
    <style:style style:parent-style-name="1005" style:display-name="T19" style:family="text" style:name="1436">
      <style:paragraph-properties/>
    </style:style>
    <style:style style:parent-style-name="1005" style:display-name="T20" style:family="text" style:name="1437">
      <style:paragraph-properties/>
    </style:style>
    <style:style style:parent-style-name="1005" style:display-name="T21" style:family="text" style:name="1438">
      <style:paragraph-properties/>
    </style:style>
    <style:style style:parent-style-name="1005" style:display-name="T22" style:family="text" style:name="1439">
      <style:paragraph-properties/>
    </style:style>
    <style:style style:parent-style-name="1005" style:display-name="T23" style:family="text" style:name="1440">
      <style:paragraph-properties/>
    </style:style>
    <style:style style:parent-style-name="1005" style:display-name="T24" style:family="text" style:name="1441">
      <style:paragraph-properties/>
    </style:style>
    <style:style style:parent-style-name="1005" style:display-name="T25" style:family="text" style:name="1442">
      <style:paragraph-properties/>
    </style:style>
    <style:style style:parent-style-name="1005" style:display-name="T26" style:family="text" style:name="1443">
      <style:paragraph-properties/>
    </style:style>
    <style:style style:parent-style-name="1005" style:display-name="T27" style:family="text" style:name="1444">
      <style:paragraph-properties/>
    </style:style>
    <style:style style:parent-style-name="1005" style:display-name="T28" style:family="text" style:name="1445">
      <style:paragraph-properties/>
    </style:style>
    <style:style style:parent-style-name="1005" style:display-name="T29" style:family="text" style:name="1446">
      <style:paragraph-properties/>
    </style:style>
    <style:style style:parent-style-name="1005" style:display-name="T30" style:family="text" style:name="1447">
      <style:paragraph-properties/>
    </style:style>
    <style:style style:parent-style-name="1005" style:display-name="T31" style:family="text" style:name="1448">
      <style:paragraph-properties/>
    </style:style>
    <style:style style:parent-style-name="1005" style:display-name="T32" style:family="text" style:name="1449">
      <style:paragraph-properties/>
    </style:style>
    <style:style style:parent-style-name="1005" style:display-name="T33" style:family="text" style:name="1450">
      <style:paragraph-properties/>
    </style:style>
    <style:style style:parent-style-name="1005" style:display-name="T34" style:family="text" style:name="1451">
      <style:paragraph-properties/>
    </style:style>
    <style:style style:parent-style-name="1005" style:display-name="T35" style:family="text" style:name="1452">
      <style:paragraph-properties/>
    </style:style>
    <style:style style:parent-style-name="1005" style:display-name="T36" style:family="text" style:name="1453">
      <style:paragraph-properties/>
    </style:style>
    <style:style style:parent-style-name="1005" style:display-name="T37" style:family="text" style:name="1454">
      <style:paragraph-properties/>
    </style:style>
    <style:style style:parent-style-name="1005" style:display-name="T38" style:family="text" style:name="1455">
      <style:paragraph-properties/>
    </style:style>
    <style:style style:parent-style-name="1005" style:display-name="T39" style:family="text" style:name="1456">
      <style:paragraph-properties/>
    </style:style>
    <style:style style:parent-style-name="1005" style:display-name="T40" style:family="text" style:name="1457">
      <style:paragraph-properties/>
    </style:style>
    <style:style style:parent-style-name="1005" style:display-name="T41" style:family="text" style:name="1458">
      <style:paragraph-properties/>
    </style:style>
    <style:style style:parent-style-name="1005" style:display-name="T42" style:family="text" style:name="1459">
      <style:paragraph-properties/>
    </style:style>
    <style:style style:parent-style-name="1005" style:display-name="T43" style:family="text" style:name="1460">
      <style:paragraph-properties/>
    </style:style>
    <style:style style:parent-style-name="1005" style:display-name="T44" style:family="text" style:name="1461">
      <style:paragraph-properties/>
    </style:style>
    <style:style style:parent-style-name="1005" style:display-name="T45" style:family="text" style:name="1462">
      <style:paragraph-properties/>
    </style:style>
    <style:style style:parent-style-name="1005" style:display-name="T46" style:family="text" style:name="1463">
      <style:paragraph-properties/>
    </style:style>
    <style:style style:parent-style-name="1005" style:display-name="T47" style:family="text" style:name="1464">
      <style:paragraph-properties/>
    </style:style>
    <style:style style:parent-style-name="1005" style:display-name="T48" style:family="text" style:name="1465">
      <style:paragraph-properties/>
    </style:style>
    <style:style style:parent-style-name="1005" style:display-name="T49" style:family="text" style:name="1466">
      <style:paragraph-properties/>
    </style:style>
    <style:style style:parent-style-name="1005" style:display-name="T50" style:family="text" style:name="1467">
      <style:paragraph-properties/>
    </style:style>
    <style:style style:parent-style-name="1005" style:display-name="T51" style:family="text" style:name="1468">
      <style:paragraph-properties/>
    </style:style>
    <style:style style:parent-style-name="1005" style:display-name="T52" style:family="text" style:name="1469">
      <style:paragraph-properties/>
    </style:style>
    <style:style style:parent-style-name="1005" style:display-name="T53" style:family="text" style:name="1470">
      <style:paragraph-properties/>
    </style:style>
    <style:style style:parent-style-name="1005" style:display-name="T54" style:family="text" style:name="1471">
      <style:paragraph-properties/>
    </style:style>
    <style:style style:parent-style-name="1005" style:display-name="T55" style:family="text" style:name="1472">
      <style:paragraph-properties/>
    </style:style>
    <style:style style:parent-style-name="1005" style:display-name="T56" style:family="text" style:name="1473">
      <style:paragraph-properties/>
    </style:style>
    <style:style style:parent-style-name="1005" style:display-name="T57" style:family="text" style:name="1474">
      <style:paragraph-properties/>
    </style:style>
    <style:style style:parent-style-name="1005" style:display-name="T58" style:family="text" style:name="1475">
      <style:paragraph-properties/>
    </style:style>
    <style:style style:parent-style-name="1005" style:display-name="T59" style:family="text" style:name="1476">
      <style:paragraph-properties/>
    </style:style>
    <style:style style:parent-style-name="1005" style:display-name="T60" style:family="text" style:name="1477">
      <style:paragraph-properties/>
    </style:style>
    <style:style style:parent-style-name="1005" style:display-name="T61" style:family="text" style:name="1478">
      <style:paragraph-properties/>
    </style:style>
    <style:style style:parent-style-name="1005" style:display-name="T62" style:family="text" style:name="1479">
      <style:paragraph-properties/>
    </style:style>
    <style:style style:parent-style-name="1005" style:display-name="T63" style:family="text" style:name="1480">
      <style:paragraph-properties/>
    </style:style>
    <style:style style:parent-style-name="1005" style:display-name="T64" style:family="text" style:name="1481">
      <style:paragraph-properties/>
    </style:style>
    <style:style style:parent-style-name="1005" style:display-name="T65" style:family="text" style:name="1482">
      <style:paragraph-properties/>
    </style:style>
    <style:style style:parent-style-name="1005" style:display-name="T66" style:family="text" style:name="1483">
      <style:paragraph-properties/>
    </style:style>
    <style:style style:parent-style-name="1005" style:display-name="T67" style:family="text" style:name="1484">
      <style:paragraph-properties/>
    </style:style>
    <style:style style:parent-style-name="1005" style:display-name="T68" style:family="text" style:name="1485">
      <style:paragraph-properties/>
    </style:style>
    <style:style style:parent-style-name="1005" style:display-name="T69" style:family="text" style:name="1486">
      <style:paragraph-properties/>
    </style:style>
    <style:style style:parent-style-name="1005" style:display-name="T70" style:family="text" style:name="1487">
      <style:paragraph-properties/>
    </style:style>
    <style:style style:parent-style-name="1005" style:display-name="T71" style:family="text" style:name="1488">
      <style:paragraph-properties/>
    </style:style>
    <style:style style:parent-style-name="1005" style:display-name="T72" style:family="text" style:name="1489">
      <style:paragraph-properties/>
    </style:style>
    <style:style style:parent-style-name="1005" style:display-name="T73" style:family="text" style:name="1490">
      <style:paragraph-properties/>
    </style:style>
    <style:style style:parent-style-name="1005" style:display-name="T74" style:family="text" style:name="1491">
      <style:paragraph-properties/>
    </style:style>
    <style:style style:parent-style-name="1005" style:display-name="T75" style:family="text" style:name="1492">
      <style:paragraph-properties/>
    </style:style>
    <style:style style:parent-style-name="1005" style:display-name="T76" style:family="text" style:name="1493">
      <style:paragraph-properties/>
    </style:style>
    <style:style style:parent-style-name="1005" style:display-name="T77" style:family="text" style:name="1494">
      <style:paragraph-properties/>
    </style:style>
    <style:style style:parent-style-name="1005" style:display-name="T78" style:family="text" style:name="1495">
      <style:paragraph-properties/>
    </style:style>
    <style:style style:parent-style-name="1005" style:display-name="T79" style:family="text" style:name="1496">
      <style:paragraph-properties/>
    </style:style>
    <style:style style:parent-style-name="1005" style:display-name="T80" style:family="text" style:name="1497">
      <style:paragraph-properties/>
    </style:style>
    <style:style style:parent-style-name="1005" style:display-name="T81" style:family="text" style:name="1498">
      <style:paragraph-properties/>
    </style:style>
    <style:style style:parent-style-name="1005" style:display-name="T82" style:family="text" style:name="1499">
      <style:paragraph-properties/>
    </style:style>
    <style:style style:parent-style-name="1005" style:display-name="T83" style:family="text" style:name="1500">
      <style:paragraph-properties/>
    </style:style>
    <style:style style:parent-style-name="1005" style:display-name="T84" style:family="text" style:name="1501">
      <style:paragraph-properties/>
    </style:style>
    <style:style style:parent-style-name="1005" style:display-name="T85" style:family="text" style:name="1502">
      <style:paragraph-properties/>
    </style:style>
    <style:style style:parent-style-name="1005" style:display-name="T86" style:family="text" style:name="1503">
      <style:paragraph-properties/>
    </style:style>
    <style:style style:parent-style-name="1005" style:display-name="T87" style:family="text" style:name="1504">
      <style:paragraph-properties/>
    </style:style>
    <style:style style:parent-style-name="1005" style:display-name="T88" style:family="text" style:name="1505">
      <style:paragraph-properties/>
    </style:style>
    <style:style style:parent-style-name="1005" style:display-name="T89" style:family="text" style:name="1506">
      <style:paragraph-properties/>
    </style:style>
    <style:style style:parent-style-name="1005" style:display-name="T90" style:family="text" style:name="1507">
      <style:paragraph-properties/>
    </style:style>
    <style:style style:parent-style-name="1005" style:display-name="T91" style:family="text" style:name="1508">
      <style:paragraph-properties/>
    </style:style>
    <style:style style:parent-style-name="1005" style:display-name="T92" style:family="text" style:name="1509">
      <style:paragraph-properties/>
    </style:style>
    <style:style style:parent-style-name="1005" style:display-name="T93" style:family="text" style:name="1510">
      <style:paragraph-properties/>
    </style:style>
    <style:style style:parent-style-name="1005" style:display-name="T94" style:family="text" style:name="1511">
      <style:paragraph-properties/>
    </style:style>
    <style:style style:parent-style-name="1005" style:display-name="T95" style:family="text" style:name="1512">
      <style:paragraph-properties/>
    </style:style>
    <style:style style:parent-style-name="1005" style:display-name="T96" style:family="text" style:name="1513">
      <style:paragraph-properties/>
    </style:style>
    <style:style style:parent-style-name="1005" style:display-name="T97" style:family="text" style:name="1514">
      <style:paragraph-properties/>
    </style:style>
    <style:style style:parent-style-name="1005" style:display-name="T98" style:family="text" style:name="1515">
      <style:paragraph-properties/>
    </style:style>
    <style:style style:parent-style-name="1005" style:display-name="T99" style:family="text" style:name="1516">
      <style:paragraph-properties/>
    </style:style>
    <style:style style:parent-style-name="1005" style:display-name="T100" style:family="text" style:name="1517">
      <style:paragraph-properties/>
    </style:style>
    <style:style style:parent-style-name="1005" style:display-name="T101" style:family="text" style:name="1518">
      <style:paragraph-properties/>
    </style:style>
    <style:style style:parent-style-name="1005" style:display-name="T102" style:family="text" style:name="1519">
      <style:paragraph-properties/>
    </style:style>
    <style:style style:parent-style-name="1005" style:display-name="T103" style:family="text" style:name="1520">
      <style:paragraph-properties/>
    </style:style>
    <style:style style:parent-style-name="1005" style:display-name="T104" style:family="text" style:name="1521">
      <style:paragraph-properties/>
    </style:style>
    <style:style style:parent-style-name="1005" style:display-name="T105" style:family="text" style:name="1522">
      <style:paragraph-properties/>
    </style:style>
    <style:style style:parent-style-name="1005" style:display-name="T106" style:family="text" style:name="1523">
      <style:paragraph-properties/>
    </style:style>
    <style:style style:parent-style-name="1005" style:display-name="T107" style:family="text" style:name="1524">
      <style:paragraph-properties/>
    </style:style>
    <style:style style:parent-style-name="1005" style:display-name="T108" style:family="text" style:name="1525">
      <style:paragraph-properties/>
    </style:style>
    <style:style style:parent-style-name="1005" style:display-name="T109" style:family="text" style:name="1526">
      <style:paragraph-properties/>
    </style:style>
    <style:style style:parent-style-name="1005" style:display-name="T110" style:family="text" style:name="1527">
      <style:paragraph-properties/>
    </style:style>
    <style:style style:parent-style-name="1005" style:display-name="T111" style:family="text" style:name="1528">
      <style:paragraph-properties/>
    </style:style>
    <style:style style:parent-style-name="1005" style:display-name="T112" style:family="text" style:name="1529">
      <style:paragraph-properties/>
    </style:style>
    <style:style style:parent-style-name="1005" style:display-name="T113" style:family="text" style:name="1530">
      <style:paragraph-properties/>
    </style:style>
    <style:style style:parent-style-name="1005" style:display-name="T114" style:family="text" style:name="1531">
      <style:paragraph-properties/>
    </style:style>
    <style:style style:parent-style-name="1005" style:display-name="T115" style:family="text" style:name="1532">
      <style:paragraph-properties/>
    </style:style>
    <style:style style:parent-style-name="1005" style:display-name="T116" style:family="text" style:name="1533">
      <style:paragraph-properties/>
    </style:style>
    <style:style style:parent-style-name="1005" style:display-name="T117" style:family="text" style:name="1534">
      <style:paragraph-properties/>
    </style:style>
    <style:style style:parent-style-name="1005" style:display-name="T118" style:family="text" style:name="1535">
      <style:paragraph-properties/>
    </style:style>
    <style:style style:parent-style-name="1005" style:display-name="T119" style:family="text" style:name="1536">
      <style:paragraph-properties/>
    </style:style>
    <style:style style:parent-style-name="1005" style:display-name="T120" style:family="text" style:name="1537">
      <style:paragraph-properties/>
    </style:style>
    <style:style style:parent-style-name="1005" style:display-name="T121" style:family="text" style:name="1538">
      <style:paragraph-properties/>
    </style:style>
    <style:style style:parent-style-name="1005" style:display-name="T122" style:family="text" style:name="1539">
      <style:paragraph-properties/>
    </style:style>
    <style:style style:parent-style-name="1005" style:display-name="T123" style:family="text" style:name="1540">
      <style:paragraph-properties/>
    </style:style>
    <style:style style:parent-style-name="1005" style:display-name="T124" style:family="text" style:name="1541">
      <style:paragraph-properties/>
    </style:style>
    <style:style style:parent-style-name="1005" style:display-name="T125" style:family="text" style:name="1542">
      <style:paragraph-properties/>
    </style:style>
    <style:style style:parent-style-name="1005" style:display-name="T126" style:family="text" style:name="1543">
      <style:paragraph-properties/>
    </style:style>
    <style:style style:parent-style-name="1005" style:display-name="T127" style:family="text" style:name="1544">
      <style:paragraph-properties/>
    </style:style>
    <style:style style:parent-style-name="1005" style:display-name="T128" style:family="text" style:name="1545">
      <style:paragraph-properties/>
    </style:style>
    <style:style style:parent-style-name="1005" style:display-name="T129" style:family="text" style:name="1546">
      <style:paragraph-properties/>
    </style:style>
    <style:style style:parent-style-name="1005" style:display-name="T130" style:family="text" style:name="1547">
      <style:paragraph-properties/>
    </style:style>
    <style:style style:parent-style-name="1005" style:display-name="T131" style:family="text" style:name="1548">
      <style:paragraph-properties/>
    </style:style>
    <style:style style:parent-style-name="1005" style:display-name="T132" style:family="text" style:name="1549">
      <style:paragraph-properties/>
    </style:style>
    <style:style style:parent-style-name="1005" style:display-name="T133" style:family="text" style:name="1550">
      <style:paragraph-properties/>
    </style:style>
    <style:style style:parent-style-name="1005" style:display-name="T134" style:family="text" style:name="1551">
      <style:paragraph-properties/>
    </style:style>
    <style:style style:parent-style-name="1005" style:display-name="T135" style:family="text" style:name="1552">
      <style:paragraph-properties/>
    </style:style>
    <style:style style:parent-style-name="1005" style:display-name="T136" style:family="text" style:name="1553">
      <style:paragraph-properties/>
    </style:style>
    <style:style style:parent-style-name="1005" style:display-name="T137" style:family="text" style:name="1554">
      <style:paragraph-properties/>
    </style:style>
    <style:style style:parent-style-name="1005" style:display-name="T138" style:family="text" style:name="1555">
      <style:paragraph-properties/>
    </style:style>
    <style:style style:parent-style-name="1005" style:display-name="T139" style:family="text" style:name="1556">
      <style:paragraph-properties/>
    </style:style>
    <style:style style:parent-style-name="1005" style:display-name="T140" style:family="text" style:name="1557">
      <style:paragraph-properties/>
    </style:style>
    <style:style style:parent-style-name="1005" style:display-name="T141" style:family="text" style:name="1558">
      <style:paragraph-properties/>
    </style:style>
    <style:style style:parent-style-name="1005" style:display-name="T142" style:family="text" style:name="1559">
      <style:paragraph-properties/>
    </style:style>
    <style:style style:parent-style-name="1005" style:display-name="T143" style:family="text" style:name="1560">
      <style:paragraph-properties/>
    </style:style>
    <style:style style:parent-style-name="1005" style:display-name="T144" style:family="text" style:name="1561">
      <style:paragraph-properties/>
    </style:style>
    <style:style style:parent-style-name="1005" style:display-name="T145" style:family="text" style:name="1562">
      <style:paragraph-properties/>
    </style:style>
    <style:style style:parent-style-name="1005" style:display-name="T146" style:family="text" style:name="1563">
      <style:paragraph-properties/>
      <style:text-properties fo:font-family="Courier New" style:font-family-complex="Courier New"/>
    </style:style>
    <style:style style:parent-style-name="1005" style:display-name="T147" style:family="text" style:name="1564">
      <style:paragraph-properties/>
      <style:text-properties fo:font-family="Wingdings" style:font-family-complex="Wingdings"/>
    </style:style>
    <style:style style:parent-style-name="1005" style:display-name="T148" style:family="text" style:name="1565">
      <style:paragraph-properties/>
      <style:text-properties fo:font-family="Symbol" style:font-family-complex="Symbol"/>
    </style:style>
    <style:style style:parent-style-name="1005" style:display-name="T149" style:family="text" style:name="1566">
      <style:paragraph-properties/>
      <style:text-properties fo:font-family="Courier New" style:font-family-complex="Courier New"/>
    </style:style>
    <style:style style:parent-style-name="1005" style:display-name="T150" style:family="text" style:name="1567">
      <style:paragraph-properties/>
      <style:text-properties fo:font-family="Wingdings" style:font-family-complex="Wingdings"/>
    </style:style>
    <style:style style:parent-style-name="1005" style:display-name="T151" style:family="text" style:name="1568">
      <style:paragraph-properties/>
      <style:text-properties fo:font-family="Symbol" style:font-family-complex="Symbol"/>
    </style:style>
    <style:style style:parent-style-name="1005" style:display-name="T152" style:family="text" style:name="1569">
      <style:paragraph-properties/>
      <style:text-properties fo:font-family="Courier New" style:font-family-complex="Courier New"/>
    </style:style>
    <style:style style:parent-style-name="1005" style:display-name="T153" style:family="text" style:name="1570">
      <style:paragraph-properties/>
      <style:text-properties fo:font-family="Wingdings" style:font-family-complex="Wingdings"/>
    </style:style>
    <style:style style:parent-style-name="1005" style:display-name="T154" style:family="text" style:name="1571">
      <style:paragraph-properties/>
      <style:text-properties fo:font-family="Symbol" style:font-family-complex="Symbol"/>
    </style:style>
    <style:style style:parent-style-name="1005" style:display-name="T155" style:family="text" style:name="1572">
      <style:paragraph-properties/>
      <style:text-properties fo:font-family="Courier New" style:font-family-complex="Courier New"/>
    </style:style>
    <style:style style:parent-style-name="1005" style:display-name="T156" style:family="text" style:name="1573">
      <style:paragraph-properties/>
      <style:text-properties fo:font-family="Wingdings" style:font-family-complex="Wingdings"/>
    </style:style>
    <style:style style:parent-style-name="1005" style:display-name="T157" style:family="text" style:name="1574">
      <style:paragraph-properties/>
      <style:text-properties fo:font-family="Symbol" style:font-family-complex="Symbol"/>
    </style:style>
    <style:style style:parent-style-name="1005" style:display-name="T158" style:family="text" style:name="1575">
      <style:paragraph-properties/>
      <style:text-properties fo:font-family="Courier New" style:font-family-complex="Courier New"/>
    </style:style>
    <style:style style:parent-style-name="1005" style:display-name="T159" style:family="text" style:name="1576">
      <style:paragraph-properties/>
      <style:text-properties fo:font-family="Wingdings" style:font-family-complex="Wingdings"/>
    </style:style>
    <style:style style:parent-style-name="1005" style:display-name="T160" style:family="text" style:name="1577">
      <style:paragraph-properties/>
      <style:text-properties fo:font-family="Symbol" style:font-family-complex="Symbol"/>
    </style:style>
    <style:style style:parent-style-name="1005" style:display-name="T161" style:family="text" style:name="1578">
      <style:paragraph-properties/>
      <style:text-properties fo:font-family="Courier New" style:font-family-complex="Courier New"/>
    </style:style>
    <style:style style:parent-style-name="1005" style:display-name="T162" style:family="text" style:name="1579">
      <style:paragraph-properties/>
      <style:text-properties fo:font-family="Wingdings" style:font-family-complex="Wingdings"/>
    </style:style>
    <style:style style:parent-style-name="1005" style:display-name="T163" style:family="text" style:name="1580">
      <style:paragraph-properties/>
      <style:text-properties fo:font-family="Symbol" style:font-family-complex="Symbol" fo:font-weight="bold"/>
    </style:style>
    <style:style style:parent-style-name="1005" style:display-name="T164" style:family="text" style:name="1581">
      <style:paragraph-properties/>
      <style:text-properties fo:font-family="Symbol" style:font-family-complex="Symbol"/>
    </style:style>
    <style:style style:parent-style-name="1005" style:display-name="T165" style:family="text" style:name="1582">
      <style:paragraph-properties/>
      <style:text-properties fo:font-family="Wingdings" style:font-family-complex="Wingdings"/>
    </style:style>
    <style:style style:parent-style-name="1005" style:display-name="T166" style:family="text" style:name="1583">
      <style:paragraph-properties/>
      <style:text-properties fo:font-family="Symbol" style:font-family-complex="Symbol"/>
    </style:style>
    <style:style style:parent-style-name="1005" style:display-name="T167" style:family="text" style:name="1584">
      <style:paragraph-properties/>
      <style:text-properties fo:font-family="Courier New" style:font-family-complex="Courier New"/>
    </style:style>
    <style:style style:parent-style-name="1005" style:display-name="T168" style:family="text" style:name="1585">
      <style:paragraph-properties/>
      <style:text-properties fo:font-family="Wingdings" style:font-family-complex="Wingdings"/>
    </style:style>
    <style:style style:parent-style-name="1005" style:display-name="T169" style:family="text" style:name="1586">
      <style:paragraph-properties/>
      <style:text-properties fo:font-family="Symbol" style:font-family-complex="Symbol"/>
    </style:style>
    <style:style style:parent-style-name="1005" style:display-name="T170" style:family="text" style:name="1587">
      <style:paragraph-properties/>
      <style:text-properties fo:font-family="Courier New" style:font-family-complex="Courier New"/>
    </style:style>
    <style:style style:parent-style-name="1005" style:display-name="T171" style:family="text" style:name="1588">
      <style:paragraph-properties/>
      <style:text-properties fo:font-family="Wingdings" style:font-family-complex="Wingdings"/>
    </style:style>
    <style:style style:parent-style-name="1005" style:display-name="T172" style:family="text" style:name="1589">
      <style:paragraph-properties/>
      <style:text-properties fo:font-family="Symbol" style:font-family-complex="Symbol"/>
    </style:style>
    <style:style style:parent-style-name="1005" style:display-name="T173" style:family="text" style:name="1590">
      <style:paragraph-properties/>
      <style:text-properties fo:font-family="Courier New" style:font-family-complex="Courier New"/>
    </style:style>
    <style:style style:parent-style-name="1005" style:display-name="T174" style:family="text" style:name="1591">
      <style:paragraph-properties/>
      <style:text-properties fo:font-family="Wingdings" style:font-family-complex="Wingdings"/>
    </style:style>
    <style:style style:parent-style-name="1005" style:display-name="T175" style:family="text" style:name="1592">
      <style:paragraph-properties/>
      <style:text-properties fo:font-family="Symbol" style:font-family-complex="Symbol"/>
    </style:style>
    <style:style style:parent-style-name="1005" style:display-name="T176" style:family="text" style:name="1593">
      <style:paragraph-properties/>
      <style:text-properties fo:font-family="Courier New" style:font-family-complex="Courier New"/>
    </style:style>
    <style:style style:parent-style-name="1005" style:display-name="T177" style:family="text" style:name="1594">
      <style:paragraph-properties/>
      <style:text-properties fo:font-family="Wingdings" style:font-family-complex="Wingdings"/>
    </style:style>
    <style:style style:parent-style-name="1005" style:display-name="T178" style:family="text" style:name="1595">
      <style:paragraph-properties/>
      <style:text-properties fo:font-family="Symbol" style:font-family-complex="Symbol"/>
    </style:style>
    <style:style style:parent-style-name="1005" style:display-name="T179" style:family="text" style:name="1596">
      <style:paragraph-properties/>
      <style:text-properties fo:font-family="Courier New" style:font-family-complex="Courier New"/>
    </style:style>
    <style:style style:parent-style-name="1005" style:display-name="T180" style:family="text" style:name="1597">
      <style:paragraph-properties/>
      <style:text-properties fo:font-family="Wingdings" style:font-family-complex="Wingdings"/>
    </style:style>
    <style:style style:parent-style-name="1005" style:display-name="T181" style:family="text" style:name="1598">
      <style:paragraph-properties/>
      <style:text-properties fo:font-family="Symbol" style:font-family-complex="Symbol"/>
    </style:style>
    <style:style style:parent-style-name="1005" style:display-name="T182" style:family="text" style:name="1599">
      <style:paragraph-properties/>
    </style:style>
    <style:style style:parent-style-name="1005" style:display-name="T183" style:family="text" style:name="1600">
      <style:paragraph-properties/>
      <style:text-properties fo:font-family="Wingdings" style:font-family-complex="Wingdings"/>
    </style:style>
    <style:style style:parent-style-name="1005" style:display-name="T184" style:family="text" style:name="1601">
      <style:paragraph-properties/>
      <style:text-properties fo:font-family="Symbol" style:font-family-complex="Symbol"/>
    </style:style>
    <style:style style:parent-style-name="1005" style:display-name="T185" style:family="text" style:name="1602">
      <style:paragraph-properties/>
      <style:text-properties fo:font-family="Courier New" style:font-family-complex="Courier New"/>
    </style:style>
    <style:style style:parent-style-name="1005" style:display-name="T186" style:family="text" style:name="1603">
      <style:paragraph-properties/>
      <style:text-properties fo:font-family="Wingdings" style:font-family-complex="Wingdings"/>
    </style:style>
    <style:style style:parent-style-name="1005" style:display-name="T187" style:family="text" style:name="1604">
      <style:paragraph-properties/>
      <style:text-properties fo:font-family="Symbol" style:font-family-complex="Symbol"/>
    </style:style>
    <style:style style:parent-style-name="1005" style:display-name="T188" style:family="text" style:name="1605">
      <style:paragraph-properties/>
      <style:text-properties fo:font-family="Courier New" style:font-family-complex="Courier New"/>
    </style:style>
    <style:style style:parent-style-name="1005" style:display-name="T189" style:family="text" style:name="1606">
      <style:paragraph-properties/>
      <style:text-properties fo:font-family="Wingdings" style:font-family-complex="Wingdings"/>
    </style:style>
    <style:style style:parent-style-name="1005" style:display-name="T190" style:family="text" style:name="1607">
      <style:paragraph-properties/>
      <style:text-properties fo:font-family="Symbol" style:font-family-complex="Symbol"/>
    </style:style>
    <style:style style:parent-style-name="1005" style:display-name="T191" style:family="text" style:name="1608">
      <style:paragraph-properties/>
    </style:style>
    <style:style style:parent-style-name="1005" style:display-name="T192" style:family="text" style:name="1609">
      <style:paragraph-properties/>
      <style:text-properties fo:font-family="Wingdings" style:font-family-complex="Wingdings"/>
    </style:style>
    <style:style style:parent-style-name="1005" style:display-name="T193" style:family="text" style:name="1610">
      <style:paragraph-properties/>
      <style:text-properties fo:font-family="Symbol" style:font-family-complex="Symbol"/>
    </style:style>
    <style:style style:parent-style-name="1005" style:display-name="T194" style:family="text" style:name="1611">
      <style:paragraph-properties/>
      <style:text-properties fo:font-family="Courier New" style:font-family-complex="Courier New"/>
    </style:style>
    <style:style style:parent-style-name="1005" style:display-name="T195" style:family="text" style:name="1612">
      <style:paragraph-properties/>
      <style:text-properties fo:font-family="Wingdings" style:font-family-complex="Wingdings"/>
    </style:style>
    <style:style style:parent-style-name="1005" style:display-name="T196" style:family="text" style:name="1613">
      <style:paragraph-properties/>
      <style:text-properties fo:font-family="Symbol" style:font-family-complex="Symbol"/>
    </style:style>
    <style:style style:parent-style-name="1005" style:display-name="T197" style:family="text" style:name="1614">
      <style:paragraph-properties/>
      <style:text-properties fo:font-family="Courier New" style:font-family-complex="Courier New"/>
    </style:style>
    <style:style style:parent-style-name="1005" style:display-name="T198" style:family="text" style:name="1615">
      <style:paragraph-properties/>
      <style:text-properties fo:font-family="Wingdings" style:font-family-complex="Wingdings"/>
    </style:style>
    <style:style style:parent-style-name="1005" style:display-name="T1" style:family="text" style:name="1616">
      <style:paragraph-properties/>
    </style:style>
    <style:style style:parent-style-name="1005" style:display-name="T2" style:family="text" style:name="1617">
      <style:paragraph-properties/>
    </style:style>
    <style:style style:parent-style-name="1005" style:display-name="T3" style:family="text" style:name="1618">
      <style:paragraph-properties/>
    </style:style>
    <style:style style:parent-style-name="1005" style:display-name="T4" style:family="text" style:name="1619">
      <style:paragraph-properties/>
    </style:style>
    <style:style style:parent-style-name="1005" style:display-name="T5" style:family="text" style:name="1620">
      <style:paragraph-properties/>
    </style:style>
    <style:style style:parent-style-name="1005" style:display-name="T6" style:family="text" style:name="1621">
      <style:paragraph-properties/>
    </style:style>
    <style:style style:parent-style-name="1005" style:display-name="T7" style:family="text" style:name="1622">
      <style:paragraph-properties/>
    </style:style>
    <style:style style:parent-style-name="1005" style:display-name="T8" style:family="text" style:name="1623">
      <style:paragraph-properties/>
    </style:style>
    <style:style style:parent-style-name="1005" style:display-name="T9" style:family="text" style:name="1624">
      <style:paragraph-properties/>
    </style:style>
    <style:style style:parent-style-name="1005" style:display-name="T10" style:family="text" style:name="1625">
      <style:paragraph-properties/>
    </style:style>
    <style:style style:parent-style-name="1005" style:display-name="T11" style:family="text" style:name="1626">
      <style:paragraph-properties/>
    </style:style>
    <style:style style:parent-style-name="1005" style:display-name="T12" style:family="text" style:name="1627">
      <style:paragraph-properties/>
    </style:style>
    <style:style style:parent-style-name="1005" style:display-name="T13" style:family="text" style:name="1628">
      <style:paragraph-properties/>
    </style:style>
    <style:style style:parent-style-name="1005" style:display-name="T14" style:family="text" style:name="1629">
      <style:paragraph-properties/>
    </style:style>
    <style:style style:parent-style-name="1005" style:display-name="T15" style:family="text" style:name="1630">
      <style:paragraph-properties/>
    </style:style>
    <style:style style:parent-style-name="1005" style:display-name="T16" style:family="text" style:name="1631">
      <style:paragraph-properties/>
    </style:style>
    <style:style style:parent-style-name="1005" style:display-name="T17" style:family="text" style:name="1632">
      <style:paragraph-properties/>
    </style:style>
    <style:style style:parent-style-name="1005" style:display-name="T18" style:family="text" style:name="1633">
      <style:paragraph-properties/>
    </style:style>
    <style:style style:parent-style-name="1005" style:display-name="T19" style:family="text" style:name="1634">
      <style:paragraph-properties/>
    </style:style>
    <style:style style:parent-style-name="1005" style:display-name="T20" style:family="text" style:name="1635">
      <style:paragraph-properties/>
    </style:style>
    <style:style style:parent-style-name="1005" style:display-name="T21" style:family="text" style:name="1636">
      <style:paragraph-properties/>
    </style:style>
    <style:style style:parent-style-name="1005" style:display-name="T22" style:family="text" style:name="1637">
      <style:paragraph-properties/>
    </style:style>
    <style:style style:parent-style-name="1005" style:display-name="T23" style:family="text" style:name="1638">
      <style:paragraph-properties/>
    </style:style>
    <style:style style:parent-style-name="1005" style:display-name="T24" style:family="text" style:name="1639">
      <style:paragraph-properties/>
    </style:style>
    <style:style style:parent-style-name="1005" style:display-name="T25" style:family="text" style:name="1640">
      <style:paragraph-properties/>
    </style:style>
    <style:style style:parent-style-name="1005" style:display-name="T26" style:family="text" style:name="1641">
      <style:paragraph-properties/>
    </style:style>
    <style:style style:parent-style-name="1005" style:display-name="T27" style:family="text" style:name="1642">
      <style:paragraph-properties/>
    </style:style>
    <style:style style:parent-style-name="1005" style:display-name="T28" style:family="text" style:name="1643">
      <style:paragraph-properties/>
    </style:style>
    <style:style style:parent-style-name="1005" style:display-name="T29" style:family="text" style:name="1644">
      <style:paragraph-properties/>
    </style:style>
    <style:style style:parent-style-name="1005" style:display-name="T30" style:family="text" style:name="1645">
      <style:paragraph-properties/>
    </style:style>
    <style:style style:parent-style-name="1005" style:display-name="T31" style:family="text" style:name="1646">
      <style:paragraph-properties/>
    </style:style>
    <style:style style:parent-style-name="1005" style:display-name="T32" style:family="text" style:name="1647">
      <style:paragraph-properties/>
    </style:style>
    <style:style style:parent-style-name="1005" style:display-name="T33" style:family="text" style:name="1648">
      <style:paragraph-properties/>
    </style:style>
    <style:style style:parent-style-name="1005" style:display-name="T34" style:family="text" style:name="1649">
      <style:paragraph-properties/>
    </style:style>
    <style:style style:parent-style-name="1005" style:display-name="T35" style:family="text" style:name="1650">
      <style:paragraph-properties/>
    </style:style>
    <style:style style:parent-style-name="1005" style:display-name="T36" style:family="text" style:name="1651">
      <style:paragraph-properties/>
    </style:style>
    <style:style style:parent-style-name="1005" style:display-name="T37" style:family="text" style:name="1652">
      <style:paragraph-properties/>
    </style:style>
    <style:style style:parent-style-name="1005" style:display-name="T38" style:family="text" style:name="1653">
      <style:paragraph-properties/>
    </style:style>
    <style:style style:parent-style-name="1005" style:display-name="T39" style:family="text" style:name="1654">
      <style:paragraph-properties/>
    </style:style>
    <style:style style:parent-style-name="1005" style:display-name="T40" style:family="text" style:name="1655">
      <style:paragraph-properties/>
    </style:style>
    <style:style style:parent-style-name="1005" style:display-name="T41" style:family="text" style:name="1656">
      <style:paragraph-properties/>
    </style:style>
    <style:style style:parent-style-name="1005" style:display-name="T42" style:family="text" style:name="1657">
      <style:paragraph-properties/>
    </style:style>
    <style:style style:parent-style-name="1005" style:display-name="T43" style:family="text" style:name="1658">
      <style:paragraph-properties/>
    </style:style>
    <style:style style:parent-style-name="1005" style:display-name="T44" style:family="text" style:name="1659">
      <style:paragraph-properties/>
    </style:style>
    <style:style style:parent-style-name="1005" style:display-name="T45" style:family="text" style:name="1660">
      <style:paragraph-properties/>
    </style:style>
    <style:style style:parent-style-name="1005" style:display-name="T46" style:family="text" style:name="1661">
      <style:paragraph-properties/>
    </style:style>
    <style:style style:parent-style-name="1005" style:display-name="T47" style:family="text" style:name="1662">
      <style:paragraph-properties/>
    </style:style>
    <style:style style:parent-style-name="1005" style:display-name="T48" style:family="text" style:name="1663">
      <style:paragraph-properties/>
    </style:style>
    <style:style style:parent-style-name="1005" style:display-name="T49" style:family="text" style:name="1664">
      <style:paragraph-properties/>
    </style:style>
    <style:style style:parent-style-name="1005" style:display-name="T50" style:family="text" style:name="1665">
      <style:paragraph-properties/>
    </style:style>
    <style:style style:parent-style-name="1005" style:display-name="T51" style:family="text" style:name="1666">
      <style:paragraph-properties/>
    </style:style>
    <style:style style:parent-style-name="1005" style:display-name="T52" style:family="text" style:name="1667">
      <style:paragraph-properties/>
    </style:style>
    <style:style style:parent-style-name="1005" style:display-name="T53" style:family="text" style:name="1668">
      <style:paragraph-properties/>
    </style:style>
    <style:style style:parent-style-name="1005" style:display-name="T54" style:family="text" style:name="1669">
      <style:paragraph-properties/>
    </style:style>
    <style:style style:parent-style-name="1005" style:display-name="T55" style:family="text" style:name="1670">
      <style:paragraph-properties/>
    </style:style>
    <style:style style:parent-style-name="1005" style:display-name="T56" style:family="text" style:name="1671">
      <style:paragraph-properties/>
    </style:style>
    <style:style style:parent-style-name="1005" style:display-name="T57" style:family="text" style:name="1672">
      <style:paragraph-properties/>
    </style:style>
    <style:style style:parent-style-name="1005" style:display-name="T58" style:family="text" style:name="1673">
      <style:paragraph-properties/>
    </style:style>
    <style:style style:parent-style-name="1005" style:display-name="T59" style:family="text" style:name="1674">
      <style:paragraph-properties/>
    </style:style>
    <style:style style:parent-style-name="1005" style:display-name="T60" style:family="text" style:name="1675">
      <style:paragraph-properties/>
    </style:style>
    <style:style style:parent-style-name="1005" style:display-name="T61" style:family="text" style:name="1676">
      <style:paragraph-properties/>
    </style:style>
    <style:style style:parent-style-name="1005" style:display-name="T62" style:family="text" style:name="1677">
      <style:paragraph-properties/>
    </style:style>
    <style:style style:parent-style-name="1005" style:display-name="T63" style:family="text" style:name="1678">
      <style:paragraph-properties/>
    </style:style>
    <style:style style:parent-style-name="1005" style:display-name="T64" style:family="text" style:name="1679">
      <style:paragraph-properties/>
    </style:style>
    <style:style style:parent-style-name="1005" style:display-name="T65" style:family="text" style:name="1680">
      <style:paragraph-properties/>
    </style:style>
    <style:style style:parent-style-name="1005" style:display-name="T66" style:family="text" style:name="1681">
      <style:paragraph-properties/>
    </style:style>
    <style:style style:parent-style-name="1005" style:display-name="T67" style:family="text" style:name="1682">
      <style:paragraph-properties/>
    </style:style>
    <style:style style:parent-style-name="1005" style:display-name="T68" style:family="text" style:name="1683">
      <style:paragraph-properties/>
    </style:style>
    <style:style style:parent-style-name="1005" style:display-name="T69" style:family="text" style:name="1684">
      <style:paragraph-properties/>
    </style:style>
    <style:style style:parent-style-name="1005" style:display-name="T70" style:family="text" style:name="1685">
      <style:paragraph-properties/>
    </style:style>
    <style:style style:parent-style-name="1005" style:display-name="T71" style:family="text" style:name="1686">
      <style:paragraph-properties/>
    </style:style>
    <style:style style:parent-style-name="1005" style:display-name="T72" style:family="text" style:name="1687">
      <style:paragraph-properties/>
    </style:style>
    <style:style style:parent-style-name="1005" style:display-name="T73" style:family="text" style:name="1688">
      <style:paragraph-properties/>
    </style:style>
    <style:style style:parent-style-name="1005" style:display-name="T74" style:family="text" style:name="1689">
      <style:paragraph-properties/>
    </style:style>
    <style:style style:parent-style-name="1005" style:display-name="T75" style:family="text" style:name="1690">
      <style:paragraph-properties/>
    </style:style>
    <style:style style:parent-style-name="1005" style:display-name="T76" style:family="text" style:name="1691">
      <style:paragraph-properties/>
    </style:style>
    <style:style style:parent-style-name="1005" style:display-name="T77" style:family="text" style:name="1692">
      <style:paragraph-properties/>
    </style:style>
    <style:style style:parent-style-name="1005" style:display-name="T78" style:family="text" style:name="1693">
      <style:paragraph-properties/>
    </style:style>
    <style:style style:parent-style-name="1005" style:display-name="T79" style:family="text" style:name="1694">
      <style:paragraph-properties/>
    </style:style>
    <style:style style:parent-style-name="1005" style:display-name="T80" style:family="text" style:name="1695">
      <style:paragraph-properties/>
    </style:style>
    <style:style style:parent-style-name="1005" style:display-name="T81" style:family="text" style:name="1696">
      <style:paragraph-properties/>
    </style:style>
    <style:style style:parent-style-name="1005" style:display-name="T82" style:family="text" style:name="1697">
      <style:paragraph-properties/>
    </style:style>
    <style:style style:parent-style-name="1005" style:display-name="T83" style:family="text" style:name="1698">
      <style:paragraph-properties/>
    </style:style>
    <style:style style:parent-style-name="1005" style:display-name="T84" style:family="text" style:name="1699">
      <style:paragraph-properties/>
    </style:style>
    <style:style style:parent-style-name="1005" style:display-name="T85" style:family="text" style:name="1700">
      <style:paragraph-properties/>
    </style:style>
    <style:style style:parent-style-name="1005" style:display-name="T86" style:family="text" style:name="1701">
      <style:paragraph-properties/>
    </style:style>
    <style:style style:parent-style-name="1005" style:display-name="T87" style:family="text" style:name="1702">
      <style:paragraph-properties/>
    </style:style>
    <style:style style:parent-style-name="1005" style:display-name="T88" style:family="text" style:name="1703">
      <style:paragraph-properties/>
    </style:style>
    <style:style style:parent-style-name="1005" style:display-name="T89" style:family="text" style:name="1704">
      <style:paragraph-properties/>
    </style:style>
    <style:style style:parent-style-name="1005" style:display-name="T90" style:family="text" style:name="1705">
      <style:paragraph-properties/>
    </style:style>
    <style:style style:parent-style-name="1005" style:display-name="T91" style:family="text" style:name="1706">
      <style:paragraph-properties/>
    </style:style>
    <style:style style:parent-style-name="1005" style:display-name="T92" style:family="text" style:name="1707">
      <style:paragraph-properties/>
    </style:style>
    <style:style style:parent-style-name="1005" style:display-name="T93" style:family="text" style:name="1708">
      <style:paragraph-properties/>
    </style:style>
    <style:style style:parent-style-name="1005" style:display-name="T94" style:family="text" style:name="1709">
      <style:paragraph-properties/>
    </style:style>
    <style:style style:parent-style-name="1005" style:display-name="T95" style:family="text" style:name="1710">
      <style:paragraph-properties/>
    </style:style>
    <style:style style:parent-style-name="1005" style:display-name="T96" style:family="text" style:name="1711">
      <style:paragraph-properties/>
    </style:style>
    <style:style style:parent-style-name="1005" style:display-name="T97" style:family="text" style:name="1712">
      <style:paragraph-properties/>
    </style:style>
    <style:style style:parent-style-name="1005" style:display-name="T98" style:family="text" style:name="1713">
      <style:paragraph-properties/>
    </style:style>
    <style:style style:parent-style-name="1005" style:display-name="T99" style:family="text" style:name="1714">
      <style:paragraph-properties/>
    </style:style>
    <style:style style:parent-style-name="1005" style:display-name="T100" style:family="text" style:name="1715">
      <style:paragraph-properties/>
    </style:style>
    <style:style style:parent-style-name="1005" style:display-name="T101" style:family="text" style:name="1716">
      <style:paragraph-properties/>
    </style:style>
    <style:style style:parent-style-name="1005" style:display-name="T102" style:family="text" style:name="1717">
      <style:paragraph-properties/>
    </style:style>
    <style:style style:parent-style-name="1005" style:display-name="T103" style:family="text" style:name="1718">
      <style:paragraph-properties/>
    </style:style>
    <style:style style:parent-style-name="1005" style:display-name="T104" style:family="text" style:name="1719">
      <style:paragraph-properties/>
    </style:style>
    <style:style style:parent-style-name="1005" style:display-name="T105" style:family="text" style:name="1720">
      <style:paragraph-properties/>
    </style:style>
    <style:style style:parent-style-name="1005" style:display-name="T106" style:family="text" style:name="1721">
      <style:paragraph-properties/>
    </style:style>
    <style:style style:parent-style-name="1005" style:display-name="T107" style:family="text" style:name="1722">
      <style:paragraph-properties/>
    </style:style>
    <style:style style:parent-style-name="1005" style:display-name="T108" style:family="text" style:name="1723">
      <style:paragraph-properties/>
    </style:style>
    <style:style style:parent-style-name="1005" style:display-name="T109" style:family="text" style:name="1724">
      <style:paragraph-properties/>
    </style:style>
    <style:style style:parent-style-name="1005" style:display-name="T110" style:family="text" style:name="1725">
      <style:paragraph-properties/>
    </style:style>
    <style:style style:parent-style-name="1005" style:display-name="T111" style:family="text" style:name="1726">
      <style:paragraph-properties/>
    </style:style>
    <style:style style:parent-style-name="1005" style:display-name="T112" style:family="text" style:name="1727">
      <style:paragraph-properties/>
    </style:style>
    <style:style style:parent-style-name="1005" style:display-name="T113" style:family="text" style:name="1728">
      <style:paragraph-properties/>
    </style:style>
    <style:style style:parent-style-name="1005" style:display-name="T114" style:family="text" style:name="1729">
      <style:paragraph-properties/>
    </style:style>
    <style:style style:parent-style-name="1005" style:display-name="T115" style:family="text" style:name="1730">
      <style:paragraph-properties/>
    </style:style>
    <style:style style:parent-style-name="1005" style:display-name="T116" style:family="text" style:name="1731">
      <style:paragraph-properties/>
    </style:style>
    <style:style style:parent-style-name="1005" style:display-name="T117" style:family="text" style:name="1732">
      <style:paragraph-properties/>
    </style:style>
    <style:style style:parent-style-name="1005" style:display-name="T118" style:family="text" style:name="1733">
      <style:paragraph-properties/>
    </style:style>
    <style:style style:parent-style-name="1005" style:display-name="T119" style:family="text" style:name="1734">
      <style:paragraph-properties/>
    </style:style>
    <style:style style:parent-style-name="1005" style:display-name="T120" style:family="text" style:name="1735">
      <style:paragraph-properties/>
    </style:style>
    <style:style style:parent-style-name="1005" style:display-name="T121" style:family="text" style:name="1736">
      <style:paragraph-properties/>
    </style:style>
    <style:style style:parent-style-name="1005" style:display-name="T122" style:family="text" style:name="1737">
      <style:paragraph-properties/>
    </style:style>
    <style:style style:parent-style-name="1005" style:display-name="T123" style:family="text" style:name="1738">
      <style:paragraph-properties/>
    </style:style>
    <style:style style:parent-style-name="1005" style:display-name="T124" style:family="text" style:name="1739">
      <style:paragraph-properties/>
    </style:style>
    <style:style style:parent-style-name="1005" style:display-name="T125" style:family="text" style:name="1740">
      <style:paragraph-properties/>
    </style:style>
    <style:style style:parent-style-name="1005" style:display-name="T126" style:family="text" style:name="1741">
      <style:paragraph-properties/>
    </style:style>
    <style:style style:parent-style-name="1005" style:display-name="T127" style:family="text" style:name="1742">
      <style:paragraph-properties/>
    </style:style>
    <style:style style:parent-style-name="1005" style:display-name="T128" style:family="text" style:name="1743">
      <style:paragraph-properties/>
    </style:style>
    <style:style style:parent-style-name="1005" style:display-name="T129" style:family="text" style:name="1744">
      <style:paragraph-properties/>
    </style:style>
    <style:style style:parent-style-name="1005" style:display-name="T130" style:family="text" style:name="1745">
      <style:paragraph-properties/>
    </style:style>
    <style:style style:parent-style-name="1005" style:display-name="T131" style:family="text" style:name="1746">
      <style:paragraph-properties/>
    </style:style>
    <style:style style:parent-style-name="1005" style:display-name="T132" style:family="text" style:name="1747">
      <style:paragraph-properties/>
    </style:style>
    <style:style style:parent-style-name="1005" style:display-name="T133" style:family="text" style:name="1748">
      <style:paragraph-properties/>
    </style:style>
    <style:style style:parent-style-name="1005" style:display-name="T134" style:family="text" style:name="1749">
      <style:paragraph-properties/>
    </style:style>
    <style:style style:parent-style-name="1005" style:display-name="T135" style:family="text" style:name="1750">
      <style:paragraph-properties/>
    </style:style>
    <style:style style:parent-style-name="1005" style:display-name="T136" style:family="text" style:name="1751">
      <style:paragraph-properties/>
    </style:style>
    <style:style style:parent-style-name="1005" style:display-name="T137" style:family="text" style:name="1752">
      <style:paragraph-properties/>
    </style:style>
    <style:style style:parent-style-name="1005" style:display-name="T138" style:family="text" style:name="1753">
      <style:paragraph-properties/>
    </style:style>
    <style:style style:parent-style-name="1005" style:display-name="T139" style:family="text" style:name="1754">
      <style:paragraph-properties/>
    </style:style>
    <style:style style:parent-style-name="1005" style:display-name="T140" style:family="text" style:name="1755">
      <style:paragraph-properties/>
    </style:style>
    <style:style style:parent-style-name="1005" style:display-name="T141" style:family="text" style:name="1756">
      <style:paragraph-properties/>
    </style:style>
    <style:style style:parent-style-name="1005" style:display-name="T142" style:family="text" style:name="1757">
      <style:paragraph-properties/>
    </style:style>
    <style:style style:parent-style-name="1005" style:display-name="T143" style:family="text" style:name="1758">
      <style:paragraph-properties/>
    </style:style>
    <style:style style:parent-style-name="1005" style:display-name="T144" style:family="text" style:name="1759">
      <style:paragraph-properties/>
    </style:style>
    <style:style style:parent-style-name="1005" style:display-name="T145" style:family="text" style:name="1760">
      <style:paragraph-properties/>
    </style:style>
    <style:style style:parent-style-name="1005" style:display-name="T146" style:family="text" style:name="1761">
      <style:paragraph-properties/>
      <style:text-properties fo:font-family="Courier New" style:font-family-complex="Courier New"/>
    </style:style>
    <style:style style:parent-style-name="1005" style:display-name="T147" style:family="text" style:name="1762">
      <style:paragraph-properties/>
      <style:text-properties fo:font-family="Wingdings" style:font-family-complex="Wingdings"/>
    </style:style>
    <style:style style:parent-style-name="1005" style:display-name="T148" style:family="text" style:name="1763">
      <style:paragraph-properties/>
      <style:text-properties fo:font-family="Symbol" style:font-family-complex="Symbol"/>
    </style:style>
    <style:style style:parent-style-name="1005" style:display-name="T149" style:family="text" style:name="1764">
      <style:paragraph-properties/>
      <style:text-properties fo:font-family="Courier New" style:font-family-complex="Courier New"/>
    </style:style>
    <style:style style:parent-style-name="1005" style:display-name="T150" style:family="text" style:name="1765">
      <style:paragraph-properties/>
      <style:text-properties fo:font-family="Wingdings" style:font-family-complex="Wingdings"/>
    </style:style>
    <style:style style:parent-style-name="1005" style:display-name="T151" style:family="text" style:name="1766">
      <style:paragraph-properties/>
      <style:text-properties fo:font-family="Symbol" style:font-family-complex="Symbol"/>
    </style:style>
    <style:style style:parent-style-name="1005" style:display-name="T152" style:family="text" style:name="1767">
      <style:paragraph-properties/>
      <style:text-properties fo:font-family="Courier New" style:font-family-complex="Courier New"/>
    </style:style>
    <style:style style:parent-style-name="1005" style:display-name="T153" style:family="text" style:name="1768">
      <style:paragraph-properties/>
      <style:text-properties fo:font-family="Wingdings" style:font-family-complex="Wingdings"/>
    </style:style>
    <style:style style:parent-style-name="1005" style:display-name="T154" style:family="text" style:name="1769">
      <style:paragraph-properties/>
      <style:text-properties fo:font-family="Symbol" style:font-family-complex="Symbol"/>
    </style:style>
    <style:style style:parent-style-name="1005" style:display-name="T155" style:family="text" style:name="1770">
      <style:paragraph-properties/>
      <style:text-properties fo:font-family="Courier New" style:font-family-complex="Courier New"/>
    </style:style>
    <style:style style:parent-style-name="1005" style:display-name="T156" style:family="text" style:name="1771">
      <style:paragraph-properties/>
      <style:text-properties fo:font-family="Wingdings" style:font-family-complex="Wingdings"/>
    </style:style>
    <style:style style:parent-style-name="1005" style:display-name="T157" style:family="text" style:name="1772">
      <style:paragraph-properties/>
      <style:text-properties fo:font-family="Symbol" style:font-family-complex="Symbol"/>
    </style:style>
    <style:style style:parent-style-name="1005" style:display-name="T158" style:family="text" style:name="1773">
      <style:paragraph-properties/>
      <style:text-properties fo:font-family="Courier New" style:font-family-complex="Courier New"/>
    </style:style>
    <style:style style:parent-style-name="1005" style:display-name="T159" style:family="text" style:name="1774">
      <style:paragraph-properties/>
      <style:text-properties fo:font-family="Wingdings" style:font-family-complex="Wingdings"/>
    </style:style>
    <style:style style:parent-style-name="1005" style:display-name="T160" style:family="text" style:name="1775">
      <style:paragraph-properties/>
      <style:text-properties fo:font-family="Symbol" style:font-family-complex="Symbol"/>
    </style:style>
    <style:style style:parent-style-name="1005" style:display-name="T161" style:family="text" style:name="1776">
      <style:paragraph-properties/>
      <style:text-properties fo:font-family="Courier New" style:font-family-complex="Courier New"/>
    </style:style>
    <style:style style:parent-style-name="1005" style:display-name="T162" style:family="text" style:name="1777">
      <style:paragraph-properties/>
      <style:text-properties fo:font-family="Wingdings" style:font-family-complex="Wingdings"/>
    </style:style>
    <style:style style:parent-style-name="1005" style:display-name="T163" style:family="text" style:name="1778">
      <style:paragraph-properties/>
      <style:text-properties fo:font-family="Symbol" style:font-family-complex="Symbol" fo:font-weight="bold"/>
    </style:style>
    <style:style style:parent-style-name="1005" style:display-name="T164" style:family="text" style:name="1779">
      <style:paragraph-properties/>
      <style:text-properties fo:font-family="Symbol" style:font-family-complex="Symbol"/>
    </style:style>
    <style:style style:parent-style-name="1005" style:display-name="T165" style:family="text" style:name="1780">
      <style:paragraph-properties/>
      <style:text-properties fo:font-family="Wingdings" style:font-family-complex="Wingdings"/>
    </style:style>
    <style:style style:parent-style-name="1005" style:display-name="T166" style:family="text" style:name="1781">
      <style:paragraph-properties/>
      <style:text-properties fo:font-family="Symbol" style:font-family-complex="Symbol"/>
    </style:style>
    <style:style style:parent-style-name="1005" style:display-name="T167" style:family="text" style:name="1782">
      <style:paragraph-properties/>
      <style:text-properties fo:font-family="Courier New" style:font-family-complex="Courier New"/>
    </style:style>
    <style:style style:parent-style-name="1005" style:display-name="T168" style:family="text" style:name="1783">
      <style:paragraph-properties/>
      <style:text-properties fo:font-family="Wingdings" style:font-family-complex="Wingdings"/>
    </style:style>
    <style:style style:parent-style-name="1005" style:display-name="T169" style:family="text" style:name="1784">
      <style:paragraph-properties/>
      <style:text-properties fo:font-family="Symbol" style:font-family-complex="Symbol"/>
    </style:style>
    <style:style style:parent-style-name="1005" style:display-name="T170" style:family="text" style:name="1785">
      <style:paragraph-properties/>
      <style:text-properties fo:font-family="Courier New" style:font-family-complex="Courier New"/>
    </style:style>
    <style:style style:parent-style-name="1005" style:display-name="T171" style:family="text" style:name="1786">
      <style:paragraph-properties/>
      <style:text-properties fo:font-family="Wingdings" style:font-family-complex="Wingdings"/>
    </style:style>
    <style:style style:parent-style-name="1005" style:display-name="T172" style:family="text" style:name="1787">
      <style:paragraph-properties/>
      <style:text-properties fo:font-family="Symbol" style:font-family-complex="Symbol"/>
    </style:style>
    <style:style style:parent-style-name="1005" style:display-name="T173" style:family="text" style:name="1788">
      <style:paragraph-properties/>
      <style:text-properties fo:font-family="Courier New" style:font-family-complex="Courier New"/>
    </style:style>
    <style:style style:parent-style-name="1005" style:display-name="T174" style:family="text" style:name="1789">
      <style:paragraph-properties/>
      <style:text-properties fo:font-family="Wingdings" style:font-family-complex="Wingdings"/>
    </style:style>
    <style:style style:parent-style-name="1005" style:display-name="T175" style:family="text" style:name="1790">
      <style:paragraph-properties/>
      <style:text-properties fo:font-family="Symbol" style:font-family-complex="Symbol"/>
    </style:style>
    <style:style style:parent-style-name="1005" style:display-name="T176" style:family="text" style:name="1791">
      <style:paragraph-properties/>
      <style:text-properties fo:font-family="Courier New" style:font-family-complex="Courier New"/>
    </style:style>
    <style:style style:parent-style-name="1005" style:display-name="T177" style:family="text" style:name="1792">
      <style:paragraph-properties/>
      <style:text-properties fo:font-family="Wingdings" style:font-family-complex="Wingdings"/>
    </style:style>
    <style:style style:parent-style-name="1005" style:display-name="T178" style:family="text" style:name="1793">
      <style:paragraph-properties/>
      <style:text-properties fo:font-family="Symbol" style:font-family-complex="Symbol"/>
    </style:style>
    <style:style style:parent-style-name="1005" style:display-name="T179" style:family="text" style:name="1794">
      <style:paragraph-properties/>
      <style:text-properties fo:font-family="Courier New" style:font-family-complex="Courier New"/>
    </style:style>
    <style:style style:parent-style-name="1005" style:display-name="T180" style:family="text" style:name="1795">
      <style:paragraph-properties/>
      <style:text-properties fo:font-family="Wingdings" style:font-family-complex="Wingdings"/>
    </style:style>
    <style:style style:parent-style-name="1005" style:display-name="T181" style:family="text" style:name="1796">
      <style:paragraph-properties/>
      <style:text-properties fo:font-family="Symbol" style:font-family-complex="Symbol"/>
    </style:style>
    <style:style style:parent-style-name="1005" style:display-name="T182" style:family="text" style:name="1797">
      <style:paragraph-properties/>
    </style:style>
    <style:style style:parent-style-name="1005" style:display-name="T183" style:family="text" style:name="1798">
      <style:paragraph-properties/>
      <style:text-properties fo:font-family="Wingdings" style:font-family-complex="Wingdings"/>
    </style:style>
    <style:style style:parent-style-name="1005" style:display-name="T184" style:family="text" style:name="1799">
      <style:paragraph-properties/>
      <style:text-properties fo:font-family="Symbol" style:font-family-complex="Symbol"/>
    </style:style>
    <style:style style:parent-style-name="1005" style:display-name="T185" style:family="text" style:name="1800">
      <style:paragraph-properties/>
      <style:text-properties fo:font-family="Courier New" style:font-family-complex="Courier New"/>
    </style:style>
    <style:style style:parent-style-name="1005" style:display-name="T186" style:family="text" style:name="1801">
      <style:paragraph-properties/>
      <style:text-properties fo:font-family="Wingdings" style:font-family-complex="Wingdings"/>
    </style:style>
    <style:style style:parent-style-name="1005" style:display-name="T187" style:family="text" style:name="1802">
      <style:paragraph-properties/>
      <style:text-properties fo:font-family="Symbol" style:font-family-complex="Symbol"/>
    </style:style>
    <style:style style:parent-style-name="1005" style:display-name="T188" style:family="text" style:name="1803">
      <style:paragraph-properties/>
      <style:text-properties fo:font-family="Courier New" style:font-family-complex="Courier New"/>
    </style:style>
    <style:style style:parent-style-name="1005" style:display-name="T189" style:family="text" style:name="1804">
      <style:paragraph-properties/>
      <style:text-properties fo:font-family="Wingdings" style:font-family-complex="Wingdings"/>
    </style:style>
    <style:style style:parent-style-name="1005" style:display-name="T190" style:family="text" style:name="1805">
      <style:paragraph-properties/>
      <style:text-properties fo:font-family="Symbol" style:font-family-complex="Symbol"/>
    </style:style>
    <style:style style:parent-style-name="1005" style:display-name="T191" style:family="text" style:name="1806">
      <style:paragraph-properties/>
    </style:style>
    <style:style style:parent-style-name="1005" style:display-name="T192" style:family="text" style:name="1807">
      <style:paragraph-properties/>
      <style:text-properties fo:font-family="Wingdings" style:font-family-complex="Wingdings"/>
    </style:style>
    <style:style style:parent-style-name="1005" style:display-name="T193" style:family="text" style:name="1808">
      <style:paragraph-properties/>
      <style:text-properties fo:font-family="Symbol" style:font-family-complex="Symbol"/>
    </style:style>
    <style:style style:parent-style-name="1005" style:display-name="T194" style:family="text" style:name="1809">
      <style:paragraph-properties/>
      <style:text-properties fo:font-family="Courier New" style:font-family-complex="Courier New"/>
    </style:style>
    <style:style style:parent-style-name="1005" style:display-name="T195" style:family="text" style:name="1810">
      <style:paragraph-properties/>
      <style:text-properties fo:font-family="Wingdings" style:font-family-complex="Wingdings"/>
    </style:style>
    <style:style style:parent-style-name="1005" style:display-name="T196" style:family="text" style:name="1811">
      <style:paragraph-properties/>
      <style:text-properties fo:font-family="Symbol" style:font-family-complex="Symbol"/>
    </style:style>
    <style:style style:parent-style-name="1005" style:display-name="T197" style:family="text" style:name="1812">
      <style:paragraph-properties/>
      <style:text-properties fo:font-family="Courier New" style:font-family-complex="Courier New"/>
    </style:style>
    <style:style style:parent-style-name="1005" style:display-name="T198" style:family="text" style:name="1813">
      <style:paragraph-properties/>
      <style:text-properties fo:font-family="Wingdings" style:font-family-complex="Wingdings"/>
    </style:style>
    <style:style style:parent-style-name="1005" style:display-name="T1" style:family="text" style:name="1814">
      <style:paragraph-properties/>
    </style:style>
    <style:style style:parent-style-name="1005" style:display-name="T2" style:family="text" style:name="1815">
      <style:paragraph-properties/>
    </style:style>
    <style:style style:parent-style-name="1005" style:display-name="T3" style:family="text" style:name="1816">
      <style:paragraph-properties/>
    </style:style>
    <style:style style:parent-style-name="1005" style:display-name="T4" style:family="text" style:name="1817">
      <style:paragraph-properties/>
    </style:style>
    <style:style style:parent-style-name="1005" style:display-name="T5" style:family="text" style:name="1818">
      <style:paragraph-properties/>
    </style:style>
    <style:style style:parent-style-name="1005" style:display-name="T6" style:family="text" style:name="1819">
      <style:paragraph-properties/>
    </style:style>
    <style:style style:parent-style-name="1005" style:display-name="T7" style:family="text" style:name="1820">
      <style:paragraph-properties/>
    </style:style>
    <style:style style:parent-style-name="1005" style:display-name="T8" style:family="text" style:name="1821">
      <style:paragraph-properties/>
    </style:style>
    <style:style style:parent-style-name="1005" style:display-name="T9" style:family="text" style:name="1822">
      <style:paragraph-properties/>
    </style:style>
    <style:style style:parent-style-name="1005" style:display-name="T10" style:family="text" style:name="1823">
      <style:paragraph-properties/>
    </style:style>
    <style:style style:parent-style-name="1005" style:display-name="T11" style:family="text" style:name="1824">
      <style:paragraph-properties/>
    </style:style>
    <style:style style:parent-style-name="1005" style:display-name="T12" style:family="text" style:name="1825">
      <style:paragraph-properties/>
    </style:style>
    <style:style style:parent-style-name="1005" style:display-name="T13" style:family="text" style:name="1826">
      <style:paragraph-properties/>
    </style:style>
    <style:style style:parent-style-name="1005" style:display-name="T14" style:family="text" style:name="1827">
      <style:paragraph-properties/>
    </style:style>
    <style:style style:parent-style-name="1005" style:display-name="T15" style:family="text" style:name="1828">
      <style:paragraph-properties/>
    </style:style>
    <style:style style:parent-style-name="1005" style:display-name="T16" style:family="text" style:name="1829">
      <style:paragraph-properties/>
    </style:style>
    <style:style style:parent-style-name="1005" style:display-name="T17" style:family="text" style:name="1830">
      <style:paragraph-properties/>
    </style:style>
    <style:style style:parent-style-name="1005" style:display-name="T18" style:family="text" style:name="1831">
      <style:paragraph-properties/>
    </style:style>
    <style:style style:parent-style-name="1005" style:display-name="T19" style:family="text" style:name="1832">
      <style:paragraph-properties/>
    </style:style>
    <style:style style:parent-style-name="1005" style:display-name="T20" style:family="text" style:name="1833">
      <style:paragraph-properties/>
    </style:style>
    <style:style style:parent-style-name="1005" style:display-name="T21" style:family="text" style:name="1834">
      <style:paragraph-properties/>
    </style:style>
    <style:style style:parent-style-name="1005" style:display-name="T22" style:family="text" style:name="1835">
      <style:paragraph-properties/>
    </style:style>
    <style:style style:parent-style-name="1005" style:display-name="T23" style:family="text" style:name="1836">
      <style:paragraph-properties/>
    </style:style>
    <style:style style:parent-style-name="1005" style:display-name="T24" style:family="text" style:name="1837">
      <style:paragraph-properties/>
    </style:style>
    <style:style style:parent-style-name="1005" style:display-name="T25" style:family="text" style:name="1838">
      <style:paragraph-properties/>
    </style:style>
    <style:style style:parent-style-name="1005" style:display-name="T26" style:family="text" style:name="1839">
      <style:paragraph-properties/>
    </style:style>
    <style:style style:parent-style-name="1005" style:display-name="T27" style:family="text" style:name="1840">
      <style:paragraph-properties/>
    </style:style>
    <style:style style:parent-style-name="1005" style:display-name="T28" style:family="text" style:name="1841">
      <style:paragraph-properties/>
    </style:style>
    <style:style style:parent-style-name="1005" style:display-name="T29" style:family="text" style:name="1842">
      <style:paragraph-properties/>
    </style:style>
    <style:style style:parent-style-name="1005" style:display-name="T30" style:family="text" style:name="1843">
      <style:paragraph-properties/>
    </style:style>
    <style:style style:parent-style-name="1005" style:display-name="T31" style:family="text" style:name="1844">
      <style:paragraph-properties/>
    </style:style>
    <style:style style:parent-style-name="1005" style:display-name="T32" style:family="text" style:name="1845">
      <style:paragraph-properties/>
    </style:style>
    <style:style style:parent-style-name="1005" style:display-name="T33" style:family="text" style:name="1846">
      <style:paragraph-properties/>
    </style:style>
    <style:style style:parent-style-name="1005" style:display-name="T34" style:family="text" style:name="1847">
      <style:paragraph-properties/>
    </style:style>
    <style:style style:parent-style-name="1005" style:display-name="T35" style:family="text" style:name="1848">
      <style:paragraph-properties/>
    </style:style>
    <style:style style:parent-style-name="1005" style:display-name="T36" style:family="text" style:name="1849">
      <style:paragraph-properties/>
    </style:style>
    <style:style style:parent-style-name="1005" style:display-name="T37" style:family="text" style:name="1850">
      <style:paragraph-properties/>
    </style:style>
    <style:style style:parent-style-name="1005" style:display-name="T38" style:family="text" style:name="1851">
      <style:paragraph-properties/>
    </style:style>
    <style:style style:parent-style-name="1005" style:display-name="T39" style:family="text" style:name="1852">
      <style:paragraph-properties/>
    </style:style>
    <style:style style:parent-style-name="1005" style:display-name="T40" style:family="text" style:name="1853">
      <style:paragraph-properties/>
    </style:style>
    <style:style style:parent-style-name="1005" style:display-name="T41" style:family="text" style:name="1854">
      <style:paragraph-properties/>
    </style:style>
    <style:style style:parent-style-name="1005" style:display-name="T42" style:family="text" style:name="1855">
      <style:paragraph-properties/>
    </style:style>
    <style:style style:parent-style-name="1005" style:display-name="T43" style:family="text" style:name="1856">
      <style:paragraph-properties/>
    </style:style>
    <style:style style:parent-style-name="1005" style:display-name="T44" style:family="text" style:name="1857">
      <style:paragraph-properties/>
    </style:style>
    <style:style style:parent-style-name="1005" style:display-name="T45" style:family="text" style:name="1858">
      <style:paragraph-properties/>
    </style:style>
    <style:style style:parent-style-name="1005" style:display-name="T46" style:family="text" style:name="1859">
      <style:paragraph-properties/>
    </style:style>
    <style:style style:parent-style-name="1005" style:display-name="T47" style:family="text" style:name="1860">
      <style:paragraph-properties/>
    </style:style>
    <style:style style:parent-style-name="1005" style:display-name="T48" style:family="text" style:name="1861">
      <style:paragraph-properties/>
    </style:style>
    <style:style style:parent-style-name="1005" style:display-name="T49" style:family="text" style:name="1862">
      <style:paragraph-properties/>
    </style:style>
    <style:style style:parent-style-name="1005" style:display-name="T50" style:family="text" style:name="1863">
      <style:paragraph-properties/>
    </style:style>
    <style:style style:parent-style-name="1005" style:display-name="T51" style:family="text" style:name="1864">
      <style:paragraph-properties/>
    </style:style>
    <style:style style:parent-style-name="1005" style:display-name="T52" style:family="text" style:name="1865">
      <style:paragraph-properties/>
    </style:style>
    <style:style style:parent-style-name="1005" style:display-name="T53" style:family="text" style:name="1866">
      <style:paragraph-properties/>
    </style:style>
    <style:style style:parent-style-name="1005" style:display-name="T54" style:family="text" style:name="1867">
      <style:paragraph-properties/>
    </style:style>
    <style:style style:parent-style-name="1005" style:display-name="T55" style:family="text" style:name="1868">
      <style:paragraph-properties/>
    </style:style>
    <style:style style:parent-style-name="1005" style:display-name="T56" style:family="text" style:name="1869">
      <style:paragraph-properties/>
    </style:style>
    <style:style style:parent-style-name="1005" style:display-name="T57" style:family="text" style:name="1870">
      <style:paragraph-properties/>
    </style:style>
    <style:style style:parent-style-name="1005" style:display-name="T58" style:family="text" style:name="1871">
      <style:paragraph-properties/>
    </style:style>
    <style:style style:parent-style-name="1005" style:display-name="T59" style:family="text" style:name="1872">
      <style:paragraph-properties/>
    </style:style>
    <style:style style:parent-style-name="1005" style:display-name="T60" style:family="text" style:name="1873">
      <style:paragraph-properties/>
    </style:style>
    <style:style style:parent-style-name="1005" style:display-name="T61" style:family="text" style:name="1874">
      <style:paragraph-properties/>
    </style:style>
    <style:style style:parent-style-name="1005" style:display-name="T62" style:family="text" style:name="1875">
      <style:paragraph-properties/>
    </style:style>
    <style:style style:parent-style-name="1005" style:display-name="T63" style:family="text" style:name="1876">
      <style:paragraph-properties/>
    </style:style>
    <style:style style:parent-style-name="1005" style:display-name="T64" style:family="text" style:name="1877">
      <style:paragraph-properties/>
    </style:style>
    <style:style style:parent-style-name="1005" style:display-name="T65" style:family="text" style:name="1878">
      <style:paragraph-properties/>
    </style:style>
    <style:style style:parent-style-name="1005" style:display-name="T66" style:family="text" style:name="1879">
      <style:paragraph-properties/>
    </style:style>
    <style:style style:parent-style-name="1005" style:display-name="T67" style:family="text" style:name="1880">
      <style:paragraph-properties/>
    </style:style>
    <style:style style:parent-style-name="1005" style:display-name="T68" style:family="text" style:name="1881">
      <style:paragraph-properties/>
    </style:style>
    <style:style style:parent-style-name="1005" style:display-name="T69" style:family="text" style:name="1882">
      <style:paragraph-properties/>
    </style:style>
    <style:style style:parent-style-name="1005" style:display-name="T70" style:family="text" style:name="1883">
      <style:paragraph-properties/>
    </style:style>
    <style:style style:parent-style-name="1005" style:display-name="T71" style:family="text" style:name="1884">
      <style:paragraph-properties/>
    </style:style>
    <style:style style:parent-style-name="1005" style:display-name="T72" style:family="text" style:name="1885">
      <style:paragraph-properties/>
    </style:style>
    <style:style style:parent-style-name="1005" style:display-name="T73" style:family="text" style:name="1886">
      <style:paragraph-properties/>
    </style:style>
    <style:style style:parent-style-name="1005" style:display-name="T74" style:family="text" style:name="1887">
      <style:paragraph-properties/>
    </style:style>
    <style:style style:parent-style-name="1005" style:display-name="T75" style:family="text" style:name="1888">
      <style:paragraph-properties/>
    </style:style>
    <style:style style:parent-style-name="1005" style:display-name="T76" style:family="text" style:name="1889">
      <style:paragraph-properties/>
    </style:style>
    <style:style style:parent-style-name="1005" style:display-name="T77" style:family="text" style:name="1890">
      <style:paragraph-properties/>
    </style:style>
    <style:style style:parent-style-name="1005" style:display-name="T78" style:family="text" style:name="1891">
      <style:paragraph-properties/>
    </style:style>
    <style:style style:parent-style-name="1005" style:display-name="T79" style:family="text" style:name="1892">
      <style:paragraph-properties/>
    </style:style>
    <style:style style:parent-style-name="1005" style:display-name="T80" style:family="text" style:name="1893">
      <style:paragraph-properties/>
    </style:style>
    <style:style style:parent-style-name="1005" style:display-name="T81" style:family="text" style:name="1894">
      <style:paragraph-properties/>
    </style:style>
    <style:style style:parent-style-name="1005" style:display-name="T82" style:family="text" style:name="1895">
      <style:paragraph-properties/>
    </style:style>
    <style:style style:parent-style-name="1005" style:display-name="T83" style:family="text" style:name="1896">
      <style:paragraph-properties/>
    </style:style>
    <style:style style:parent-style-name="1005" style:display-name="T84" style:family="text" style:name="1897">
      <style:paragraph-properties/>
    </style:style>
    <style:style style:parent-style-name="1005" style:display-name="T85" style:family="text" style:name="1898">
      <style:paragraph-properties/>
    </style:style>
    <style:style style:parent-style-name="1005" style:display-name="T86" style:family="text" style:name="1899">
      <style:paragraph-properties/>
    </style:style>
    <style:style style:parent-style-name="1005" style:display-name="T87" style:family="text" style:name="1900">
      <style:paragraph-properties/>
    </style:style>
    <style:style style:parent-style-name="1005" style:display-name="T88" style:family="text" style:name="1901">
      <style:paragraph-properties/>
    </style:style>
    <style:style style:parent-style-name="1005" style:display-name="T89" style:family="text" style:name="1902">
      <style:paragraph-properties/>
    </style:style>
    <style:style style:parent-style-name="1005" style:display-name="T90" style:family="text" style:name="1903">
      <style:paragraph-properties/>
    </style:style>
    <style:style style:parent-style-name="1005" style:display-name="T91" style:family="text" style:name="1904">
      <style:paragraph-properties/>
    </style:style>
    <style:style style:parent-style-name="1005" style:display-name="T92" style:family="text" style:name="1905">
      <style:paragraph-properties/>
    </style:style>
    <style:style style:parent-style-name="1005" style:display-name="T93" style:family="text" style:name="1906">
      <style:paragraph-properties/>
    </style:style>
    <style:style style:parent-style-name="1005" style:display-name="T94" style:family="text" style:name="1907">
      <style:paragraph-properties/>
    </style:style>
    <style:style style:parent-style-name="1005" style:display-name="T95" style:family="text" style:name="1908">
      <style:paragraph-properties/>
    </style:style>
    <style:style style:parent-style-name="1005" style:display-name="T96" style:family="text" style:name="1909">
      <style:paragraph-properties/>
    </style:style>
    <style:style style:parent-style-name="1005" style:display-name="T97" style:family="text" style:name="1910">
      <style:paragraph-properties/>
    </style:style>
    <style:style style:parent-style-name="1005" style:display-name="T98" style:family="text" style:name="1911">
      <style:paragraph-properties/>
    </style:style>
    <style:style style:parent-style-name="1005" style:display-name="T99" style:family="text" style:name="1912">
      <style:paragraph-properties/>
    </style:style>
    <style:style style:parent-style-name="1005" style:display-name="T100" style:family="text" style:name="1913">
      <style:paragraph-properties/>
    </style:style>
    <style:style style:parent-style-name="1005" style:display-name="T101" style:family="text" style:name="1914">
      <style:paragraph-properties/>
    </style:style>
    <style:style style:parent-style-name="1005" style:display-name="T102" style:family="text" style:name="1915">
      <style:paragraph-properties/>
    </style:style>
    <style:style style:parent-style-name="1005" style:display-name="T103" style:family="text" style:name="1916">
      <style:paragraph-properties/>
    </style:style>
    <style:style style:parent-style-name="1005" style:display-name="T104" style:family="text" style:name="1917">
      <style:paragraph-properties/>
    </style:style>
    <style:style style:parent-style-name="1005" style:display-name="T105" style:family="text" style:name="1918">
      <style:paragraph-properties/>
    </style:style>
    <style:style style:parent-style-name="1005" style:display-name="T106" style:family="text" style:name="1919">
      <style:paragraph-properties/>
    </style:style>
    <style:style style:parent-style-name="1005" style:display-name="T107" style:family="text" style:name="1920">
      <style:paragraph-properties/>
    </style:style>
    <style:style style:parent-style-name="1005" style:display-name="T108" style:family="text" style:name="1921">
      <style:paragraph-properties/>
    </style:style>
    <style:style style:parent-style-name="1005" style:display-name="T109" style:family="text" style:name="1922">
      <style:paragraph-properties/>
    </style:style>
    <style:style style:parent-style-name="1005" style:display-name="T110" style:family="text" style:name="1923">
      <style:paragraph-properties/>
    </style:style>
    <style:style style:parent-style-name="1005" style:display-name="T111" style:family="text" style:name="1924">
      <style:paragraph-properties/>
    </style:style>
    <style:style style:parent-style-name="1005" style:display-name="T112" style:family="text" style:name="1925">
      <style:paragraph-properties/>
    </style:style>
    <style:style style:parent-style-name="1005" style:display-name="T113" style:family="text" style:name="1926">
      <style:paragraph-properties/>
    </style:style>
    <style:style style:parent-style-name="1005" style:display-name="T114" style:family="text" style:name="1927">
      <style:paragraph-properties/>
    </style:style>
    <style:style style:parent-style-name="1005" style:display-name="T115" style:family="text" style:name="1928">
      <style:paragraph-properties/>
    </style:style>
    <style:style style:parent-style-name="1005" style:display-name="T116" style:family="text" style:name="1929">
      <style:paragraph-properties/>
    </style:style>
    <style:style style:parent-style-name="1005" style:display-name="T117" style:family="text" style:name="1930">
      <style:paragraph-properties/>
    </style:style>
    <style:style style:parent-style-name="1005" style:display-name="T118" style:family="text" style:name="1931">
      <style:paragraph-properties/>
    </style:style>
    <style:style style:parent-style-name="1005" style:display-name="T119" style:family="text" style:name="1932">
      <style:paragraph-properties/>
    </style:style>
    <style:style style:parent-style-name="1005" style:display-name="T120" style:family="text" style:name="1933">
      <style:paragraph-properties/>
    </style:style>
    <style:style style:parent-style-name="1005" style:display-name="T121" style:family="text" style:name="1934">
      <style:paragraph-properties/>
    </style:style>
    <style:style style:parent-style-name="1005" style:display-name="T122" style:family="text" style:name="1935">
      <style:paragraph-properties/>
    </style:style>
    <style:style style:parent-style-name="1005" style:display-name="T123" style:family="text" style:name="1936">
      <style:paragraph-properties/>
    </style:style>
    <style:style style:parent-style-name="1005" style:display-name="T124" style:family="text" style:name="1937">
      <style:paragraph-properties/>
    </style:style>
    <style:style style:parent-style-name="1005" style:display-name="T125" style:family="text" style:name="1938">
      <style:paragraph-properties/>
    </style:style>
    <style:style style:parent-style-name="1005" style:display-name="T126" style:family="text" style:name="1939">
      <style:paragraph-properties/>
    </style:style>
    <style:style style:parent-style-name="1005" style:display-name="T127" style:family="text" style:name="1940">
      <style:paragraph-properties/>
    </style:style>
    <style:style style:parent-style-name="1005" style:display-name="T128" style:family="text" style:name="1941">
      <style:paragraph-properties/>
    </style:style>
    <style:style style:parent-style-name="1005" style:display-name="T129" style:family="text" style:name="1942">
      <style:paragraph-properties/>
    </style:style>
    <style:style style:parent-style-name="1005" style:display-name="T130" style:family="text" style:name="1943">
      <style:paragraph-properties/>
    </style:style>
    <style:style style:parent-style-name="1005" style:display-name="T131" style:family="text" style:name="1944">
      <style:paragraph-properties/>
    </style:style>
    <style:style style:parent-style-name="1005" style:display-name="T132" style:family="text" style:name="1945">
      <style:paragraph-properties/>
    </style:style>
    <style:style style:parent-style-name="1005" style:display-name="T133" style:family="text" style:name="1946">
      <style:paragraph-properties/>
    </style:style>
    <style:style style:parent-style-name="1005" style:display-name="T134" style:family="text" style:name="1947">
      <style:paragraph-properties/>
    </style:style>
    <style:style style:parent-style-name="1005" style:display-name="T135" style:family="text" style:name="1948">
      <style:paragraph-properties/>
    </style:style>
    <style:style style:parent-style-name="1005" style:display-name="T136" style:family="text" style:name="1949">
      <style:paragraph-properties/>
    </style:style>
    <style:style style:parent-style-name="1005" style:display-name="T137" style:family="text" style:name="1950">
      <style:paragraph-properties/>
    </style:style>
    <style:style style:parent-style-name="1005" style:display-name="T138" style:family="text" style:name="1951">
      <style:paragraph-properties/>
    </style:style>
    <style:style style:parent-style-name="1005" style:display-name="T139" style:family="text" style:name="1952">
      <style:paragraph-properties/>
    </style:style>
    <style:style style:parent-style-name="1005" style:display-name="T140" style:family="text" style:name="1953">
      <style:paragraph-properties/>
    </style:style>
    <style:style style:parent-style-name="1005" style:display-name="T141" style:family="text" style:name="1954">
      <style:paragraph-properties/>
    </style:style>
    <style:style style:parent-style-name="1005" style:display-name="T142" style:family="text" style:name="1955">
      <style:paragraph-properties/>
    </style:style>
    <style:style style:parent-style-name="1005" style:display-name="T143" style:family="text" style:name="1956">
      <style:paragraph-properties/>
    </style:style>
    <style:style style:parent-style-name="1005" style:display-name="T144" style:family="text" style:name="1957">
      <style:paragraph-properties/>
    </style:style>
    <style:style style:parent-style-name="1005" style:display-name="T145" style:family="text" style:name="1958">
      <style:paragraph-properties/>
    </style:style>
    <style:style style:parent-style-name="1005" style:display-name="T146" style:family="text" style:name="1959">
      <style:paragraph-properties/>
      <style:text-properties fo:font-family="Courier New" style:font-family-complex="Courier New"/>
    </style:style>
    <style:style style:parent-style-name="1005" style:display-name="T147" style:family="text" style:name="1960">
      <style:paragraph-properties/>
      <style:text-properties fo:font-family="Wingdings" style:font-family-complex="Wingdings"/>
    </style:style>
    <style:style style:parent-style-name="1005" style:display-name="T148" style:family="text" style:name="1961">
      <style:paragraph-properties/>
      <style:text-properties fo:font-family="Symbol" style:font-family-complex="Symbol"/>
    </style:style>
    <style:style style:parent-style-name="1005" style:display-name="T149" style:family="text" style:name="1962">
      <style:paragraph-properties/>
      <style:text-properties fo:font-family="Courier New" style:font-family-complex="Courier New"/>
    </style:style>
    <style:style style:parent-style-name="1005" style:display-name="T150" style:family="text" style:name="1963">
      <style:paragraph-properties/>
      <style:text-properties fo:font-family="Wingdings" style:font-family-complex="Wingdings"/>
    </style:style>
    <style:style style:parent-style-name="1005" style:display-name="T151" style:family="text" style:name="1964">
      <style:paragraph-properties/>
      <style:text-properties fo:font-family="Symbol" style:font-family-complex="Symbol"/>
    </style:style>
    <style:style style:parent-style-name="1005" style:display-name="T152" style:family="text" style:name="1965">
      <style:paragraph-properties/>
      <style:text-properties fo:font-family="Courier New" style:font-family-complex="Courier New"/>
    </style:style>
    <style:style style:parent-style-name="1005" style:display-name="T153" style:family="text" style:name="1966">
      <style:paragraph-properties/>
      <style:text-properties fo:font-family="Wingdings" style:font-family-complex="Wingdings"/>
    </style:style>
    <style:style style:parent-style-name="1005" style:display-name="T154" style:family="text" style:name="1967">
      <style:paragraph-properties/>
      <style:text-properties fo:font-family="Symbol" style:font-family-complex="Symbol"/>
    </style:style>
    <style:style style:parent-style-name="1005" style:display-name="T155" style:family="text" style:name="1968">
      <style:paragraph-properties/>
      <style:text-properties fo:font-family="Courier New" style:font-family-complex="Courier New"/>
    </style:style>
    <style:style style:parent-style-name="1005" style:display-name="T156" style:family="text" style:name="1969">
      <style:paragraph-properties/>
      <style:text-properties fo:font-family="Wingdings" style:font-family-complex="Wingdings"/>
    </style:style>
    <style:style style:parent-style-name="1005" style:display-name="T157" style:family="text" style:name="1970">
      <style:paragraph-properties/>
      <style:text-properties fo:font-family="Symbol" style:font-family-complex="Symbol"/>
    </style:style>
    <style:style style:parent-style-name="1005" style:display-name="T158" style:family="text" style:name="1971">
      <style:paragraph-properties/>
      <style:text-properties fo:font-family="Courier New" style:font-family-complex="Courier New"/>
    </style:style>
    <style:style style:parent-style-name="1005" style:display-name="T159" style:family="text" style:name="1972">
      <style:paragraph-properties/>
      <style:text-properties fo:font-family="Wingdings" style:font-family-complex="Wingdings"/>
    </style:style>
    <style:style style:parent-style-name="1005" style:display-name="T160" style:family="text" style:name="1973">
      <style:paragraph-properties/>
      <style:text-properties fo:font-family="Symbol" style:font-family-complex="Symbol"/>
    </style:style>
    <style:style style:parent-style-name="1005" style:display-name="T161" style:family="text" style:name="1974">
      <style:paragraph-properties/>
      <style:text-properties fo:font-family="Courier New" style:font-family-complex="Courier New"/>
    </style:style>
    <style:style style:parent-style-name="1005" style:display-name="T162" style:family="text" style:name="1975">
      <style:paragraph-properties/>
      <style:text-properties fo:font-family="Wingdings" style:font-family-complex="Wingdings"/>
    </style:style>
    <style:style style:parent-style-name="1005" style:display-name="T163" style:family="text" style:name="1976">
      <style:paragraph-properties/>
      <style:text-properties fo:font-family="Symbol" style:font-family-complex="Symbol" fo:font-weight="bold"/>
    </style:style>
    <style:style style:parent-style-name="1005" style:display-name="T164" style:family="text" style:name="1977">
      <style:paragraph-properties/>
      <style:text-properties fo:font-family="Symbol" style:font-family-complex="Symbol"/>
    </style:style>
    <style:style style:parent-style-name="1005" style:display-name="T165" style:family="text" style:name="1978">
      <style:paragraph-properties/>
      <style:text-properties fo:font-family="Wingdings" style:font-family-complex="Wingdings"/>
    </style:style>
    <style:style style:parent-style-name="1005" style:display-name="T166" style:family="text" style:name="1979">
      <style:paragraph-properties/>
      <style:text-properties fo:font-family="Symbol" style:font-family-complex="Symbol"/>
    </style:style>
    <style:style style:parent-style-name="1005" style:display-name="T167" style:family="text" style:name="1980">
      <style:paragraph-properties/>
      <style:text-properties fo:font-family="Courier New" style:font-family-complex="Courier New"/>
    </style:style>
    <style:style style:parent-style-name="1005" style:display-name="T168" style:family="text" style:name="1981">
      <style:paragraph-properties/>
      <style:text-properties fo:font-family="Wingdings" style:font-family-complex="Wingdings"/>
    </style:style>
    <style:style style:parent-style-name="1005" style:display-name="T169" style:family="text" style:name="1982">
      <style:paragraph-properties/>
      <style:text-properties fo:font-family="Symbol" style:font-family-complex="Symbol"/>
    </style:style>
    <style:style style:parent-style-name="1005" style:display-name="T170" style:family="text" style:name="1983">
      <style:paragraph-properties/>
      <style:text-properties fo:font-family="Courier New" style:font-family-complex="Courier New"/>
    </style:style>
    <style:style style:parent-style-name="1005" style:display-name="T171" style:family="text" style:name="1984">
      <style:paragraph-properties/>
      <style:text-properties fo:font-family="Wingdings" style:font-family-complex="Wingdings"/>
    </style:style>
    <style:style style:parent-style-name="1005" style:display-name="T172" style:family="text" style:name="1985">
      <style:paragraph-properties/>
      <style:text-properties fo:font-family="Symbol" style:font-family-complex="Symbol"/>
    </style:style>
    <style:style style:parent-style-name="1005" style:display-name="T173" style:family="text" style:name="1986">
      <style:paragraph-properties/>
      <style:text-properties fo:font-family="Courier New" style:font-family-complex="Courier New"/>
    </style:style>
    <style:style style:parent-style-name="1005" style:display-name="T174" style:family="text" style:name="1987">
      <style:paragraph-properties/>
      <style:text-properties fo:font-family="Wingdings" style:font-family-complex="Wingdings"/>
    </style:style>
    <style:style style:parent-style-name="1005" style:display-name="T175" style:family="text" style:name="1988">
      <style:paragraph-properties/>
      <style:text-properties fo:font-family="Symbol" style:font-family-complex="Symbol"/>
    </style:style>
    <style:style style:parent-style-name="1005" style:display-name="T176" style:family="text" style:name="1989">
      <style:paragraph-properties/>
      <style:text-properties fo:font-family="Courier New" style:font-family-complex="Courier New"/>
    </style:style>
    <style:style style:parent-style-name="1005" style:display-name="T177" style:family="text" style:name="1990">
      <style:paragraph-properties/>
      <style:text-properties fo:font-family="Wingdings" style:font-family-complex="Wingdings"/>
    </style:style>
    <style:style style:parent-style-name="1005" style:display-name="T178" style:family="text" style:name="1991">
      <style:paragraph-properties/>
      <style:text-properties fo:font-family="Symbol" style:font-family-complex="Symbol"/>
    </style:style>
    <style:style style:parent-style-name="1005" style:display-name="T179" style:family="text" style:name="1992">
      <style:paragraph-properties/>
      <style:text-properties fo:font-family="Courier New" style:font-family-complex="Courier New"/>
    </style:style>
    <style:style style:parent-style-name="1005" style:display-name="T180" style:family="text" style:name="1993">
      <style:paragraph-properties/>
      <style:text-properties fo:font-family="Wingdings" style:font-family-complex="Wingdings"/>
    </style:style>
    <style:style style:parent-style-name="1005" style:display-name="T181" style:family="text" style:name="1994">
      <style:paragraph-properties/>
      <style:text-properties fo:font-family="Symbol" style:font-family-complex="Symbol"/>
    </style:style>
    <style:style style:parent-style-name="1005" style:display-name="T182" style:family="text" style:name="1995">
      <style:paragraph-properties/>
    </style:style>
    <style:style style:parent-style-name="1005" style:display-name="T183" style:family="text" style:name="1996">
      <style:paragraph-properties/>
      <style:text-properties fo:font-family="Wingdings" style:font-family-complex="Wingdings"/>
    </style:style>
    <style:style style:parent-style-name="1005" style:display-name="T184" style:family="text" style:name="1997">
      <style:paragraph-properties/>
      <style:text-properties fo:font-family="Symbol" style:font-family-complex="Symbol"/>
    </style:style>
    <style:style style:parent-style-name="1005" style:display-name="T185" style:family="text" style:name="1998">
      <style:paragraph-properties/>
      <style:text-properties fo:font-family="Courier New" style:font-family-complex="Courier New"/>
    </style:style>
    <style:style style:parent-style-name="1005" style:display-name="T186" style:family="text" style:name="1999">
      <style:paragraph-properties/>
      <style:text-properties fo:font-family="Wingdings" style:font-family-complex="Wingdings"/>
    </style:style>
    <style:style style:parent-style-name="1005" style:display-name="T187" style:family="text" style:name="2000">
      <style:paragraph-properties/>
      <style:text-properties fo:font-family="Symbol" style:font-family-complex="Symbol"/>
    </style:style>
    <style:style style:parent-style-name="1005" style:display-name="T188" style:family="text" style:name="2001">
      <style:paragraph-properties/>
      <style:text-properties fo:font-family="Courier New" style:font-family-complex="Courier New"/>
    </style:style>
    <style:style style:parent-style-name="1005" style:display-name="T189" style:family="text" style:name="2002">
      <style:paragraph-properties/>
      <style:text-properties fo:font-family="Wingdings" style:font-family-complex="Wingdings"/>
    </style:style>
    <style:style style:parent-style-name="1005" style:display-name="T190" style:family="text" style:name="2003">
      <style:paragraph-properties/>
      <style:text-properties fo:font-family="Symbol" style:font-family-complex="Symbol"/>
    </style:style>
    <style:style style:parent-style-name="1005" style:display-name="T191" style:family="text" style:name="2004">
      <style:paragraph-properties/>
    </style:style>
    <style:style style:parent-style-name="1005" style:display-name="T192" style:family="text" style:name="2005">
      <style:paragraph-properties/>
      <style:text-properties fo:font-family="Wingdings" style:font-family-complex="Wingdings"/>
    </style:style>
    <style:style style:parent-style-name="1005" style:display-name="T193" style:family="text" style:name="2006">
      <style:paragraph-properties/>
      <style:text-properties fo:font-family="Symbol" style:font-family-complex="Symbol"/>
    </style:style>
    <style:style style:parent-style-name="1005" style:display-name="T194" style:family="text" style:name="2007">
      <style:paragraph-properties/>
      <style:text-properties fo:font-family="Courier New" style:font-family-complex="Courier New"/>
    </style:style>
    <style:style style:parent-style-name="1005" style:display-name="T195" style:family="text" style:name="2008">
      <style:paragraph-properties/>
      <style:text-properties fo:font-family="Wingdings" style:font-family-complex="Wingdings"/>
    </style:style>
    <style:style style:parent-style-name="1005" style:display-name="T196" style:family="text" style:name="2009">
      <style:paragraph-properties/>
      <style:text-properties fo:font-family="Symbol" style:font-family-complex="Symbol"/>
    </style:style>
    <style:style style:parent-style-name="1005" style:display-name="T197" style:family="text" style:name="2010">
      <style:paragraph-properties/>
      <style:text-properties fo:font-family="Courier New" style:font-family-complex="Courier New"/>
    </style:style>
    <style:style style:parent-style-name="1005" style:display-name="T198" style:family="text" style:name="2011">
      <style:paragraph-properties/>
      <style:text-properties fo:font-family="Wingdings" style:font-family-complex="Wingdings"/>
    </style:style>
    <style:style style:parent-style-name="1005" style:display-name="T1" style:family="text" style:name="2012">
      <style:paragraph-properties/>
    </style:style>
    <style:style style:parent-style-name="1005" style:display-name="T2" style:family="text" style:name="2013">
      <style:paragraph-properties/>
    </style:style>
    <style:style style:parent-style-name="1005" style:display-name="T3" style:family="text" style:name="2014">
      <style:paragraph-properties/>
    </style:style>
    <style:style style:parent-style-name="1005" style:display-name="T4" style:family="text" style:name="2015">
      <style:paragraph-properties/>
    </style:style>
    <style:style style:parent-style-name="1005" style:display-name="T5" style:family="text" style:name="2016">
      <style:paragraph-properties/>
    </style:style>
    <style:style style:parent-style-name="1005" style:display-name="T6" style:family="text" style:name="2017">
      <style:paragraph-properties/>
    </style:style>
    <style:style style:parent-style-name="1005" style:display-name="T7" style:family="text" style:name="2018">
      <style:paragraph-properties/>
    </style:style>
    <style:style style:parent-style-name="1005" style:display-name="T8" style:family="text" style:name="2019">
      <style:paragraph-properties/>
    </style:style>
    <style:style style:parent-style-name="1005" style:display-name="T9" style:family="text" style:name="2020">
      <style:paragraph-properties/>
    </style:style>
    <style:style style:parent-style-name="1005" style:display-name="T10" style:family="text" style:name="2021">
      <style:paragraph-properties/>
    </style:style>
    <style:style style:parent-style-name="1005" style:display-name="T11" style:family="text" style:name="2022">
      <style:paragraph-properties/>
    </style:style>
    <style:style style:parent-style-name="1005" style:display-name="T12" style:family="text" style:name="2023">
      <style:paragraph-properties/>
    </style:style>
    <style:style style:parent-style-name="1005" style:display-name="T13" style:family="text" style:name="2024">
      <style:paragraph-properties/>
    </style:style>
    <style:style style:parent-style-name="1005" style:display-name="T14" style:family="text" style:name="2025">
      <style:paragraph-properties/>
    </style:style>
    <style:style style:parent-style-name="1005" style:display-name="T15" style:family="text" style:name="2026">
      <style:paragraph-properties/>
    </style:style>
    <style:style style:parent-style-name="1005" style:display-name="T16" style:family="text" style:name="2027">
      <style:paragraph-properties/>
    </style:style>
    <style:style style:parent-style-name="1005" style:display-name="T17" style:family="text" style:name="2028">
      <style:paragraph-properties/>
    </style:style>
    <style:style style:parent-style-name="1005" style:display-name="T18" style:family="text" style:name="2029">
      <style:paragraph-properties/>
    </style:style>
    <style:style style:parent-style-name="1005" style:display-name="T19" style:family="text" style:name="2030">
      <style:paragraph-properties/>
    </style:style>
    <style:style style:parent-style-name="1005" style:display-name="T20" style:family="text" style:name="2031">
      <style:paragraph-properties/>
    </style:style>
    <style:style style:parent-style-name="1005" style:display-name="T21" style:family="text" style:name="2032">
      <style:paragraph-properties/>
    </style:style>
    <style:style style:parent-style-name="1005" style:display-name="T22" style:family="text" style:name="2033">
      <style:paragraph-properties/>
    </style:style>
    <style:style style:parent-style-name="1005" style:display-name="T23" style:family="text" style:name="2034">
      <style:paragraph-properties/>
    </style:style>
    <style:style style:parent-style-name="1005" style:display-name="T24" style:family="text" style:name="2035">
      <style:paragraph-properties/>
    </style:style>
    <style:style style:parent-style-name="1005" style:display-name="T25" style:family="text" style:name="2036">
      <style:paragraph-properties/>
    </style:style>
    <style:style style:parent-style-name="1005" style:display-name="T26" style:family="text" style:name="2037">
      <style:paragraph-properties/>
    </style:style>
    <style:style style:parent-style-name="1005" style:display-name="T27" style:family="text" style:name="2038">
      <style:paragraph-properties/>
    </style:style>
    <style:style style:parent-style-name="1005" style:display-name="T28" style:family="text" style:name="2039">
      <style:paragraph-properties/>
    </style:style>
    <style:style style:parent-style-name="1005" style:display-name="T29" style:family="text" style:name="2040">
      <style:paragraph-properties/>
    </style:style>
    <style:style style:parent-style-name="1005" style:display-name="T30" style:family="text" style:name="2041">
      <style:paragraph-properties/>
    </style:style>
    <style:style style:parent-style-name="1005" style:display-name="T31" style:family="text" style:name="2042">
      <style:paragraph-properties/>
    </style:style>
    <style:style style:parent-style-name="1005" style:display-name="T32" style:family="text" style:name="2043">
      <style:paragraph-properties/>
    </style:style>
    <style:style style:parent-style-name="1005" style:display-name="T33" style:family="text" style:name="2044">
      <style:paragraph-properties/>
    </style:style>
    <style:style style:parent-style-name="1005" style:display-name="T34" style:family="text" style:name="2045">
      <style:paragraph-properties/>
    </style:style>
    <style:style style:parent-style-name="1005" style:display-name="T35" style:family="text" style:name="2046">
      <style:paragraph-properties/>
    </style:style>
    <style:style style:parent-style-name="1005" style:display-name="T36" style:family="text" style:name="2047">
      <style:paragraph-properties/>
    </style:style>
    <style:style style:parent-style-name="1005" style:display-name="T37" style:family="text" style:name="2048">
      <style:paragraph-properties/>
    </style:style>
    <style:style style:parent-style-name="1005" style:display-name="T38" style:family="text" style:name="2049">
      <style:paragraph-properties/>
    </style:style>
    <style:style style:parent-style-name="1005" style:display-name="T39" style:family="text" style:name="2050">
      <style:paragraph-properties/>
    </style:style>
    <style:style style:parent-style-name="1005" style:display-name="T40" style:family="text" style:name="2051">
      <style:paragraph-properties/>
    </style:style>
    <style:style style:parent-style-name="1005" style:display-name="T41" style:family="text" style:name="2052">
      <style:paragraph-properties/>
    </style:style>
    <style:style style:parent-style-name="1005" style:display-name="T42" style:family="text" style:name="2053">
      <style:paragraph-properties/>
    </style:style>
    <style:style style:parent-style-name="1005" style:display-name="T43" style:family="text" style:name="2054">
      <style:paragraph-properties/>
    </style:style>
    <style:style style:parent-style-name="1005" style:display-name="T44" style:family="text" style:name="2055">
      <style:paragraph-properties/>
    </style:style>
    <style:style style:parent-style-name="1005" style:display-name="T45" style:family="text" style:name="2056">
      <style:paragraph-properties/>
    </style:style>
    <style:style style:parent-style-name="1005" style:display-name="T46" style:family="text" style:name="2057">
      <style:paragraph-properties/>
    </style:style>
    <style:style style:parent-style-name="1005" style:display-name="T47" style:family="text" style:name="2058">
      <style:paragraph-properties/>
    </style:style>
    <style:style style:parent-style-name="1005" style:display-name="T48" style:family="text" style:name="2059">
      <style:paragraph-properties/>
    </style:style>
    <style:style style:parent-style-name="1005" style:display-name="T49" style:family="text" style:name="2060">
      <style:paragraph-properties/>
    </style:style>
    <style:style style:parent-style-name="1005" style:display-name="T50" style:family="text" style:name="2061">
      <style:paragraph-properties/>
    </style:style>
    <style:style style:parent-style-name="1005" style:display-name="T51" style:family="text" style:name="2062">
      <style:paragraph-properties/>
    </style:style>
    <style:style style:parent-style-name="1005" style:display-name="T52" style:family="text" style:name="2063">
      <style:paragraph-properties/>
    </style:style>
    <style:style style:parent-style-name="1005" style:display-name="T53" style:family="text" style:name="2064">
      <style:paragraph-properties/>
    </style:style>
    <style:style style:parent-style-name="1005" style:display-name="T54" style:family="text" style:name="2065">
      <style:paragraph-properties/>
    </style:style>
    <style:style style:parent-style-name="1005" style:display-name="T55" style:family="text" style:name="2066">
      <style:paragraph-properties/>
    </style:style>
    <style:style style:parent-style-name="1005" style:display-name="T56" style:family="text" style:name="2067">
      <style:paragraph-properties/>
    </style:style>
    <style:style style:parent-style-name="1005" style:display-name="T57" style:family="text" style:name="2068">
      <style:paragraph-properties/>
    </style:style>
    <style:style style:parent-style-name="1005" style:display-name="T58" style:family="text" style:name="2069">
      <style:paragraph-properties/>
    </style:style>
    <style:style style:parent-style-name="1005" style:display-name="T59" style:family="text" style:name="2070">
      <style:paragraph-properties/>
    </style:style>
    <style:style style:parent-style-name="1005" style:display-name="T60" style:family="text" style:name="2071">
      <style:paragraph-properties/>
    </style:style>
    <style:style style:parent-style-name="1005" style:display-name="T61" style:family="text" style:name="2072">
      <style:paragraph-properties/>
    </style:style>
    <style:style style:parent-style-name="1005" style:display-name="T62" style:family="text" style:name="2073">
      <style:paragraph-properties/>
    </style:style>
    <style:style style:parent-style-name="1005" style:display-name="T63" style:family="text" style:name="2074">
      <style:paragraph-properties/>
    </style:style>
    <style:style style:parent-style-name="1005" style:display-name="T64" style:family="text" style:name="2075">
      <style:paragraph-properties/>
    </style:style>
    <style:style style:parent-style-name="1005" style:display-name="T65" style:family="text" style:name="2076">
      <style:paragraph-properties/>
    </style:style>
    <style:style style:parent-style-name="1005" style:display-name="T66" style:family="text" style:name="2077">
      <style:paragraph-properties/>
    </style:style>
    <style:style style:parent-style-name="1005" style:display-name="T67" style:family="text" style:name="2078">
      <style:paragraph-properties/>
    </style:style>
    <style:style style:parent-style-name="1005" style:display-name="T68" style:family="text" style:name="2079">
      <style:paragraph-properties/>
    </style:style>
    <style:style style:parent-style-name="1005" style:display-name="T69" style:family="text" style:name="2080">
      <style:paragraph-properties/>
    </style:style>
    <style:style style:parent-style-name="1005" style:display-name="T70" style:family="text" style:name="2081">
      <style:paragraph-properties/>
    </style:style>
    <style:style style:parent-style-name="1005" style:display-name="T71" style:family="text" style:name="2082">
      <style:paragraph-properties/>
    </style:style>
    <style:style style:parent-style-name="1005" style:display-name="T72" style:family="text" style:name="2083">
      <style:paragraph-properties/>
    </style:style>
    <style:style style:parent-style-name="1005" style:display-name="T73" style:family="text" style:name="2084">
      <style:paragraph-properties/>
    </style:style>
    <style:style style:parent-style-name="1005" style:display-name="T74" style:family="text" style:name="2085">
      <style:paragraph-properties/>
    </style:style>
    <style:style style:parent-style-name="1005" style:display-name="T75" style:family="text" style:name="2086">
      <style:paragraph-properties/>
    </style:style>
    <style:style style:parent-style-name="1005" style:display-name="T76" style:family="text" style:name="2087">
      <style:paragraph-properties/>
    </style:style>
    <style:style style:parent-style-name="1005" style:display-name="T77" style:family="text" style:name="2088">
      <style:paragraph-properties/>
    </style:style>
    <style:style style:parent-style-name="1005" style:display-name="T78" style:family="text" style:name="2089">
      <style:paragraph-properties/>
    </style:style>
    <style:style style:parent-style-name="1005" style:display-name="T79" style:family="text" style:name="2090">
      <style:paragraph-properties/>
    </style:style>
    <style:style style:parent-style-name="1005" style:display-name="T80" style:family="text" style:name="2091">
      <style:paragraph-properties/>
    </style:style>
    <style:style style:parent-style-name="1005" style:display-name="T81" style:family="text" style:name="2092">
      <style:paragraph-properties/>
    </style:style>
    <style:style style:parent-style-name="1005" style:display-name="T82" style:family="text" style:name="2093">
      <style:paragraph-properties/>
    </style:style>
    <style:style style:parent-style-name="1005" style:display-name="T83" style:family="text" style:name="2094">
      <style:paragraph-properties/>
    </style:style>
    <style:style style:parent-style-name="1005" style:display-name="T84" style:family="text" style:name="2095">
      <style:paragraph-properties/>
    </style:style>
    <style:style style:parent-style-name="1005" style:display-name="T85" style:family="text" style:name="2096">
      <style:paragraph-properties/>
    </style:style>
    <style:style style:parent-style-name="1005" style:display-name="T86" style:family="text" style:name="2097">
      <style:paragraph-properties/>
    </style:style>
    <style:style style:parent-style-name="1005" style:display-name="T87" style:family="text" style:name="2098">
      <style:paragraph-properties/>
    </style:style>
    <style:style style:parent-style-name="1005" style:display-name="T88" style:family="text" style:name="2099">
      <style:paragraph-properties/>
    </style:style>
    <style:style style:parent-style-name="1005" style:display-name="T89" style:family="text" style:name="2100">
      <style:paragraph-properties/>
    </style:style>
    <style:style style:parent-style-name="1005" style:display-name="T90" style:family="text" style:name="2101">
      <style:paragraph-properties/>
    </style:style>
    <style:style style:parent-style-name="1005" style:display-name="T91" style:family="text" style:name="2102">
      <style:paragraph-properties/>
    </style:style>
    <style:style style:parent-style-name="1005" style:display-name="T92" style:family="text" style:name="2103">
      <style:paragraph-properties/>
    </style:style>
    <style:style style:parent-style-name="1005" style:display-name="T93" style:family="text" style:name="2104">
      <style:paragraph-properties/>
    </style:style>
    <style:style style:parent-style-name="1005" style:display-name="T94" style:family="text" style:name="2105">
      <style:paragraph-properties/>
    </style:style>
    <style:style style:parent-style-name="1005" style:display-name="T95" style:family="text" style:name="2106">
      <style:paragraph-properties/>
    </style:style>
    <style:style style:parent-style-name="1005" style:display-name="T96" style:family="text" style:name="2107">
      <style:paragraph-properties/>
    </style:style>
    <style:style style:parent-style-name="1005" style:display-name="T97" style:family="text" style:name="2108">
      <style:paragraph-properties/>
    </style:style>
    <style:style style:parent-style-name="1005" style:display-name="T98" style:family="text" style:name="2109">
      <style:paragraph-properties/>
    </style:style>
    <style:style style:parent-style-name="1005" style:display-name="T99" style:family="text" style:name="2110">
      <style:paragraph-properties/>
    </style:style>
    <style:style style:parent-style-name="1005" style:display-name="T100" style:family="text" style:name="2111">
      <style:paragraph-properties/>
    </style:style>
    <style:style style:parent-style-name="1005" style:display-name="T101" style:family="text" style:name="2112">
      <style:paragraph-properties/>
    </style:style>
    <style:style style:parent-style-name="1005" style:display-name="T102" style:family="text" style:name="2113">
      <style:paragraph-properties/>
    </style:style>
    <style:style style:parent-style-name="1005" style:display-name="T103" style:family="text" style:name="2114">
      <style:paragraph-properties/>
    </style:style>
    <style:style style:parent-style-name="1005" style:display-name="T104" style:family="text" style:name="2115">
      <style:paragraph-properties/>
    </style:style>
    <style:style style:parent-style-name="1005" style:display-name="T105" style:family="text" style:name="2116">
      <style:paragraph-properties/>
    </style:style>
    <style:style style:parent-style-name="1005" style:display-name="T106" style:family="text" style:name="2117">
      <style:paragraph-properties/>
    </style:style>
    <style:style style:parent-style-name="1005" style:display-name="T107" style:family="text" style:name="2118">
      <style:paragraph-properties/>
    </style:style>
    <style:style style:parent-style-name="1005" style:display-name="T108" style:family="text" style:name="2119">
      <style:paragraph-properties/>
    </style:style>
    <style:style style:parent-style-name="1005" style:display-name="T109" style:family="text" style:name="2120">
      <style:paragraph-properties/>
    </style:style>
    <style:style style:parent-style-name="1005" style:display-name="T110" style:family="text" style:name="2121">
      <style:paragraph-properties/>
    </style:style>
    <style:style style:parent-style-name="1005" style:display-name="T111" style:family="text" style:name="2122">
      <style:paragraph-properties/>
    </style:style>
    <style:style style:parent-style-name="1005" style:display-name="T112" style:family="text" style:name="2123">
      <style:paragraph-properties/>
    </style:style>
    <style:style style:parent-style-name="1005" style:display-name="T113" style:family="text" style:name="2124">
      <style:paragraph-properties/>
    </style:style>
    <style:style style:parent-style-name="1005" style:display-name="T114" style:family="text" style:name="2125">
      <style:paragraph-properties/>
    </style:style>
    <style:style style:parent-style-name="1005" style:display-name="T115" style:family="text" style:name="2126">
      <style:paragraph-properties/>
    </style:style>
    <style:style style:parent-style-name="1005" style:display-name="T116" style:family="text" style:name="2127">
      <style:paragraph-properties/>
    </style:style>
    <style:style style:parent-style-name="1005" style:display-name="T117" style:family="text" style:name="2128">
      <style:paragraph-properties/>
    </style:style>
    <style:style style:parent-style-name="1005" style:display-name="T118" style:family="text" style:name="2129">
      <style:paragraph-properties/>
    </style:style>
    <style:style style:parent-style-name="1005" style:display-name="T119" style:family="text" style:name="2130">
      <style:paragraph-properties/>
    </style:style>
    <style:style style:parent-style-name="1005" style:display-name="T120" style:family="text" style:name="2131">
      <style:paragraph-properties/>
    </style:style>
    <style:style style:parent-style-name="1005" style:display-name="T121" style:family="text" style:name="2132">
      <style:paragraph-properties/>
    </style:style>
    <style:style style:parent-style-name="1005" style:display-name="T122" style:family="text" style:name="2133">
      <style:paragraph-properties/>
    </style:style>
    <style:style style:parent-style-name="1005" style:display-name="T123" style:family="text" style:name="2134">
      <style:paragraph-properties/>
    </style:style>
    <style:style style:parent-style-name="1005" style:display-name="T124" style:family="text" style:name="2135">
      <style:paragraph-properties/>
    </style:style>
    <style:style style:parent-style-name="1005" style:display-name="T125" style:family="text" style:name="2136">
      <style:paragraph-properties/>
    </style:style>
    <style:style style:parent-style-name="1005" style:display-name="T126" style:family="text" style:name="2137">
      <style:paragraph-properties/>
    </style:style>
    <style:style style:parent-style-name="1005" style:display-name="T127" style:family="text" style:name="2138">
      <style:paragraph-properties/>
    </style:style>
    <style:style style:parent-style-name="1005" style:display-name="T128" style:family="text" style:name="2139">
      <style:paragraph-properties/>
    </style:style>
    <style:style style:parent-style-name="1005" style:display-name="T129" style:family="text" style:name="2140">
      <style:paragraph-properties/>
    </style:style>
    <style:style style:parent-style-name="1005" style:display-name="T130" style:family="text" style:name="2141">
      <style:paragraph-properties/>
    </style:style>
    <style:style style:parent-style-name="1005" style:display-name="T131" style:family="text" style:name="2142">
      <style:paragraph-properties/>
    </style:style>
    <style:style style:parent-style-name="1005" style:display-name="T132" style:family="text" style:name="2143">
      <style:paragraph-properties/>
    </style:style>
    <style:style style:parent-style-name="1005" style:display-name="T133" style:family="text" style:name="2144">
      <style:paragraph-properties/>
    </style:style>
    <style:style style:parent-style-name="1005" style:display-name="T134" style:family="text" style:name="2145">
      <style:paragraph-properties/>
    </style:style>
    <style:style style:parent-style-name="1005" style:display-name="T135" style:family="text" style:name="2146">
      <style:paragraph-properties/>
    </style:style>
    <style:style style:parent-style-name="1005" style:display-name="T136" style:family="text" style:name="2147">
      <style:paragraph-properties/>
    </style:style>
    <style:style style:parent-style-name="1005" style:display-name="T137" style:family="text" style:name="2148">
      <style:paragraph-properties/>
    </style:style>
    <style:style style:parent-style-name="1005" style:display-name="T138" style:family="text" style:name="2149">
      <style:paragraph-properties/>
    </style:style>
    <style:style style:parent-style-name="1005" style:display-name="T139" style:family="text" style:name="2150">
      <style:paragraph-properties/>
    </style:style>
    <style:style style:parent-style-name="1005" style:display-name="T140" style:family="text" style:name="2151">
      <style:paragraph-properties/>
    </style:style>
    <style:style style:parent-style-name="1005" style:display-name="T141" style:family="text" style:name="2152">
      <style:paragraph-properties/>
    </style:style>
    <style:style style:parent-style-name="1005" style:display-name="T142" style:family="text" style:name="2153">
      <style:paragraph-properties/>
    </style:style>
    <style:style style:parent-style-name="1005" style:display-name="T143" style:family="text" style:name="2154">
      <style:paragraph-properties/>
    </style:style>
    <style:style style:parent-style-name="1005" style:display-name="T144" style:family="text" style:name="2155">
      <style:paragraph-properties/>
    </style:style>
    <style:style style:parent-style-name="1005" style:display-name="T145" style:family="text" style:name="2156">
      <style:paragraph-properties/>
    </style:style>
    <style:style style:parent-style-name="1005" style:display-name="T146" style:family="text" style:name="2157">
      <style:paragraph-properties/>
      <style:text-properties fo:font-family="Courier New" style:font-family-complex="Courier New"/>
    </style:style>
    <style:style style:parent-style-name="1005" style:display-name="T147" style:family="text" style:name="2158">
      <style:paragraph-properties/>
      <style:text-properties fo:font-family="Wingdings" style:font-family-complex="Wingdings"/>
    </style:style>
    <style:style style:parent-style-name="1005" style:display-name="T148" style:family="text" style:name="2159">
      <style:paragraph-properties/>
      <style:text-properties fo:font-family="Symbol" style:font-family-complex="Symbol"/>
    </style:style>
    <style:style style:parent-style-name="1005" style:display-name="T149" style:family="text" style:name="2160">
      <style:paragraph-properties/>
      <style:text-properties fo:font-family="Courier New" style:font-family-complex="Courier New"/>
    </style:style>
    <style:style style:parent-style-name="1005" style:display-name="T150" style:family="text" style:name="2161">
      <style:paragraph-properties/>
      <style:text-properties fo:font-family="Wingdings" style:font-family-complex="Wingdings"/>
    </style:style>
    <style:style style:parent-style-name="1005" style:display-name="T151" style:family="text" style:name="2162">
      <style:paragraph-properties/>
      <style:text-properties fo:font-family="Symbol" style:font-family-complex="Symbol"/>
    </style:style>
    <style:style style:parent-style-name="1005" style:display-name="T152" style:family="text" style:name="2163">
      <style:paragraph-properties/>
      <style:text-properties fo:font-family="Courier New" style:font-family-complex="Courier New"/>
    </style:style>
    <style:style style:parent-style-name="1005" style:display-name="T153" style:family="text" style:name="2164">
      <style:paragraph-properties/>
      <style:text-properties fo:font-family="Wingdings" style:font-family-complex="Wingdings"/>
    </style:style>
    <style:style style:parent-style-name="1005" style:display-name="T154" style:family="text" style:name="2165">
      <style:paragraph-properties/>
      <style:text-properties fo:font-family="Symbol" style:font-family-complex="Symbol"/>
    </style:style>
    <style:style style:parent-style-name="1005" style:display-name="T155" style:family="text" style:name="2166">
      <style:paragraph-properties/>
      <style:text-properties fo:font-family="Courier New" style:font-family-complex="Courier New"/>
    </style:style>
    <style:style style:parent-style-name="1005" style:display-name="T156" style:family="text" style:name="2167">
      <style:paragraph-properties/>
      <style:text-properties fo:font-family="Wingdings" style:font-family-complex="Wingdings"/>
    </style:style>
    <style:style style:parent-style-name="1005" style:display-name="T157" style:family="text" style:name="2168">
      <style:paragraph-properties/>
      <style:text-properties fo:font-family="Symbol" style:font-family-complex="Symbol"/>
    </style:style>
    <style:style style:parent-style-name="1005" style:display-name="T158" style:family="text" style:name="2169">
      <style:paragraph-properties/>
      <style:text-properties fo:font-family="Courier New" style:font-family-complex="Courier New"/>
    </style:style>
    <style:style style:parent-style-name="1005" style:display-name="T159" style:family="text" style:name="2170">
      <style:paragraph-properties/>
      <style:text-properties fo:font-family="Wingdings" style:font-family-complex="Wingdings"/>
    </style:style>
    <style:style style:parent-style-name="1005" style:display-name="T160" style:family="text" style:name="2171">
      <style:paragraph-properties/>
      <style:text-properties fo:font-family="Symbol" style:font-family-complex="Symbol"/>
    </style:style>
    <style:style style:parent-style-name="1005" style:display-name="T161" style:family="text" style:name="2172">
      <style:paragraph-properties/>
      <style:text-properties fo:font-family="Courier New" style:font-family-complex="Courier New"/>
    </style:style>
    <style:style style:parent-style-name="1005" style:display-name="T162" style:family="text" style:name="2173">
      <style:paragraph-properties/>
      <style:text-properties fo:font-family="Wingdings" style:font-family-complex="Wingdings"/>
    </style:style>
    <style:style style:parent-style-name="1005" style:display-name="T163" style:family="text" style:name="2174">
      <style:paragraph-properties/>
      <style:text-properties fo:font-family="Symbol" style:font-family-complex="Symbol" fo:font-weight="bold"/>
    </style:style>
    <style:style style:parent-style-name="1005" style:display-name="T164" style:family="text" style:name="2175">
      <style:paragraph-properties/>
      <style:text-properties fo:font-family="Symbol" style:font-family-complex="Symbol"/>
    </style:style>
    <style:style style:parent-style-name="1005" style:display-name="T165" style:family="text" style:name="2176">
      <style:paragraph-properties/>
      <style:text-properties fo:font-family="Wingdings" style:font-family-complex="Wingdings"/>
    </style:style>
    <style:style style:parent-style-name="1005" style:display-name="T166" style:family="text" style:name="2177">
      <style:paragraph-properties/>
      <style:text-properties fo:font-family="Symbol" style:font-family-complex="Symbol"/>
    </style:style>
    <style:style style:parent-style-name="1005" style:display-name="T167" style:family="text" style:name="2178">
      <style:paragraph-properties/>
      <style:text-properties fo:font-family="Courier New" style:font-family-complex="Courier New"/>
    </style:style>
    <style:style style:parent-style-name="1005" style:display-name="T168" style:family="text" style:name="2179">
      <style:paragraph-properties/>
      <style:text-properties fo:font-family="Wingdings" style:font-family-complex="Wingdings"/>
    </style:style>
    <style:style style:parent-style-name="1005" style:display-name="T169" style:family="text" style:name="2180">
      <style:paragraph-properties/>
      <style:text-properties fo:font-family="Symbol" style:font-family-complex="Symbol"/>
    </style:style>
    <style:style style:parent-style-name="1005" style:display-name="T170" style:family="text" style:name="2181">
      <style:paragraph-properties/>
      <style:text-properties fo:font-family="Courier New" style:font-family-complex="Courier New"/>
    </style:style>
    <style:style style:parent-style-name="1005" style:display-name="T171" style:family="text" style:name="2182">
      <style:paragraph-properties/>
      <style:text-properties fo:font-family="Wingdings" style:font-family-complex="Wingdings"/>
    </style:style>
    <style:style style:parent-style-name="1005" style:display-name="T172" style:family="text" style:name="2183">
      <style:paragraph-properties/>
      <style:text-properties fo:font-family="Symbol" style:font-family-complex="Symbol"/>
    </style:style>
    <style:style style:parent-style-name="1005" style:display-name="T173" style:family="text" style:name="2184">
      <style:paragraph-properties/>
      <style:text-properties fo:font-family="Courier New" style:font-family-complex="Courier New"/>
    </style:style>
    <style:style style:parent-style-name="1005" style:display-name="T174" style:family="text" style:name="2185">
      <style:paragraph-properties/>
      <style:text-properties fo:font-family="Wingdings" style:font-family-complex="Wingdings"/>
    </style:style>
    <style:style style:parent-style-name="1005" style:display-name="T175" style:family="text" style:name="2186">
      <style:paragraph-properties/>
      <style:text-properties fo:font-family="Symbol" style:font-family-complex="Symbol"/>
    </style:style>
    <style:style style:parent-style-name="1005" style:display-name="T176" style:family="text" style:name="2187">
      <style:paragraph-properties/>
      <style:text-properties fo:font-family="Courier New" style:font-family-complex="Courier New"/>
    </style:style>
    <style:style style:parent-style-name="1005" style:display-name="T177" style:family="text" style:name="2188">
      <style:paragraph-properties/>
      <style:text-properties fo:font-family="Wingdings" style:font-family-complex="Wingdings"/>
    </style:style>
    <style:style style:parent-style-name="1005" style:display-name="T178" style:family="text" style:name="2189">
      <style:paragraph-properties/>
      <style:text-properties fo:font-family="Symbol" style:font-family-complex="Symbol"/>
    </style:style>
    <style:style style:parent-style-name="1005" style:display-name="T179" style:family="text" style:name="2190">
      <style:paragraph-properties/>
      <style:text-properties fo:font-family="Courier New" style:font-family-complex="Courier New"/>
    </style:style>
    <style:style style:parent-style-name="1005" style:display-name="T180" style:family="text" style:name="2191">
      <style:paragraph-properties/>
      <style:text-properties fo:font-family="Wingdings" style:font-family-complex="Wingdings"/>
    </style:style>
    <style:style style:parent-style-name="1005" style:display-name="T181" style:family="text" style:name="2192">
      <style:paragraph-properties/>
      <style:text-properties fo:font-family="Symbol" style:font-family-complex="Symbol"/>
    </style:style>
    <style:style style:parent-style-name="1005" style:display-name="T182" style:family="text" style:name="2193">
      <style:paragraph-properties/>
    </style:style>
    <style:style style:parent-style-name="1005" style:display-name="T183" style:family="text" style:name="2194">
      <style:paragraph-properties/>
      <style:text-properties fo:font-family="Wingdings" style:font-family-complex="Wingdings"/>
    </style:style>
    <style:style style:parent-style-name="1005" style:display-name="T184" style:family="text" style:name="2195">
      <style:paragraph-properties/>
      <style:text-properties fo:font-family="Symbol" style:font-family-complex="Symbol"/>
    </style:style>
    <style:style style:parent-style-name="1005" style:display-name="T185" style:family="text" style:name="2196">
      <style:paragraph-properties/>
      <style:text-properties fo:font-family="Courier New" style:font-family-complex="Courier New"/>
    </style:style>
    <style:style style:parent-style-name="1005" style:display-name="T186" style:family="text" style:name="2197">
      <style:paragraph-properties/>
      <style:text-properties fo:font-family="Wingdings" style:font-family-complex="Wingdings"/>
    </style:style>
    <style:style style:parent-style-name="1005" style:display-name="T187" style:family="text" style:name="2198">
      <style:paragraph-properties/>
      <style:text-properties fo:font-family="Symbol" style:font-family-complex="Symbol"/>
    </style:style>
    <style:style style:parent-style-name="1005" style:display-name="T188" style:family="text" style:name="2199">
      <style:paragraph-properties/>
      <style:text-properties fo:font-family="Courier New" style:font-family-complex="Courier New"/>
    </style:style>
    <style:style style:parent-style-name="1005" style:display-name="T189" style:family="text" style:name="2200">
      <style:paragraph-properties/>
      <style:text-properties fo:font-family="Wingdings" style:font-family-complex="Wingdings"/>
    </style:style>
    <style:style style:parent-style-name="1005" style:display-name="T190" style:family="text" style:name="2201">
      <style:paragraph-properties/>
      <style:text-properties fo:font-family="Symbol" style:font-family-complex="Symbol"/>
    </style:style>
    <style:style style:parent-style-name="1005" style:display-name="T191" style:family="text" style:name="2202">
      <style:paragraph-properties/>
    </style:style>
    <style:style style:parent-style-name="1005" style:display-name="T192" style:family="text" style:name="2203">
      <style:paragraph-properties/>
      <style:text-properties fo:font-family="Wingdings" style:font-family-complex="Wingdings"/>
    </style:style>
    <style:style style:parent-style-name="1005" style:display-name="T193" style:family="text" style:name="2204">
      <style:paragraph-properties/>
      <style:text-properties fo:font-family="Symbol" style:font-family-complex="Symbol"/>
    </style:style>
    <style:style style:parent-style-name="1005" style:display-name="T194" style:family="text" style:name="2205">
      <style:paragraph-properties/>
      <style:text-properties fo:font-family="Courier New" style:font-family-complex="Courier New"/>
    </style:style>
    <style:style style:parent-style-name="1005" style:display-name="T195" style:family="text" style:name="2206">
      <style:paragraph-properties/>
      <style:text-properties fo:font-family="Wingdings" style:font-family-complex="Wingdings"/>
    </style:style>
    <style:style style:parent-style-name="1005" style:display-name="T196" style:family="text" style:name="2207">
      <style:paragraph-properties/>
      <style:text-properties fo:font-family="Symbol" style:font-family-complex="Symbol"/>
    </style:style>
    <style:style style:parent-style-name="1005" style:display-name="T197" style:family="text" style:name="2208">
      <style:paragraph-properties/>
      <style:text-properties fo:font-family="Courier New" style:font-family-complex="Courier New"/>
    </style:style>
    <style:style style:parent-style-name="1005" style:display-name="T198" style:family="text" style:name="2209">
      <style:paragraph-properties/>
      <style:text-properties fo:font-family="Wingdings" style:font-family-complex="Wingdings"/>
    </style:style>
    <style:style style:parent-style-name="1005" style:display-name="T1" style:family="text" style:name="2210">
      <style:paragraph-properties/>
    </style:style>
    <style:style style:parent-style-name="1005" style:display-name="T2" style:family="text" style:name="2211">
      <style:paragraph-properties/>
    </style:style>
    <style:style style:parent-style-name="1005" style:display-name="T3" style:family="text" style:name="2212">
      <style:paragraph-properties/>
    </style:style>
    <style:style style:parent-style-name="1005" style:display-name="T4" style:family="text" style:name="2213">
      <style:paragraph-properties/>
    </style:style>
    <style:style style:parent-style-name="1005" style:display-name="T5" style:family="text" style:name="2214">
      <style:paragraph-properties/>
    </style:style>
    <style:style style:parent-style-name="1005" style:display-name="T6" style:family="text" style:name="2215">
      <style:paragraph-properties/>
    </style:style>
    <style:style style:parent-style-name="1005" style:display-name="T7" style:family="text" style:name="2216">
      <style:paragraph-properties/>
    </style:style>
    <style:style style:parent-style-name="1005" style:display-name="T8" style:family="text" style:name="2217">
      <style:paragraph-properties/>
    </style:style>
    <style:style style:parent-style-name="1005" style:display-name="T9" style:family="text" style:name="2218">
      <style:paragraph-properties/>
    </style:style>
    <style:style style:parent-style-name="1005" style:display-name="T10" style:family="text" style:name="2219">
      <style:paragraph-properties/>
    </style:style>
    <style:style style:parent-style-name="1005" style:display-name="T11" style:family="text" style:name="2220">
      <style:paragraph-properties/>
    </style:style>
    <style:style style:parent-style-name="1005" style:display-name="T12" style:family="text" style:name="2221">
      <style:paragraph-properties/>
    </style:style>
    <style:style style:parent-style-name="1005" style:display-name="T13" style:family="text" style:name="2222">
      <style:paragraph-properties/>
    </style:style>
    <style:style style:parent-style-name="1005" style:display-name="T14" style:family="text" style:name="2223">
      <style:paragraph-properties/>
    </style:style>
    <style:style style:parent-style-name="1005" style:display-name="T15" style:family="text" style:name="2224">
      <style:paragraph-properties/>
    </style:style>
    <style:style style:parent-style-name="1005" style:display-name="T16" style:family="text" style:name="2225">
      <style:paragraph-properties/>
    </style:style>
    <style:style style:parent-style-name="1005" style:display-name="T17" style:family="text" style:name="2226">
      <style:paragraph-properties/>
    </style:style>
    <style:style style:parent-style-name="1005" style:display-name="T18" style:family="text" style:name="2227">
      <style:paragraph-properties/>
    </style:style>
    <style:style style:parent-style-name="1005" style:display-name="T19" style:family="text" style:name="2228">
      <style:paragraph-properties/>
    </style:style>
    <style:style style:parent-style-name="1005" style:display-name="T20" style:family="text" style:name="2229">
      <style:paragraph-properties/>
    </style:style>
    <style:style style:parent-style-name="1005" style:display-name="T21" style:family="text" style:name="2230">
      <style:paragraph-properties/>
    </style:style>
    <style:style style:parent-style-name="1005" style:display-name="T22" style:family="text" style:name="2231">
      <style:paragraph-properties/>
    </style:style>
    <style:style style:parent-style-name="1005" style:display-name="T23" style:family="text" style:name="2232">
      <style:paragraph-properties/>
    </style:style>
    <style:style style:parent-style-name="1005" style:display-name="T24" style:family="text" style:name="2233">
      <style:paragraph-properties/>
    </style:style>
    <style:style style:parent-style-name="1005" style:display-name="T25" style:family="text" style:name="2234">
      <style:paragraph-properties/>
    </style:style>
    <style:style style:parent-style-name="1005" style:display-name="T26" style:family="text" style:name="2235">
      <style:paragraph-properties/>
    </style:style>
    <style:style style:parent-style-name="1005" style:display-name="T27" style:family="text" style:name="2236">
      <style:paragraph-properties/>
    </style:style>
    <style:style style:parent-style-name="1005" style:display-name="T28" style:family="text" style:name="2237">
      <style:paragraph-properties/>
    </style:style>
    <style:style style:parent-style-name="1005" style:display-name="T29" style:family="text" style:name="2238">
      <style:paragraph-properties/>
    </style:style>
    <style:style style:parent-style-name="1005" style:display-name="T30" style:family="text" style:name="2239">
      <style:paragraph-properties/>
    </style:style>
    <style:style style:parent-style-name="1005" style:display-name="T31" style:family="text" style:name="2240">
      <style:paragraph-properties/>
    </style:style>
    <style:style style:parent-style-name="1005" style:display-name="T32" style:family="text" style:name="2241">
      <style:paragraph-properties/>
    </style:style>
    <style:style style:parent-style-name="1005" style:display-name="T33" style:family="text" style:name="2242">
      <style:paragraph-properties/>
    </style:style>
    <style:style style:parent-style-name="1005" style:display-name="T34" style:family="text" style:name="2243">
      <style:paragraph-properties/>
    </style:style>
    <style:style style:parent-style-name="1005" style:display-name="T35" style:family="text" style:name="2244">
      <style:paragraph-properties/>
    </style:style>
    <style:style style:parent-style-name="1005" style:display-name="T36" style:family="text" style:name="2245">
      <style:paragraph-properties/>
    </style:style>
    <style:style style:parent-style-name="1005" style:display-name="T37" style:family="text" style:name="2246">
      <style:paragraph-properties/>
    </style:style>
    <style:style style:parent-style-name="1005" style:display-name="T38" style:family="text" style:name="2247">
      <style:paragraph-properties/>
    </style:style>
    <style:style style:parent-style-name="1005" style:display-name="T39" style:family="text" style:name="2248">
      <style:paragraph-properties/>
    </style:style>
    <style:style style:parent-style-name="1005" style:display-name="T40" style:family="text" style:name="2249">
      <style:paragraph-properties/>
    </style:style>
    <style:style style:parent-style-name="1005" style:display-name="T41" style:family="text" style:name="2250">
      <style:paragraph-properties/>
    </style:style>
    <style:style style:parent-style-name="1005" style:display-name="T42" style:family="text" style:name="2251">
      <style:paragraph-properties/>
    </style:style>
    <style:style style:parent-style-name="1005" style:display-name="T43" style:family="text" style:name="2252">
      <style:paragraph-properties/>
    </style:style>
    <style:style style:parent-style-name="1005" style:display-name="T44" style:family="text" style:name="2253">
      <style:paragraph-properties/>
    </style:style>
    <style:style style:parent-style-name="1005" style:display-name="T45" style:family="text" style:name="2254">
      <style:paragraph-properties/>
    </style:style>
    <style:style style:parent-style-name="1005" style:display-name="T46" style:family="text" style:name="2255">
      <style:paragraph-properties/>
    </style:style>
    <style:style style:parent-style-name="1005" style:display-name="T47" style:family="text" style:name="2256">
      <style:paragraph-properties/>
    </style:style>
    <style:style style:parent-style-name="1005" style:display-name="T48" style:family="text" style:name="2257">
      <style:paragraph-properties/>
    </style:style>
    <style:style style:parent-style-name="1005" style:display-name="T49" style:family="text" style:name="2258">
      <style:paragraph-properties/>
    </style:style>
    <style:style style:parent-style-name="1005" style:display-name="T50" style:family="text" style:name="2259">
      <style:paragraph-properties/>
    </style:style>
    <style:style style:parent-style-name="1005" style:display-name="T51" style:family="text" style:name="2260">
      <style:paragraph-properties/>
    </style:style>
    <style:style style:parent-style-name="1005" style:display-name="T52" style:family="text" style:name="2261">
      <style:paragraph-properties/>
    </style:style>
    <style:style style:parent-style-name="1005" style:display-name="T53" style:family="text" style:name="2262">
      <style:paragraph-properties/>
    </style:style>
    <style:style style:parent-style-name="1005" style:display-name="T54" style:family="text" style:name="2263">
      <style:paragraph-properties/>
    </style:style>
    <style:style style:parent-style-name="1005" style:display-name="T55" style:family="text" style:name="2264">
      <style:paragraph-properties/>
    </style:style>
    <style:style style:parent-style-name="1005" style:display-name="T56" style:family="text" style:name="2265">
      <style:paragraph-properties/>
    </style:style>
    <style:style style:parent-style-name="1005" style:display-name="T57" style:family="text" style:name="2266">
      <style:paragraph-properties/>
    </style:style>
    <style:style style:parent-style-name="1005" style:display-name="T58" style:family="text" style:name="2267">
      <style:paragraph-properties/>
    </style:style>
    <style:style style:parent-style-name="1005" style:display-name="T59" style:family="text" style:name="2268">
      <style:paragraph-properties/>
    </style:style>
    <style:style style:parent-style-name="1005" style:display-name="T60" style:family="text" style:name="2269">
      <style:paragraph-properties/>
    </style:style>
    <style:style style:parent-style-name="1005" style:display-name="T61" style:family="text" style:name="2270">
      <style:paragraph-properties/>
    </style:style>
    <style:style style:parent-style-name="1005" style:display-name="T62" style:family="text" style:name="2271">
      <style:paragraph-properties/>
    </style:style>
    <style:style style:parent-style-name="1005" style:display-name="T63" style:family="text" style:name="2272">
      <style:paragraph-properties/>
    </style:style>
    <style:style style:parent-style-name="1005" style:display-name="T64" style:family="text" style:name="2273">
      <style:paragraph-properties/>
    </style:style>
    <style:style style:parent-style-name="1005" style:display-name="T65" style:family="text" style:name="2274">
      <style:paragraph-properties/>
    </style:style>
    <style:style style:parent-style-name="1005" style:display-name="T66" style:family="text" style:name="2275">
      <style:paragraph-properties/>
    </style:style>
    <style:style style:parent-style-name="1005" style:display-name="T67" style:family="text" style:name="2276">
      <style:paragraph-properties/>
    </style:style>
    <style:style style:parent-style-name="1005" style:display-name="T68" style:family="text" style:name="2277">
      <style:paragraph-properties/>
    </style:style>
    <style:style style:parent-style-name="1005" style:display-name="T69" style:family="text" style:name="2278">
      <style:paragraph-properties/>
    </style:style>
    <style:style style:parent-style-name="1005" style:display-name="T70" style:family="text" style:name="2279">
      <style:paragraph-properties/>
    </style:style>
    <style:style style:parent-style-name="1005" style:display-name="T71" style:family="text" style:name="2280">
      <style:paragraph-properties/>
    </style:style>
    <style:style style:parent-style-name="1005" style:display-name="T72" style:family="text" style:name="2281">
      <style:paragraph-properties/>
    </style:style>
    <style:style style:parent-style-name="1005" style:display-name="T73" style:family="text" style:name="2282">
      <style:paragraph-properties/>
    </style:style>
    <style:style style:parent-style-name="1005" style:display-name="T74" style:family="text" style:name="2283">
      <style:paragraph-properties/>
    </style:style>
    <style:style style:parent-style-name="1005" style:display-name="T75" style:family="text" style:name="2284">
      <style:paragraph-properties/>
    </style:style>
    <style:style style:parent-style-name="1005" style:display-name="T76" style:family="text" style:name="2285">
      <style:paragraph-properties/>
    </style:style>
    <style:style style:parent-style-name="1005" style:display-name="T77" style:family="text" style:name="2286">
      <style:paragraph-properties/>
    </style:style>
    <style:style style:parent-style-name="1005" style:display-name="T78" style:family="text" style:name="2287">
      <style:paragraph-properties/>
    </style:style>
    <style:style style:parent-style-name="1005" style:display-name="T79" style:family="text" style:name="2288">
      <style:paragraph-properties/>
    </style:style>
    <style:style style:parent-style-name="1005" style:display-name="T80" style:family="text" style:name="2289">
      <style:paragraph-properties/>
    </style:style>
    <style:style style:parent-style-name="1005" style:display-name="T81" style:family="text" style:name="2290">
      <style:paragraph-properties/>
    </style:style>
    <style:style style:parent-style-name="1005" style:display-name="T82" style:family="text" style:name="2291">
      <style:paragraph-properties/>
    </style:style>
    <style:style style:parent-style-name="1005" style:display-name="T83" style:family="text" style:name="2292">
      <style:paragraph-properties/>
    </style:style>
    <style:style style:parent-style-name="1005" style:display-name="T84" style:family="text" style:name="2293">
      <style:paragraph-properties/>
    </style:style>
    <style:style style:parent-style-name="1005" style:display-name="T85" style:family="text" style:name="2294">
      <style:paragraph-properties/>
    </style:style>
    <style:style style:parent-style-name="1005" style:display-name="T86" style:family="text" style:name="2295">
      <style:paragraph-properties/>
    </style:style>
    <style:style style:parent-style-name="1005" style:display-name="T87" style:family="text" style:name="2296">
      <style:paragraph-properties/>
    </style:style>
    <style:style style:parent-style-name="1005" style:display-name="T88" style:family="text" style:name="2297">
      <style:paragraph-properties/>
    </style:style>
    <style:style style:parent-style-name="1005" style:display-name="T89" style:family="text" style:name="2298">
      <style:paragraph-properties/>
    </style:style>
    <style:style style:parent-style-name="1005" style:display-name="T90" style:family="text" style:name="2299">
      <style:paragraph-properties/>
    </style:style>
    <style:style style:parent-style-name="1005" style:display-name="T91" style:family="text" style:name="2300">
      <style:paragraph-properties/>
    </style:style>
    <style:style style:parent-style-name="1005" style:display-name="T92" style:family="text" style:name="2301">
      <style:paragraph-properties/>
    </style:style>
    <style:style style:parent-style-name="1005" style:display-name="T93" style:family="text" style:name="2302">
      <style:paragraph-properties/>
    </style:style>
    <style:style style:parent-style-name="1005" style:display-name="T94" style:family="text" style:name="2303">
      <style:paragraph-properties/>
    </style:style>
    <style:style style:parent-style-name="1005" style:display-name="T95" style:family="text" style:name="2304">
      <style:paragraph-properties/>
    </style:style>
    <style:style style:parent-style-name="1005" style:display-name="T96" style:family="text" style:name="2305">
      <style:paragraph-properties/>
    </style:style>
    <style:style style:parent-style-name="1005" style:display-name="T97" style:family="text" style:name="2306">
      <style:paragraph-properties/>
    </style:style>
    <style:style style:parent-style-name="1005" style:display-name="T98" style:family="text" style:name="2307">
      <style:paragraph-properties/>
    </style:style>
    <style:style style:parent-style-name="1005" style:display-name="T99" style:family="text" style:name="2308">
      <style:paragraph-properties/>
    </style:style>
    <style:style style:parent-style-name="1005" style:display-name="T100" style:family="text" style:name="2309">
      <style:paragraph-properties/>
    </style:style>
    <style:style style:parent-style-name="1005" style:display-name="T101" style:family="text" style:name="2310">
      <style:paragraph-properties/>
    </style:style>
    <style:style style:parent-style-name="1005" style:display-name="T102" style:family="text" style:name="2311">
      <style:paragraph-properties/>
    </style:style>
    <style:style style:parent-style-name="1005" style:display-name="T103" style:family="text" style:name="2312">
      <style:paragraph-properties/>
    </style:style>
    <style:style style:parent-style-name="1005" style:display-name="T104" style:family="text" style:name="2313">
      <style:paragraph-properties/>
    </style:style>
    <style:style style:parent-style-name="1005" style:display-name="T105" style:family="text" style:name="2314">
      <style:paragraph-properties/>
    </style:style>
    <style:style style:parent-style-name="1005" style:display-name="T106" style:family="text" style:name="2315">
      <style:paragraph-properties/>
    </style:style>
    <style:style style:parent-style-name="1005" style:display-name="T107" style:family="text" style:name="2316">
      <style:paragraph-properties/>
    </style:style>
    <style:style style:parent-style-name="1005" style:display-name="T108" style:family="text" style:name="2317">
      <style:paragraph-properties/>
    </style:style>
    <style:style style:parent-style-name="1005" style:display-name="T109" style:family="text" style:name="2318">
      <style:paragraph-properties/>
    </style:style>
    <style:style style:parent-style-name="1005" style:display-name="T110" style:family="text" style:name="2319">
      <style:paragraph-properties/>
    </style:style>
    <style:style style:parent-style-name="1005" style:display-name="T111" style:family="text" style:name="2320">
      <style:paragraph-properties/>
    </style:style>
    <style:style style:parent-style-name="1005" style:display-name="T112" style:family="text" style:name="2321">
      <style:paragraph-properties/>
    </style:style>
    <style:style style:parent-style-name="1005" style:display-name="T113" style:family="text" style:name="2322">
      <style:paragraph-properties/>
    </style:style>
    <style:style style:parent-style-name="1005" style:display-name="T114" style:family="text" style:name="2323">
      <style:paragraph-properties/>
    </style:style>
    <style:style style:parent-style-name="1005" style:display-name="T115" style:family="text" style:name="2324">
      <style:paragraph-properties/>
    </style:style>
    <style:style style:parent-style-name="1005" style:display-name="T116" style:family="text" style:name="2325">
      <style:paragraph-properties/>
    </style:style>
    <style:style style:parent-style-name="1005" style:display-name="T117" style:family="text" style:name="2326">
      <style:paragraph-properties/>
    </style:style>
    <style:style style:parent-style-name="1005" style:display-name="T118" style:family="text" style:name="2327">
      <style:paragraph-properties/>
    </style:style>
    <style:style style:parent-style-name="1005" style:display-name="T119" style:family="text" style:name="2328">
      <style:paragraph-properties/>
    </style:style>
    <style:style style:parent-style-name="1005" style:display-name="T120" style:family="text" style:name="2329">
      <style:paragraph-properties/>
    </style:style>
    <style:style style:parent-style-name="1005" style:display-name="T121" style:family="text" style:name="2330">
      <style:paragraph-properties/>
    </style:style>
    <style:style style:parent-style-name="1005" style:display-name="T122" style:family="text" style:name="2331">
      <style:paragraph-properties/>
    </style:style>
    <style:style style:parent-style-name="1005" style:display-name="T123" style:family="text" style:name="2332">
      <style:paragraph-properties/>
    </style:style>
    <style:style style:parent-style-name="1005" style:display-name="T124" style:family="text" style:name="2333">
      <style:paragraph-properties/>
    </style:style>
    <style:style style:parent-style-name="1005" style:display-name="T125" style:family="text" style:name="2334">
      <style:paragraph-properties/>
    </style:style>
    <style:style style:parent-style-name="1005" style:display-name="T126" style:family="text" style:name="2335">
      <style:paragraph-properties/>
    </style:style>
    <style:style style:parent-style-name="1005" style:display-name="T127" style:family="text" style:name="2336">
      <style:paragraph-properties/>
    </style:style>
    <style:style style:parent-style-name="1005" style:display-name="T128" style:family="text" style:name="2337">
      <style:paragraph-properties/>
    </style:style>
    <style:style style:parent-style-name="1005" style:display-name="T129" style:family="text" style:name="2338">
      <style:paragraph-properties/>
    </style:style>
    <style:style style:parent-style-name="1005" style:display-name="T130" style:family="text" style:name="2339">
      <style:paragraph-properties/>
    </style:style>
    <style:style style:parent-style-name="1005" style:display-name="T131" style:family="text" style:name="2340">
      <style:paragraph-properties/>
    </style:style>
    <style:style style:parent-style-name="1005" style:display-name="T132" style:family="text" style:name="2341">
      <style:paragraph-properties/>
    </style:style>
    <style:style style:parent-style-name="1005" style:display-name="T133" style:family="text" style:name="2342">
      <style:paragraph-properties/>
    </style:style>
    <style:style style:parent-style-name="1005" style:display-name="T134" style:family="text" style:name="2343">
      <style:paragraph-properties/>
    </style:style>
    <style:style style:parent-style-name="1005" style:display-name="T135" style:family="text" style:name="2344">
      <style:paragraph-properties/>
    </style:style>
    <style:style style:parent-style-name="1005" style:display-name="T136" style:family="text" style:name="2345">
      <style:paragraph-properties/>
    </style:style>
    <style:style style:parent-style-name="1005" style:display-name="T137" style:family="text" style:name="2346">
      <style:paragraph-properties/>
    </style:style>
    <style:style style:parent-style-name="1005" style:display-name="T138" style:family="text" style:name="2347">
      <style:paragraph-properties/>
    </style:style>
    <style:style style:parent-style-name="1005" style:display-name="T139" style:family="text" style:name="2348">
      <style:paragraph-properties/>
    </style:style>
    <style:style style:parent-style-name="1005" style:display-name="T140" style:family="text" style:name="2349">
      <style:paragraph-properties/>
    </style:style>
    <style:style style:parent-style-name="1005" style:display-name="T141" style:family="text" style:name="2350">
      <style:paragraph-properties/>
    </style:style>
    <style:style style:parent-style-name="1005" style:display-name="T142" style:family="text" style:name="2351">
      <style:paragraph-properties/>
    </style:style>
    <style:style style:parent-style-name="1005" style:display-name="T143" style:family="text" style:name="2352">
      <style:paragraph-properties/>
    </style:style>
    <style:style style:parent-style-name="1005" style:display-name="T144" style:family="text" style:name="2353">
      <style:paragraph-properties/>
    </style:style>
    <style:style style:parent-style-name="1005" style:display-name="T145" style:family="text" style:name="2354">
      <style:paragraph-properties/>
    </style:style>
    <style:style style:parent-style-name="1005" style:display-name="T146" style:family="text" style:name="2355">
      <style:paragraph-properties/>
      <style:text-properties fo:font-family="Courier New" style:font-family-complex="Courier New"/>
    </style:style>
    <style:style style:parent-style-name="1005" style:display-name="T147" style:family="text" style:name="2356">
      <style:paragraph-properties/>
      <style:text-properties fo:font-family="Wingdings" style:font-family-complex="Wingdings"/>
    </style:style>
    <style:style style:parent-style-name="1005" style:display-name="T148" style:family="text" style:name="2357">
      <style:paragraph-properties/>
      <style:text-properties fo:font-family="Symbol" style:font-family-complex="Symbol"/>
    </style:style>
    <style:style style:parent-style-name="1005" style:display-name="T149" style:family="text" style:name="2358">
      <style:paragraph-properties/>
      <style:text-properties fo:font-family="Courier New" style:font-family-complex="Courier New"/>
    </style:style>
    <style:style style:parent-style-name="1005" style:display-name="T150" style:family="text" style:name="2359">
      <style:paragraph-properties/>
      <style:text-properties fo:font-family="Wingdings" style:font-family-complex="Wingdings"/>
    </style:style>
    <style:style style:parent-style-name="1005" style:display-name="T151" style:family="text" style:name="2360">
      <style:paragraph-properties/>
      <style:text-properties fo:font-family="Symbol" style:font-family-complex="Symbol"/>
    </style:style>
    <style:style style:parent-style-name="1005" style:display-name="T152" style:family="text" style:name="2361">
      <style:paragraph-properties/>
      <style:text-properties fo:font-family="Courier New" style:font-family-complex="Courier New"/>
    </style:style>
    <style:style style:parent-style-name="1005" style:display-name="T153" style:family="text" style:name="2362">
      <style:paragraph-properties/>
      <style:text-properties fo:font-family="Wingdings" style:font-family-complex="Wingdings"/>
    </style:style>
    <style:style style:parent-style-name="1005" style:display-name="T154" style:family="text" style:name="2363">
      <style:paragraph-properties/>
      <style:text-properties fo:font-family="Symbol" style:font-family-complex="Symbol"/>
    </style:style>
    <style:style style:parent-style-name="1005" style:display-name="T155" style:family="text" style:name="2364">
      <style:paragraph-properties/>
      <style:text-properties fo:font-family="Courier New" style:font-family-complex="Courier New"/>
    </style:style>
    <style:style style:parent-style-name="1005" style:display-name="T156" style:family="text" style:name="2365">
      <style:paragraph-properties/>
      <style:text-properties fo:font-family="Wingdings" style:font-family-complex="Wingdings"/>
    </style:style>
    <style:style style:parent-style-name="1005" style:display-name="T157" style:family="text" style:name="2366">
      <style:paragraph-properties/>
      <style:text-properties fo:font-family="Symbol" style:font-family-complex="Symbol"/>
    </style:style>
    <style:style style:parent-style-name="1005" style:display-name="T158" style:family="text" style:name="2367">
      <style:paragraph-properties/>
      <style:text-properties fo:font-family="Courier New" style:font-family-complex="Courier New"/>
    </style:style>
    <style:style style:parent-style-name="1005" style:display-name="T159" style:family="text" style:name="2368">
      <style:paragraph-properties/>
      <style:text-properties fo:font-family="Wingdings" style:font-family-complex="Wingdings"/>
    </style:style>
    <style:style style:parent-style-name="1005" style:display-name="T160" style:family="text" style:name="2369">
      <style:paragraph-properties/>
      <style:text-properties fo:font-family="Symbol" style:font-family-complex="Symbol"/>
    </style:style>
    <style:style style:parent-style-name="1005" style:display-name="T161" style:family="text" style:name="2370">
      <style:paragraph-properties/>
      <style:text-properties fo:font-family="Courier New" style:font-family-complex="Courier New"/>
    </style:style>
    <style:style style:parent-style-name="1005" style:display-name="T162" style:family="text" style:name="2371">
      <style:paragraph-properties/>
      <style:text-properties fo:font-family="Wingdings" style:font-family-complex="Wingdings"/>
    </style:style>
    <style:style style:parent-style-name="1005" style:display-name="T163" style:family="text" style:name="2372">
      <style:paragraph-properties/>
      <style:text-properties fo:font-family="Symbol" style:font-family-complex="Symbol" fo:font-weight="bold"/>
    </style:style>
    <style:style style:parent-style-name="1005" style:display-name="T164" style:family="text" style:name="2373">
      <style:paragraph-properties/>
      <style:text-properties fo:font-family="Symbol" style:font-family-complex="Symbol"/>
    </style:style>
    <style:style style:parent-style-name="1005" style:display-name="T165" style:family="text" style:name="2374">
      <style:paragraph-properties/>
      <style:text-properties fo:font-family="Wingdings" style:font-family-complex="Wingdings"/>
    </style:style>
    <style:style style:parent-style-name="1005" style:display-name="T166" style:family="text" style:name="2375">
      <style:paragraph-properties/>
      <style:text-properties fo:font-family="Symbol" style:font-family-complex="Symbol"/>
    </style:style>
    <style:style style:parent-style-name="1005" style:display-name="T167" style:family="text" style:name="2376">
      <style:paragraph-properties/>
      <style:text-properties fo:font-family="Courier New" style:font-family-complex="Courier New"/>
    </style:style>
    <style:style style:parent-style-name="1005" style:display-name="T168" style:family="text" style:name="2377">
      <style:paragraph-properties/>
      <style:text-properties fo:font-family="Wingdings" style:font-family-complex="Wingdings"/>
    </style:style>
    <style:style style:parent-style-name="1005" style:display-name="T169" style:family="text" style:name="2378">
      <style:paragraph-properties/>
      <style:text-properties fo:font-family="Symbol" style:font-family-complex="Symbol"/>
    </style:style>
    <style:style style:parent-style-name="1005" style:display-name="T170" style:family="text" style:name="2379">
      <style:paragraph-properties/>
      <style:text-properties fo:font-family="Courier New" style:font-family-complex="Courier New"/>
    </style:style>
    <style:style style:parent-style-name="1005" style:display-name="T171" style:family="text" style:name="2380">
      <style:paragraph-properties/>
      <style:text-properties fo:font-family="Wingdings" style:font-family-complex="Wingdings"/>
    </style:style>
    <style:style style:parent-style-name="1005" style:display-name="T172" style:family="text" style:name="2381">
      <style:paragraph-properties/>
      <style:text-properties fo:font-family="Symbol" style:font-family-complex="Symbol"/>
    </style:style>
    <style:style style:parent-style-name="1005" style:display-name="T173" style:family="text" style:name="2382">
      <style:paragraph-properties/>
      <style:text-properties fo:font-family="Courier New" style:font-family-complex="Courier New"/>
    </style:style>
    <style:style style:parent-style-name="1005" style:display-name="T174" style:family="text" style:name="2383">
      <style:paragraph-properties/>
      <style:text-properties fo:font-family="Wingdings" style:font-family-complex="Wingdings"/>
    </style:style>
    <style:style style:parent-style-name="1005" style:display-name="T175" style:family="text" style:name="2384">
      <style:paragraph-properties/>
      <style:text-properties fo:font-family="Symbol" style:font-family-complex="Symbol"/>
    </style:style>
    <style:style style:parent-style-name="1005" style:display-name="T176" style:family="text" style:name="2385">
      <style:paragraph-properties/>
      <style:text-properties fo:font-family="Courier New" style:font-family-complex="Courier New"/>
    </style:style>
    <style:style style:parent-style-name="1005" style:display-name="T177" style:family="text" style:name="2386">
      <style:paragraph-properties/>
      <style:text-properties fo:font-family="Wingdings" style:font-family-complex="Wingdings"/>
    </style:style>
    <style:style style:parent-style-name="1005" style:display-name="T178" style:family="text" style:name="2387">
      <style:paragraph-properties/>
      <style:text-properties fo:font-family="Symbol" style:font-family-complex="Symbol"/>
    </style:style>
    <style:style style:parent-style-name="1005" style:display-name="T179" style:family="text" style:name="2388">
      <style:paragraph-properties/>
      <style:text-properties fo:font-family="Courier New" style:font-family-complex="Courier New"/>
    </style:style>
    <style:style style:parent-style-name="1005" style:display-name="T180" style:family="text" style:name="2389">
      <style:paragraph-properties/>
      <style:text-properties fo:font-family="Wingdings" style:font-family-complex="Wingdings"/>
    </style:style>
    <style:style style:parent-style-name="1005" style:display-name="T181" style:family="text" style:name="2390">
      <style:paragraph-properties/>
      <style:text-properties fo:font-family="Symbol" style:font-family-complex="Symbol"/>
    </style:style>
    <style:style style:parent-style-name="1005" style:display-name="T182" style:family="text" style:name="2391">
      <style:paragraph-properties/>
    </style:style>
    <style:style style:parent-style-name="1005" style:display-name="T183" style:family="text" style:name="2392">
      <style:paragraph-properties/>
      <style:text-properties fo:font-family="Wingdings" style:font-family-complex="Wingdings"/>
    </style:style>
    <style:style style:parent-style-name="1005" style:display-name="T184" style:family="text" style:name="2393">
      <style:paragraph-properties/>
      <style:text-properties fo:font-family="Symbol" style:font-family-complex="Symbol"/>
    </style:style>
    <style:style style:parent-style-name="1005" style:display-name="T185" style:family="text" style:name="2394">
      <style:paragraph-properties/>
      <style:text-properties fo:font-family="Courier New" style:font-family-complex="Courier New"/>
    </style:style>
    <style:style style:parent-style-name="1005" style:display-name="T186" style:family="text" style:name="2395">
      <style:paragraph-properties/>
      <style:text-properties fo:font-family="Wingdings" style:font-family-complex="Wingdings"/>
    </style:style>
    <style:style style:parent-style-name="1005" style:display-name="T187" style:family="text" style:name="2396">
      <style:paragraph-properties/>
      <style:text-properties fo:font-family="Symbol" style:font-family-complex="Symbol"/>
    </style:style>
    <style:style style:parent-style-name="1005" style:display-name="T188" style:family="text" style:name="2397">
      <style:paragraph-properties/>
      <style:text-properties fo:font-family="Courier New" style:font-family-complex="Courier New"/>
    </style:style>
    <style:style style:parent-style-name="1005" style:display-name="T189" style:family="text" style:name="2398">
      <style:paragraph-properties/>
      <style:text-properties fo:font-family="Wingdings" style:font-family-complex="Wingdings"/>
    </style:style>
    <style:style style:parent-style-name="1005" style:display-name="T190" style:family="text" style:name="2399">
      <style:paragraph-properties/>
      <style:text-properties fo:font-family="Symbol" style:font-family-complex="Symbol"/>
    </style:style>
    <style:style style:parent-style-name="1005" style:display-name="T191" style:family="text" style:name="2400">
      <style:paragraph-properties/>
    </style:style>
    <style:style style:parent-style-name="1005" style:display-name="T192" style:family="text" style:name="2401">
      <style:paragraph-properties/>
      <style:text-properties fo:font-family="Wingdings" style:font-family-complex="Wingdings"/>
    </style:style>
    <style:style style:parent-style-name="1005" style:display-name="T193" style:family="text" style:name="2402">
      <style:paragraph-properties/>
      <style:text-properties fo:font-family="Symbol" style:font-family-complex="Symbol"/>
    </style:style>
    <style:style style:parent-style-name="1005" style:display-name="T194" style:family="text" style:name="2403">
      <style:paragraph-properties/>
      <style:text-properties fo:font-family="Courier New" style:font-family-complex="Courier New"/>
    </style:style>
    <style:style style:parent-style-name="1005" style:display-name="T195" style:family="text" style:name="2404">
      <style:paragraph-properties/>
      <style:text-properties fo:font-family="Wingdings" style:font-family-complex="Wingdings"/>
    </style:style>
    <style:style style:parent-style-name="1005" style:display-name="T196" style:family="text" style:name="2405">
      <style:paragraph-properties/>
      <style:text-properties fo:font-family="Symbol" style:font-family-complex="Symbol"/>
    </style:style>
    <style:style style:parent-style-name="1005" style:display-name="T197" style:family="text" style:name="2406">
      <style:paragraph-properties/>
      <style:text-properties fo:font-family="Courier New" style:font-family-complex="Courier New"/>
    </style:style>
    <style:style style:parent-style-name="1005" style:display-name="T198" style:family="text" style:name="2407">
      <style:paragraph-properties/>
      <style:text-properties fo:font-family="Wingdings" style:font-family-complex="Wingdings"/>
    </style:style>
    <style:style style:parent-style-name="1005" style:display-name="T1" style:family="text" style:name="2408">
      <style:paragraph-properties/>
    </style:style>
    <style:style style:parent-style-name="1005" style:display-name="T2" style:family="text" style:name="2409">
      <style:paragraph-properties/>
    </style:style>
    <style:style style:parent-style-name="1005" style:display-name="T3" style:family="text" style:name="2410">
      <style:paragraph-properties/>
    </style:style>
    <style:style style:parent-style-name="1005" style:display-name="T4" style:family="text" style:name="2411">
      <style:paragraph-properties/>
    </style:style>
    <style:style style:parent-style-name="1005" style:display-name="T5" style:family="text" style:name="2412">
      <style:paragraph-properties/>
    </style:style>
    <style:style style:parent-style-name="1005" style:display-name="T6" style:family="text" style:name="2413">
      <style:paragraph-properties/>
    </style:style>
    <style:style style:parent-style-name="1005" style:display-name="T7" style:family="text" style:name="2414">
      <style:paragraph-properties/>
    </style:style>
    <style:style style:parent-style-name="1005" style:display-name="T8" style:family="text" style:name="2415">
      <style:paragraph-properties/>
    </style:style>
    <style:style style:parent-style-name="1005" style:display-name="T9" style:family="text" style:name="2416">
      <style:paragraph-properties/>
    </style:style>
    <style:style style:parent-style-name="1005" style:display-name="T10" style:family="text" style:name="2417">
      <style:paragraph-properties/>
    </style:style>
    <style:style style:parent-style-name="1005" style:display-name="T11" style:family="text" style:name="2418">
      <style:paragraph-properties/>
    </style:style>
    <style:style style:parent-style-name="1005" style:display-name="T12" style:family="text" style:name="2419">
      <style:paragraph-properties/>
    </style:style>
    <style:style style:parent-style-name="1005" style:display-name="T13" style:family="text" style:name="2420">
      <style:paragraph-properties/>
    </style:style>
    <style:style style:parent-style-name="1005" style:display-name="T14" style:family="text" style:name="2421">
      <style:paragraph-properties/>
    </style:style>
    <style:style style:parent-style-name="1005" style:display-name="T15" style:family="text" style:name="2422">
      <style:paragraph-properties/>
    </style:style>
    <style:style style:parent-style-name="1005" style:display-name="T16" style:family="text" style:name="2423">
      <style:paragraph-properties/>
    </style:style>
    <style:style style:parent-style-name="1005" style:display-name="T17" style:family="text" style:name="2424">
      <style:paragraph-properties/>
    </style:style>
    <style:style style:parent-style-name="1005" style:display-name="T18" style:family="text" style:name="2425">
      <style:paragraph-properties/>
    </style:style>
    <style:style style:parent-style-name="1005" style:display-name="T19" style:family="text" style:name="2426">
      <style:paragraph-properties/>
    </style:style>
    <style:style style:parent-style-name="1005" style:display-name="T20" style:family="text" style:name="2427">
      <style:paragraph-properties/>
    </style:style>
    <style:style style:parent-style-name="1005" style:display-name="T21" style:family="text" style:name="2428">
      <style:paragraph-properties/>
    </style:style>
    <style:style style:parent-style-name="1005" style:display-name="T22" style:family="text" style:name="2429">
      <style:paragraph-properties/>
    </style:style>
    <style:style style:parent-style-name="1005" style:display-name="T23" style:family="text" style:name="2430">
      <style:paragraph-properties/>
    </style:style>
    <style:style style:parent-style-name="1005" style:display-name="T24" style:family="text" style:name="2431">
      <style:paragraph-properties/>
    </style:style>
    <style:style style:parent-style-name="1005" style:display-name="T25" style:family="text" style:name="2432">
      <style:paragraph-properties/>
    </style:style>
    <style:style style:parent-style-name="1005" style:display-name="T26" style:family="text" style:name="2433">
      <style:paragraph-properties/>
    </style:style>
    <style:style style:parent-style-name="1005" style:display-name="T27" style:family="text" style:name="2434">
      <style:paragraph-properties/>
    </style:style>
    <style:style style:parent-style-name="1005" style:display-name="T28" style:family="text" style:name="2435">
      <style:paragraph-properties/>
    </style:style>
    <style:style style:parent-style-name="1005" style:display-name="T29" style:family="text" style:name="2436">
      <style:paragraph-properties/>
    </style:style>
    <style:style style:parent-style-name="1005" style:display-name="T30" style:family="text" style:name="2437">
      <style:paragraph-properties/>
    </style:style>
    <style:style style:parent-style-name="1005" style:display-name="T31" style:family="text" style:name="2438">
      <style:paragraph-properties/>
    </style:style>
    <style:style style:parent-style-name="1005" style:display-name="T32" style:family="text" style:name="2439">
      <style:paragraph-properties/>
    </style:style>
    <style:style style:parent-style-name="1005" style:display-name="T33" style:family="text" style:name="2440">
      <style:paragraph-properties/>
    </style:style>
    <style:style style:parent-style-name="1005" style:display-name="T34" style:family="text" style:name="2441">
      <style:paragraph-properties/>
    </style:style>
    <style:style style:parent-style-name="1005" style:display-name="T35" style:family="text" style:name="2442">
      <style:paragraph-properties/>
    </style:style>
    <style:style style:parent-style-name="1005" style:display-name="T36" style:family="text" style:name="2443">
      <style:paragraph-properties/>
    </style:style>
    <style:style style:parent-style-name="1005" style:display-name="T37" style:family="text" style:name="2444">
      <style:paragraph-properties/>
    </style:style>
    <style:style style:parent-style-name="1005" style:display-name="T38" style:family="text" style:name="2445">
      <style:paragraph-properties/>
    </style:style>
    <style:style style:parent-style-name="1005" style:display-name="T39" style:family="text" style:name="2446">
      <style:paragraph-properties/>
    </style:style>
    <style:style style:parent-style-name="1005" style:display-name="T40" style:family="text" style:name="2447">
      <style:paragraph-properties/>
    </style:style>
    <style:style style:parent-style-name="1005" style:display-name="T41" style:family="text" style:name="2448">
      <style:paragraph-properties/>
    </style:style>
    <style:style style:parent-style-name="1005" style:display-name="T42" style:family="text" style:name="2449">
      <style:paragraph-properties/>
    </style:style>
    <style:style style:parent-style-name="1005" style:display-name="T43" style:family="text" style:name="2450">
      <style:paragraph-properties/>
    </style:style>
    <style:style style:parent-style-name="1005" style:display-name="T44" style:family="text" style:name="2451">
      <style:paragraph-properties/>
    </style:style>
    <style:style style:parent-style-name="1005" style:display-name="T45" style:family="text" style:name="2452">
      <style:paragraph-properties/>
    </style:style>
    <style:style style:parent-style-name="1005" style:display-name="T46" style:family="text" style:name="2453">
      <style:paragraph-properties/>
    </style:style>
    <style:style style:parent-style-name="1005" style:display-name="T47" style:family="text" style:name="2454">
      <style:paragraph-properties/>
    </style:style>
    <style:style style:parent-style-name="1005" style:display-name="T48" style:family="text" style:name="2455">
      <style:paragraph-properties/>
    </style:style>
    <style:style style:parent-style-name="1005" style:display-name="T49" style:family="text" style:name="2456">
      <style:paragraph-properties/>
    </style:style>
    <style:style style:parent-style-name="1005" style:display-name="T50" style:family="text" style:name="2457">
      <style:paragraph-properties/>
    </style:style>
    <style:style style:parent-style-name="1005" style:display-name="T51" style:family="text" style:name="2458">
      <style:paragraph-properties/>
    </style:style>
    <style:style style:parent-style-name="1005" style:display-name="T52" style:family="text" style:name="2459">
      <style:paragraph-properties/>
    </style:style>
    <style:style style:parent-style-name="1005" style:display-name="T53" style:family="text" style:name="2460">
      <style:paragraph-properties/>
    </style:style>
    <style:style style:parent-style-name="1005" style:display-name="T54" style:family="text" style:name="2461">
      <style:paragraph-properties/>
    </style:style>
    <style:style style:parent-style-name="1005" style:display-name="T55" style:family="text" style:name="2462">
      <style:paragraph-properties/>
    </style:style>
    <style:style style:parent-style-name="1005" style:display-name="T56" style:family="text" style:name="2463">
      <style:paragraph-properties/>
    </style:style>
    <style:style style:parent-style-name="1005" style:display-name="T57" style:family="text" style:name="2464">
      <style:paragraph-properties/>
    </style:style>
    <style:style style:parent-style-name="1005" style:display-name="T58" style:family="text" style:name="2465">
      <style:paragraph-properties/>
    </style:style>
    <style:style style:parent-style-name="1005" style:display-name="T59" style:family="text" style:name="2466">
      <style:paragraph-properties/>
    </style:style>
    <style:style style:parent-style-name="1005" style:display-name="T60" style:family="text" style:name="2467">
      <style:paragraph-properties/>
    </style:style>
    <style:style style:parent-style-name="1005" style:display-name="T61" style:family="text" style:name="2468">
      <style:paragraph-properties/>
    </style:style>
    <style:style style:parent-style-name="1005" style:display-name="T62" style:family="text" style:name="2469">
      <style:paragraph-properties/>
    </style:style>
    <style:style style:parent-style-name="1005" style:display-name="T63" style:family="text" style:name="2470">
      <style:paragraph-properties/>
    </style:style>
    <style:style style:parent-style-name="1005" style:display-name="T64" style:family="text" style:name="2471">
      <style:paragraph-properties/>
    </style:style>
    <style:style style:parent-style-name="1005" style:display-name="T65" style:family="text" style:name="2472">
      <style:paragraph-properties/>
    </style:style>
    <style:style style:parent-style-name="1005" style:display-name="T66" style:family="text" style:name="2473">
      <style:paragraph-properties/>
    </style:style>
    <style:style style:parent-style-name="1005" style:display-name="T67" style:family="text" style:name="2474">
      <style:paragraph-properties/>
    </style:style>
    <style:style style:parent-style-name="1005" style:display-name="T68" style:family="text" style:name="2475">
      <style:paragraph-properties/>
    </style:style>
    <style:style style:parent-style-name="1005" style:display-name="T69" style:family="text" style:name="2476">
      <style:paragraph-properties/>
    </style:style>
    <style:style style:parent-style-name="1005" style:display-name="T70" style:family="text" style:name="2477">
      <style:paragraph-properties/>
    </style:style>
    <style:style style:parent-style-name="1005" style:display-name="T71" style:family="text" style:name="2478">
      <style:paragraph-properties/>
    </style:style>
    <style:style style:parent-style-name="1005" style:display-name="T72" style:family="text" style:name="2479">
      <style:paragraph-properties/>
    </style:style>
    <style:style style:parent-style-name="1005" style:display-name="T73" style:family="text" style:name="2480">
      <style:paragraph-properties/>
    </style:style>
    <style:style style:parent-style-name="1005" style:display-name="T74" style:family="text" style:name="2481">
      <style:paragraph-properties/>
    </style:style>
    <style:style style:parent-style-name="1005" style:display-name="T75" style:family="text" style:name="2482">
      <style:paragraph-properties/>
    </style:style>
    <style:style style:parent-style-name="1005" style:display-name="T76" style:family="text" style:name="2483">
      <style:paragraph-properties/>
    </style:style>
    <style:style style:parent-style-name="1005" style:display-name="T77" style:family="text" style:name="2484">
      <style:paragraph-properties/>
    </style:style>
    <style:style style:parent-style-name="1005" style:display-name="T78" style:family="text" style:name="2485">
      <style:paragraph-properties/>
    </style:style>
    <style:style style:parent-style-name="1005" style:display-name="T79" style:family="text" style:name="2486">
      <style:paragraph-properties/>
    </style:style>
    <style:style style:parent-style-name="1005" style:display-name="T80" style:family="text" style:name="2487">
      <style:paragraph-properties/>
    </style:style>
    <style:style style:parent-style-name="1005" style:display-name="T81" style:family="text" style:name="2488">
      <style:paragraph-properties/>
    </style:style>
    <style:style style:parent-style-name="1005" style:display-name="T82" style:family="text" style:name="2489">
      <style:paragraph-properties/>
    </style:style>
    <style:style style:parent-style-name="1005" style:display-name="T83" style:family="text" style:name="2490">
      <style:paragraph-properties/>
    </style:style>
    <style:style style:parent-style-name="1005" style:display-name="T84" style:family="text" style:name="2491">
      <style:paragraph-properties/>
    </style:style>
    <style:style style:parent-style-name="1005" style:display-name="T85" style:family="text" style:name="2492">
      <style:paragraph-properties/>
    </style:style>
    <style:style style:parent-style-name="1005" style:display-name="T86" style:family="text" style:name="2493">
      <style:paragraph-properties/>
    </style:style>
    <style:style style:parent-style-name="1005" style:display-name="T87" style:family="text" style:name="2494">
      <style:paragraph-properties/>
    </style:style>
    <style:style style:parent-style-name="1005" style:display-name="T88" style:family="text" style:name="2495">
      <style:paragraph-properties/>
    </style:style>
    <style:style style:parent-style-name="1005" style:display-name="T89" style:family="text" style:name="2496">
      <style:paragraph-properties/>
    </style:style>
    <style:style style:parent-style-name="1005" style:display-name="T90" style:family="text" style:name="2497">
      <style:paragraph-properties/>
    </style:style>
    <style:style style:parent-style-name="1005" style:display-name="T91" style:family="text" style:name="2498">
      <style:paragraph-properties/>
    </style:style>
    <style:style style:parent-style-name="1005" style:display-name="T92" style:family="text" style:name="2499">
      <style:paragraph-properties/>
    </style:style>
    <style:style style:parent-style-name="1005" style:display-name="T93" style:family="text" style:name="2500">
      <style:paragraph-properties/>
    </style:style>
    <style:style style:parent-style-name="1005" style:display-name="T94" style:family="text" style:name="2501">
      <style:paragraph-properties/>
    </style:style>
    <style:style style:parent-style-name="1005" style:display-name="T95" style:family="text" style:name="2502">
      <style:paragraph-properties/>
    </style:style>
    <style:style style:parent-style-name="1005" style:display-name="T96" style:family="text" style:name="2503">
      <style:paragraph-properties/>
    </style:style>
    <style:style style:parent-style-name="1005" style:display-name="T97" style:family="text" style:name="2504">
      <style:paragraph-properties/>
    </style:style>
    <style:style style:parent-style-name="1005" style:display-name="T98" style:family="text" style:name="2505">
      <style:paragraph-properties/>
    </style:style>
    <style:style style:parent-style-name="1005" style:display-name="T99" style:family="text" style:name="2506">
      <style:paragraph-properties/>
    </style:style>
    <style:style style:parent-style-name="1005" style:display-name="T100" style:family="text" style:name="2507">
      <style:paragraph-properties/>
    </style:style>
    <style:style style:parent-style-name="1005" style:display-name="T101" style:family="text" style:name="2508">
      <style:paragraph-properties/>
    </style:style>
    <style:style style:parent-style-name="1005" style:display-name="T102" style:family="text" style:name="2509">
      <style:paragraph-properties/>
    </style:style>
    <style:style style:parent-style-name="1005" style:display-name="T103" style:family="text" style:name="2510">
      <style:paragraph-properties/>
    </style:style>
    <style:style style:parent-style-name="1005" style:display-name="T104" style:family="text" style:name="2511">
      <style:paragraph-properties/>
    </style:style>
    <style:style style:parent-style-name="1005" style:display-name="T105" style:family="text" style:name="2512">
      <style:paragraph-properties/>
    </style:style>
    <style:style style:parent-style-name="1005" style:display-name="T106" style:family="text" style:name="2513">
      <style:paragraph-properties/>
    </style:style>
    <style:style style:parent-style-name="1005" style:display-name="T107" style:family="text" style:name="2514">
      <style:paragraph-properties/>
    </style:style>
    <style:style style:parent-style-name="1005" style:display-name="T108" style:family="text" style:name="2515">
      <style:paragraph-properties/>
    </style:style>
    <style:style style:parent-style-name="1005" style:display-name="T109" style:family="text" style:name="2516">
      <style:paragraph-properties/>
    </style:style>
    <style:style style:parent-style-name="1005" style:display-name="T110" style:family="text" style:name="2517">
      <style:paragraph-properties/>
    </style:style>
    <style:style style:parent-style-name="1005" style:display-name="T111" style:family="text" style:name="2518">
      <style:paragraph-properties/>
    </style:style>
    <style:style style:parent-style-name="1005" style:display-name="T112" style:family="text" style:name="2519">
      <style:paragraph-properties/>
    </style:style>
    <style:style style:parent-style-name="1005" style:display-name="T113" style:family="text" style:name="2520">
      <style:paragraph-properties/>
    </style:style>
    <style:style style:parent-style-name="1005" style:display-name="T114" style:family="text" style:name="2521">
      <style:paragraph-properties/>
    </style:style>
    <style:style style:parent-style-name="1005" style:display-name="T115" style:family="text" style:name="2522">
      <style:paragraph-properties/>
    </style:style>
    <style:style style:parent-style-name="1005" style:display-name="T116" style:family="text" style:name="2523">
      <style:paragraph-properties/>
    </style:style>
    <style:style style:parent-style-name="1005" style:display-name="T117" style:family="text" style:name="2524">
      <style:paragraph-properties/>
    </style:style>
    <style:style style:parent-style-name="1005" style:display-name="T118" style:family="text" style:name="2525">
      <style:paragraph-properties/>
    </style:style>
    <style:style style:parent-style-name="1005" style:display-name="T119" style:family="text" style:name="2526">
      <style:paragraph-properties/>
    </style:style>
    <style:style style:parent-style-name="1005" style:display-name="T120" style:family="text" style:name="2527">
      <style:paragraph-properties/>
    </style:style>
    <style:style style:parent-style-name="1005" style:display-name="T121" style:family="text" style:name="2528">
      <style:paragraph-properties/>
    </style:style>
    <style:style style:parent-style-name="1005" style:display-name="T122" style:family="text" style:name="2529">
      <style:paragraph-properties/>
    </style:style>
    <style:style style:parent-style-name="1005" style:display-name="T123" style:family="text" style:name="2530">
      <style:paragraph-properties/>
    </style:style>
    <style:style style:parent-style-name="1005" style:display-name="T124" style:family="text" style:name="2531">
      <style:paragraph-properties/>
    </style:style>
    <style:style style:parent-style-name="1005" style:display-name="T125" style:family="text" style:name="2532">
      <style:paragraph-properties/>
    </style:style>
    <style:style style:parent-style-name="1005" style:display-name="T126" style:family="text" style:name="2533">
      <style:paragraph-properties/>
    </style:style>
    <style:style style:parent-style-name="1005" style:display-name="T127" style:family="text" style:name="2534">
      <style:paragraph-properties/>
    </style:style>
    <style:style style:parent-style-name="1005" style:display-name="T128" style:family="text" style:name="2535">
      <style:paragraph-properties/>
    </style:style>
    <style:style style:parent-style-name="1005" style:display-name="T129" style:family="text" style:name="2536">
      <style:paragraph-properties/>
    </style:style>
    <style:style style:parent-style-name="1005" style:display-name="T130" style:family="text" style:name="2537">
      <style:paragraph-properties/>
    </style:style>
    <style:style style:parent-style-name="1005" style:display-name="T131" style:family="text" style:name="2538">
      <style:paragraph-properties/>
    </style:style>
    <style:style style:parent-style-name="1005" style:display-name="T132" style:family="text" style:name="2539">
      <style:paragraph-properties/>
    </style:style>
    <style:style style:parent-style-name="1005" style:display-name="T133" style:family="text" style:name="2540">
      <style:paragraph-properties/>
    </style:style>
    <style:style style:parent-style-name="1005" style:display-name="T134" style:family="text" style:name="2541">
      <style:paragraph-properties/>
    </style:style>
    <style:style style:parent-style-name="1005" style:display-name="T135" style:family="text" style:name="2542">
      <style:paragraph-properties/>
    </style:style>
    <style:style style:parent-style-name="1005" style:display-name="T136" style:family="text" style:name="2543">
      <style:paragraph-properties/>
    </style:style>
    <style:style style:parent-style-name="1005" style:display-name="T137" style:family="text" style:name="2544">
      <style:paragraph-properties/>
    </style:style>
    <style:style style:parent-style-name="1005" style:display-name="T138" style:family="text" style:name="2545">
      <style:paragraph-properties/>
    </style:style>
    <style:style style:parent-style-name="1005" style:display-name="T139" style:family="text" style:name="2546">
      <style:paragraph-properties/>
    </style:style>
    <style:style style:parent-style-name="1005" style:display-name="T140" style:family="text" style:name="2547">
      <style:paragraph-properties/>
    </style:style>
    <style:style style:parent-style-name="1005" style:display-name="T141" style:family="text" style:name="2548">
      <style:paragraph-properties/>
    </style:style>
    <style:style style:parent-style-name="1005" style:display-name="T142" style:family="text" style:name="2549">
      <style:paragraph-properties/>
    </style:style>
    <style:style style:parent-style-name="1005" style:display-name="T143" style:family="text" style:name="2550">
      <style:paragraph-properties/>
    </style:style>
    <style:style style:parent-style-name="1005" style:display-name="T144" style:family="text" style:name="2551">
      <style:paragraph-properties/>
    </style:style>
    <style:style style:parent-style-name="1005" style:display-name="T145" style:family="text" style:name="2552">
      <style:paragraph-properties/>
    </style:style>
    <style:style style:parent-style-name="1005" style:display-name="T146" style:family="text" style:name="2553">
      <style:paragraph-properties/>
      <style:text-properties fo:font-family="Courier New" style:font-family-complex="Courier New"/>
    </style:style>
    <style:style style:parent-style-name="1005" style:display-name="T147" style:family="text" style:name="2554">
      <style:paragraph-properties/>
      <style:text-properties fo:font-family="Wingdings" style:font-family-complex="Wingdings"/>
    </style:style>
    <style:style style:parent-style-name="1005" style:display-name="T148" style:family="text" style:name="2555">
      <style:paragraph-properties/>
      <style:text-properties fo:font-family="Symbol" style:font-family-complex="Symbol"/>
    </style:style>
    <style:style style:parent-style-name="1005" style:display-name="T149" style:family="text" style:name="2556">
      <style:paragraph-properties/>
      <style:text-properties fo:font-family="Courier New" style:font-family-complex="Courier New"/>
    </style:style>
    <style:style style:parent-style-name="1005" style:display-name="T150" style:family="text" style:name="2557">
      <style:paragraph-properties/>
      <style:text-properties fo:font-family="Wingdings" style:font-family-complex="Wingdings"/>
    </style:style>
    <style:style style:parent-style-name="1005" style:display-name="T151" style:family="text" style:name="2558">
      <style:paragraph-properties/>
      <style:text-properties fo:font-family="Symbol" style:font-family-complex="Symbol"/>
    </style:style>
    <style:style style:parent-style-name="1005" style:display-name="T152" style:family="text" style:name="2559">
      <style:paragraph-properties/>
      <style:text-properties fo:font-family="Courier New" style:font-family-complex="Courier New"/>
    </style:style>
    <style:style style:parent-style-name="1005" style:display-name="T153" style:family="text" style:name="2560">
      <style:paragraph-properties/>
      <style:text-properties fo:font-family="Wingdings" style:font-family-complex="Wingdings"/>
    </style:style>
    <style:style style:parent-style-name="1005" style:display-name="T154" style:family="text" style:name="2561">
      <style:paragraph-properties/>
      <style:text-properties fo:font-family="Symbol" style:font-family-complex="Symbol"/>
    </style:style>
    <style:style style:parent-style-name="1005" style:display-name="T155" style:family="text" style:name="2562">
      <style:paragraph-properties/>
      <style:text-properties fo:font-family="Courier New" style:font-family-complex="Courier New"/>
    </style:style>
    <style:style style:parent-style-name="1005" style:display-name="T156" style:family="text" style:name="2563">
      <style:paragraph-properties/>
      <style:text-properties fo:font-family="Wingdings" style:font-family-complex="Wingdings"/>
    </style:style>
    <style:style style:parent-style-name="1005" style:display-name="T157" style:family="text" style:name="2564">
      <style:paragraph-properties/>
      <style:text-properties fo:font-family="Symbol" style:font-family-complex="Symbol"/>
    </style:style>
    <style:style style:parent-style-name="1005" style:display-name="T158" style:family="text" style:name="2565">
      <style:paragraph-properties/>
      <style:text-properties fo:font-family="Courier New" style:font-family-complex="Courier New"/>
    </style:style>
    <style:style style:parent-style-name="1005" style:display-name="T159" style:family="text" style:name="2566">
      <style:paragraph-properties/>
      <style:text-properties fo:font-family="Wingdings" style:font-family-complex="Wingdings"/>
    </style:style>
    <style:style style:parent-style-name="1005" style:display-name="T160" style:family="text" style:name="2567">
      <style:paragraph-properties/>
      <style:text-properties fo:font-family="Symbol" style:font-family-complex="Symbol"/>
    </style:style>
    <style:style style:parent-style-name="1005" style:display-name="T161" style:family="text" style:name="2568">
      <style:paragraph-properties/>
      <style:text-properties fo:font-family="Courier New" style:font-family-complex="Courier New"/>
    </style:style>
    <style:style style:parent-style-name="1005" style:display-name="T162" style:family="text" style:name="2569">
      <style:paragraph-properties/>
      <style:text-properties fo:font-family="Wingdings" style:font-family-complex="Wingdings"/>
    </style:style>
    <style:style style:parent-style-name="1005" style:display-name="T163" style:family="text" style:name="2570">
      <style:paragraph-properties/>
      <style:text-properties fo:font-family="Symbol" style:font-family-complex="Symbol" fo:font-weight="bold"/>
    </style:style>
    <style:style style:parent-style-name="1005" style:display-name="T164" style:family="text" style:name="2571">
      <style:paragraph-properties/>
      <style:text-properties fo:font-family="Symbol" style:font-family-complex="Symbol"/>
    </style:style>
    <style:style style:parent-style-name="1005" style:display-name="T165" style:family="text" style:name="2572">
      <style:paragraph-properties/>
      <style:text-properties fo:font-family="Wingdings" style:font-family-complex="Wingdings"/>
    </style:style>
    <style:style style:parent-style-name="1005" style:display-name="T166" style:family="text" style:name="2573">
      <style:paragraph-properties/>
      <style:text-properties fo:font-family="Symbol" style:font-family-complex="Symbol"/>
    </style:style>
    <style:style style:parent-style-name="1005" style:display-name="T167" style:family="text" style:name="2574">
      <style:paragraph-properties/>
      <style:text-properties fo:font-family="Courier New" style:font-family-complex="Courier New"/>
    </style:style>
    <style:style style:parent-style-name="1005" style:display-name="T168" style:family="text" style:name="2575">
      <style:paragraph-properties/>
      <style:text-properties fo:font-family="Wingdings" style:font-family-complex="Wingdings"/>
    </style:style>
    <style:style style:parent-style-name="1005" style:display-name="T169" style:family="text" style:name="2576">
      <style:paragraph-properties/>
      <style:text-properties fo:font-family="Symbol" style:font-family-complex="Symbol"/>
    </style:style>
    <style:style style:parent-style-name="1005" style:display-name="T170" style:family="text" style:name="2577">
      <style:paragraph-properties/>
      <style:text-properties fo:font-family="Courier New" style:font-family-complex="Courier New"/>
    </style:style>
    <style:style style:parent-style-name="1005" style:display-name="T171" style:family="text" style:name="2578">
      <style:paragraph-properties/>
      <style:text-properties fo:font-family="Wingdings" style:font-family-complex="Wingdings"/>
    </style:style>
    <style:style style:parent-style-name="1005" style:display-name="T172" style:family="text" style:name="2579">
      <style:paragraph-properties/>
      <style:text-properties fo:font-family="Symbol" style:font-family-complex="Symbol"/>
    </style:style>
    <style:style style:parent-style-name="1005" style:display-name="T173" style:family="text" style:name="2580">
      <style:paragraph-properties/>
      <style:text-properties fo:font-family="Courier New" style:font-family-complex="Courier New"/>
    </style:style>
    <style:style style:parent-style-name="1005" style:display-name="T174" style:family="text" style:name="2581">
      <style:paragraph-properties/>
      <style:text-properties fo:font-family="Wingdings" style:font-family-complex="Wingdings"/>
    </style:style>
    <style:style style:parent-style-name="1005" style:display-name="T175" style:family="text" style:name="2582">
      <style:paragraph-properties/>
      <style:text-properties fo:font-family="Symbol" style:font-family-complex="Symbol"/>
    </style:style>
    <style:style style:parent-style-name="1005" style:display-name="T176" style:family="text" style:name="2583">
      <style:paragraph-properties/>
      <style:text-properties fo:font-family="Courier New" style:font-family-complex="Courier New"/>
    </style:style>
    <style:style style:parent-style-name="1005" style:display-name="T177" style:family="text" style:name="2584">
      <style:paragraph-properties/>
      <style:text-properties fo:font-family="Wingdings" style:font-family-complex="Wingdings"/>
    </style:style>
    <style:style style:parent-style-name="1005" style:display-name="T178" style:family="text" style:name="2585">
      <style:paragraph-properties/>
      <style:text-properties fo:font-family="Symbol" style:font-family-complex="Symbol"/>
    </style:style>
    <style:style style:parent-style-name="1005" style:display-name="T179" style:family="text" style:name="2586">
      <style:paragraph-properties/>
      <style:text-properties fo:font-family="Courier New" style:font-family-complex="Courier New"/>
    </style:style>
    <style:style style:parent-style-name="1005" style:display-name="T180" style:family="text" style:name="2587">
      <style:paragraph-properties/>
      <style:text-properties fo:font-family="Wingdings" style:font-family-complex="Wingdings"/>
    </style:style>
    <style:style style:parent-style-name="1005" style:display-name="T181" style:family="text" style:name="2588">
      <style:paragraph-properties/>
      <style:text-properties fo:font-family="Symbol" style:font-family-complex="Symbol"/>
    </style:style>
    <style:style style:parent-style-name="1005" style:display-name="T182" style:family="text" style:name="2589">
      <style:paragraph-properties/>
    </style:style>
    <style:style style:parent-style-name="1005" style:display-name="T183" style:family="text" style:name="2590">
      <style:paragraph-properties/>
      <style:text-properties fo:font-family="Wingdings" style:font-family-complex="Wingdings"/>
    </style:style>
    <style:style style:parent-style-name="1005" style:display-name="T184" style:family="text" style:name="2591">
      <style:paragraph-properties/>
      <style:text-properties fo:font-family="Symbol" style:font-family-complex="Symbol"/>
    </style:style>
    <style:style style:parent-style-name="1005" style:display-name="T185" style:family="text" style:name="2592">
      <style:paragraph-properties/>
      <style:text-properties fo:font-family="Courier New" style:font-family-complex="Courier New"/>
    </style:style>
    <style:style style:parent-style-name="1005" style:display-name="T186" style:family="text" style:name="2593">
      <style:paragraph-properties/>
      <style:text-properties fo:font-family="Wingdings" style:font-family-complex="Wingdings"/>
    </style:style>
    <style:style style:parent-style-name="1005" style:display-name="T187" style:family="text" style:name="2594">
      <style:paragraph-properties/>
      <style:text-properties fo:font-family="Symbol" style:font-family-complex="Symbol"/>
    </style:style>
    <style:style style:parent-style-name="1005" style:display-name="T188" style:family="text" style:name="2595">
      <style:paragraph-properties/>
      <style:text-properties fo:font-family="Courier New" style:font-family-complex="Courier New"/>
    </style:style>
    <style:style style:parent-style-name="1005" style:display-name="T189" style:family="text" style:name="2596">
      <style:paragraph-properties/>
      <style:text-properties fo:font-family="Wingdings" style:font-family-complex="Wingdings"/>
    </style:style>
    <style:style style:parent-style-name="1005" style:display-name="T190" style:family="text" style:name="2597">
      <style:paragraph-properties/>
      <style:text-properties fo:font-family="Symbol" style:font-family-complex="Symbol"/>
    </style:style>
    <style:style style:parent-style-name="1005" style:display-name="T191" style:family="text" style:name="2598">
      <style:paragraph-properties/>
    </style:style>
    <style:style style:parent-style-name="1005" style:display-name="T192" style:family="text" style:name="2599">
      <style:paragraph-properties/>
      <style:text-properties fo:font-family="Wingdings" style:font-family-complex="Wingdings"/>
    </style:style>
    <style:style style:parent-style-name="1005" style:display-name="T193" style:family="text" style:name="2600">
      <style:paragraph-properties/>
      <style:text-properties fo:font-family="Symbol" style:font-family-complex="Symbol"/>
    </style:style>
    <style:style style:parent-style-name="1005" style:display-name="T194" style:family="text" style:name="2601">
      <style:paragraph-properties/>
      <style:text-properties fo:font-family="Courier New" style:font-family-complex="Courier New"/>
    </style:style>
    <style:style style:parent-style-name="1005" style:display-name="T195" style:family="text" style:name="2602">
      <style:paragraph-properties/>
      <style:text-properties fo:font-family="Wingdings" style:font-family-complex="Wingdings"/>
    </style:style>
    <style:style style:parent-style-name="1005" style:display-name="T196" style:family="text" style:name="2603">
      <style:paragraph-properties/>
      <style:text-properties fo:font-family="Symbol" style:font-family-complex="Symbol"/>
    </style:style>
    <style:style style:parent-style-name="1005" style:display-name="T197" style:family="text" style:name="2604">
      <style:paragraph-properties/>
      <style:text-properties fo:font-family="Courier New" style:font-family-complex="Courier New"/>
    </style:style>
    <style:style style:parent-style-name="1005" style:display-name="T198" style:family="text" style:name="2605">
      <style:paragraph-properties/>
      <style:text-properties fo:font-family="Wingdings" style:font-family-complex="Wingdings"/>
    </style:style>
    <style:style style:parent-style-name="693" style:display-name="text-3" style:family="paragraph" style:name="1_8">
      <style:paragraph-properties fo:line-height="100%" fo:text-align="left" fo:margin-left="0cm" fo:margin-right="0cm" fo:text-indent="0cm" fo:margin-top="18pt" fo:margin-bottom="4pt" style:contextual-spacing="true" fo:border="none"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695" style:display-name="text-3-c" style:family="text" style:name="1_9">
      <style:paragraph-properties/>
      <style:text-properties fo:color="#0f4761" fo:font-family="Arial" style:font-family-asian="Arial" style:font-family-complex="Arial" fo:font-size="20pt" style:font-size-complex="20pt" fo:font-weight="bold"/>
    </style:style>
    <style:style style:display-name="text-5" style:family="paragraph" style:name="1_10">
      <style:paragraph-properties fo:line-height="100%" fo:text-align="left" fo:margin-left="0cm" fo:margin-right="0cm" fo:text-indent="0cm" fo:margin-top="0pt" fo:margin-bottom="7.5pt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5-c" style:family="text" style:name="1_11">
      <style:paragraph-properties/>
      <style:text-properties fo:color="#000000" fo:font-family="Arial" style:font-family-asian="Arial" style:font-family-complex="Arial"/>
    </style:style>
    <style:style style:parent-style-name="699" style:display-name="text-8" style:family="paragraph" style:name="1_12">
      <style:paragraph-properties fo:line-height="100%" fo:text-align="left" fo:margin-left="1.27cm" fo:margin-right="0cm" fo:text-indent="0cm" fo:margin-top="0pt" fo:margin-bottom="7.5pt" style:contextual-spacing="true" fo:border="none"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8-c" style:family="text" style:name="1_13">
      <style:paragraph-properties/>
      <style:text-properties fo:color="#000000" fo:font-family="Arial" style:font-family-asian="Arial" style:font-family-complex="Arial"/>
    </style:style>
    <style:style style:parent-style-name="702" style:display-name="text-13" style:family="paragraph" style:name="1_14">
      <style:paragraph-properties fo:line-height="100%" fo:text-align="left" fo:margin-left="0cm" fo:margin-right="0cm" fo:text-indent="0cm" fo:margin-top="8pt" fo:margin-bottom="4pt" style:contextual-spacing="true" fo:border="none"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704" style:display-name="text-13-c" style:family="text" style:name="1_15">
      <style:paragraph-properties/>
      <style:text-properties fo:color="#0f4761" fo:font-family="Arial" style:font-family-asian="Arial" style:font-family-complex="Arial" fo:font-size="16pt" style:font-size-complex="16pt" fo:font-weight="bold"/>
    </style:style>
    <style:style style:display-name="text-16" style:family="paragraph" style:name="1_16">
      <style:paragraph-properties style:line-height-at-least="0.05pt" fo:text-align="left" fo:margin-left="0cm" fo:margin-right="0cm" fo:text-indent="0cm" fo:margin-top="0pt" fo:margin-bottom="7.5pt" fo:background-color="#f8f8f8" style:contextual-spacing="true" fo:border="0.00882cm solid #FFFFFF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16-c" style:family="text" style:name="1_17">
      <style:paragraph-properties/>
      <style:text-properties fo:color="#000000" fo:font-family="Menlo" style:font-family-asian="Menlo" style:font-family-complex="Menlo" fo:font-size="11pt" style:font-size-complex="11pt" fo:background-color="#f8f8f8"/>
    </style:style>
    <style:style style:display-name="text-20" style:family="paragraph" style:name="1_18">
      <style:paragraph-properties fo:line-height="100%" fo:text-align="left" fo:margin-left="0cm" fo:margin-right="0cm" fo:text-indent="0cm" fo:margin-top="8pt" fo:margin-bottom="4pt" fo:background-color="#f9f2f4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20-c" style:family="text" style:name="1_19">
      <style:paragraph-properties/>
      <style:text-properties fo:color="#c7254e" fo:font-family="Menlo" style:font-family-asian="Menlo" style:font-family-complex="Menlo" fo:font-size="12.5pt" style:font-size-complex="12.5pt" fo:background-color="#f9f2f4"/>
    </style:style>
    <style:style style:display-name="text-22" style:family="paragraph" style:name="1_20">
      <style:paragraph-properties fo:line-height="100%" fo:text-align="left" fo:margin-left="0cm" fo:margin-right="0cm" fo:text-indent="0cm" fo:margin-top="0pt" fo:margin-bottom="7.5pt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22-c" style:family="text" style:name="1_21">
      <style:paragraph-properties/>
      <style:text-properties fo:color="#000000" fo:font-family="Arial" style:font-family-asian="Arial" style:font-family-complex="Arial" fo:font-weight="bold"/>
    </style:style>
    <style:style style:display-name="text-29-c" style:family="text" style:name="1_22">
      <style:paragraph-properties/>
      <style:text-properties fo:color="#c7254e" fo:font-family="Menlo" style:font-family-asian="Menlo" style:font-family-complex="Menlo" fo:font-size="11pt" style:font-size-complex="11pt" fo:background-color="#f9f2f4"/>
    </style:style>
    <style:style style:display-name="text-58" style:family="paragraph" style:name="1_23">
      <style:paragraph-properties fo:line-height="100%" fo:text-align="center" fo:margin-left="0cm" fo:margin-right="0cm" fo:text-indent="0cm" fo:margin-top="0pt" fo:margin-bottom="15pt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58-c" style:family="text" style:name="1_24">
      <style:paragraph-properties/>
      <style:text-properties fo:color="#000000" fo:font-family="Arial" style:font-family-asian="Arial" style:font-family-complex="Arial" fo:font-weight="bold"/>
    </style:style>
    <style:style style:display-name="text-64" style:family="paragraph" style:name="1_25">
      <style:paragraph-properties style:line-height-at-least="0.05pt" fo:text-align="left" fo:margin-left="0cm" fo:margin-right="0cm" fo:text-indent="0cm" fo:margin-top="0pt" fo:margin-bottom="15pt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64-c" style:family="text" style:name="1_26">
      <style:paragraph-properties/>
      <style:text-properties fo:color="#c7254e" fo:font-family="Menlo" style:font-family-asian="Menlo" style:font-family-complex="Menlo" fo:font-size="11pt" style:font-size-complex="11pt"/>
    </style:style>
    <style:style style:display-name="text-65" style:family="paragraph" style:name="1_27">
      <style:paragraph-properties style:line-height-at-least="0.05pt" fo:text-align="left" fo:margin-left="0cm" fo:margin-right="0cm" fo:text-indent="0cm" fo:margin-top="0pt" fo:margin-bottom="15pt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65-c" style:family="text" style:name="1_28">
      <style:paragraph-properties/>
      <style:text-properties fo:color="#000000" fo:font-family="Arial" style:font-family-asian="Arial" style:font-family-complex="Arial"/>
    </style:style>
    <style:style style:parent-style-name="719" style:display-name="text-186" style:family="paragraph" style:name="1_29">
      <style:paragraph-properties fo:line-height="100%" fo:text-align="left" fo:margin-left="0cm" fo:margin-right="0cm" fo:text-indent="0cm" fo:margin-top="8pt" fo:margin-bottom="4pt" style:contextual-spacing="true" fo:border="none"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parent-style-name="721" style:display-name="text-186-c" style:family="text" style:name="1_30">
      <style:paragraph-properties/>
      <style:text-properties fo:color="#0f4761" fo:font-family="Arial" style:font-family-asian="Arial" style:font-family-complex="Arial" fo:font-size="14pt" style:font-size-complex="14pt" fo:font-weight="bold"/>
    </style:style>
    <style:style style:display-name="text-247" style:family="paragraph" style:name="1_31">
      <style:paragraph-properties fo:line-height="100%" fo:text-align="left" fo:margin-left="0cm" fo:margin-right="0cm" fo:text-indent="0cm" fo:margin-top="0pt" fo:margin-bottom="7.5pt" fo:background-color="#f9f2f4" style:contextual-spacing="true" fo:border="none"/>
      <style:text-properties fo:font-variant="normal" fo:text-transform="none" fo:color="#000000" style:text-line-through-type="none" fo:font-family="Times New Roman" style:font-family-asian="Times New Roman" style:font-family-complex="Times New Roman" fo:font-size="10pt" style:font-size-complex="10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247-c" style:family="text" style:name="1_32">
      <style:paragraph-properties/>
      <style:text-properties fo:color="#c7254e" fo:font-family="Menlo" style:font-family-asian="Menlo" style:font-family-complex="Menlo" fo:font-size="11pt" style:font-size-complex="11pt" fo:background-color="#f9f2f4"/>
    </style:style>
    <style:style style:display-name="text-405-c" style:family="text" style:name="1_33">
      <style:paragraph-properties/>
      <style:text-properties fo:color="#c7254e" fo:font-family="Menlo" style:font-family-asian="Menlo" style:font-family-complex="Menlo" fo:font-size="11pt" style:font-size-complex="11pt" fo:font-weight="bold"/>
    </style:style>
    <style:style style:parent-style-name="699" style:display-name="text-483" style:family="paragraph" style:name="1_34">
      <style:paragraph-properties fo:line-height="100%" fo:text-align="left" fo:margin-left="1.27cm" fo:margin-right="0cm" fo:text-indent="0cm" fo:margin-top="5pt" fo:margin-bottom="5pt" style:contextual-spacing="true" fo:border="none"/>
      <style:text-properties fo:font-variant="normal" fo:text-transform="none" fo:color="#000000" style:text-line-through-type="none" fo:font-family="Times New Roman" style:font-family-asian="Arial" style:font-family-complex="Times New Roman" fo:font-size="12pt" style:font-size-complex="12pt" fo:letter-spacing="0pt" fo:language="en" style:language-complex="ar" fo:country="US" style:country-complex="SA" fo:font-style="normal" style:text-underline-type="none" style:text-underline-width="auto" fo:font-weight="normal" text:display="none"/>
    </style:style>
    <style:style style:display-name="text-483-c" style:family="text" style:name="1_35">
      <style:paragraph-properties/>
      <style:text-properties fo:color="#000000" fo:font-family="Arial" style:font-family-asian="Arial" style:font-family-complex="Arial"/>
    </style:style>
    <style:style style:display-name="text-485-c" style:family="text" style:name="1_36">
      <style:paragraph-properties/>
      <style:text-properties fo:color="#c7254e" fo:font-family="Menlo" style:font-family-asian="Menlo" style:font-family-complex="Menlo" fo:font-size="11pt" style:font-size-complex="11pt" fo:background-color="#f9f2f4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 fo:font-weight="bold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Courier New" style:font-family-complex="Courier New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Courier New" style:font-family-complex="Courier New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Courier New" style:font-family-complex="Courier New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 fo:font-family="Symbol" style:font-family-complex="Symbol"/>
    </style:style>
    <style:style style:family="text" style:name="T191">
      <style:text-properties/>
    </style:style>
    <style:style style:family="text" style:name="T192">
      <style:text-properties fo:font-family="Wingdings" style:font-family-complex="Wingdings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Courier New" style:font-family-complex="Courier New"/>
    </style:style>
    <style:style style:family="text" style:name="T195">
      <style:text-properties fo:font-family="Wingdings" style:font-family-complex="Wingdings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Courier New" style:font-family-complex="Courier New"/>
    </style:style>
    <style:style style:family="text" style:name="T198">
      <style:text-properties fo:font-family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text:list-style style:name="WWNum1">
      <text:list-level-style-bullet text:level="1" text:style-name="T1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 fo:font-weight="bold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number text:level="1" text:style-name="T20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5">
      <text:list-level-style-number text:level="1" text:style-name="T21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18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1086" style:family="paragraph" style:name="P6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808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09">
      <style:text-properties fo:font-size="8pt" style:font-size-complex="8pt" fo:language="it" fo:country="IT" fo:font-weight="bold"/>
    </style:style>
    <style:style style:family="text" style:name="T181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811">
      <style:text-properties fo:font-size="8pt" style:font-size-complex="8pt" fo:language="it" fo:country="IT" fo:font-weight="bold"/>
    </style:style>
    <style:style style:family="text" style:name="T1812">
      <style:text-properties fo:font-size="8pt" style:font-size-complex="8pt" fo:language="it" fo:country="IT" fo:font-weight="normal"/>
    </style:style>
    <style:style style:family="text" style:name="T1813">
      <style:text-properties fo:font-size="8pt" style:font-size-complex="8pt" fo:language="it" fo:country="IT" fo:font-weight="normal"/>
    </style:style>
    <style:style style:family="text" style:name="T1814">
      <style:text-properties fo:font-size="8pt" style:font-size-complex="8pt" fo:language="it" fo:country="IT" fo:font-weight="bold"/>
    </style:style>
    <style:style style:parent-style-name="1086" style:family="paragraph" style:name="P7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815">
      <style:text-properties fo:font-size="8pt" style:font-size-complex="8pt" fo:language="it" fo:country="IT" fo:font-weight="bold"/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16">
      <style:text-properties fo:font-size="8pt" style:font-size-complex="8pt" fo:language="it" fo:country="IT" fo:font-weight="bold"/>
    </style:style>
    <style:style style:family="text" style:name="T181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818">
      <style:text-properties fo:font-size="8pt" style:font-size-complex="8pt" fo:language="it" fo:country="IT" fo:font-weight="bold"/>
    </style:style>
    <style:style style:family="text" style:name="T1819">
      <style:text-properties fo:font-size="8pt" style:font-size-complex="8pt" fo:language="it" fo:country="IT" fo:font-weight="normal"/>
    </style:style>
    <style:style style:family="text" style:name="T1820">
      <style:text-properties fo:font-size="8pt" style:font-size-complex="8pt" fo:language="it" fo:country="IT" fo:font-weight="normal"/>
    </style:style>
    <style:style style:family="text" style:name="T1821">
      <style:text-properties fo:font-size="8pt" style:font-size-complex="8pt" fo:language="it" fo:country="IT" fo:font-weight="bold"/>
    </style:style>
    <style:style style:parent-style-name="1086" style:family="paragraph" style:name="P36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484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85">
      <style:text-properties fo:font-size="8pt" style:font-size-complex="8pt" fo:language="it" fo:country="IT" fo:font-weight="bold"/>
    </style:style>
    <style:style style:family="text" style:name="T248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487">
      <style:text-properties fo:font-size="8pt" style:font-size-complex="8pt" fo:language="it" fo:country="IT" fo:font-weight="bold"/>
    </style:style>
    <style:style style:family="text" style:name="T2488">
      <style:text-properties fo:font-size="8pt" style:font-size-complex="8pt" fo:language="it" fo:country="IT" fo:font-weight="normal"/>
    </style:style>
    <style:style style:family="text" style:name="T2489">
      <style:text-properties fo:font-size="8pt" style:font-size-complex="8pt" fo:language="it" fo:country="IT" fo:font-weight="normal"/>
    </style:style>
    <style:style style:family="text" style:name="T2490">
      <style:text-properties fo:font-size="8pt" style:font-size-complex="8pt" fo:language="it" fo:country="IT" fo:font-weight="bold"/>
    </style:style>
    <style:style style:parent-style-name="1086" style:family="paragraph" style:name="P36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491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92">
      <style:text-properties fo:font-size="8pt" style:font-size-complex="8pt" fo:language="it" fo:country="IT" fo:font-weight="bold"/>
    </style:style>
    <style:style style:family="text" style:name="T249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494">
      <style:text-properties fo:font-size="8pt" style:font-size-complex="8pt" fo:language="it" fo:country="IT" fo:font-weight="bold"/>
    </style:style>
    <style:style style:family="text" style:name="T2495">
      <style:text-properties fo:font-size="8pt" style:font-size-complex="8pt" fo:language="it" fo:country="IT" fo:font-weight="normal"/>
    </style:style>
    <style:style style:family="text" style:name="T2496">
      <style:text-properties fo:font-size="8pt" style:font-size-complex="8pt" fo:language="it" fo:country="IT" fo:font-weight="normal"/>
    </style:style>
    <style:style style:family="text" style:name="T2497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>
      <style:footer>
        <text:p text:style-name="P68"><text:span text:style-name="T1808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1809"><text:tab/>GIACENZE CRYPTO : </text:span><text:span text:style-name="T1810">Esportazione files CSV</text:span><text:span text:style-name="T1811"><text:s/></text:span><text:span text:style-name="T1812">(Aggiornato alla versione 1.</text:span><text:span text:style-name="T1813">0.56)</text:span><text:span text:style-name="T181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2" style:page-layout-name="Mpm2">
      <style:footer>
        <text:p text:style-name="P70"><text:span text:style-name="T1815"/><text:span/><draw:frame draw:name="Copia Immagine13 1" draw:style-name="gr4" text:anchor-type="as-char" svg:width="0.619cm" svg:height="0.619cm" svg:x="0cm" svg:y="0cm"><draw:image xlink:href="Pictures/image1.png" xlink:type="simple" xlink:show="embed" xlink:actuate="onLoad"/></draw:frame><text:span text:style-name="T1816"><text:tab/>GIACENZE CRYPTO : </text:span><text:span text:style-name="T1817">Conf. JSON per l'importazione CSV generica</text:span><text:span text:style-name="T1818"><text:s/></text:span><text:span text:style-name="T1819">(Agg. alla v. 1.</text:span><text:span text:style-name="T1820">0.56)</text:span><text:span text:style-name="T182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362"><text:span text:style-name="T2491"/><text:span/><draw:frame draw:name="Copia Immagine13 1" draw:style-name="gr7" text:anchor-type="as-char" svg:width="0.619cm" svg:height="0.619cm" svg:x="0cm" svg:y="0cm"><draw:image xlink:href="Pictures/image1.png" xlink:type="simple" xlink:show="embed" xlink:actuate="onLoad"/></draw:frame><text:span text:style-name="T2492"><text:tab/>GIACENZE CRYPTO : </text:span><text:span text:style-name="T2493">Esportazione files CSV</text:span><text:span text:style-name="T2494"><text:s/></text:span><text:span text:style-name="T2495">(Aggiornato alla versione 1.</text:span><text:span text:style-name="T2496">0.56)</text:span><text:span text:style-name="T2497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4.0.129</meta:generator>
    <meta:creation-date>2024-07-12T21:04:48Z</meta:creation-date>
  </office:meta>
</office:document-meta>
</file>