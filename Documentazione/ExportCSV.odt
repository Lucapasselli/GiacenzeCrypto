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016" style:master-page-name="MasterPage2" style:family="paragraph" style:name="P50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72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parent-style-name="Graphics" style:family="graphic" style:name="gr4">
      <style:graphic-properties draw:image-opacity="100%"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773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7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52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6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7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53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9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780">
      <style:text-properties fo:color="#000000" fo:font-family="Eras Bold ITC" style:font-family-complex="Eras Bold ITC" fo:font-size="20pt" style:font-size-complex="20pt" fo:language="it" style:language-complex="hi" fo:country="IT" style:country-complex="IN" fo:font-weight="bold"/>
    </style:style>
    <style:style style:family="text" style:name="T781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782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7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5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85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7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5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88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7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56">
      <style:paragraph-properties fo:text-align="left" fo:margin-left="0cm" fo:margin-right="0cm" fo:text-indent="1.244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91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7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5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94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7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25" style:family="paragraph" style:name="P58">
      <style:paragraph-properties/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797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798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799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parent-style-name="1003" style:family="paragraph" style:name="P5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03" style:family="paragraph" style:name="P6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800">
      <style:text-properties fo:font-family="Liberation Sans" style:font-family-complex="Liberation Sans"/>
    </style:style>
    <style:style style:family="text" style:name="T801">
      <style:text-properties fo:font-family="Liberation Sans" style:font-family-complex="Liberation Sans"/>
    </style:style>
    <style:style style:family="text" style:name="T802">
      <style:text-properties fo:font-family="Liberation Sans" style:font-family-complex="Liberation Sans"/>
    </style:style>
    <style:style style:parent-style-name="1003" style:family="paragraph" style:name="P6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803">
      <style:text-properties fo:font-family="Liberation Sans" style:font-family-complex="Liberation Sans"/>
    </style:style>
    <style:style style:family="text" style:name="T804">
      <style:text-properties fo:font-family="Liberation Sans" style:font-family-complex="Liberation Sans"/>
    </style:style>
    <style:style style:family="text" style:name="T805">
      <style:text-properties fo:font-family="Liberation Sans" style:font-family-complex="Liberation Sans"/>
    </style:style>
    <style:style style:parent-style-name="1003" style:family="paragraph" style:name="P6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806">
      <style:text-properties fo:font-family="Liberation Sans" style:font-family-complex="Liberation Sans"/>
    </style:style>
    <style:style style:family="text" style:name="T807">
      <style:text-properties fo:font-family="Liberation Sans" style:font-family-complex="Liberation Sans"/>
    </style:style>
    <style:style style:family="text" style:name="T808">
      <style:text-properties fo:font-family="Liberation Sans" style:font-family-complex="Liberation Sans"/>
    </style:style>
    <style:style style:parent-style-name="1003" style:family="paragraph" style:name="P6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97" style:family="text" style:name="T809">
      <style:text-properties/>
    </style:style>
    <style:style style:parent-style-name="997" style:family="text" style:name="T810">
      <style:text-properties fo:font-family="Liberation Sans" style:font-family-complex="Liberation Sans" fo:language="it" style:language-complex="hi" fo:country="IT" style:country-complex="IN"/>
    </style:style>
    <style:style style:parent-style-name="997" style:family="text" style:name="T811">
      <style:text-properties fo:font-family="Liberation Sans" style:font-family-complex="Liberation Sans" fo:language="it" style:language-complex="hi" fo:country="IT" style:country-complex="IN"/>
    </style:style>
    <style:style style:family="text" style:name="T812">
      <style:text-properties fo:font-family="Liberation Sans" style:font-family-complex="Liberation Sans" fo:language="it" style:language-complex="hi" fo:country="IT" style:country-complex="IN"/>
    </style:style>
    <style:style style:parent-style-name="1003" style:family="paragraph" style:name="P6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97" style:family="text" style:name="T813">
      <style:text-properties/>
    </style:style>
    <style:style style:parent-style-name="997" style:family="text" style:name="T814">
      <style:text-properties fo:font-family="Liberation Sans" style:font-family-complex="Liberation Sans" fo:language="it" style:language-complex="hi" fo:country="IT" style:country-complex="IN"/>
    </style:style>
    <style:style style:parent-style-name="997" style:family="text" style:name="T815">
      <style:text-properties fo:font-family="Liberation Sans" style:font-family-complex="Liberation Sans" fo:language="it" style:language-complex="hi" fo:country="IT" style:country-complex="IN"/>
    </style:style>
    <style:style style:family="text" style:name="T816">
      <style:text-properties fo:font-family="Liberation Sans" style:font-family-complex="Liberation Sans" fo:language="it" style:language-complex="hi" fo:country="IT" style:country-complex="IN"/>
    </style:style>
    <style:style style:parent-style-name="1003" style:family="paragraph" style:name="P6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97" style:family="text" style:name="T817">
      <style:text-properties/>
    </style:style>
    <style:style style:parent-style-name="997" style:family="text" style:name="T818">
      <style:text-properties fo:font-family="Liberation Sans" style:font-family-complex="Liberation Sans" fo:language="it" style:language-complex="hi" fo:country="IT" style:country-complex="IN"/>
    </style:style>
    <style:style style:parent-style-name="997" style:family="text" style:name="T819">
      <style:text-properties fo:font-family="Liberation Sans" style:font-family-complex="Liberation Sans" fo:language="it" style:language-complex="hi" fo:country="IT" style:country-complex="IN"/>
    </style:style>
    <style:style style:family="text" style:name="T820">
      <style:text-properties fo:font-family="Liberation Sans" style:font-family-complex="Liberation Sans" fo:language="it" style:language-complex="hi" fo:country="IT" style:country-complex="IN"/>
    </style:style>
    <style:style style:parent-style-name="1005" style:family="paragraph" style:name="P6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97" style:family="text" style:name="T821">
      <style:text-properties/>
    </style:style>
    <style:style style:parent-style-name="997" style:family="text" style:name="T822">
      <style:text-properties fo:font-family="Arial" style:font-family-complex="Arial" fo:font-weight="bold"/>
    </style:style>
    <style:style style:parent-style-name="997" style:family="text" style:name="T823">
      <style:text-properties fo:font-family="Arial" style:font-family-complex="Arial" fo:font-weight="bold"/>
    </style:style>
    <style:style style:family="text" style:name="T824">
      <style:text-properties fo:font-family="Arial" style:font-family-complex="Arial" fo:font-weight="bold"/>
    </style:style>
    <style:style style:parent-style-name="1005" style:family="paragraph" style:name="P6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97" style:family="text" style:name="T825">
      <style:text-properties/>
    </style:style>
    <style:style style:parent-style-name="997" style:family="text" style:name="T826">
      <style:text-properties fo:font-family="Arial" style:font-family-complex="Arial" fo:font-weight="bold"/>
    </style:style>
    <style:style style:parent-style-name="997" style:family="text" style:name="T827">
      <style:text-properties fo:font-family="Arial" style:font-family-complex="Arial" fo:font-weight="bold"/>
    </style:style>
    <style:style style:family="text" style:name="T828">
      <style:text-properties fo:font-family="Arial" style:font-family-complex="Arial" fo:font-weight="bold"/>
    </style:style>
    <style:style style:parent-style-name="1003" style:family="paragraph" style:name="P6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97" style:family="text" style:name="T829">
      <style:text-properties/>
    </style:style>
    <style:style style:parent-style-name="997" style:family="text" style:name="T830">
      <style:text-properties fo:font-family="Liberation Sans" style:font-family-complex="Liberation Sans" fo:language="it" style:language-complex="hi" fo:country="IT" style:country-complex="IN"/>
    </style:style>
    <style:style style:parent-style-name="997" style:family="text" style:name="T831">
      <style:text-properties fo:font-family="Liberation Sans" style:font-family-complex="Liberation Sans" fo:language="it" style:language-complex="hi" fo:country="IT" style:country-complex="IN"/>
    </style:style>
    <style:style style:family="text" style:name="T832">
      <style:text-properties fo:font-family="Liberation Sans" style:font-family-complex="Liberation Sans" fo:language="it" style:language-complex="hi" fo:country="IT" style:country-complex="IN"/>
    </style:style>
    <style:style style:parent-style-name="1005" style:family="paragraph" style:name="P6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97" style:family="text" style:name="T833">
      <style:text-properties/>
    </style:style>
    <style:style style:parent-style-name="997" style:family="text" style:name="T834">
      <style:text-properties fo:font-family="Arial" style:font-family-complex="Arial" fo:font-weight="bold"/>
    </style:style>
    <style:style style:parent-style-name="997" style:family="text" style:name="T835">
      <style:text-properties fo:font-family="Arial" style:font-family-complex="Arial" fo:font-weight="bold"/>
    </style:style>
    <style:style style:family="text" style:name="T836">
      <style:text-properties fo:font-family="Arial" style:font-family-complex="Arial" fo:font-weight="bold"/>
    </style:style>
    <style:style style:parent-style-name="1005" style:family="paragraph" style:name="P7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97" style:family="text" style:name="T837">
      <style:text-properties/>
    </style:style>
    <style:style style:parent-style-name="997" style:family="text" style:name="T838">
      <style:text-properties fo:font-family="Arial" style:font-family-complex="Arial" fo:font-weight="bold"/>
    </style:style>
    <style:style style:parent-style-name="997" style:family="text" style:name="T839">
      <style:text-properties fo:font-family="Arial" style:font-family-complex="Arial" fo:font-weight="bold"/>
    </style:style>
    <style:style style:family="text" style:name="T840">
      <style:text-properties fo:font-family="Arial" style:font-family-complex="Arial" fo:font-weight="bold"/>
    </style:style>
    <style:style style:parent-style-name="1003" style:family="paragraph" style:name="P7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97" style:family="text" style:name="T841">
      <style:text-properties/>
    </style:style>
    <style:style style:parent-style-name="997" style:family="text" style:name="T842">
      <style:text-properties fo:font-family="Liberation Sans" style:font-family-complex="Liberation Sans" fo:language="it" style:language-complex="hi" fo:country="IT" style:country-complex="IN"/>
    </style:style>
    <style:style style:parent-style-name="997" style:family="text" style:name="T843">
      <style:text-properties fo:font-family="Liberation Sans" style:font-family-complex="Liberation Sans" fo:language="it" style:language-complex="hi" fo:country="IT" style:country-complex="IN"/>
    </style:style>
    <style:style style:family="text" style:name="T844">
      <style:text-properties fo:font-family="Liberation Sans" style:font-family-complex="Liberation Sans" fo:language="it" style:language-complex="hi" fo:country="IT" style:country-complex="IN"/>
    </style:style>
    <style:style style:parent-style-name="1003" style:family="paragraph" style:name="P7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97" style:family="text" style:name="T845">
      <style:text-properties/>
    </style:style>
    <style:style style:parent-style-name="997" style:family="text" style:name="T846">
      <style:text-properties fo:font-family="Liberation Serif" style:font-family-complex="Liberation Serif" fo:language="it" style:language-complex="it" fo:country="IT" style:country-complex="IT"/>
    </style:style>
    <style:style style:parent-style-name="997" style:family="text" style:name="T847">
      <style:text-properties fo:font-family="Liberation Sans" style:font-family-complex="Liberation Sans" fo:language="it" style:language-complex="hi" fo:country="IT" style:country-complex="IN"/>
    </style:style>
    <style:style style:family="text" style:name="T848">
      <style:text-properties fo:font-family="Liberation Sans" style:font-family-complex="Liberation Sans" fo:language="it" style:language-complex="hi" fo:country="IT" style:country-complex="IN"/>
    </style:style>
    <style:style style:family="paragraph" style:name="P73">
      <style:paragraph-properties/>
      <style:text-properties/>
    </style:style>
    <style:style style:parent-style-name="1016" style:family="paragraph" style:name="P7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9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8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7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2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8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7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5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8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7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27" style:master-page-name="MasterPage3" style:family="paragraph" style:name="P78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87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87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87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18" style:family="paragraph" style:name="P8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family="paragraph" style:name="P8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8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8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8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27" style:master-page-name="MasterPage4" style:family="paragraph" style:name="P83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905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906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907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908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90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16" style:family="paragraph" style:name="P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0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9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list-style-name="WWNum7" style:family="paragraph" style:name="P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3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94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945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946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parent-style-name="1016" style:family="paragraph" style:name="P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8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8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1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83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9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list-style-name="WWNum7" style:family="paragraph" style:name="P1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9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9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9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1016" style:family="paragraph" style:name="P1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1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2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0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3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3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3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3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3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3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4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7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0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list-style-name="WWNum7" style:family="paragraph" style:name="P1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7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07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07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07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07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family="paragraph" style:name="P1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4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4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4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4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4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4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4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5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5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5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5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5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5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2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1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5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5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5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5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6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list-style-name="WWNum7" style:family="paragraph" style:name="P16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3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3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13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3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4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family="paragraph" style:name="P16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6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6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6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6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6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6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6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3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1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7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7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7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7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7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7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7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list-style-name="WWNum7" style:family="paragraph" style:name="P17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19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19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19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family="paragraph" style:name="P17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8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8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8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8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8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4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2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family="paragraph" style:name="P1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6" style:list-style-name="WWNum7" style:family="paragraph" style:name="P1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2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6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6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family="paragraph" style:name="P2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2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2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71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2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2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1274">
      <style:text-properties fo:color="#000000" fo:font-family="Liberation Serif" style:font-family-complex="Liberation Serif" fo:font-size="10pt" style:font-size-complex="10pt" fo:language="it" style:language-complex="hi" fo:country="IT" style:country-complex="IN" fo:font-style="italic"/>
    </style:style>
    <style:style style:family="text" style:name="T1275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1276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parent-style-name="1027" style:master-page-name="MasterPage5" style:family="paragraph" style:name="P204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05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30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0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18" style:family="paragraph" style:name="P2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family="paragraph" style:name="P2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family="paragraph" style:name="P2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18" style:family="paragraph" style:name="P2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6" style:family="paragraph" style:name="P213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325">
      <style:text-properties fo:color="#0f4761" fo:font-family="Arial" style:font-family-complex="Arial" fo:font-size="14pt" style:font-size-complex="14pt" fo:font-weight="bold"/>
    </style:style>
    <style:style style:family="text" style:name="T1326">
      <style:text-properties fo:color="#0f4761" fo:font-family="Arial" style:font-family-complex="Arial" fo:font-size="14pt" style:font-size-complex="14pt" fo:font-weight="bold"/>
    </style:style>
    <style:style style:family="text" style:name="T1327">
      <style:text-properties fo:color="#0f4761" fo:font-family="Arial" style:font-family-complex="Arial" fo:font-size="14pt" style:font-size-complex="14pt" fo:font-weight="bold"/>
    </style:style>
    <style:style style:family="paragraph" style:name="P214">
      <style:paragraph-properties/>
      <style:text-properties/>
    </style:style>
    <style:style style:parent-style-name="1018" style:list-style-name="WWNum2" style:family="paragraph" style:name="P2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list-style-name="WWNum2" style:family="paragraph" style:name="P2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list-style-name="WWNum2" style:family="paragraph" style:name="P2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list-style-name="WWNum2" style:family="paragraph" style:name="P2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family="paragraph" style:name="P2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list-style-name="WWNum2" style:family="paragraph" style:name="P2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family="paragraph" style:name="P221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list-style-name="WWNum2" style:family="paragraph" style:name="P2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family="paragraph" style:name="P223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list-style-name="WWNum2" style:family="paragraph" style:name="P2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family="paragraph" style:name="P2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7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6" style:family="paragraph" style:name="P226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374">
      <style:text-properties fo:color="#0f4761" fo:font-family="Arial" style:font-family-complex="Arial" fo:font-size="14pt" style:font-size-complex="14pt" fo:font-weight="bold"/>
    </style:style>
    <style:style style:family="text" style:name="T1375">
      <style:text-properties fo:color="#0f4761" fo:font-family="Arial" style:font-family-complex="Arial" fo:font-size="14pt" style:font-size-complex="14pt" fo:font-weight="bold"/>
    </style:style>
    <style:style style:family="text" style:name="T1376">
      <style:text-properties fo:color="#0f4761" fo:font-family="Arial" style:font-family-complex="Arial" fo:font-size="14pt" style:font-size-complex="14pt" fo:font-weight="bold"/>
    </style:style>
    <style:style style:family="paragraph" style:name="P227">
      <style:paragraph-properties/>
      <style:text-properties/>
    </style:style>
    <style:style style:parent-style-name="1018" style:list-style-name="WWNum6" style:family="paragraph" style:name="P2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list-style-name="WWNum6" style:family="paragraph" style:name="P2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8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list-style-name="WWNum6" style:family="paragraph" style:name="P2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8" style:family="paragraph" style:name="P2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family="paragraph" style:name="P232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family="paragraph" style:name="P2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23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3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14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23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6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14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27" style:master-page-name="MasterPage6" style:family="paragraph" style:name="P236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444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44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44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18" style:family="paragraph" style:name="P2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8" style:family="paragraph" style:name="P24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24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4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4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6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4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6" style:family="paragraph" style:name="P248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472">
      <style:text-properties fo:color="#0f4761" fo:font-family="Arial" style:font-family-complex="Arial" fo:font-size="14pt" style:font-size-complex="14pt" fo:font-weight="bold"/>
    </style:style>
    <style:style style:family="text" style:name="T1473">
      <style:text-properties fo:color="#0f4761" fo:font-family="Arial" style:font-family-complex="Arial" fo:font-size="14pt" style:font-size-complex="14pt" fo:font-weight="bold"/>
    </style:style>
    <style:style style:family="text" style:name="T1474">
      <style:text-properties fo:color="#0f4761" fo:font-family="Arial" style:font-family-complex="Arial" fo:font-size="14pt" style:font-size-complex="14pt" fo:font-weight="bold"/>
    </style:style>
    <style:style style:parent-style-name="1016" style:family="paragraph" style:name="P24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0" style:family="paragraph" style:name="P25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5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0" style:family="paragraph" style:name="P25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5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0" style:family="paragraph" style:name="P25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5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5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0" style:family="paragraph" style:name="P25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9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5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0" style:family="paragraph" style:name="P25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5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6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61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6" style:family="paragraph" style:name="P262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536">
      <style:text-properties fo:color="#0f4761" fo:font-family="Arial" style:font-family-complex="Arial" fo:font-size="14pt" style:font-size-complex="14pt" fo:font-weight="bold"/>
    </style:style>
    <style:style style:family="text" style:name="T1537">
      <style:text-properties fo:color="#0f4761" fo:font-family="Arial" style:font-family-complex="Arial" fo:font-size="14pt" style:font-size-complex="14pt" fo:font-weight="bold"/>
    </style:style>
    <style:style style:family="text" style:name="T1538">
      <style:text-properties fo:color="#0f4761" fo:font-family="Arial" style:font-family-complex="Arial" fo:font-size="14pt" style:font-size-complex="14pt" fo:font-weight="bold"/>
    </style:style>
    <style:style style:parent-style-name="1016" style:family="paragraph" style:name="P263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3" style:family="paragraph" style:name="P26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6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3" style:family="paragraph" style:name="P26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6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3" style:family="paragraph" style:name="P26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6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7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71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7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73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274">
      <style:paragraph-properties/>
      <style:text-properties/>
    </style:style>
    <style:style style:family="text" style:name="T15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27" style:master-page-name="MasterPage7" style:family="paragraph" style:name="P275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623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624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62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16" style:family="paragraph" style:name="P28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2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8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2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8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3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8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8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3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3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4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4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8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4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98" style:family="text" style:name="T16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99" style:family="text" style:name="T16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97" style:family="text" style:name="T164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97" style:family="text" style:name="T164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97" style:family="text" style:name="T165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97" style:family="text" style:name="T165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8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8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4" style:family="paragraph" style:name="P29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6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family="paragraph" style:name="P29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9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4" style:family="paragraph" style:name="P29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4" style:family="paragraph" style:name="P29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7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7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7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7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7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8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list-style-name="WWNum14" style:family="paragraph" style:name="P29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39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6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8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list-style-name="WWNum14" style:family="paragraph" style:name="P29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9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9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9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family="paragraph" style:name="P297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98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4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29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0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4" style:family="paragraph" style:name="P30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0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0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70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0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70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0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0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family="paragraph" style:name="P301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1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302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4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303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304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30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2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2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306">
      <style:paragraph-properties/>
      <style:text-properties/>
    </style:style>
    <style:style style:family="text" style:name="T17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27" style:master-page-name="MasterPage8" style:family="paragraph" style:name="P307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70">
      <style:text-properties fo:color="#1f497d" fo:font-family="Liberation Serif" style:font-family-complex="Liberation Serif" fo:font-size="20pt" style:font-size-complex="20pt" fo:language="it" style:language-complex="it" fo:country="IT" style:country-complex="IT" fo:font-weight="bold"/>
    </style:style>
    <style:style style:family="text" style:name="T1771">
      <style:text-properties fo:color="#1f497d" fo:font-family="Liberation Serif" style:font-family-complex="Liberation Serif" fo:font-size="20pt" style:font-size-complex="20pt" fo:language="it" style:language-complex="hi" fo:country="IT" style:country-complex="IN" fo:font-weight="bold"/>
    </style:style>
    <style:style style:family="text" style:name="T177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16" style:family="paragraph" style:name="P31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31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7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7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31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7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48">
      <style:graphic-properties style:repeat="stretch" style:wrap="run-through" style:run-through="foreground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78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family="paragraph" style:name="P31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9" style:family="paragraph" style:name="P31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8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7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7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9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family="paragraph" style:name="P31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32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32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32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32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32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family="paragraph" style:name="P32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49">
      <style:graphic-properties style:repeat="stretch" style:wrap="run-through" style:run-through="foreground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8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6" style:list-style-name="WWNum19" style:family="paragraph" style:name="P32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1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1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1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1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list-style-name="WWNum19" style:family="paragraph" style:name="P32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1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1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list-style-name="WWNum19" style:family="paragraph" style:name="P32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2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2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family="paragraph" style:name="P32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3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3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9" style:family="paragraph" style:name="P33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3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50">
      <style:graphic-properties style:repeat="stretch" style:wrap="run-through" style:run-through="foreground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83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3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3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16" style:list-style-name="WWNum19" style:family="paragraph" style:name="P33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4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4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4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4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4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4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1016" style:family="paragraph" style:name="P33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4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4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4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4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16" style:list-style-name="WWNum18" style:family="paragraph" style:name="P33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5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51">
      <style:graphic-properties style:repeat="stretch" style:wrap="run-through" style:run-through="foreground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85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5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5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</office:automatic-styles>
  <office:body>
    <office:text text:use-soft-page-breaks="true">
      <text:p text:style-name="P50"><text:span text:style-name="T772"/><text:span/><draw:frame draw:name="Image9" draw:style-name="gr4" draw:z-index="3085" text:anchor-type="paragraph" svg:width="3.45cm" svg:height="3.45cm" svg:x="1.267cm" svg:y="0cm"><draw:image xlink:href="Pictures/image2.png" xlink:type="simple" xlink:show="embed" xlink:actuate="onLoad"/></draw:frame><text:span text:style-name="T773"><text:tab/></text:span><text:span text:style-name="T774"/><text:span text:style-name="T775"/></text:p>
      <text:p text:style-name="P52"><text:span text:style-name="T776"/><text:span text:style-name="T777"/><text:span text:style-name="T778"/></text:p>
      <text:p text:style-name="P53"><text:span text:style-name="T779"/><text:span text:style-name="T780">Esportazione files CSV</text:span><text:span text:style-name="T781"><text:s/></text:span><text:span text:style-name="T782"> dalle varie piattaforme<text:s text:c="2"/></text:span><text:span text:style-name="T783"/><text:span text:style-name="T784"/></text:p>
      <text:p text:style-name="P54"><text:span text:style-name="T785"><text:s text:c="10"/></text:span><text:span text:style-name="T786"/><text:span text:style-name="T787"/></text:p>
      <text:p text:style-name="P55"><text:span text:style-name="T788"/><text:span text:style-name="T789"/><text:span text:style-name="T790"/></text:p>
      <text:p text:style-name="P56"><text:span text:style-name="T791">GIACENZE CRYPTO</text:span><text:span text:style-name="T792"/><text:span text:style-name="T793"/></text:p>
      <text:p text:style-name="P57"><text:span text:style-name="T794"/><text:span text:style-name="T795"/><text:span text:style-name="T796"/></text:p>
      <text:p text:style-name="P58"><text:span text:style-name="T797">Indice</text:span><text:span text:style-name="T798"/><text:span text:style-name="T799"/></text:p>
      <text:p text:style-name="P59"><text:span/><text:span/></text:p>
      <text:p text:style-name="P60"><text:span text:style-name="T800"/><text:span text:style-name="T801"/><text:span text:style-name="T802"/></text:p>
      <text:p text:style-name="P61"><text:span text:style-name="T803"/><text:span text:style-name="T804"/><text:span text:style-name="T805"/></text:p>
      <text:p text:style-name="P62"><text:span text:style-name="T806"/><text:span text:style-name="T807"/><text:span text:style-name="T808"/></text:p>
      <text:p text:style-name="P63"><text:span/><text:span/><text:span/><text:span/></text:p>
      <text:table-of-content text:name="">
        <text:table-of-content-source/>
        <text:index-body>
          <text:p text:style-name="P63"><text:a xlink:href="#_Toc1" xlink:type="simple"><text:span text:style-name="T809"/><text:span text:style-name="T810">Introduzione</text:span><text:span text:style-name="T811"/><text:span><text:tab/></text:span><text:span>2</text:span></text:a><text:span text:style-name="T812"/></text:p>
          <text:p text:style-name="P64"><text:a xlink:href="#_Toc2" xlink:type="simple"><text:span text:style-name="T813"/><text:span text:style-name="T814">Crypto.com App</text:span><text:span text:style-name="T815"/><text:span><text:tab/></text:span><text:span>3</text:span></text:a><text:span text:style-name="T816"/></text:p>
          <text:p text:style-name="P65"><text:a xlink:href="#_Toc3" xlink:type="simple"><text:span text:style-name="T817"/><text:span text:style-name="T818">Crypto.com Exchange</text:span><text:span text:style-name="T819"/><text:span><text:tab/></text:span><text:span>6</text:span></text:a><text:span text:style-name="T820"/></text:p>
          <text:p text:style-name="P66"><text:a xlink:href="#_Toc4" xlink:type="simple"><text:span text:style-name="T821"/><text:span text:style-name="T822">1 - Come esportare il file delle Transazioni:</text:span><text:span text:style-name="T823"/><text:span><text:tab/></text:span><text:span>6</text:span></text:a><text:span text:style-name="T824"/></text:p>
          <text:p text:style-name="P67"><text:a xlink:href="#_Toc5" xlink:type="simple"><text:span text:style-name="T825"/><text:span text:style-name="T826">2 - Come esportare i file dei movimenti mensili:</text:span><text:span text:style-name="T827"/><text:span><text:tab/></text:span><text:span>7</text:span></text:a><text:span text:style-name="T828"/></text:p>
          <text:p text:style-name="P68"><text:a xlink:href="#_Toc6" xlink:type="simple"><text:span text:style-name="T829"/><text:span text:style-name="T830">Binance</text:span><text:span text:style-name="T831"/><text:span><text:tab/></text:span><text:span>9</text:span></text:a><text:span text:style-name="T832"/></text:p>
          <text:p text:style-name="P69"><text:a xlink:href="#_Toc7" xlink:type="simple"><text:span text:style-name="T833"/><text:span text:style-name="T834">1 - Come esportare il file delle Transazioni:</text:span><text:span text:style-name="T835"/><text:span><text:tab/></text:span><text:span>9</text:span></text:a><text:span text:style-name="T836"/></text:p>
          <text:p text:style-name="P70"><text:a xlink:href="#_Toc8" xlink:type="simple"><text:span text:style-name="T837"/><text:span text:style-name="T838">2 - Come esportare il Report Finanziario:</text:span><text:span text:style-name="T839"/><text:span><text:tab/></text:span><text:span>11</text:span></text:a><text:span text:style-name="T840"/></text:p>
          <text:p text:style-name="P71"><text:a xlink:href="#_Toc9" xlink:type="simple"><text:span text:style-name="T841"/><text:span text:style-name="T842">Cointraking.info</text:span><text:span text:style-name="T843"/><text:span><text:tab/></text:span><text:span>12</text:span></text:a><text:span text:style-name="T844"/></text:p>
          <text:p text:style-name="P72"><text:a xlink:href="#_Toc10" xlink:type="simple"><text:span text:style-name="T845"/><text:span text:style-name="T846">Import CSV sul software Giacenze Crypto</text:span><text:span text:style-name="T847"/><text:span><text:tab/></text:span><text:span>14</text:span></text:a><text:span text:style-name="T848"/></text:p>
          <text:p text:style-name="P73"><text:span/><text:span/><text:span/><text:span/></text:p>
        </text:index-body>
      </text:table-of-content>
      <text:p text:style-name="P74"><text:span text:style-name="T849"/><text:span text:style-name="T850"/><text:span text:style-name="T851"/></text:p>
      <text:p text:style-name="P75"><text:span text:style-name="T852"/><text:span text:style-name="T853"/><text:span text:style-name="T854"/></text:p>
      <text:p text:style-name="P76"><text:span text:style-name="T855"/><text:span text:style-name="T856"/><text:span text:style-name="T857"/></text:p>
      <text:p text:style-name="P77"><text:span text:style-name="T858"/><text:span text:style-name="T859"/><text:span text:style-name="T860"/></text:p>
      <text:list>
        <text:list-item>
          <text:p text:style-name="P78"><text:span/><text:bookmark-start text:name="_Toc1"/><text:span text:style-name="T875">Introduzione</text:span><text:span text:style-name="T876"/><text:bookmark-end text:name="_Toc1"/><text:span/><text:span text:style-name="T877"/></text:p>
        </text:list-item>
      </text:list>
      <text:p text:style-name="P81"><text:span text:style-name="T878"/><text:span text:style-name="T879"/><text:span text:style-name="T880"/></text:p>
      <text:p text:style-name="P82"><text:span text:style-name="T881">Questa guida server per spiegare passo-passo come estrarre i file CSV dalle varie piattaforme che poi serviranno per essere importati sul programma.</text:span><text:span text:style-name="T882"/><text:span text:style-name="T883"/></text:p>
      <text:list>
        <text:list-item>
          <text:p text:style-name="P83"><text:span/><text:bookmark-start text:name="_Toc2"/><text:span text:style-name="T905">Crypto.com App</text:span><text:span text:style-name="T906"/><text:bookmark-start text:name="__RefHeading___Toc3187_1777463037"/><text:span text:style-name="T907"/><text:bookmark-end text:name="__RefHeading___Toc3187_1777463037"/><text:span text:style-name="T908"/><text:bookmark-end text:name="_Toc2"/><text:span/><text:span text:style-name="T909"/></text:p>
        </text:list-item>
      </text:list>
      <text:p text:style-name="P87"><text:span text:style-name="T910"/><text:span text:style-name="T911"/><text:span text:style-name="T912"/></text:p>
      <text:p text:style-name="P88"><text:span text:style-name="T913">Per scaricare il file dall’app di Crypto.com seguire i seguenti passaggi :</text:span><text:span text:style-name="T914"/><text:span text:style-name="T915"/></text:p>
      <text:p text:style-name="P89"><text:span text:style-name="T916"/><text:span text:style-name="T917"/><text:span text:style-name="T918"/></text:p>
      <text:p text:style-name="P90"><text:span text:style-name="T919"/><text:span/><draw:frame draw:name="Object" draw:style-name="gr10" draw:z-index="25613" text:anchor-type="paragraph" svg:width="8.288cm" svg:height="16.26cm" svg:x="10.54cm" svg:y="0.341cm"><draw:image xlink:href="Pictures/image3.jpg" xlink:type="simple" xlink:show="embed" xlink:actuate="onLoad"/></draw:frame><text:span text:style-name="T920"/><text:span text:style-name="T921"/></text:p>
      <text:p text:style-name="P91"><text:span text:style-name="T922"/><text:span text:style-name="T923"/><text:span text:style-name="T924"/></text:p>
      <text:p text:style-name="P92"><text:span text:style-name="T925"/><text:span text:style-name="T926"/><text:span text:style-name="T927"/></text:p>
      <text:p text:style-name="P93"><text:span text:style-name="T928"/><text:span text:style-name="T929"/><text:span text:style-name="T930"/></text:p>
      <text:p text:style-name="P94"><text:span text:style-name="T931"/><text:span text:style-name="T932"/><text:span text:style-name="T933"/></text:p>
      <text:p text:style-name="P95"><text:span text:style-name="T934"/><text:span text:style-name="T935"/><text:span text:style-name="T936"/></text:p>
      <text:p text:style-name="P96"><text:span text:style-name="T937"/><text:span text:style-name="T938"/><text:span text:style-name="T939"/></text:p>
      <text:p text:style-name="P97"><text:span text:style-name="T940"/><text:span text:style-name="T941"/><text:span text:style-name="T942"/></text:p>
      <text:list text:style-name="WWNum7" text:continue-numbering="true">
        <text:list-item>
          <text:p text:style-name="P98"><text:span text:style-name="T943">Aprire l’app e andare nella sezione </text:span><text:span text:style-name="T944">Conti</text:span><text:span text:style-name="T945"/><text:span text:style-name="T946"/></text:p>
        </text:list-item>
      </text:list>
      <text:p text:style-name="P99"><text:span text:style-name="T947"/><text:span text:style-name="T948"/><text:span text:style-name="T949"/></text:p>
      <text:p text:style-name="P100"><text:span text:style-name="T950"/><text:span text:style-name="T951"/><text:span text:style-name="T952"/></text:p>
      <text:p text:style-name="P101"><text:span text:style-name="T953"/><text:span text:style-name="T954"/><text:span text:style-name="T955"/></text:p>
      <text:p text:style-name="P102"><text:span text:style-name="T956"/><text:span text:style-name="T957"/><text:span text:style-name="T958"/></text:p>
      <text:p text:style-name="P103"><text:span text:style-name="T959"/><text:span text:style-name="T960"/><text:span text:style-name="T961"/></text:p>
      <text:p text:style-name="P104"><text:span text:style-name="T962"/><text:span text:style-name="T963"/><text:span text:style-name="T964"/></text:p>
      <text:p text:style-name="P105"><text:span text:style-name="T965"/><text:span text:style-name="T966"/><text:span text:style-name="T967"/></text:p>
      <text:p text:style-name="P106"><text:span text:style-name="T968"/><text:span text:style-name="T969"/><text:span text:style-name="T970"/></text:p>
      <text:p text:style-name="P107"><text:span text:style-name="T971"/><text:span text:style-name="T972"/><text:span text:style-name="T973"/></text:p>
      <text:p text:style-name="P108"><text:span text:style-name="T974"/><text:span text:style-name="T975"/><text:span text:style-name="T976"/></text:p>
      <text:p text:style-name="P109"><text:span text:style-name="T977"/><text:span text:style-name="T978"/><text:span text:style-name="T979"/></text:p>
      <text:p text:style-name="P110"><text:span text:style-name="T980"/><text:span text:style-name="T981"/><text:span text:style-name="T982"/></text:p>
      <text:p text:style-name="P111"><text:span text:style-name="T983"/><text:span text:style-name="T984"/><text:span text:style-name="T985"/></text:p>
      <text:list text:style-name="WWNum7" text:continue-numbering="true">
        <text:list-item>
          <text:p text:style-name="P112"><text:span text:style-name="T986">Premere quindi il tastino in alto a destra rappresentato da un </text:span><text:span text:style-name="T987">orologio con il dollaro</text:span><text:span text:style-name="T988"/><text:span text:style-name="T989"/></text:p>
        </text:list-item>
      </text:list>
      <text:p text:style-name="P113"><text:span text:style-name="T990"/><text:span text:style-name="T991"/><text:span text:style-name="T992"/></text:p>
      <text:p text:style-name="P114"><text:span text:style-name="T993"/><text:span text:style-name="T994"/><text:span text:style-name="T995"/></text:p>
      <text:p text:style-name="P115"><text:span text:style-name="T996"/><text:span text:style-name="T997"/><text:span text:style-name="T998"/></text:p>
      <text:p text:style-name="P116"><text:span text:style-name="T999"/><text:span text:style-name="T1000"/><text:span text:style-name="T1001"/></text:p>
      <text:p text:style-name="P117"><text:span text:style-name="T1002"/><text:span text:style-name="T1003"/><text:span text:style-name="T1004"/></text:p>
      <text:p text:style-name="P118"><text:span text:style-name="T1005"/><text:span text:style-name="T1006"/><text:span text:style-name="T1007"/></text:p>
      <text:p text:style-name="P119"><text:span text:style-name="T1008"/><text:span text:style-name="T1009"/><text:span text:style-name="T1010"/></text:p>
      <text:p text:style-name="P120"><text:span text:style-name="T1011"/><text:span text:style-name="T1012"/><text:span text:style-name="T1013"/></text:p>
      <text:p text:style-name="P121"><text:span text:style-name="T1014"/><text:span text:style-name="T1015"/><text:span text:style-name="T1016"/></text:p>
      <text:p text:style-name="P122"><text:span text:style-name="T1017"/><text:span text:style-name="T1018"/><text:span text:style-name="T1019"/></text:p>
      <text:p text:style-name="P123"><text:span text:style-name="T1020"/><text:span text:style-name="T1021"/><text:span text:style-name="T1022"/></text:p>
      <text:p text:style-name="P124"><text:span text:style-name="T1023"/><text:span text:style-name="T1024"/><text:span text:style-name="T1025"/></text:p>
      <text:p text:style-name="P125"><text:span text:style-name="T1026"/><text:span text:style-name="T1027"/><text:span text:style-name="T1028"/></text:p>
      <text:p text:style-name="P126"><text:span text:style-name="T1029"/><text:span text:style-name="T1030"/><text:span text:style-name="T1031"/></text:p>
      <text:p text:style-name="P127"><text:span text:style-name="T1032"/><text:span text:style-name="T1033"/><text:span text:style-name="T1034"/></text:p>
      <text:p text:style-name="P128"><text:span text:style-name="T1035"/><text:span text:style-name="T1036"/><text:span text:style-name="T1037"/></text:p>
      <text:p text:style-name="P129"><text:span text:style-name="T1038"/><text:span text:style-name="T1039"/><text:span text:style-name="T1040"/></text:p>
      <text:p text:style-name="P130"><text:span text:style-name="T1041"/><text:span text:style-name="T1042"/><text:span text:style-name="T1043"/></text:p>
      <text:p text:style-name="P131"><text:span text:style-name="T1044"/><text:span/><draw:frame draw:name="Object" draw:style-name="gr11" draw:z-index="29709" text:anchor-type="paragraph" svg:width="5.615cm" svg:height="11.02cm" svg:x="12.32cm" svg:y="-0.3103cm"><draw:image xlink:href="Pictures/image4.jpg" xlink:type="simple" xlink:show="embed" xlink:actuate="onLoad"/></draw:frame><text:span text:style-name="T1045"/><text:span text:style-name="T1046"/></text:p>
      <text:p text:style-name="P132"><text:span text:style-name="T1047"/><text:span text:style-name="T1048"/><text:span text:style-name="T1049"/></text:p>
      <text:p text:style-name="P133"><text:span text:style-name="T1050"/><text:span text:style-name="T1051"/><text:span text:style-name="T1052"/></text:p>
      <text:p text:style-name="P134"><text:span text:style-name="T1053"/><text:span text:style-name="T1054"/><text:span text:style-name="T1055"/></text:p>
      <text:p text:style-name="P135"><text:span text:style-name="T1056"/><text:span text:style-name="T1057"/><text:span text:style-name="T1058"/></text:p>
      <text:p text:style-name="P136"><text:span text:style-name="T1059"/><text:span text:style-name="T1060"/><text:span text:style-name="T1061"/></text:p>
      <text:p text:style-name="P137"><text:span text:style-name="T1062"/><text:span text:style-name="T1063"/><text:span text:style-name="T1064"/></text:p>
      <text:p text:style-name="P138"><text:span text:style-name="T1065"/><text:span text:style-name="T1066"/><text:span text:style-name="T1067"/></text:p>
      <text:p text:style-name="P139"><text:span text:style-name="T1068"/><text:span text:style-name="T1069"/><text:span text:style-name="T1070"/></text:p>
      <text:p text:style-name="P140"><text:span text:style-name="T1071"/><text:span text:style-name="T1072"/><text:span text:style-name="T1073"/></text:p>
      <text:list text:style-name="WWNum7" text:continue-numbering="true">
        <text:list-item>
          <text:p text:style-name="P141"><text:span text:style-name="T1074">Premere su </text:span><text:span text:style-name="T1075">Crypto Wallet</text:span><text:span text:style-name="T1076">, si aprirà la cronologia delle Transazioni.</text:span><text:span text:style-name="T1077"/><text:span text:style-name="T1078"/></text:p>
        </text:list-item>
      </text:list>
      <text:p text:style-name="P142"><text:span text:style-name="T1079"/><text:span text:style-name="T1080"/><text:span text:style-name="T1081"/></text:p>
      <text:p text:style-name="P143"><text:span text:style-name="T1082"/><text:span text:style-name="T1083"/><text:span text:style-name="T1084"/></text:p>
      <text:p text:style-name="P144"><text:span text:style-name="T1085"/><text:span text:style-name="T1086"/><text:span text:style-name="T1087"/></text:p>
      <text:p text:style-name="P145"><text:span text:style-name="T1088"/><text:span text:style-name="T1089"/><text:span text:style-name="T1090"/></text:p>
      <text:p text:style-name="P146"><text:span text:style-name="T1091"/><text:span text:style-name="T1092"/><text:span text:style-name="T1093"/></text:p>
      <text:p text:style-name="P147"><text:span text:style-name="T1094"/><text:span text:style-name="T1095"/><text:span text:style-name="T1096"/></text:p>
      <text:p text:style-name="P148"><text:span text:style-name="T1097"/><text:span text:style-name="T1098"/><text:span text:style-name="T1099"/></text:p>
      <text:p text:style-name="P149"><text:span text:style-name="T1100"/><text:span text:style-name="T1101"/><text:span text:style-name="T1102"/></text:p>
      <text:p text:style-name="P150"><text:span text:style-name="T1103"/><text:span text:style-name="T1104"/><text:span text:style-name="T1105"/></text:p>
      <text:p text:style-name="P151"><text:span text:style-name="T1106"/><text:span text:style-name="T1107"/><text:span text:style-name="T1108"/></text:p>
      <text:p text:style-name="P152"><text:span text:style-name="T1109"/><text:span text:style-name="T1110"/><text:span text:style-name="T1111"/></text:p>
      <text:p text:style-name="P153"><text:span text:style-name="T1112"/><text:span text:style-name="T1113"/><text:span text:style-name="T1114"/></text:p>
      <text:p text:style-name="P154"><text:span text:style-name="T1115"/><text:span text:style-name="T1116"/><text:span text:style-name="T1117"/></text:p>
      <text:p text:style-name="P155"><text:span text:style-name="T1118"/><text:span/><draw:frame draw:name="Object" draw:style-name="gr12" draw:z-index="31757" text:anchor-type="paragraph" svg:width="8.72cm" svg:height="6.612cm" svg:x="9.215cm" svg:y="0.3377cm"><draw:image xlink:href="Pictures/image5.jpg" xlink:type="simple" xlink:show="embed" xlink:actuate="onLoad"/></draw:frame><text:span text:style-name="T1119"/><text:span text:style-name="T1120"/></text:p>
      <text:p text:style-name="P156"><text:span text:style-name="T1121"/><text:span text:style-name="T1122"/><text:span text:style-name="T1123"/></text:p>
      <text:p text:style-name="P157"><text:span text:style-name="T1124"/><text:span text:style-name="T1125"/><text:span text:style-name="T1126"/></text:p>
      <text:p text:style-name="P158"><text:span text:style-name="T1127"/><text:span text:style-name="T1128"/><text:span text:style-name="T1129"/></text:p>
      <text:p text:style-name="P159"><text:span text:style-name="T1130"/><text:span text:style-name="T1131"/><text:span text:style-name="T1132"/></text:p>
      <text:p text:style-name="P160"><text:span text:style-name="T1133"/><text:span text:style-name="T1134"/><text:span text:style-name="T1135"/></text:p>
      <text:list text:style-name="WWNum7" text:continue-numbering="true">
        <text:list-item>
          <text:p text:style-name="P161"><text:span text:style-name="T1136">Premere sull’</text:span><text:span text:style-name="T1137">icona in alto a destra</text:span><text:span text:style-name="T1138"> rappresentata da un quadrato con una freccia</text:span><text:span text:style-name="T1139"/><text:span text:style-name="T1140"/></text:p>
        </text:list-item>
      </text:list>
      <text:p text:style-name="P162"><text:span text:style-name="T1141"/><text:span text:style-name="T1142"/><text:span text:style-name="T1143"/></text:p>
      <text:p text:style-name="P163"><text:span text:style-name="T1144"/><text:span text:style-name="T1145"/><text:span text:style-name="T1146"/></text:p>
      <text:p text:style-name="P164"><text:span text:style-name="T1147"/><text:span text:style-name="T1148"/><text:span text:style-name="T1149"/></text:p>
      <text:p text:style-name="P165"><text:span text:style-name="T1150"/><text:span text:style-name="T1151"/><text:span text:style-name="T1152"/></text:p>
      <text:p text:style-name="P166"><text:span text:style-name="T1153"/><text:span text:style-name="T1154"/><text:span text:style-name="T1155"/></text:p>
      <text:p text:style-name="P167"><text:span text:style-name="T1156"/><text:span text:style-name="T1157"/><text:span text:style-name="T1158"/></text:p>
      <text:p text:style-name="P168"><text:span text:style-name="T1159"/><text:span text:style-name="T1160"/><text:span text:style-name="T1161"/></text:p>
      <text:p text:style-name="P169"><text:span text:style-name="T1162"/><text:span/><draw:frame draw:name="Object" draw:style-name="gr13" draw:z-index="34829" text:anchor-type="paragraph" svg:width="6.245cm" svg:height="12.25cm" svg:x="11.51cm" svg:y="-0.6281cm"><draw:image xlink:href="Pictures/image6.jpg" xlink:type="simple" xlink:show="embed" xlink:actuate="onLoad"/></draw:frame><text:span text:style-name="T1163"/><text:span text:style-name="T1164"/></text:p>
      <text:p text:style-name="P170"><text:span text:style-name="T1165"/><text:span text:style-name="T1166"/><text:span text:style-name="T1167"/></text:p>
      <text:p text:style-name="P171"><text:span text:style-name="T1168"/><text:span text:style-name="T1169"/><text:span text:style-name="T1170"/></text:p>
      <text:p text:style-name="P172"><text:span text:style-name="T1171"/><text:span text:style-name="T1172"/><text:span text:style-name="T1173"/></text:p>
      <text:p text:style-name="P173"><text:span text:style-name="T1174"/><text:span text:style-name="T1175"/><text:span text:style-name="T1176"/></text:p>
      <text:p text:style-name="P174"><text:span text:style-name="T1177"/><text:span text:style-name="T1178"/><text:span text:style-name="T1179"/></text:p>
      <text:p text:style-name="P175"><text:span text:style-name="T1180"/><text:span text:style-name="T1181"/><text:span text:style-name="T1182"/></text:p>
      <text:p text:style-name="P176"><text:span text:style-name="T1183"/><text:span text:style-name="T1184"/><text:span text:style-name="T1185"/></text:p>
      <text:p text:style-name="P177"><text:span text:style-name="T1186"/><text:span text:style-name="T1187"/><text:span text:style-name="T1188"/></text:p>
      <text:list text:style-name="WWNum7" text:continue-numbering="true">
        <text:list-item>
          <text:p text:style-name="P178"><text:span text:style-name="T1189">Assicurarsi che sia selezionato “</text:span><text:span text:style-name="T1190">Crypto Wallet</text:span><text:span text:style-name="T1191">” e scegliere le </text:span><text:span text:style-name="T1192">date</text:span><text:span text:style-name="T1193"> in base alle proprie</text:span><text:span text:style-name="T1194"> esigenze quindi premere sul tasto </text:span><text:span text:style-name="T1195">“</text:span><text:span text:style-name="T1196">Esporta in CSV</text:span><text:span text:style-name="T1197">”</text:span><text:span text:style-name="T1198"/><text:span text:style-name="T1199"/></text:p>
        </text:list-item>
      </text:list>
      <text:p text:style-name="P179"><text:span text:style-name="T1200"/><text:span text:style-name="T1201"/><text:span text:style-name="T1202"/></text:p>
      <text:p text:style-name="P180"><text:span text:style-name="T1203"/><text:span text:style-name="T1204"/><text:span text:style-name="T1205"/></text:p>
      <text:p text:style-name="P181"><text:span text:style-name="T1206"/><text:span text:style-name="T1207"/><text:span text:style-name="T1208"/></text:p>
      <text:p text:style-name="P182"><text:span text:style-name="T1209"/><text:span text:style-name="T1210"/><text:span text:style-name="T1211"/></text:p>
      <text:p text:style-name="P183"><text:span text:style-name="T1212"/><text:span text:style-name="T1213"/><text:span text:style-name="T1214"/></text:p>
      <text:p text:style-name="P184"><text:span text:style-name="T1215"/><text:span text:style-name="T1216"/><text:span text:style-name="T1217"/></text:p>
      <text:p text:style-name="P185"><text:span text:style-name="T1218"/><text:span text:style-name="T1219"/><text:span text:style-name="T1220"/></text:p>
      <text:p text:style-name="P186"><text:span text:style-name="T1221"/><text:span text:style-name="T1222"/><text:span text:style-name="T1223"/></text:p>
      <text:p text:style-name="P187"><text:span text:style-name="T1224"/><text:span text:style-name="T1225"/><text:span text:style-name="T1226"/></text:p>
      <text:p text:style-name="P188"><text:span text:style-name="T1227"/><text:span text:style-name="T1228"/><text:span text:style-name="T1229"/></text:p>
      <text:p text:style-name="P189"><text:span text:style-name="T1230"/><text:span text:style-name="T1231"/><text:span text:style-name="T1232"/></text:p>
      <text:p text:style-name="P190"><text:span text:style-name="T1233"/><text:span text:style-name="T1234"/><text:span text:style-name="T1235"/></text:p>
      <text:p text:style-name="P191"><text:span text:style-name="T1236"/><text:span text:style-name="T1237"/><text:span text:style-name="T1238"/></text:p>
      <text:p text:style-name="P192"><text:span text:style-name="T1239"/><text:span text:style-name="T1240"/><text:span text:style-name="T1241"/></text:p>
      <text:p text:style-name="P193"><text:span text:style-name="T1242"/><text:span text:style-name="T1243"/><text:span text:style-name="T1244"/></text:p>
      <text:p text:style-name="P194"><text:span text:style-name="T1245"/><text:span text:style-name="T1246"/><text:span text:style-name="T1247"/></text:p>
      <text:p text:style-name="P195"><text:span text:style-name="T1248"/><text:span/><draw:frame draw:name="Object" draw:style-name="gr14" draw:z-index="40973" text:anchor-type="paragraph" svg:width="8.055cm" svg:height="5.482cm" svg:x="9.535cm" svg:y="0.3987cm"><draw:image xlink:href="Pictures/image7.jpg" xlink:type="simple" xlink:show="embed" xlink:actuate="onLoad"/></draw:frame><text:span text:style-name="T1249"/><text:span text:style-name="T1250"/></text:p>
      <text:p text:style-name="P196"><text:span text:style-name="T1251"/><text:span text:style-name="T1252"/><text:span text:style-name="T1253"/></text:p>
      <text:p text:style-name="P197"><text:span text:style-name="T1254"/><text:span text:style-name="T1255"/><text:span text:style-name="T1256"/></text:p>
      <text:p text:style-name="P198"><text:span text:style-name="T1257"/><text:span text:style-name="T1258"/><text:span text:style-name="T1259"/></text:p>
      <text:list text:style-name="WWNum7" text:continue-numbering="true">
        <text:list-item>
          <text:p text:style-name="P199"><text:span text:style-name="T1260">Una volta terminata l’esportazione, premere sul pulsante “</text:span><text:span text:style-name="T1261">Scarica</text:span><text:span text:style-name="T1262">”</text:span><text:span text:style-name="T1263"/><text:span text:style-name="T1264"/></text:p>
        </text:list-item>
      </text:list>
      <text:p text:style-name="P200"><text:span text:style-name="T1265"/><text:span text:style-name="T1266"/><text:span text:style-name="T1267"/></text:p>
      <text:p text:style-name="P201"><text:span text:style-name="T1268"/><text:span text:style-name="T1269"/><text:span text:style-name="T1270"/></text:p>
      <text:p text:style-name="P202"><text:span text:style-name="T1271"/><text:span text:style-name="T1272"/><text:span text:style-name="T1273"/></text:p>
      <text:p text:style-name="P203"><text:span text:style-name="T1274"><text:s/></text:span><text:span text:style-name="T1275"/><text:span text:style-name="T1276"/></text:p>
      <text:list>
        <text:list-item>
          <text:p text:style-name="P204"><text:span/><text:bookmark-start text:name="_Toc3"/><text:span text:style-name="T1305">Crypto.com Exchange</text:span><text:span text:style-name="T1306"/><text:bookmark-end text:name="_Toc3"/><text:span/><text:span text:style-name="T1307"/></text:p>
        </text:list-item>
      </text:list>
      <text:p text:style-name="P209"><text:span text:style-name="T1308"/><text:span text:style-name="T1309"/><text:span text:style-name="T1310"/></text:p>
      <text:p text:style-name="P210"><text:span text:style-name="T1311">Da Crypto.com Exchange si possono scaricare 2 tipi di file da importare sul programma, il </text:span><text:span text:style-name="T1312">file delle transazioni</text:span><text:span text:style-name="T1313"> e il </text:span><text:span text:style-name="T1314">report mensile</text:span><text:span text:style-name="T1315"> delle transazioni.</text:span><text:span text:style-name="T1316"/><text:span text:style-name="T1317"/></text:p>
      <text:p text:style-name="P211"><text:span text:style-name="T1318">NB. Dal programma si posso importare entrambi ma è importante scegliere e utilizzare una sola tipologia per ogni periodo per evitare di avere dati doppi e incoerenti</text:span><text:span text:style-name="T1319">.</text:span><text:span text:style-name="T1320"/><text:span text:style-name="T1321"/></text:p>
      <text:p text:style-name="P212"><text:span text:style-name="T1322"/><text:span text:style-name="T1323"/><text:span text:style-name="T1324"/></text:p>
      <text:p text:style-name="P213"><text:span/><text:bookmark-start text:name="_Toc4"/><text:span text:style-name="T1325">1 - Come esportare il file delle Transazioni:</text:span><text:span text:style-name="T1326"/><text:bookmark-end text:name="_Toc4"/><text:span/><text:span text:style-name="T1327"/></text:p>
      <text:p text:style-name="P214"><text:span/><text:span/></text:p>
      <text:list text:style-name="WWNum2" text:continue-numbering="true">
        <text:list-item>
          <text:p text:style-name="P215"><text:span text:style-name="T1328">Collegarsi all’exchange da pc e andare nella sezione </text:span><text:span text:style-name="T1329">Ordini</text:span><text:span text:style-name="T1330"/><text:span text:style-name="T1331"/></text:p>
        </text:list-item>
        <text:list-item>
          <text:p text:style-name="P216"><text:span text:style-name="T1332">Selezionare la linguetta </text:span><text:span text:style-name="T1333">Transazioni</text:span><text:span text:style-name="T1334"> e selezionare “</text:span><text:span text:style-name="T1335">Tutte le transazioni</text:span><text:span text:style-name="T1336">”</text:span><text:span text:style-name="T1337"/><text:span text:style-name="T1338"/></text:p>
        </text:list-item>
        <text:list-item>
          <text:p text:style-name="P217"><text:span text:style-name="T1339">Impostare le date di cui si necessita l’importazione (max.180gg) nel </text:span><text:span text:style-name="T1340">calendario</text:span><text:span text:style-name="T1341"/><text:span text:style-name="T1342"/></text:p>
        </text:list-item>
        <text:list-item>
          <text:p text:style-name="P218"><text:span text:style-name="T1343">Premere il pulsante </text:span><text:span text:style-name="T1344">Esporta</text:span><text:span text:style-name="T1345"/><text:span text:style-name="T1346"/></text:p>
        </text:list-item>
      </text:list>
      <text:p text:style-name="P219"><text:span text:style-name="T1347"/><text:span/><draw:frame draw:name="Object" draw:style-name="gr19" text:anchor-type="as-char" svg:width="17.59cm" svg:height="4.814cm" svg:x="0cm" svg:y="0cm"><draw:image xlink:href="Pictures/image8.png" xlink:type="simple" xlink:show="embed" xlink:actuate="onLoad"/></draw:frame><text:span text:style-name="T1348"/><text:span text:style-name="T1349"/></text:p>
      <text:list text:style-name="WWNum2" text:continue-numbering="true">
        <text:list-item>
          <text:p text:style-name="P220"><text:span text:style-name="T1350">Premere su </text:span><text:span text:style-name="T1351">Esporta CSV</text:span><text:span text:style-name="T1352"> (l’esportazione potrebbe durare parecchi minuti)</text:span><text:span text:style-name="T1353"/><text:span text:style-name="T1354"/></text:p>
        </text:list-item>
      </text:list>
      <text:p text:style-name="P221"><text:span text:style-name="T1355"/><text:span/><draw:frame draw:name="Object" draw:style-name="gr20" text:anchor-type="as-char" svg:width="7.301cm" svg:height="6.641cm" svg:x="0cm" svg:y="0cm"><draw:image xlink:href="Pictures/image9.png" xlink:type="simple" xlink:show="embed" xlink:actuate="onLoad"/></draw:frame><text:span text:style-name="T1356"/><text:span text:style-name="T1357"/></text:p>
      <text:list text:style-name="WWNum2" text:continue-numbering="true">
        <text:list-item>
          <text:p text:style-name="P222"><text:span text:style-name="T1358">Una volta terminato troverete il file nella sezione </text:span><text:span text:style-name="T1359">Esporta Storico</text:span><text:span text:style-name="T1360"> della stessa maschera</text:span><text:span text:style-name="T1361"/><text:span text:style-name="T1362"/></text:p>
        </text:list-item>
      </text:list>
      <text:p text:style-name="P223"><text:span text:style-name="T1363"/><text:span/><draw:frame draw:name="Object" draw:style-name="gr21" text:anchor-type="as-char" svg:width="7.823cm" svg:height="5.786cm" svg:x="0cm" svg:y="0cm"><draw:image xlink:href="Pictures/image10.png" xlink:type="simple" xlink:show="embed" xlink:actuate="onLoad"/></draw:frame><text:span text:style-name="T1364"/><text:span text:style-name="T1365"/></text:p>
      <text:list text:style-name="WWNum2" text:continue-numbering="true">
        <text:list-item>
          <text:p text:style-name="P224"><text:span text:style-name="T1366">Premere su </text:span><text:span text:style-name="T1367">Scarica </text:span><text:span text:style-name="T1368">per scaricare il file sul pc.</text:span><text:span text:style-name="T1369"/><text:span text:style-name="T1370"/></text:p>
        </text:list-item>
      </text:list>
      <text:p text:style-name="P225"><text:span text:style-name="T1371"/><text:span text:style-name="T1372"/><text:span text:style-name="T1373"/></text:p>
      <text:p text:style-name="P226"><text:span/><text:bookmark-start text:name="_Toc5"/><text:span text:style-name="T1374">2 - Come esportare i file dei movimenti mensili:</text:span><text:span text:style-name="T1375"/><text:bookmark-end text:name="_Toc5"/><text:span/><text:span text:style-name="T1376"/></text:p>
      <text:p text:style-name="P227"><text:span/><text:span/></text:p>
      <text:list text:style-name="WWNum6" text:continue-numbering="true">
        <text:list-item>
          <text:p text:style-name="P228"><text:span text:style-name="T1377">Coll</text:span><text:span text:style-name="T1378">egarsi all’exchange da pc e andare nella sezione </text:span><text:span text:style-name="T1379">Ordini</text:span><text:span text:style-name="T1380"/><text:span text:style-name="T1381"/></text:p>
        </text:list-item>
        <text:list-item>
          <text:p text:style-name="P229"><text:span text:style-name="T1382">Premere sulla linguetta </text:span><text:span text:style-name="T1383">Transazioni</text:span><text:span text:style-name="T1384"> e selezionare “</text:span><text:span text:style-name="T1385">Estratti mensili</text:span><text:span text:style-name="T1386">”</text:span><text:span text:style-name="T1387"/><text:span text:style-name="T1388"/></text:p>
        </text:list-item>
        <text:list-item>
          <text:p text:style-name="P230"><text:span text:style-name="T1389">Su ogni rigo premere su </text:span><text:span text:style-name="T1390">CSV </text:span><text:span text:style-name="T1391">per scaricare il file</text:span><text:span text:style-name="T1392"/><text:span text:style-name="T1393"/></text:p>
        </text:list-item>
      </text:list>
      <text:p text:style-name="P231"><text:span text:style-name="T1394"/><text:span/><draw:frame draw:name="Object" draw:style-name="gr22" text:anchor-type="as-char" svg:width="17.59cm" svg:height="8.599cm" svg:x="0cm" svg:y="0cm"><draw:image xlink:href="Pictures/image11.png" xlink:type="simple" xlink:show="embed" xlink:actuate="onLoad"/></draw:frame><text:span text:style-name="T1395"/><text:span text:style-name="T1396"/></text:p>
      <text:p text:style-name="P232"><text:span text:style-name="T1397"/><text:span text:style-name="T1398"/><text:span text:style-name="T1399"/></text:p>
      <text:p text:style-name="P233"><text:span text:style-name="T1400"/><text:span text:style-name="T1401"/><text:span text:style-name="T1402"/></text:p>
      <text:p text:style-name="P234"><text:span text:style-name="T1403"/><text:span text:style-name="T1404"/><text:span text:style-name="T1405"/></text:p>
      <text:p text:style-name="P235"><text:span text:style-name="T1406"/><text:span text:style-name="T1407"/><text:span text:style-name="T1408"/></text:p>
      <text:list>
        <text:list-item>
          <text:p text:style-name="P236"><text:span/><text:bookmark-start text:name="_Toc6"/><text:span text:style-name="T1444">Binance</text:span><text:span text:style-name="T1445"/><text:bookmark-end text:name="_Toc6"/><text:span/><text:span text:style-name="T1446"/></text:p>
        </text:list-item>
      </text:list>
      <text:p text:style-name="P242"><text:span text:style-name="T1447"/><text:span text:style-name="T1448"/><text:span text:style-name="T1449"/></text:p>
      <text:p text:style-name="P243"><text:span text:style-name="T1450">Da Binance si possono scaricare 2 tipi di file da importare sul programma, il </text:span><text:span text:style-name="T1451">file delle transazioni</text:span><text:span text:style-name="T1452"> e il </text:span><text:span text:style-name="T1453">Report finanziario</text:span><text:span text:style-name="T1454"> delle transazioni.</text:span><text:span text:style-name="T1455"/><text:span text:style-name="T1456"/></text:p>
      <text:p text:style-name="P244"><text:span text:style-name="T1457">NB. Dalle prove fatte durante il 2025 non so come mai ma il file delle transazioni risulta essere più accurato nei movimenti</text:span><text:span text:style-name="T1458">, vedremo nel 2026 se cambia qualcosa.</text:span><text:span text:style-name="T1459"/><text:span text:style-name="T1460"/></text:p>
      <text:p text:style-name="P245"><text:span text:style-name="T1461"/><text:span text:style-name="T1462"/><text:span text:style-name="T1463"/></text:p>
      <text:p text:style-name="P246"><text:span text:style-name="T1464">NB2. </text:span><text:span text:style-name="T1465">E’ importante scegliere e utilizzare una sola tipologia per ogni periodo per evitare di avere dati doppi e incoerenti</text:span><text:span text:style-name="T1466">.</text:span><text:span text:style-name="T1467"/><text:span text:style-name="T1468"/></text:p>
      <text:p text:style-name="P247"><text:span text:style-name="T1469"/><text:span text:style-name="T1470"/><text:span text:style-name="T1471"/></text:p>
      <text:p text:style-name="P248"><text:span/><text:bookmark-start text:name="_Toc7"/><text:span text:style-name="T1472">1 - Come esportare il file delle Transazioni:</text:span><text:span text:style-name="T1473"/><text:bookmark-end text:name="_Toc7"/><text:span/><text:span text:style-name="T1474"/></text:p>
      <text:p text:style-name="P249"><text:span text:style-name="T1475"/><text:span text:style-name="T1476"/><text:span text:style-name="T1477"/></text:p>
      <text:list text:style-name="WWNum10" text:continue-numbering="true">
        <text:list-item>
          <text:p text:style-name="P250"><text:span text:style-name="T1478">Premere sulla scritta “</text:span><text:span text:style-name="T1479">Ordini</text:span><text:span text:style-name="T1480">” nel menù a sinistra.</text:span><text:span text:style-name="T1481"/><text:span text:style-name="T1482"/></text:p>
        </text:list-item>
      </text:list>
      <text:p text:style-name="P251"><text:span text:style-name="T1483"/><text:span text:style-name="T1484"/><text:span text:style-name="T1485"/></text:p>
      <text:list text:style-name="WWNum10" text:continue-numbering="true">
        <text:list-item>
          <text:p text:style-name="P252"><text:span text:style-name="T1486">Premere su “</text:span><text:span text:style-name="T1487">Storico Asset</text:span><text:span text:style-name="T1488">”</text:span><text:span text:style-name="T1489"/><text:span text:style-name="T1490"/></text:p>
        </text:list-item>
      </text:list>
      <text:p text:style-name="P253"><text:span text:style-name="T1491"/><text:span text:style-name="T1492"/><text:span text:style-name="T1493"/></text:p>
      <text:list text:style-name="WWNum10" text:continue-numbering="true">
        <text:list-item>
          <text:p text:style-name="P254"><text:span text:style-name="T1494"/><text:span text:style-name="T1495">Nella schermata che si apre premere sull’</text:span><text:span text:style-name="T1496">icona</text:span><text:span text:style-name="T1497"> in alto a destra contenente un </text:span><text:span text:style-name="T1498">riquadro con freccia</text:span><text:span text:style-name="T1499"/><text:span text:style-name="T1500"/></text:p>
        </text:list-item>
      </text:list>
      <text:p text:style-name="P255"><text:span text:style-name="T1501"/><text:span text:style-name="T1502"/><text:span text:style-name="T1503"/></text:p>
      <text:p text:style-name="P256"><text:span text:style-name="T1504"/><text:span/><draw:frame draw:name="Object" draw:style-name="gr28" text:anchor-type="as-char" svg:width="18.45cm" svg:height="4.361cm" svg:x="0cm" svg:y="0cm"><draw:image xlink:href="Pictures/image12.png" xlink:type="simple" xlink:show="embed" xlink:actuate="onLoad"/></draw:frame><text:span text:style-name="T1505"/><text:span text:style-name="T1506"/></text:p>
      <text:list text:style-name="WWNum10" text:continue-numbering="true">
        <text:list-item>
          <text:p text:style-name="P257"><text:span text:style-name="T1507"/><text:span/><draw:frame draw:name="Object" draw:style-name="gr29" draw:z-index="54285" text:anchor-type="paragraph" svg:width="8.892cm" svg:height="12.51cm" svg:x="9.112cm" svg:y="0.06796cm"><draw:image xlink:href="Pictures/image13.png" xlink:type="simple" xlink:show="embed" xlink:actuate="onLoad"/></draw:frame><text:span text:style-name="T1508">Nella maschera che si apre premere su “</text:span><text:span text:style-name="T1509">Personalizza</text:span><text:span text:style-name="T1510">” e immettere le </text:span><text:span text:style-name="T1511">date </text:span><text:span text:style-name="T1512">per cui si vuole estrarre i dati facendo attenzione che nei due campi sottostanti i valori siano impostati su “</text:span><text:span text:style-name="T1513">Tutto</text:span><text:span text:style-name="T1514">” e quindi confermare con “</text:span><text:span text:style-name="T1515">Esporta</text:span><text:span text:style-name="T1516">”.</text:span><text:span text:style-name="T1517"/><text:span text:style-name="T1518"/></text:p>
        </text:list-item>
        <text:list-item>
          <text:p text:style-name="P258"><text:span text:style-name="T1519">Una volta premuto su esporta nella parte bassa della finestra comparirà un rigo con stato “</text:span><text:span text:style-name="T1520">Generando</text:span><text:span text:style-name="T1521">”, ora bisognerà aspettare che</text:span><text:span text:style-name="T1522"> il file venga generato e poi sempre dalla stessa maschera si potrà scaricare il file. Non serve aspettare, si può tranquillamente chiudere e tornare nella stessa maschera dopo qualche tempo a controllare se il file è stato generato, comparirà la scritta “</text:span><text:span text:style-name="T1523">Scarica</text:span><text:span text:style-name="T1524">” affianco allo stato.</text:span><text:span text:style-name="T1525"/><text:span text:style-name="T1526"/></text:p>
        </text:list-item>
      </text:list>
      <text:p text:style-name="P259"><text:span text:style-name="T1527"/><text:span text:style-name="T1528"/><text:span text:style-name="T1529"/></text:p>
      <text:p text:style-name="P260"><text:span text:style-name="T1530"/><text:span/><draw:frame draw:name="Object" draw:style-name="gr30" text:anchor-type="as-char" svg:width="8.401cm" svg:height="11.86cm" svg:x="0cm" svg:y="0cm"><draw:image xlink:href="Pictures/image14.png" xlink:type="simple" xlink:show="embed" xlink:actuate="onLoad"/></draw:frame><text:span text:style-name="T1531"/><text:span text:style-name="T1532"/></text:p>
      <text:p text:style-name="P261"><text:span text:style-name="T1533"/><text:span text:style-name="T1534"/><text:span text:style-name="T1535"/></text:p>
      <text:p text:style-name="P262"><text:span/><text:bookmark-start text:name="_Toc8"/><text:span text:style-name="T1536">2 - Come esportare il Report Finanziario:</text:span><text:span text:style-name="T1537"/><text:bookmark-end text:name="_Toc8"/><text:span/><text:span text:style-name="T1538"/></text:p>
      <text:p text:style-name="P263"><text:span text:style-name="T1539"/><text:span text:style-name="T1540"/><text:span text:style-name="T1541"/></text:p>
      <text:list text:style-name="WWNum13" text:continue-numbering="true">
        <text:list-item>
          <text:p text:style-name="P264"><text:span text:style-name="T1542">Nel Menù a sinistra premere su “</text:span><text:span text:style-name="T1543">Account</text:span><text:span text:style-name="T1544">”</text:span><text:span text:style-name="T1545"/><text:span text:style-name="T1546"/></text:p>
        </text:list-item>
      </text:list>
      <text:p text:style-name="P265"><text:span text:style-name="T1547"/><text:span text:style-name="T1548"/><text:span text:style-name="T1549"/></text:p>
      <text:list text:style-name="WWNum13" text:continue-numbering="true">
        <text:list-item>
          <text:p text:style-name="P266"><text:span text:style-name="T1550">Premere su “</text:span><text:span text:style-name="T1551">Report finanziari</text:span><text:span text:style-name="T1552">”</text:span><text:span text:style-name="T1553"/><text:span text:style-name="T1554"/></text:p>
        </text:list-item>
      </text:list>
      <text:p text:style-name="P267"><text:span text:style-name="T1555"/><text:span text:style-name="T1556"/><text:span text:style-name="T1557"/></text:p>
      <text:list text:style-name="WWNum13" text:continue-numbering="true">
        <text:list-item>
          <text:p text:style-name="P268"><text:span text:style-name="T1558">Selezionare il periodo desiderato e premere su “</text:span><text:span text:style-name="T1559">Visualizza</text:span><text:span text:style-name="T1560">”, verrà quindi scaricato il file.</text:span><text:span text:style-name="T1561"/><text:span text:style-name="T1562"/></text:p>
        </text:list-item>
      </text:list>
      <text:p text:style-name="P269"><text:span text:style-name="T1563"/><text:span text:style-name="T1564"/><text:span text:style-name="T1565"/></text:p>
      <text:p text:style-name="P270"><text:span text:style-name="T1566">NB. I file in questa sezione vengono generati una volta all’anno.</text:span><text:span text:style-name="T1567"/><text:span text:style-name="T1568"/></text:p>
      <text:p text:style-name="P271"><text:span text:style-name="T1569"/><text:span text:style-name="T1570"/><text:span text:style-name="T1571"/></text:p>
      <text:p text:style-name="P272"><text:span text:style-name="T1572"/><text:span/><draw:frame draw:name="Object" draw:style-name="gr31" text:anchor-type="as-char" svg:width="17.59cm" svg:height="6.681cm" svg:x="0cm" svg:y="0cm"><draw:image xlink:href="Pictures/image15.png" xlink:type="simple" xlink:show="embed" xlink:actuate="onLoad"/></draw:frame><text:span text:style-name="T1573"/><text:span text:style-name="T1574"/></text:p>
      <text:p text:style-name="P273"><text:span text:style-name="T1575"/><text:span text:style-name="T1576"><text:line-break/></text:span><text:span text:style-name="T1577"/><text:span text:style-name="T1578"/></text:p>
      <text:p text:style-name="P274"><text:span text:style-name="T1579"/><text:span text:style-name="T1580"/><text:span/></text:p>
      <text:list>
        <text:list-item>
          <text:p text:style-name="P275"><text:span/><text:bookmark-start text:name="_Toc9"/><text:span text:style-name="T1623">Cointraking.info</text:span><text:span text:style-name="T1624"/><text:bookmark-end text:name="_Toc9"/><text:span/><text:span text:style-name="T1625"/></text:p>
        </text:list-item>
      </text:list>
      <text:p text:style-name="P282"><text:span text:style-name="T1626"/><text:span text:style-name="T1627"/><text:span text:style-name="T1628"/></text:p>
      <text:p text:style-name="P283"><text:span text:style-name="T1629">Uno dei modi per poter importare i dati dei vostri exchange/blockchain non supportate da Giacenze Crypto è passare tramite un altra piattaforma di analisi dei dati.</text:span><text:span text:style-name="T1630"/><text:span text:style-name="T1631"/></text:p>
      <text:p text:style-name="P284"><text:span text:style-name="T1632">Bisognerà quindi importare i dati sulla piattaforma, quindi esportarli e caricarli su Giacenze Crypto.</text:span><text:span text:style-name="T1633"/><text:span text:style-name="T1634"/></text:p>
      <text:p text:style-name="P285"><text:span text:style-name="T1635"/><text:span text:style-name="T1636"/><text:span text:style-name="T1637"/></text:p>
      <text:p text:style-name="P286"><text:span text:style-name="T1638">In particolare se usate il software </text:span><text:span text:style-name="T1639">Cointraking </text:span><text:span text:style-name="T1640">per fare questo tipo di operazion</text:span><text:span text:style-name="T1641">e è opportuno ricordare che non permette se non a pagamento un importazione massiva dei vostri dati per cui bisognerà caricare, ad esempio, i dati di un singolo exchange, esportarli, cancellare i dati e ricominciare il giro con gli exchange che vi mancano.</text:span><text:span text:style-name="T1642"/><text:span text:style-name="T1643"/></text:p>
      <text:p text:style-name="P287"><text:span text:style-name="T1644">Il servizio è reperibile al seguente indirizzo </text:span><text:span text:style-name="T1645"/><text:a xlink:href="https://cointracking.info/dashboard.php" xlink:type="simple"><text:span text:style-name="T1646"/><text:span text:style-name="T1647"/><text:span text:style-name="T1648">https://cointracking.info/dashboard.php</text:span><text:span text:style-name="T1649"/><text:span text:style-name="T1650"/><text:span text:style-name="T1651"/></text:a><text:span text:style-name="T1652"/><text:span text:style-name="T1653"/></text:p>
      <text:p text:style-name="P288"><text:span text:style-name="T1654"/><text:span text:style-name="T1655"/><text:span text:style-name="T1656"/></text:p>
      <text:p text:style-name="P289"><text:span text:style-name="T1657">Nei passaggi successivi verrà illustrato come esportare i dati da cointraking : </text:span><text:span text:style-name="T1658"/><text:span text:style-name="T1659"/></text:p>
      <text:list text:style-name="WWNum14" text:continue-numbering="true">
        <text:list-item>
          <text:p text:style-name="P290"><text:span text:style-name="T1660">Importare i dati premendo sull’apposito pulsante e seguendo le indicazioni a video</text:span><text:span text:style-name="T1661"/><text:span text:style-name="T1662"/></text:p>
        </text:list-item>
      </text:list>
      <text:p text:style-name="P291"><text:span text:style-name="T1663"/><text:span/><draw:frame draw:name="Object" draw:style-name="gr38" text:anchor-type="as-char" svg:width="17.59cm" svg:height="4.085cm" svg:x="0cm" svg:y="0cm"><draw:image xlink:href="Pictures/image16.png" xlink:type="simple" xlink:show="embed" xlink:actuate="onLoad"/></draw:frame><text:span text:style-name="T1664"/><text:span text:style-name="T1665"/></text:p>
      <text:p text:style-name="P292"><text:span text:style-name="T1666"/><text:span text:style-name="T1667"/><text:span text:style-name="T1668"/></text:p>
      <text:list text:style-name="WWNum14" text:continue-numbering="true">
        <text:list-item>
          <text:p text:style-name="P293"><text:span text:style-name="T1669"/><text:span text:style-name="T1670">Una volta terminata l’importazione premere su “</text:span><text:span text:style-name="T1671">Transazioni</text:span><text:span text:style-name="T1672">”</text:span><text:span text:style-name="T1673"/><text:span text:style-name="T1674"/></text:p>
        </text:list-item>
        <text:list-item>
          <text:p text:style-name="P294"><text:span text:style-name="T1675"/><text:span text:style-name="T1676">Premere sul pulsante “</text:span><text:span text:style-name="T1677">Export</text:span><text:span text:style-name="T1678">”</text:span><text:span text:style-name="T1679"/><text:span text:style-name="T1680"/></text:p>
        </text:list-item>
        <text:list-item>
          <text:p text:style-name="P295"><text:span text:style-name="T1681"/><text:span/><draw:frame draw:name="Object" draw:style-name="gr39" draw:z-index="64525" text:anchor-type="paragraph" svg:width="16.44cm" svg:height="6.702cm" svg:x="0.8795cm" svg:y="0.5326cm"><draw:image xlink:href="Pictures/image17.png" xlink:type="simple" xlink:show="embed" xlink:actuate="onLoad"/></draw:frame><text:span text:style-name="T1682">Selezionare il formato “</text:span><text:span text:style-name="T1683">CSV</text:span><text:span text:style-name="T1684">”, verrà quindi scaricato il file da importare su Giacenze Crypto.</text:span><text:span text:style-name="T1685"/><text:span text:style-name="T1686"/></text:p>
        </text:list-item>
        <text:list-item>
          <text:p text:style-name="P296"><text:span text:style-name="T1687"/><text:span text:style-name="T1688">Premere ora sul pulsante “</text:span><text:span text:style-name="T1689">Modifica/Elimina di massa</text:span><text:span text:style-name="T1690">”</text:span><text:span text:style-name="T1691"><text:s/></text:span><text:span text:style-name="T1692"/><text:span text:style-name="T1693"/></text:p>
        </text:list-item>
      </text:list>
      <text:p text:style-name="P297"><text:span text:style-name="T1694"/><text:span text:style-name="T1695"/><text:span text:style-name="T1696"/></text:p>
      <text:p text:style-name="P298"><text:span text:style-name="T1697"/><text:span/><draw:frame draw:name="Object" draw:style-name="gr40" text:anchor-type="as-char" svg:width="17.59cm" svg:height="4.085cm" svg:x="0cm" svg:y="0cm"><draw:image xlink:href="Pictures/image18.png" xlink:type="simple" xlink:show="embed" xlink:actuate="onLoad"/></draw:frame><text:span text:style-name="T1698"/><text:span text:style-name="T1699"/></text:p>
      <text:p text:style-name="P299"><text:span text:style-name="T1700"/><text:span text:style-name="T1701"/><text:span text:style-name="T1702"/></text:p>
      <text:list text:style-name="WWNum14" text:continue-numbering="true">
        <text:list-item>
          <text:p text:style-name="P300"><text:span text:style-name="T1703">Nella maschera che compare selezionare la voce “</text:span><text:span text:style-name="T1704">eliminare tutte le transazioni</text:span><text:span text:style-name="T1705">” e poi premere sul tasto rosso “</text:span><text:span text:style-name="T1706">eliminare le voci selezionate</text:span><text:span text:style-name="T1707">”, in questo modo potrete ricaricare altri dati partendo dal punto 1.</text:span><text:span text:style-name="T1708"/><text:span text:style-name="T1709"/></text:p>
        </text:list-item>
      </text:list>
      <text:p text:style-name="P301"><text:span text:style-name="T1710"/><text:span text:style-name="T1711"/><text:span text:style-name="T1712"/></text:p>
      <text:p text:style-name="P302"><text:span text:style-name="T1713"/><text:span/><draw:frame draw:name="Object" draw:style-name="gr41" text:anchor-type="as-char" svg:width="12.8cm" svg:height="10.34cm" svg:x="0cm" svg:y="0cm"><draw:image xlink:href="Pictures/image19.png" xlink:type="simple" xlink:show="embed" xlink:actuate="onLoad"/></draw:frame><text:span text:style-name="T1714"/><text:span text:style-name="T1715"/></text:p>
      <text:p text:style-name="P303"><text:span text:style-name="T1716"/><text:span text:style-name="T1717"/><text:span text:style-name="T1718"/></text:p>
      <text:p text:style-name="P304"><text:span text:style-name="T1719"/><text:span text:style-name="T1720"/><text:span text:style-name="T1721"/></text:p>
      <text:p text:style-name="P305"><text:span text:style-name="T1722"/><text:span text:style-name="T1723"><text:line-break/></text:span><text:span text:style-name="T1724"/><text:span text:style-name="T1725"/></text:p>
      <text:p text:style-name="P306"><text:span text:style-name="T1726"/><text:span text:style-name="T1727"/><text:span/></text:p>
      <text:p text:style-name="P307"><text:span/><text:bookmark-start text:name="_Toc10"/><text:span text:style-name="T1770">Import CSV sul software Giacenze Crypto</text:span><text:span text:style-name="T1771"/><text:bookmark-end text:name="_Toc10"/><text:span/><text:span text:style-name="T1772"/></text:p>
      <text:p text:style-name="P314"><text:span text:style-name="T1773"/><text:span text:style-name="T1774"/><text:span text:style-name="T1775"/></text:p>
      <text:p text:style-name="P315"><text:span text:style-name="T1776">Per importare invece i dati sul Software procedere come segue :</text:span><text:span text:style-name="T1777"/><text:span text:style-name="T1778"/></text:p>
      <text:p text:style-name="P316"><text:span text:style-name="T1779"/><text:span/><draw:frame draw:name="Object" draw:style-name="gr48" draw:z-index="67597" text:anchor-type="paragraph" svg:width="6.694cm" svg:height="4.578cm" svg:x="10.89cm" svg:y="0.3683cm"><draw:image xlink:href="Pictures/image20.png" xlink:type="simple" xlink:show="embed" xlink:actuate="onLoad"/></draw:frame><text:span text:style-name="T1780"/><text:span text:style-name="T1781"/></text:p>
      <text:p text:style-name="P317"><text:span text:style-name="T1782"/><text:span text:style-name="T1783"/><text:span text:style-name="T1784"/></text:p>
      <text:list text:style-name="WWNum19" text:continue-numbering="true">
        <text:list-item>
          <text:p text:style-name="P318"><text:span text:style-name="T1785">Premere sul pulsante “</text:span><text:span text:style-name="T1786">Carica CSV” </text:span><text:span text:style-name="T1787">presente nella sezione “</text:span><text:span text:style-name="T1788">Transazioni Crypto</text:span><text:span text:style-name="T1789">”</text:span><text:span text:style-name="T1790"/><text:span text:style-name="T1791"/></text:p>
        </text:list-item>
      </text:list>
      <text:p text:style-name="P319"><text:span text:style-name="T1792"/><text:span text:style-name="T1793"/><text:span text:style-name="T1794"/></text:p>
      <text:p text:style-name="P320"><text:span text:style-name="T1795"/><text:span text:style-name="T1796"/><text:span text:style-name="T1797"/></text:p>
      <text:p text:style-name="P321"><text:span text:style-name="T1798"/><text:span text:style-name="T1799"/><text:span text:style-name="T1800"/></text:p>
      <text:p text:style-name="P322"><text:span text:style-name="T1801"/><text:span text:style-name="T1802"/><text:span text:style-name="T1803"/></text:p>
      <text:p text:style-name="P323"><text:span text:style-name="T1804"/><text:span text:style-name="T1805"/><text:span text:style-name="T1806"/></text:p>
      <text:p text:style-name="P324"><text:span text:style-name="T1807"/><text:span text:style-name="T1808"/><text:span text:style-name="T1809"/></text:p>
      <text:p text:style-name="P325"><text:span text:style-name="T1810"/><text:span/><draw:frame draw:name="Object" draw:style-name="gr49" draw:z-index="70669" text:anchor-type="paragraph" svg:width="8.233cm" svg:height="10.7cm" svg:x="9.649cm" svg:y="0.518cm"><draw:image xlink:href="Pictures/image21.png" xlink:type="simple" xlink:show="embed" xlink:actuate="onLoad"/></draw:frame><text:span text:style-name="T1811"/><text:span text:style-name="T1812"/><text:span text:style-name="T1813"/></text:p>
      <text:list text:style-name="WWNum19" text:continue-numbering="true">
        <text:list-item>
          <text:p text:style-name="P326"><text:span text:style-name="T1814"/><text:span text:style-name="T1815">A questo punto seguire i seguenti punti per procedere all’importazione :</text:span><text:span text:style-name="T1816"/><text:span text:style-name="T1817"/></text:p>
        </text:list-item>
        <text:list-item>
          <text:list>
            <text:list-item>
              <text:p text:style-name="P327"><text:span text:style-name="T1818"/><text:span/><text:span text:style-name="T1819">Selezionare l’Exchange dal menù a tendina.</text:span><text:span text:style-name="T1820"/><text:span text:style-name="T1821"/></text:p>
            </text:list-item>
            <text:list-item>
              <text:p text:style-name="P328"><text:span text:style-name="T1822"/><text:span text:style-name="T1823">Decidere se usare l’opzione “</text:span><text:span text:style-name="T1824">Sovrascrivere movimenti già presenti</text:span><text:span text:style-name="T1825">”. Questa opzione permette di sovrascrivere movimenti già presenti</text:span><text:span text:style-name="T1826"> con quelli presenti nel file CSV che si andrà a selezionare nel caso si cerci di importare movimenti doppi.Tuttavia nel caso in cui si cerchi di reimportare uno stesso periodo è consigliabile cancellare le movimentazioni del periodo e reimportarle da capo</text:span><text:span text:style-name="T1827"> per evitare problematiche. I file degli exchange infatti talune volte se scaricati in periodi diversi dalla piattaforma, pur facendo riferimento al medesimo periodo operativo potrebbero presentare delle incongruenze (Ore cambiate, valori ritoccati etc...)</text:span><text:span text:style-name="T1828"/><text:span text:style-name="T1829"/></text:p>
            </text:list-item>
          </text:list>
        </text:list-item>
      </text:list>
      <text:p text:style-name="P329"><text:span text:style-name="T1830"/><text:span text:style-name="T1831"/><text:span text:style-name="T1832"/></text:p>
      <text:list text:style-name="WWNum19" text:continue-numbering="true">
        <text:list-item>
          <text:list>
            <text:list-item>
              <text:p text:style-name="P330"><text:span text:style-name="T1833"/><text:span text:style-name="T1834">Nel caso i</text:span><text:span text:style-name="T1835">n cui invece si voglia importare un CSV da<text:s text:c="8"/>una piattaforma come ad esempio Cointraking che permette di gestire molteplici Wallet/Exchange bisognerà selezionare anche la tipologia e il Wallet di destinazione prima di procedere con l’import. (Vedi immagine).</text:span><text:span/><draw:frame draw:name="Object" draw:style-name="gr50" draw:z-index="76813" text:anchor-type="paragraph" svg:width="7.027cm" svg:height="9.076cm" svg:x="10.56cm" svg:y="-0.3022cm"><draw:image xlink:href="Pictures/image22.png" xlink:type="simple" xlink:show="embed" xlink:actuate="onLoad"/></draw:frame><text:span text:style-name="T1836"><text:line-break/><text:line-break/><text:line-break/></text:span><text:span text:style-name="T1837"/><text:span text:style-name="T1838"/></text:p>
            </text:list-item>
            <text:list-item>
              <text:p text:style-name="P331"><text:span text:style-name="T1839"/><text:span text:style-name="T1840">Premere quindi su </text:span><text:span text:style-name="T1841">“Selezione file da importare”</text:span><text:span text:style-name="T1842"> per scegliere il file CSV da caricare</text:span><text:span text:style-name="T1843">.</text:span><text:span text:style-name="T1844"/><text:span text:style-name="T1845"/></text:p>
            </text:list-item>
          </text:list>
        </text:list-item>
      </text:list>
      <text:p text:style-name="P332"><text:span text:style-name="T1846"/><text:span/><text:span text:style-name="T1847"><text:line-break/><text:line-break/><text:line-break/><text:line-break/><text:line-break/></text:span><text:span text:style-name="T1848"><text:line-break/></text:span><text:span text:style-name="T1849"/><text:span text:style-name="T1850"/></text:p>
      <text:list text:style-name="WWNum18" text:continue-numbering="true">
        <text:list-item>
          <text:p text:style-name="P333"><text:span text:style-name="T1851">Terminata l’importazione comparirà un resoconto ti</text:span><text:span/><draw:frame draw:name="Object" draw:style-name="gr51" draw:z-index="77837" text:anchor-type="paragraph" svg:width="7.463cm" svg:height="7.179cm" svg:x="10.13cm" svg:y="-0.08996cm"><draw:image xlink:href="Pictures/image23.png" xlink:type="simple" xlink:show="embed" xlink:actuate="onLoad"/></draw:frame><text:span text:style-name="T1852">po questo nel quale saranno visibili anche eventuali errori e dove sarà possibile copiarli per poi segnalarli via mail o sul canale telegram.</text:span><text:span text:style-name="T1853"/><text:span text:style-name="T185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947">
      <style:paragraph-properties/>
      <style:text-properties fo:font-size="10pt"/>
    </style:style>
    <style:style style:display-name="DStyle_text" style:family="text" style:name="948">
      <style:paragraph-properties/>
    </style:style>
    <style:style style:parent-style-name="947" style:display-name="DStyle_paragraph" style:family="paragraph" style:name="949">
      <style:paragraph-properties/>
      <style:text-properties fo:font-size="10pt"/>
    </style:style>
    <style:style style:parent-style-name="947" style:display-name="DStyle_text" style:family="text" style:name="950">
      <style:paragraph-properties/>
    </style:style>
    <style:style style:parent-style-name="949" style:display-name="DStyle_paragraph" style:family="paragraph" style:name="951">
      <style:paragraph-properties/>
      <style:text-properties fo:font-size="10pt"/>
    </style:style>
    <style:style style:parent-style-name="947" style:display-name="DStyle_text" style:family="text" style:name="952">
      <style:paragraph-properties/>
    </style:style>
    <style:style style:parent-style-name="951" style:display-name="DStyle_paragraph" style:family="paragraph" style:name="953">
      <style:paragraph-properties/>
      <style:text-properties fo:font-size="10pt"/>
    </style:style>
    <style:style style:parent-style-name="947" style:display-name="DStyle_text" style:family="text" style:name="954">
      <style:paragraph-properties/>
    </style:style>
    <style:style style:class="default" style:display-name="Normal" style:family="paragraph" style:name="955">
      <style:paragraph-properties/>
      <style:text-properties/>
    </style:style>
    <style:style style:parent-style-name="955" style:display-name="Heading 3" style:family="paragraph" style:name="956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955" style:display-name="Heading 4" style:family="paragraph" style:name="957">
      <style:paragraph-properties fo:margin-top="4pt" fo:margin-bottom="2pt"/>
      <style:text-properties fo:color="#0f4761" fo:font-family="Arial" style:font-family-complex="Arial" fo:font-style="italic"/>
    </style:style>
    <style:style style:parent-style-name="955" style:display-name="Heading 5" style:family="paragraph" style:name="958">
      <style:paragraph-properties fo:margin-top="4pt" fo:margin-bottom="2pt"/>
      <style:text-properties fo:color="#0f4761" fo:font-family="Arial" style:font-family-complex="Arial"/>
    </style:style>
    <style:style style:parent-style-name="955" style:display-name="Heading 6" style:family="paragraph" style:name="959">
      <style:paragraph-properties fo:margin-top="2pt" fo:margin-bottom="0pt"/>
      <style:text-properties fo:color="#595959" fo:font-family="Arial" style:font-family-complex="Arial" fo:font-style="italic"/>
    </style:style>
    <style:style style:parent-style-name="955" style:display-name="Heading 7" style:family="paragraph" style:name="960">
      <style:paragraph-properties fo:margin-top="2pt" fo:margin-bottom="0pt"/>
      <style:text-properties fo:color="#595959" fo:font-family="Arial" style:font-family-complex="Arial"/>
    </style:style>
    <style:style style:parent-style-name="955" style:display-name="Heading 8" style:family="paragraph" style:name="961">
      <style:paragraph-properties fo:margin-bottom="0pt"/>
      <style:text-properties fo:color="#272727" fo:font-family="Arial" style:font-family-complex="Arial" fo:font-style="italic"/>
    </style:style>
    <style:style style:parent-style-name="955" style:display-name="Heading 9" style:family="paragraph" style:name="962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963">
      <style:paragraph-properties/>
      <style:text-properties/>
    </style:style>
    <style:style style:parent-style-name="963" style:display-name="Heading 1 Char" style:family="text" style:name="964">
      <style:paragraph-properties/>
      <style:text-properties fo:color="#0f4761" fo:font-family="Arial" style:font-family-complex="Arial" fo:font-size="20pt" style:font-size-complex="20pt"/>
    </style:style>
    <style:style style:parent-style-name="963" style:display-name="Heading 2 Char" style:family="text" style:name="965">
      <style:paragraph-properties/>
      <style:text-properties fo:color="#0f4761" fo:font-family="Arial" style:font-family-complex="Arial" fo:font-size="16pt" style:font-size-complex="16pt"/>
    </style:style>
    <style:style style:parent-style-name="963" style:display-name="Heading 3 Char" style:family="text" style:name="966">
      <style:paragraph-properties/>
      <style:text-properties fo:color="#0f4761" fo:font-family="Arial" style:font-family-complex="Arial" fo:font-size="14pt" style:font-size-complex="14pt"/>
    </style:style>
    <style:style style:parent-style-name="963" style:display-name="Heading 4 Char" style:family="text" style:name="967">
      <style:paragraph-properties/>
      <style:text-properties fo:color="#0f4761" fo:font-family="Arial" style:font-family-complex="Arial" fo:font-style="italic"/>
    </style:style>
    <style:style style:parent-style-name="963" style:display-name="Heading 5 Char" style:family="text" style:name="968">
      <style:paragraph-properties/>
      <style:text-properties fo:color="#0f4761" fo:font-family="Arial" style:font-family-complex="Arial"/>
    </style:style>
    <style:style style:parent-style-name="963" style:display-name="Heading 6 Char" style:family="text" style:name="969">
      <style:paragraph-properties/>
      <style:text-properties fo:color="#595959" fo:font-family="Arial" style:font-family-complex="Arial" fo:font-style="italic"/>
    </style:style>
    <style:style style:parent-style-name="963" style:display-name="Heading 7 Char" style:family="text" style:name="970">
      <style:paragraph-properties/>
      <style:text-properties fo:color="#595959" fo:font-family="Arial" style:font-family-complex="Arial"/>
    </style:style>
    <style:style style:parent-style-name="963" style:display-name="Heading 8 Char" style:family="text" style:name="971">
      <style:paragraph-properties/>
      <style:text-properties fo:color="#272727" fo:font-family="Arial" style:font-family-complex="Arial" fo:font-style="italic"/>
    </style:style>
    <style:style style:parent-style-name="963" style:display-name="Heading 9 Char" style:family="text" style:name="972">
      <style:paragraph-properties/>
      <style:text-properties fo:color="#272727" fo:font-family="Arial" style:font-family-complex="Arial" fo:font-style="italic"/>
    </style:style>
    <style:style style:parent-style-name="955" style:display-name="Title" style:family="paragraph" style:name="973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963" style:display-name="Title Char" style:family="text" style:name="974">
      <style:paragraph-properties/>
      <style:text-properties fo:font-family="Arial" style:font-family-complex="Arial" fo:font-size="28pt" style:font-size-complex="28pt" fo:letter-spacing="-0.5pt"/>
    </style:style>
    <style:style style:parent-style-name="955" style:display-name="Subtitle" style:family="paragraph" style:name="975">
      <style:paragraph-properties/>
      <style:text-properties fo:color="#595959" fo:font-size="14pt" style:font-size-complex="14pt" fo:letter-spacing="0.75pt"/>
    </style:style>
    <style:style style:parent-style-name="963" style:display-name="Subtitle Char" style:family="text" style:name="976">
      <style:paragraph-properties/>
      <style:text-properties fo:color="#595959" fo:font-size="14pt" style:font-size-complex="14pt" fo:letter-spacing="0.75pt"/>
    </style:style>
    <style:style style:parent-style-name="955" style:display-name="Quote" style:family="paragraph" style:name="977">
      <style:paragraph-properties fo:text-align="center" fo:margin-top="8pt"/>
      <style:text-properties fo:color="#404040" fo:font-style="italic"/>
    </style:style>
    <style:style style:parent-style-name="963" style:display-name="Quote Char" style:family="text" style:name="978">
      <style:paragraph-properties/>
      <style:text-properties fo:color="#404040" fo:font-style="italic"/>
    </style:style>
    <style:style style:parent-style-name="955" style:display-name="List Paragraph" style:family="paragraph" style:name="979">
      <style:paragraph-properties fo:margin-left="1.27cm" fo:margin-right="0cm" fo:text-indent="0cm"/>
    </style:style>
    <style:style style:parent-style-name="963" style:display-name="Intense Emphasis" style:family="text" style:name="980">
      <style:paragraph-properties/>
      <style:text-properties fo:color="#0f4761" fo:font-style="italic"/>
    </style:style>
    <style:style style:parent-style-name="955" style:display-name="Intense Quote" style:family="paragraph" style:name="981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963" style:display-name="Intense Quote Char" style:family="text" style:name="982">
      <style:paragraph-properties/>
      <style:text-properties fo:color="#0f4761" fo:font-style="italic"/>
    </style:style>
    <style:style style:parent-style-name="963" style:display-name="Intense Reference" style:family="text" style:name="983">
      <style:paragraph-properties/>
      <style:text-properties fo:font-variant="small-caps" fo:color="#0f4761" fo:letter-spacing="0.25pt" fo:font-weight="bold"/>
    </style:style>
    <style:style style:parent-style-name="955" style:display-name="No Spacing" style:family="paragraph" style:name="984">
      <style:paragraph-properties fo:line-height="100%" fo:margin-bottom="0pt"/>
    </style:style>
    <style:style style:parent-style-name="963" style:display-name="Subtle Emphasis" style:family="text" style:name="985">
      <style:paragraph-properties/>
      <style:text-properties fo:color="#404040" fo:font-style="italic"/>
    </style:style>
    <style:style style:parent-style-name="963" style:display-name="Strong" style:family="text" style:name="986">
      <style:paragraph-properties/>
      <style:text-properties fo:font-weight="bold"/>
    </style:style>
    <style:style style:parent-style-name="963" style:display-name="Subtle Reference" style:family="text" style:name="987">
      <style:paragraph-properties/>
      <style:text-properties fo:font-variant="small-caps" fo:color="#5a5a5a"/>
    </style:style>
    <style:style style:parent-style-name="963" style:display-name="Book Title" style:family="text" style:name="988">
      <style:paragraph-properties/>
      <style:text-properties fo:letter-spacing="0.25pt" fo:font-style="italic" fo:font-weight="bold"/>
    </style:style>
    <style:style style:parent-style-name="963" style:display-name="Header Char" style:family="text" style:name="989">
      <style:paragraph-properties/>
    </style:style>
    <style:style style:parent-style-name="963" style:display-name="Footer Char" style:family="text" style:name="990">
      <style:paragraph-properties/>
    </style:style>
    <style:style style:parent-style-name="955" style:display-name="footnote text" style:family="paragraph" style:name="991">
      <style:paragraph-properties fo:line-height="100%" fo:margin-bottom="0pt"/>
      <style:text-properties fo:font-size="10pt" style:font-size-complex="10pt"/>
    </style:style>
    <style:style style:parent-style-name="963" style:display-name="Footnote Text Char" style:family="text" style:name="992">
      <style:paragraph-properties/>
      <style:text-properties fo:font-size="10pt" style:font-size-complex="10pt"/>
    </style:style>
    <style:style style:parent-style-name="963" style:display-name="footnote reference" style:family="text" style:name="993">
      <style:paragraph-properties/>
      <style:text-properties style:text-position="super 58%"/>
    </style:style>
    <style:style style:parent-style-name="955" style:display-name="endnote text" style:family="paragraph" style:name="994">
      <style:paragraph-properties fo:line-height="100%" fo:margin-bottom="0pt"/>
      <style:text-properties fo:font-size="10pt" style:font-size-complex="10pt"/>
    </style:style>
    <style:style style:parent-style-name="963" style:display-name="Endnote Text Char" style:family="text" style:name="995">
      <style:paragraph-properties/>
      <style:text-properties fo:font-size="10pt" style:font-size-complex="10pt"/>
    </style:style>
    <style:style style:parent-style-name="963" style:display-name="endnote reference" style:family="text" style:name="996">
      <style:paragraph-properties/>
      <style:text-properties style:text-position="super 58%"/>
    </style:style>
    <style:style style:parent-style-name="963" style:display-name="Hyperlink" style:family="text" style:name="99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955" style:display-name="Internet link" style:family="text" style:name="99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55" style:display-name="Internet link" style:family="text" style:name="99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55" style:display-name="Internet link" style:family="text" style:name="100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55" style:display-name="Internet link" style:family="text" style:name="100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63" style:display-name="FollowedHyperlink" style:family="text" style:name="1002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955" style:display-name="toc 1" style:family="paragraph" style:name="1003">
      <style:paragraph-properties fo:margin-bottom="5pt"/>
      <style:text-properties/>
    </style:style>
    <style:style style:parent-style-name="955" style:display-name="toc 2" style:family="paragraph" style:name="1004">
      <style:paragraph-properties fo:margin-left="0.3881cm" fo:margin-right="0cm" fo:text-indent="0cm" fo:margin-bottom="5pt"/>
    </style:style>
    <style:style style:parent-style-name="955" style:display-name="toc 3" style:family="paragraph" style:name="1005">
      <style:paragraph-properties fo:margin-left="0.7762cm" fo:margin-right="0cm" fo:text-indent="0cm" fo:margin-bottom="5pt"/>
      <style:text-properties/>
    </style:style>
    <style:style style:parent-style-name="955" style:display-name="toc 4" style:family="paragraph" style:name="1006">
      <style:paragraph-properties fo:margin-left="1.164cm" fo:margin-right="0cm" fo:text-indent="0cm" fo:margin-bottom="5pt"/>
    </style:style>
    <style:style style:parent-style-name="955" style:display-name="toc 5" style:family="paragraph" style:name="1007">
      <style:paragraph-properties fo:margin-left="1.552cm" fo:margin-right="0cm" fo:text-indent="0cm" fo:margin-bottom="5pt"/>
    </style:style>
    <style:style style:parent-style-name="955" style:display-name="toc 6" style:family="paragraph" style:name="1008">
      <style:paragraph-properties fo:margin-left="1.94cm" fo:margin-right="0cm" fo:text-indent="0cm" fo:margin-bottom="5pt"/>
    </style:style>
    <style:style style:parent-style-name="955" style:display-name="toc 7" style:family="paragraph" style:name="1009">
      <style:paragraph-properties fo:margin-left="2.328cm" fo:margin-right="0cm" fo:text-indent="0cm" fo:margin-bottom="5pt"/>
    </style:style>
    <style:style style:parent-style-name="955" style:display-name="toc 8" style:family="paragraph" style:name="1010">
      <style:paragraph-properties fo:margin-left="2.717cm" fo:margin-right="0cm" fo:text-indent="0cm" fo:margin-bottom="5pt"/>
    </style:style>
    <style:style style:parent-style-name="955" style:display-name="toc 9" style:family="paragraph" style:name="1011">
      <style:paragraph-properties fo:margin-left="3.105cm" fo:margin-right="0cm" fo:text-indent="0cm" fo:margin-bottom="5pt"/>
    </style:style>
    <style:style style:parent-style-name="963" style:display-name="Placeholder Text" style:family="text" style:name="1012">
      <style:paragraph-properties/>
      <style:text-properties fo:color="#666666"/>
    </style:style>
    <style:style style:parent-style-name="955" style:display-name="TOC Heading" style:family="paragraph" style:name="1013">
      <style:paragraph-properties/>
    </style:style>
    <style:style style:parent-style-name="955" style:display-name="table of figures" style:family="paragraph" style:name="1014">
      <style:paragraph-properties fo:margin-bottom="0pt"/>
    </style:style>
    <style:style style:parent-style-name="955" style:display-name="DStyle_paragraph" style:family="paragraph" style:name="10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15" style:display-name="Standard" style:family="paragraph" style:name="1016">
      <style:paragraph-properties/>
      <style:text-properties/>
    </style:style>
    <style:style style:parent-style-name="1016" style:display-name="Heading" style:family="paragraph" style:name="1017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1016" style:display-name="Text body" style:family="paragraph" style:name="1018">
      <style:paragraph-properties fo:line-height="115%" fo:margin-top="0pt" fo:margin-bottom="7pt"/>
      <style:text-properties/>
    </style:style>
    <style:style style:parent-style-name="1018" style:display-name="List" style:family="paragraph" style:name="1019">
      <style:paragraph-properties/>
    </style:style>
    <style:style style:parent-style-name="1016" style:display-name="Caption" style:family="paragraph" style:name="1020">
      <style:paragraph-properties fo:margin-top="6pt" fo:margin-bottom="6pt"/>
      <style:text-properties fo:font-size="12pt" style:font-size-complex="12pt" fo:font-style="italic"/>
    </style:style>
    <style:style style:parent-style-name="1016" style:display-name="Index" style:family="paragraph" style:name="1021">
      <style:paragraph-properties/>
    </style:style>
    <style:style style:parent-style-name="1016" style:display-name="Table Contents" style:family="paragraph" style:name="1022">
      <style:paragraph-properties/>
    </style:style>
    <style:style style:parent-style-name="1022" style:display-name="Table Heading" style:family="paragraph" style:name="1023">
      <style:paragraph-properties fo:text-align="center"/>
      <style:text-properties fo:font-weight="bold"/>
    </style:style>
    <style:style style:parent-style-name="1017" style:display-name="Index Heading" style:family="paragraph" style:name="1024">
      <style:paragraph-properties fo:margin-left="0cm" fo:margin-right="0cm" fo:text-indent="0cm"/>
      <style:text-properties fo:font-size="16pt" style:font-size-complex="16pt" fo:font-weight="bold"/>
    </style:style>
    <style:style style:parent-style-name="1024" style:display-name="Contents Heading" style:family="paragraph" style:name="1025">
      <style:paragraph-properties fo:margin-left="0cm" fo:margin-right="0cm" fo:text-indent="0cm"/>
      <style:text-properties fo:font-size="16pt" style:font-size-complex="16pt" fo:font-weight="bold"/>
    </style:style>
    <style:style style:parent-style-name="1021" style:display-name="Contents 1" style:family="paragraph" style:name="1026">
      <style:paragraph-properties fo:margin-left="0cm" fo:margin-right="0cm" fo:text-indent="0cm">
        <style:tab-stops>
          <style:tab-stop style:position="17.59cm" style:type="right" style:leader-type="dotted" style:leader-style="dotted"/>
        </style:tab-stops>
      </style:paragraph-properties>
      <style:text-properties fo:language="it" fo:country="IT" fo:font-weight="bold"/>
    </style:style>
    <style:style style:parent-style-name="1017" style:display-name="Heading 1" style:family="paragraph" style:name="1027">
      <style:paragraph-properties fo:margin-top="12pt" fo:margin-bottom="6pt"/>
      <style:text-properties fo:font-size="18pt" style:font-size-complex="18pt" fo:font-weight="bold"/>
    </style:style>
    <style:style style:parent-style-name="1017" style:display-name="Heading 2" style:family="paragraph" style:name="1028">
      <style:paragraph-properties fo:margin-top="10pt" fo:margin-bottom="6pt"/>
      <style:text-properties fo:font-size="16pt" style:font-size-complex="16pt" fo:font-weight="bold"/>
    </style:style>
    <style:style style:parent-style-name="1021" style:display-name="Contents 2" style:family="paragraph" style:name="1029">
      <style:paragraph-properties fo:margin-left="0.4992cm" fo:margin-right="0cm" fo:text-indent="0cm">
        <style:tab-stops>
          <style:tab-stop style:position="19.59cm" style:type="right" style:leader-type="dotted" style:leader-style="dotted"/>
        </style:tab-stops>
      </style:paragraph-properties>
    </style:style>
    <style:style style:parent-style-name="1016" style:display-name="Header and Footer" style:family="paragraph" style:name="1030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30" style:display-name="Footer" style:family="paragraph" style:name="1031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30" style:display-name="Header" style:family="paragraph" style:name="1032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955" style:display-name="Emphasis" style:family="text" style:name="1033">
      <style:paragraph-properties/>
      <style:text-properties fo:font-style="italic"/>
    </style:style>
    <style:style style:parent-style-name="955" style:display-name="Strong Emphasis" style:family="text" style:name="1034">
      <style:paragraph-properties/>
      <style:text-properties fo:font-weight="bold"/>
    </style:style>
    <style:style style:parent-style-name="955" style:display-name="Internet link" style:family="text" style:name="1035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955" style:display-name="Index Link" style:family="text" style:name="1036">
      <style:paragraph-properties/>
    </style:style>
    <style:style style:parent-style-name="955" style:display-name="Bullet Symbols" style:family="text" style:name="1037">
      <style:paragraph-properties/>
      <style:text-properties fo:font-family="OpenSymbol" style:font-family-complex="OpenSymbol"/>
    </style:style>
    <style:style style:parent-style-name="955" style:display-name="Numbering Symbols" style:family="text" style:name="1038">
      <style:paragraph-properties/>
    </style:style>
    <style:style style:parent-style-name="955" style:display-name="T1" style:family="text" style:name="1039">
      <style:paragraph-properties/>
    </style:style>
    <style:style style:parent-style-name="955" style:display-name="T2" style:family="text" style:name="1040">
      <style:paragraph-properties/>
    </style:style>
    <style:style style:parent-style-name="955" style:display-name="T3" style:family="text" style:name="1041">
      <style:paragraph-properties/>
    </style:style>
    <style:style style:parent-style-name="955" style:display-name="T4" style:family="text" style:name="1042">
      <style:paragraph-properties/>
    </style:style>
    <style:style style:parent-style-name="955" style:display-name="T5" style:family="text" style:name="1043">
      <style:paragraph-properties/>
    </style:style>
    <style:style style:parent-style-name="955" style:display-name="T6" style:family="text" style:name="1044">
      <style:paragraph-properties/>
    </style:style>
    <style:style style:parent-style-name="955" style:display-name="T7" style:family="text" style:name="1045">
      <style:paragraph-properties/>
    </style:style>
    <style:style style:parent-style-name="955" style:display-name="T8" style:family="text" style:name="1046">
      <style:paragraph-properties/>
    </style:style>
    <style:style style:parent-style-name="955" style:display-name="T9" style:family="text" style:name="1047">
      <style:paragraph-properties/>
    </style:style>
    <style:style style:parent-style-name="955" style:display-name="T10" style:family="text" style:name="1048">
      <style:paragraph-properties/>
    </style:style>
    <style:style style:parent-style-name="955" style:display-name="T11" style:family="text" style:name="1049">
      <style:paragraph-properties/>
    </style:style>
    <style:style style:parent-style-name="955" style:display-name="T12" style:family="text" style:name="1050">
      <style:paragraph-properties/>
    </style:style>
    <style:style style:parent-style-name="955" style:display-name="T13" style:family="text" style:name="1051">
      <style:paragraph-properties/>
    </style:style>
    <style:style style:parent-style-name="955" style:display-name="T14" style:family="text" style:name="1052">
      <style:paragraph-properties/>
    </style:style>
    <style:style style:parent-style-name="955" style:display-name="T15" style:family="text" style:name="1053">
      <style:paragraph-properties/>
    </style:style>
    <style:style style:parent-style-name="955" style:display-name="T16" style:family="text" style:name="1054">
      <style:paragraph-properties/>
    </style:style>
    <style:style style:parent-style-name="955" style:display-name="T17" style:family="text" style:name="1055">
      <style:paragraph-properties/>
    </style:style>
    <style:style style:parent-style-name="955" style:display-name="T18" style:family="text" style:name="1056">
      <style:paragraph-properties/>
    </style:style>
    <style:style style:parent-style-name="955" style:display-name="T19" style:family="text" style:name="1057">
      <style:paragraph-properties/>
    </style:style>
    <style:style style:parent-style-name="955" style:display-name="T20" style:family="text" style:name="1058">
      <style:paragraph-properties/>
    </style:style>
    <style:style style:parent-style-name="955" style:display-name="T21" style:family="text" style:name="1059">
      <style:paragraph-properties/>
    </style:style>
    <style:style style:parent-style-name="955" style:display-name="T22" style:family="text" style:name="1060">
      <style:paragraph-properties/>
    </style:style>
    <style:style style:parent-style-name="955" style:display-name="T23" style:family="text" style:name="1061">
      <style:paragraph-properties/>
    </style:style>
    <style:style style:parent-style-name="955" style:display-name="T24" style:family="text" style:name="1062">
      <style:paragraph-properties/>
    </style:style>
    <style:style style:parent-style-name="955" style:display-name="T25" style:family="text" style:name="1063">
      <style:paragraph-properties/>
    </style:style>
    <style:style style:parent-style-name="955" style:display-name="T26" style:family="text" style:name="1064">
      <style:paragraph-properties/>
    </style:style>
    <style:style style:parent-style-name="955" style:display-name="T27" style:family="text" style:name="1065">
      <style:paragraph-properties/>
    </style:style>
    <style:style style:parent-style-name="955" style:display-name="T28" style:family="text" style:name="1066">
      <style:paragraph-properties/>
    </style:style>
    <style:style style:parent-style-name="955" style:display-name="T29" style:family="text" style:name="1067">
      <style:paragraph-properties/>
    </style:style>
    <style:style style:parent-style-name="955" style:display-name="T30" style:family="text" style:name="1068">
      <style:paragraph-properties/>
    </style:style>
    <style:style style:parent-style-name="955" style:display-name="T31" style:family="text" style:name="1069">
      <style:paragraph-properties/>
    </style:style>
    <style:style style:parent-style-name="955" style:display-name="T32" style:family="text" style:name="1070">
      <style:paragraph-properties/>
    </style:style>
    <style:style style:parent-style-name="955" style:display-name="T33" style:family="text" style:name="1071">
      <style:paragraph-properties/>
    </style:style>
    <style:style style:parent-style-name="955" style:display-name="T34" style:family="text" style:name="1072">
      <style:paragraph-properties/>
    </style:style>
    <style:style style:parent-style-name="955" style:display-name="T35" style:family="text" style:name="1073">
      <style:paragraph-properties/>
    </style:style>
    <style:style style:parent-style-name="955" style:display-name="T36" style:family="text" style:name="1074">
      <style:paragraph-properties/>
    </style:style>
    <style:style style:parent-style-name="955" style:display-name="T37" style:family="text" style:name="1075">
      <style:paragraph-properties/>
    </style:style>
    <style:style style:parent-style-name="955" style:display-name="T38" style:family="text" style:name="1076">
      <style:paragraph-properties/>
    </style:style>
    <style:style style:parent-style-name="955" style:display-name="T39" style:family="text" style:name="1077">
      <style:paragraph-properties/>
    </style:style>
    <style:style style:parent-style-name="955" style:display-name="T40" style:family="text" style:name="1078">
      <style:paragraph-properties/>
    </style:style>
    <style:style style:parent-style-name="955" style:display-name="T41" style:family="text" style:name="1079">
      <style:paragraph-properties/>
    </style:style>
    <style:style style:parent-style-name="955" style:display-name="T42" style:family="text" style:name="1080">
      <style:paragraph-properties/>
    </style:style>
    <style:style style:parent-style-name="955" style:display-name="T43" style:family="text" style:name="1081">
      <style:paragraph-properties/>
    </style:style>
    <style:style style:parent-style-name="955" style:display-name="T44" style:family="text" style:name="1082">
      <style:paragraph-properties/>
    </style:style>
    <style:style style:parent-style-name="955" style:display-name="T45" style:family="text" style:name="1083">
      <style:paragraph-properties/>
    </style:style>
    <style:style style:parent-style-name="955" style:display-name="T46" style:family="text" style:name="1084">
      <style:paragraph-properties/>
    </style:style>
    <style:style style:parent-style-name="955" style:display-name="T47" style:family="text" style:name="1085">
      <style:paragraph-properties/>
    </style:style>
    <style:style style:parent-style-name="955" style:display-name="T48" style:family="text" style:name="1086">
      <style:paragraph-properties/>
    </style:style>
    <style:style style:parent-style-name="955" style:display-name="T49" style:family="text" style:name="1087">
      <style:paragraph-properties/>
    </style:style>
    <style:style style:parent-style-name="955" style:display-name="T50" style:family="text" style:name="1088">
      <style:paragraph-properties/>
    </style:style>
    <style:style style:parent-style-name="955" style:display-name="T51" style:family="text" style:name="1089">
      <style:paragraph-properties/>
    </style:style>
    <style:style style:parent-style-name="955" style:display-name="T52" style:family="text" style:name="1090">
      <style:paragraph-properties/>
    </style:style>
    <style:style style:parent-style-name="955" style:display-name="T53" style:family="text" style:name="1091">
      <style:paragraph-properties/>
    </style:style>
    <style:style style:parent-style-name="955" style:display-name="T54" style:family="text" style:name="1092">
      <style:paragraph-properties/>
    </style:style>
    <style:style style:parent-style-name="955" style:display-name="T55" style:family="text" style:name="1093">
      <style:paragraph-properties/>
    </style:style>
    <style:style style:parent-style-name="955" style:display-name="T56" style:family="text" style:name="1094">
      <style:paragraph-properties/>
    </style:style>
    <style:style style:parent-style-name="955" style:display-name="T57" style:family="text" style:name="1095">
      <style:paragraph-properties/>
    </style:style>
    <style:style style:parent-style-name="955" style:display-name="T58" style:family="text" style:name="1096">
      <style:paragraph-properties/>
    </style:style>
    <style:style style:parent-style-name="955" style:display-name="T59" style:family="text" style:name="1097">
      <style:paragraph-properties/>
    </style:style>
    <style:style style:parent-style-name="955" style:display-name="T60" style:family="text" style:name="1098">
      <style:paragraph-properties/>
    </style:style>
    <style:style style:parent-style-name="955" style:display-name="T61" style:family="text" style:name="1099">
      <style:paragraph-properties/>
    </style:style>
    <style:style style:parent-style-name="955" style:display-name="T62" style:family="text" style:name="1100">
      <style:paragraph-properties/>
    </style:style>
    <style:style style:parent-style-name="955" style:display-name="T63" style:family="text" style:name="1101">
      <style:paragraph-properties/>
    </style:style>
    <style:style style:parent-style-name="955" style:display-name="T1" style:family="text" style:name="1102">
      <style:paragraph-properties/>
    </style:style>
    <style:style style:parent-style-name="955" style:display-name="T2" style:family="text" style:name="1103">
      <style:paragraph-properties/>
    </style:style>
    <style:style style:parent-style-name="955" style:display-name="T3" style:family="text" style:name="1104">
      <style:paragraph-properties/>
    </style:style>
    <style:style style:parent-style-name="955" style:display-name="T4" style:family="text" style:name="1105">
      <style:paragraph-properties/>
    </style:style>
    <style:style style:parent-style-name="955" style:display-name="T5" style:family="text" style:name="1106">
      <style:paragraph-properties/>
    </style:style>
    <style:style style:parent-style-name="955" style:display-name="T6" style:family="text" style:name="1107">
      <style:paragraph-properties/>
    </style:style>
    <style:style style:parent-style-name="955" style:display-name="T7" style:family="text" style:name="1108">
      <style:paragraph-properties/>
    </style:style>
    <style:style style:parent-style-name="955" style:display-name="T8" style:family="text" style:name="1109">
      <style:paragraph-properties/>
    </style:style>
    <style:style style:parent-style-name="955" style:display-name="T9" style:family="text" style:name="1110">
      <style:paragraph-properties/>
    </style:style>
    <style:style style:parent-style-name="955" style:display-name="T10" style:family="text" style:name="1111">
      <style:paragraph-properties/>
    </style:style>
    <style:style style:parent-style-name="955" style:display-name="T11" style:family="text" style:name="1112">
      <style:paragraph-properties/>
    </style:style>
    <style:style style:parent-style-name="955" style:display-name="T12" style:family="text" style:name="1113">
      <style:paragraph-properties/>
    </style:style>
    <style:style style:parent-style-name="955" style:display-name="T13" style:family="text" style:name="1114">
      <style:paragraph-properties/>
    </style:style>
    <style:style style:parent-style-name="955" style:display-name="T14" style:family="text" style:name="1115">
      <style:paragraph-properties/>
    </style:style>
    <style:style style:parent-style-name="955" style:display-name="T15" style:family="text" style:name="1116">
      <style:paragraph-properties/>
    </style:style>
    <style:style style:parent-style-name="955" style:display-name="T16" style:family="text" style:name="1117">
      <style:paragraph-properties/>
    </style:style>
    <style:style style:parent-style-name="955" style:display-name="T17" style:family="text" style:name="1118">
      <style:paragraph-properties/>
    </style:style>
    <style:style style:parent-style-name="955" style:display-name="T18" style:family="text" style:name="1119">
      <style:paragraph-properties/>
    </style:style>
    <style:style style:parent-style-name="955" style:display-name="T19" style:family="text" style:name="1120">
      <style:paragraph-properties/>
    </style:style>
    <style:style style:parent-style-name="955" style:display-name="T20" style:family="text" style:name="1121">
      <style:paragraph-properties/>
    </style:style>
    <style:style style:parent-style-name="955" style:display-name="T21" style:family="text" style:name="1122">
      <style:paragraph-properties/>
    </style:style>
    <style:style style:parent-style-name="955" style:display-name="T22" style:family="text" style:name="1123">
      <style:paragraph-properties/>
    </style:style>
    <style:style style:parent-style-name="955" style:display-name="T23" style:family="text" style:name="1124">
      <style:paragraph-properties/>
    </style:style>
    <style:style style:parent-style-name="955" style:display-name="T24" style:family="text" style:name="1125">
      <style:paragraph-properties/>
    </style:style>
    <style:style style:parent-style-name="955" style:display-name="T25" style:family="text" style:name="1126">
      <style:paragraph-properties/>
    </style:style>
    <style:style style:parent-style-name="955" style:display-name="T26" style:family="text" style:name="1127">
      <style:paragraph-properties/>
    </style:style>
    <style:style style:parent-style-name="955" style:display-name="T27" style:family="text" style:name="1128">
      <style:paragraph-properties/>
    </style:style>
    <style:style style:parent-style-name="955" style:display-name="T28" style:family="text" style:name="1129">
      <style:paragraph-properties/>
    </style:style>
    <style:style style:parent-style-name="955" style:display-name="T29" style:family="text" style:name="1130">
      <style:paragraph-properties/>
    </style:style>
    <style:style style:parent-style-name="955" style:display-name="T30" style:family="text" style:name="1131">
      <style:paragraph-properties/>
    </style:style>
    <style:style style:parent-style-name="955" style:display-name="T31" style:family="text" style:name="1132">
      <style:paragraph-properties/>
    </style:style>
    <style:style style:parent-style-name="955" style:display-name="T32" style:family="text" style:name="1133">
      <style:paragraph-properties/>
    </style:style>
    <style:style style:parent-style-name="955" style:display-name="T33" style:family="text" style:name="1134">
      <style:paragraph-properties/>
    </style:style>
    <style:style style:parent-style-name="955" style:display-name="T34" style:family="text" style:name="1135">
      <style:paragraph-properties/>
    </style:style>
    <style:style style:parent-style-name="955" style:display-name="T35" style:family="text" style:name="1136">
      <style:paragraph-properties/>
    </style:style>
    <style:style style:parent-style-name="955" style:display-name="T36" style:family="text" style:name="1137">
      <style:paragraph-properties/>
    </style:style>
    <style:style style:parent-style-name="955" style:display-name="T37" style:family="text" style:name="1138">
      <style:paragraph-properties/>
    </style:style>
    <style:style style:parent-style-name="955" style:display-name="T38" style:family="text" style:name="1139">
      <style:paragraph-properties/>
    </style:style>
    <style:style style:parent-style-name="955" style:display-name="T39" style:family="text" style:name="1140">
      <style:paragraph-properties/>
    </style:style>
    <style:style style:parent-style-name="955" style:display-name="T40" style:family="text" style:name="1141">
      <style:paragraph-properties/>
    </style:style>
    <style:style style:parent-style-name="955" style:display-name="T41" style:family="text" style:name="1142">
      <style:paragraph-properties/>
    </style:style>
    <style:style style:parent-style-name="955" style:display-name="T42" style:family="text" style:name="1143">
      <style:paragraph-properties/>
    </style:style>
    <style:style style:parent-style-name="955" style:display-name="T43" style:family="text" style:name="1144">
      <style:paragraph-properties/>
    </style:style>
    <style:style style:parent-style-name="955" style:display-name="T44" style:family="text" style:name="1145">
      <style:paragraph-properties/>
    </style:style>
    <style:style style:parent-style-name="955" style:display-name="T45" style:family="text" style:name="1146">
      <style:paragraph-properties/>
    </style:style>
    <style:style style:parent-style-name="955" style:display-name="T46" style:family="text" style:name="1147">
      <style:paragraph-properties/>
    </style:style>
    <style:style style:parent-style-name="955" style:display-name="T47" style:family="text" style:name="1148">
      <style:paragraph-properties/>
    </style:style>
    <style:style style:parent-style-name="955" style:display-name="T48" style:family="text" style:name="1149">
      <style:paragraph-properties/>
    </style:style>
    <style:style style:parent-style-name="955" style:display-name="T49" style:family="text" style:name="1150">
      <style:paragraph-properties/>
    </style:style>
    <style:style style:parent-style-name="955" style:display-name="T50" style:family="text" style:name="1151">
      <style:paragraph-properties/>
    </style:style>
    <style:style style:parent-style-name="955" style:display-name="T51" style:family="text" style:name="1152">
      <style:paragraph-properties/>
    </style:style>
    <style:style style:parent-style-name="955" style:display-name="T52" style:family="text" style:name="1153">
      <style:paragraph-properties/>
    </style:style>
    <style:style style:parent-style-name="955" style:display-name="T53" style:family="text" style:name="1154">
      <style:paragraph-properties/>
    </style:style>
    <style:style style:parent-style-name="955" style:display-name="T54" style:family="text" style:name="1155">
      <style:paragraph-properties/>
    </style:style>
    <style:style style:parent-style-name="955" style:display-name="T55" style:family="text" style:name="1156">
      <style:paragraph-properties/>
    </style:style>
    <style:style style:parent-style-name="955" style:display-name="T56" style:family="text" style:name="1157">
      <style:paragraph-properties/>
    </style:style>
    <style:style style:parent-style-name="955" style:display-name="T57" style:family="text" style:name="1158">
      <style:paragraph-properties/>
    </style:style>
    <style:style style:parent-style-name="955" style:display-name="T58" style:family="text" style:name="1159">
      <style:paragraph-properties/>
    </style:style>
    <style:style style:parent-style-name="955" style:display-name="T59" style:family="text" style:name="1160">
      <style:paragraph-properties/>
    </style:style>
    <style:style style:parent-style-name="955" style:display-name="T60" style:family="text" style:name="1161">
      <style:paragraph-properties/>
    </style:style>
    <style:style style:parent-style-name="955" style:display-name="T61" style:family="text" style:name="1162">
      <style:paragraph-properties/>
    </style:style>
    <style:style style:parent-style-name="955" style:display-name="T62" style:family="text" style:name="1163">
      <style:paragraph-properties/>
    </style:style>
    <style:style style:parent-style-name="955" style:display-name="T63" style:family="text" style:name="1164">
      <style:paragraph-properties/>
    </style:style>
    <style:style style:parent-style-name="955" style:display-name="T64" style:family="text" style:name="1165">
      <style:paragraph-properties/>
    </style:style>
    <style:style style:parent-style-name="955" style:display-name="T65" style:family="text" style:name="1166">
      <style:paragraph-properties/>
    </style:style>
    <style:style style:parent-style-name="955" style:display-name="T66" style:family="text" style:name="1167">
      <style:paragraph-properties/>
    </style:style>
    <style:style style:parent-style-name="955" style:display-name="T67" style:family="text" style:name="1168">
      <style:paragraph-properties/>
    </style:style>
    <style:style style:parent-style-name="955" style:display-name="T68" style:family="text" style:name="1169">
      <style:paragraph-properties/>
    </style:style>
    <style:style style:parent-style-name="955" style:display-name="T69" style:family="text" style:name="1170">
      <style:paragraph-properties/>
    </style:style>
    <style:style style:parent-style-name="955" style:display-name="T70" style:family="text" style:name="1171">
      <style:paragraph-properties/>
    </style:style>
    <style:style style:parent-style-name="955" style:display-name="T71" style:family="text" style:name="1172">
      <style:paragraph-properties/>
    </style:style>
    <style:style style:parent-style-name="955" style:display-name="T72" style:family="text" style:name="1173">
      <style:paragraph-properties/>
    </style:style>
    <style:style style:parent-style-name="955" style:display-name="T73" style:family="text" style:name="1174">
      <style:paragraph-properties/>
    </style:style>
    <style:style style:parent-style-name="955" style:display-name="T74" style:family="text" style:name="1175">
      <style:paragraph-properties/>
    </style:style>
    <style:style style:parent-style-name="955" style:display-name="T75" style:family="text" style:name="1176">
      <style:paragraph-properties/>
    </style:style>
    <style:style style:parent-style-name="955" style:display-name="T76" style:family="text" style:name="1177">
      <style:paragraph-properties/>
    </style:style>
    <style:style style:parent-style-name="955" style:display-name="T77" style:family="text" style:name="1178">
      <style:paragraph-properties/>
    </style:style>
    <style:style style:parent-style-name="955" style:display-name="T78" style:family="text" style:name="1179">
      <style:paragraph-properties/>
    </style:style>
    <style:style style:parent-style-name="955" style:display-name="T79" style:family="text" style:name="1180">
      <style:paragraph-properties/>
    </style:style>
    <style:style style:parent-style-name="955" style:display-name="T80" style:family="text" style:name="1181">
      <style:paragraph-properties/>
    </style:style>
    <style:style style:parent-style-name="955" style:display-name="T81" style:family="text" style:name="1182">
      <style:paragraph-properties/>
    </style:style>
    <style:style style:parent-style-name="955" style:display-name="T82" style:family="text" style:name="1183">
      <style:paragraph-properties/>
    </style:style>
    <style:style style:parent-style-name="955" style:display-name="T83" style:family="text" style:name="1184">
      <style:paragraph-properties/>
    </style:style>
    <style:style style:parent-style-name="955" style:display-name="T84" style:family="text" style:name="1185">
      <style:paragraph-properties/>
    </style:style>
    <style:style style:parent-style-name="955" style:display-name="T85" style:family="text" style:name="1186">
      <style:paragraph-properties/>
    </style:style>
    <style:style style:parent-style-name="955" style:display-name="T86" style:family="text" style:name="1187">
      <style:paragraph-properties/>
    </style:style>
    <style:style style:parent-style-name="955" style:display-name="T87" style:family="text" style:name="1188">
      <style:paragraph-properties/>
    </style:style>
    <style:style style:parent-style-name="955" style:display-name="T88" style:family="text" style:name="1189">
      <style:paragraph-properties/>
    </style:style>
    <style:style style:parent-style-name="955" style:display-name="T89" style:family="text" style:name="1190">
      <style:paragraph-properties/>
    </style:style>
    <style:style style:parent-style-name="955" style:display-name="T90" style:family="text" style:name="1191">
      <style:paragraph-properties/>
    </style:style>
    <style:style style:parent-style-name="955" style:display-name="T91" style:family="text" style:name="1192">
      <style:paragraph-properties/>
    </style:style>
    <style:style style:parent-style-name="955" style:display-name="T92" style:family="text" style:name="1193">
      <style:paragraph-properties/>
    </style:style>
    <style:style style:parent-style-name="955" style:display-name="T93" style:family="text" style:name="1194">
      <style:paragraph-properties/>
    </style:style>
    <style:style style:parent-style-name="955" style:display-name="T94" style:family="text" style:name="1195">
      <style:paragraph-properties/>
    </style:style>
    <style:style style:parent-style-name="955" style:display-name="T95" style:family="text" style:name="1196">
      <style:paragraph-properties/>
    </style:style>
    <style:style style:parent-style-name="955" style:display-name="T96" style:family="text" style:name="1197">
      <style:paragraph-properties/>
    </style:style>
    <style:style style:parent-style-name="955" style:display-name="T97" style:family="text" style:name="1198">
      <style:paragraph-properties/>
    </style:style>
    <style:style style:parent-style-name="955" style:display-name="T98" style:family="text" style:name="1199">
      <style:paragraph-properties/>
    </style:style>
    <style:style style:parent-style-name="955" style:display-name="T99" style:family="text" style:name="1200">
      <style:paragraph-properties/>
    </style:style>
    <style:style style:parent-style-name="955" style:display-name="T100" style:family="text" style:name="1201">
      <style:paragraph-properties/>
    </style:style>
    <style:style style:parent-style-name="955" style:display-name="T101" style:family="text" style:name="1202">
      <style:paragraph-properties/>
    </style:style>
    <style:style style:parent-style-name="955" style:display-name="T102" style:family="text" style:name="1203">
      <style:paragraph-properties/>
    </style:style>
    <style:style style:parent-style-name="955" style:display-name="T103" style:family="text" style:name="1204">
      <style:paragraph-properties/>
    </style:style>
    <style:style style:parent-style-name="955" style:display-name="T104" style:family="text" style:name="1205">
      <style:paragraph-properties/>
    </style:style>
    <style:style style:parent-style-name="955" style:display-name="T105" style:family="text" style:name="1206">
      <style:paragraph-properties/>
    </style:style>
    <style:style style:parent-style-name="955" style:display-name="T106" style:family="text" style:name="1207">
      <style:paragraph-properties/>
    </style:style>
    <style:style style:parent-style-name="955" style:display-name="T107" style:family="text" style:name="1208">
      <style:paragraph-properties/>
    </style:style>
    <style:style style:parent-style-name="955" style:display-name="T108" style:family="text" style:name="1209">
      <style:paragraph-properties/>
    </style:style>
    <style:style style:parent-style-name="955" style:display-name="T109" style:family="text" style:name="1210">
      <style:paragraph-properties/>
    </style:style>
    <style:style style:parent-style-name="955" style:display-name="T110" style:family="text" style:name="1211">
      <style:paragraph-properties/>
    </style:style>
    <style:style style:parent-style-name="955" style:display-name="T111" style:family="text" style:name="1212">
      <style:paragraph-properties/>
    </style:style>
    <style:style style:parent-style-name="955" style:display-name="T112" style:family="text" style:name="1213">
      <style:paragraph-properties/>
    </style:style>
    <style:style style:parent-style-name="955" style:display-name="T113" style:family="text" style:name="1214">
      <style:paragraph-properties/>
    </style:style>
    <style:style style:parent-style-name="955" style:display-name="T114" style:family="text" style:name="1215">
      <style:paragraph-properties/>
    </style:style>
    <style:style style:parent-style-name="955" style:display-name="T115" style:family="text" style:name="1216">
      <style:paragraph-properties/>
    </style:style>
    <style:style style:parent-style-name="955" style:display-name="T116" style:family="text" style:name="1217">
      <style:paragraph-properties/>
    </style:style>
    <style:style style:parent-style-name="955" style:display-name="T117" style:family="text" style:name="1218">
      <style:paragraph-properties/>
    </style:style>
    <style:style style:parent-style-name="955" style:display-name="T1" style:family="text" style:name="1219">
      <style:paragraph-properties/>
    </style:style>
    <style:style style:parent-style-name="955" style:display-name="T2" style:family="text" style:name="1220">
      <style:paragraph-properties/>
    </style:style>
    <style:style style:parent-style-name="955" style:display-name="T3" style:family="text" style:name="1221">
      <style:paragraph-properties/>
    </style:style>
    <style:style style:parent-style-name="955" style:display-name="T4" style:family="text" style:name="1222">
      <style:paragraph-properties/>
    </style:style>
    <style:style style:parent-style-name="955" style:display-name="T5" style:family="text" style:name="1223">
      <style:paragraph-properties/>
    </style:style>
    <style:style style:parent-style-name="955" style:display-name="T6" style:family="text" style:name="1224">
      <style:paragraph-properties/>
    </style:style>
    <style:style style:parent-style-name="955" style:display-name="T7" style:family="text" style:name="1225">
      <style:paragraph-properties/>
    </style:style>
    <style:style style:parent-style-name="955" style:display-name="T8" style:family="text" style:name="1226">
      <style:paragraph-properties/>
    </style:style>
    <style:style style:parent-style-name="955" style:display-name="T9" style:family="text" style:name="1227">
      <style:paragraph-properties/>
    </style:style>
    <style:style style:parent-style-name="955" style:display-name="T10" style:family="text" style:name="1228">
      <style:paragraph-properties/>
    </style:style>
    <style:style style:parent-style-name="955" style:display-name="T11" style:family="text" style:name="1229">
      <style:paragraph-properties/>
    </style:style>
    <style:style style:parent-style-name="955" style:display-name="T12" style:family="text" style:name="1230">
      <style:paragraph-properties/>
    </style:style>
    <style:style style:parent-style-name="955" style:display-name="T13" style:family="text" style:name="1231">
      <style:paragraph-properties/>
    </style:style>
    <style:style style:parent-style-name="955" style:display-name="T14" style:family="text" style:name="1232">
      <style:paragraph-properties/>
    </style:style>
    <style:style style:parent-style-name="955" style:display-name="T15" style:family="text" style:name="1233">
      <style:paragraph-properties/>
    </style:style>
    <style:style style:parent-style-name="955" style:display-name="T16" style:family="text" style:name="1234">
      <style:paragraph-properties/>
    </style:style>
    <style:style style:parent-style-name="955" style:display-name="T17" style:family="text" style:name="1235">
      <style:paragraph-properties/>
    </style:style>
    <style:style style:parent-style-name="955" style:display-name="T18" style:family="text" style:name="1236">
      <style:paragraph-properties/>
    </style:style>
    <style:style style:parent-style-name="955" style:display-name="T19" style:family="text" style:name="1237">
      <style:paragraph-properties/>
    </style:style>
    <style:style style:parent-style-name="955" style:display-name="T20" style:family="text" style:name="1238">
      <style:paragraph-properties/>
    </style:style>
    <style:style style:parent-style-name="955" style:display-name="T21" style:family="text" style:name="1239">
      <style:paragraph-properties/>
    </style:style>
    <style:style style:parent-style-name="955" style:display-name="T22" style:family="text" style:name="1240">
      <style:paragraph-properties/>
    </style:style>
    <style:style style:parent-style-name="955" style:display-name="T23" style:family="text" style:name="1241">
      <style:paragraph-properties/>
    </style:style>
    <style:style style:parent-style-name="955" style:display-name="T24" style:family="text" style:name="1242">
      <style:paragraph-properties/>
    </style:style>
    <style:style style:parent-style-name="955" style:display-name="T25" style:family="text" style:name="1243">
      <style:paragraph-properties/>
    </style:style>
    <style:style style:parent-style-name="955" style:display-name="T26" style:family="text" style:name="1244">
      <style:paragraph-properties/>
    </style:style>
    <style:style style:parent-style-name="955" style:display-name="T27" style:family="text" style:name="1245">
      <style:paragraph-properties/>
    </style:style>
    <style:style style:parent-style-name="955" style:display-name="T28" style:family="text" style:name="1246">
      <style:paragraph-properties/>
    </style:style>
    <style:style style:parent-style-name="955" style:display-name="T29" style:family="text" style:name="1247">
      <style:paragraph-properties/>
    </style:style>
    <style:style style:parent-style-name="955" style:display-name="T30" style:family="text" style:name="1248">
      <style:paragraph-properties/>
    </style:style>
    <style:style style:parent-style-name="955" style:display-name="T31" style:family="text" style:name="1249">
      <style:paragraph-properties/>
    </style:style>
    <style:style style:parent-style-name="955" style:display-name="T32" style:family="text" style:name="1250">
      <style:paragraph-properties/>
    </style:style>
    <style:style style:parent-style-name="955" style:display-name="T33" style:family="text" style:name="1251">
      <style:paragraph-properties/>
    </style:style>
    <style:style style:parent-style-name="955" style:display-name="T34" style:family="text" style:name="1252">
      <style:paragraph-properties/>
    </style:style>
    <style:style style:parent-style-name="955" style:display-name="T35" style:family="text" style:name="1253">
      <style:paragraph-properties/>
    </style:style>
    <style:style style:parent-style-name="955" style:display-name="T36" style:family="text" style:name="1254">
      <style:paragraph-properties/>
    </style:style>
    <style:style style:parent-style-name="955" style:display-name="T37" style:family="text" style:name="1255">
      <style:paragraph-properties/>
    </style:style>
    <style:style style:parent-style-name="955" style:display-name="T38" style:family="text" style:name="1256">
      <style:paragraph-properties/>
    </style:style>
    <style:style style:parent-style-name="955" style:display-name="T39" style:family="text" style:name="1257">
      <style:paragraph-properties/>
    </style:style>
    <style:style style:parent-style-name="955" style:display-name="T40" style:family="text" style:name="1258">
      <style:paragraph-properties/>
    </style:style>
    <style:style style:parent-style-name="955" style:display-name="T41" style:family="text" style:name="1259">
      <style:paragraph-properties/>
    </style:style>
    <style:style style:parent-style-name="955" style:display-name="T42" style:family="text" style:name="1260">
      <style:paragraph-properties/>
    </style:style>
    <style:style style:parent-style-name="955" style:display-name="T43" style:family="text" style:name="1261">
      <style:paragraph-properties/>
    </style:style>
    <style:style style:parent-style-name="955" style:display-name="T44" style:family="text" style:name="1262">
      <style:paragraph-properties/>
    </style:style>
    <style:style style:parent-style-name="955" style:display-name="T45" style:family="text" style:name="1263">
      <style:paragraph-properties/>
    </style:style>
    <style:style style:parent-style-name="955" style:display-name="T46" style:family="text" style:name="1264">
      <style:paragraph-properties/>
    </style:style>
    <style:style style:parent-style-name="955" style:display-name="T47" style:family="text" style:name="1265">
      <style:paragraph-properties/>
    </style:style>
    <style:style style:parent-style-name="955" style:display-name="T48" style:family="text" style:name="1266">
      <style:paragraph-properties/>
    </style:style>
    <style:style style:parent-style-name="955" style:display-name="T49" style:family="text" style:name="1267">
      <style:paragraph-properties/>
    </style:style>
    <style:style style:parent-style-name="955" style:display-name="T50" style:family="text" style:name="1268">
      <style:paragraph-properties/>
    </style:style>
    <style:style style:parent-style-name="955" style:display-name="T51" style:family="text" style:name="1269">
      <style:paragraph-properties/>
    </style:style>
    <style:style style:parent-style-name="955" style:display-name="T52" style:family="text" style:name="1270">
      <style:paragraph-properties/>
    </style:style>
    <style:style style:parent-style-name="955" style:display-name="T53" style:family="text" style:name="1271">
      <style:paragraph-properties/>
    </style:style>
    <style:style style:parent-style-name="955" style:display-name="T54" style:family="text" style:name="1272">
      <style:paragraph-properties/>
    </style:style>
    <style:style style:parent-style-name="955" style:display-name="T55" style:family="text" style:name="1273">
      <style:paragraph-properties/>
    </style:style>
    <style:style style:parent-style-name="955" style:display-name="T56" style:family="text" style:name="1274">
      <style:paragraph-properties/>
    </style:style>
    <style:style style:parent-style-name="955" style:display-name="T57" style:family="text" style:name="1275">
      <style:paragraph-properties/>
    </style:style>
    <style:style style:parent-style-name="955" style:display-name="T58" style:family="text" style:name="1276">
      <style:paragraph-properties/>
    </style:style>
    <style:style style:parent-style-name="955" style:display-name="T59" style:family="text" style:name="1277">
      <style:paragraph-properties/>
    </style:style>
    <style:style style:parent-style-name="955" style:display-name="T60" style:family="text" style:name="1278">
      <style:paragraph-properties/>
    </style:style>
    <style:style style:parent-style-name="955" style:display-name="T61" style:family="text" style:name="1279">
      <style:paragraph-properties/>
    </style:style>
    <style:style style:parent-style-name="955" style:display-name="T62" style:family="text" style:name="1280">
      <style:paragraph-properties/>
    </style:style>
    <style:style style:parent-style-name="955" style:display-name="T63" style:family="text" style:name="1281">
      <style:paragraph-properties/>
    </style:style>
    <style:style style:parent-style-name="955" style:display-name="T64" style:family="text" style:name="1282">
      <style:paragraph-properties/>
    </style:style>
    <style:style style:parent-style-name="955" style:display-name="T65" style:family="text" style:name="1283">
      <style:paragraph-properties/>
    </style:style>
    <style:style style:parent-style-name="955" style:display-name="T66" style:family="text" style:name="1284">
      <style:paragraph-properties/>
    </style:style>
    <style:style style:parent-style-name="955" style:display-name="T67" style:family="text" style:name="1285">
      <style:paragraph-properties/>
    </style:style>
    <style:style style:parent-style-name="955" style:display-name="T68" style:family="text" style:name="1286">
      <style:paragraph-properties/>
    </style:style>
    <style:style style:parent-style-name="955" style:display-name="T69" style:family="text" style:name="1287">
      <style:paragraph-properties/>
    </style:style>
    <style:style style:parent-style-name="955" style:display-name="T70" style:family="text" style:name="1288">
      <style:paragraph-properties/>
    </style:style>
    <style:style style:parent-style-name="955" style:display-name="T71" style:family="text" style:name="1289">
      <style:paragraph-properties/>
    </style:style>
    <style:style style:parent-style-name="955" style:display-name="T72" style:family="text" style:name="1290">
      <style:paragraph-properties/>
    </style:style>
    <style:style style:parent-style-name="955" style:display-name="T73" style:family="text" style:name="1291">
      <style:paragraph-properties/>
    </style:style>
    <style:style style:parent-style-name="955" style:display-name="T74" style:family="text" style:name="1292">
      <style:paragraph-properties/>
    </style:style>
    <style:style style:parent-style-name="955" style:display-name="T75" style:family="text" style:name="1293">
      <style:paragraph-properties/>
    </style:style>
    <style:style style:parent-style-name="955" style:display-name="T76" style:family="text" style:name="1294">
      <style:paragraph-properties/>
    </style:style>
    <style:style style:parent-style-name="955" style:display-name="T77" style:family="text" style:name="1295">
      <style:paragraph-properties/>
    </style:style>
    <style:style style:parent-style-name="955" style:display-name="T78" style:family="text" style:name="1296">
      <style:paragraph-properties/>
    </style:style>
    <style:style style:parent-style-name="955" style:display-name="T79" style:family="text" style:name="1297">
      <style:paragraph-properties/>
    </style:style>
    <style:style style:parent-style-name="955" style:display-name="T80" style:family="text" style:name="1298">
      <style:paragraph-properties/>
    </style:style>
    <style:style style:parent-style-name="955" style:display-name="T81" style:family="text" style:name="1299">
      <style:paragraph-properties/>
    </style:style>
    <style:style style:parent-style-name="955" style:display-name="T82" style:family="text" style:name="1300">
      <style:paragraph-properties/>
    </style:style>
    <style:style style:parent-style-name="955" style:display-name="T83" style:family="text" style:name="1301">
      <style:paragraph-properties/>
    </style:style>
    <style:style style:parent-style-name="955" style:display-name="T84" style:family="text" style:name="1302">
      <style:paragraph-properties/>
    </style:style>
    <style:style style:parent-style-name="955" style:display-name="T85" style:family="text" style:name="1303">
      <style:paragraph-properties/>
    </style:style>
    <style:style style:parent-style-name="955" style:display-name="T86" style:family="text" style:name="1304">
      <style:paragraph-properties/>
    </style:style>
    <style:style style:parent-style-name="955" style:display-name="T87" style:family="text" style:name="1305">
      <style:paragraph-properties/>
    </style:style>
    <style:style style:parent-style-name="955" style:display-name="T88" style:family="text" style:name="1306">
      <style:paragraph-properties/>
    </style:style>
    <style:style style:parent-style-name="955" style:display-name="T89" style:family="text" style:name="1307">
      <style:paragraph-properties/>
    </style:style>
    <style:style style:parent-style-name="955" style:display-name="T90" style:family="text" style:name="1308">
      <style:paragraph-properties/>
    </style:style>
    <style:style style:parent-style-name="955" style:display-name="T91" style:family="text" style:name="1309">
      <style:paragraph-properties/>
    </style:style>
    <style:style style:parent-style-name="955" style:display-name="T92" style:family="text" style:name="1310">
      <style:paragraph-properties/>
    </style:style>
    <style:style style:parent-style-name="955" style:display-name="T93" style:family="text" style:name="1311">
      <style:paragraph-properties/>
    </style:style>
    <style:style style:parent-style-name="955" style:display-name="T94" style:family="text" style:name="1312">
      <style:paragraph-properties/>
    </style:style>
    <style:style style:parent-style-name="955" style:display-name="T95" style:family="text" style:name="1313">
      <style:paragraph-properties/>
    </style:style>
    <style:style style:parent-style-name="955" style:display-name="T96" style:family="text" style:name="1314">
      <style:paragraph-properties/>
    </style:style>
    <style:style style:parent-style-name="955" style:display-name="T97" style:family="text" style:name="1315">
      <style:paragraph-properties/>
    </style:style>
    <style:style style:parent-style-name="955" style:display-name="T98" style:family="text" style:name="1316">
      <style:paragraph-properties/>
    </style:style>
    <style:style style:parent-style-name="955" style:display-name="T99" style:family="text" style:name="1317">
      <style:paragraph-properties/>
    </style:style>
    <style:style style:parent-style-name="955" style:display-name="T100" style:family="text" style:name="1318">
      <style:paragraph-properties/>
    </style:style>
    <style:style style:parent-style-name="955" style:display-name="T101" style:family="text" style:name="1319">
      <style:paragraph-properties/>
    </style:style>
    <style:style style:parent-style-name="955" style:display-name="T102" style:family="text" style:name="1320">
      <style:paragraph-properties/>
    </style:style>
    <style:style style:parent-style-name="955" style:display-name="T103" style:family="text" style:name="1321">
      <style:paragraph-properties/>
    </style:style>
    <style:style style:parent-style-name="955" style:display-name="T104" style:family="text" style:name="1322">
      <style:paragraph-properties/>
    </style:style>
    <style:style style:parent-style-name="955" style:display-name="T105" style:family="text" style:name="1323">
      <style:paragraph-properties/>
    </style:style>
    <style:style style:parent-style-name="955" style:display-name="T106" style:family="text" style:name="1324">
      <style:paragraph-properties/>
    </style:style>
    <style:style style:parent-style-name="955" style:display-name="T107" style:family="text" style:name="1325">
      <style:paragraph-properties/>
    </style:style>
    <style:style style:parent-style-name="955" style:display-name="T108" style:family="text" style:name="1326">
      <style:paragraph-properties/>
    </style:style>
    <style:style style:parent-style-name="955" style:display-name="T109" style:family="text" style:name="1327">
      <style:paragraph-properties/>
    </style:style>
    <style:style style:parent-style-name="955" style:display-name="T110" style:family="text" style:name="1328">
      <style:paragraph-properties/>
    </style:style>
    <style:style style:parent-style-name="955" style:display-name="T111" style:family="text" style:name="1329">
      <style:paragraph-properties/>
    </style:style>
    <style:style style:parent-style-name="955" style:display-name="T112" style:family="text" style:name="1330">
      <style:paragraph-properties/>
    </style:style>
    <style:style style:parent-style-name="955" style:display-name="T113" style:family="text" style:name="1331">
      <style:paragraph-properties/>
    </style:style>
    <style:style style:parent-style-name="955" style:display-name="T114" style:family="text" style:name="1332">
      <style:paragraph-properties/>
    </style:style>
    <style:style style:parent-style-name="955" style:display-name="T115" style:family="text" style:name="1333">
      <style:paragraph-properties/>
    </style:style>
    <style:style style:parent-style-name="955" style:display-name="T116" style:family="text" style:name="1334">
      <style:paragraph-properties/>
    </style:style>
    <style:style style:parent-style-name="955" style:display-name="T117" style:family="text" style:name="1335">
      <style:paragraph-properties/>
    </style:style>
    <style:style style:parent-style-name="955" style:display-name="T118" style:family="text" style:name="1336">
      <style:paragraph-properties/>
    </style:style>
    <style:style style:parent-style-name="955" style:display-name="T119" style:family="text" style:name="1337">
      <style:paragraph-properties/>
    </style:style>
    <style:style style:parent-style-name="955" style:display-name="T120" style:family="text" style:name="1338">
      <style:paragraph-properties/>
    </style:style>
    <style:style style:parent-style-name="955" style:display-name="T121" style:family="text" style:name="1339">
      <style:paragraph-properties/>
    </style:style>
    <style:style style:parent-style-name="955" style:display-name="T122" style:family="text" style:name="1340">
      <style:paragraph-properties/>
    </style:style>
    <style:style style:parent-style-name="955" style:display-name="T123" style:family="text" style:name="1341">
      <style:paragraph-properties/>
    </style:style>
    <style:style style:parent-style-name="955" style:display-name="T124" style:family="text" style:name="1342">
      <style:paragraph-properties/>
    </style:style>
    <style:style style:parent-style-name="955" style:display-name="T125" style:family="text" style:name="1343">
      <style:paragraph-properties/>
    </style:style>
    <style:style style:parent-style-name="955" style:display-name="T126" style:family="text" style:name="1344">
      <style:paragraph-properties/>
    </style:style>
    <style:style style:parent-style-name="955" style:display-name="T127" style:family="text" style:name="1345">
      <style:paragraph-properties/>
    </style:style>
    <style:style style:parent-style-name="955" style:display-name="T128" style:family="text" style:name="1346">
      <style:paragraph-properties/>
    </style:style>
    <style:style style:parent-style-name="955" style:display-name="T129" style:family="text" style:name="1347">
      <style:paragraph-properties/>
    </style:style>
    <style:style style:parent-style-name="955" style:display-name="T130" style:family="text" style:name="1348">
      <style:paragraph-properties/>
    </style:style>
    <style:style style:parent-style-name="955" style:display-name="T131" style:family="text" style:name="1349">
      <style:paragraph-properties/>
    </style:style>
    <style:style style:parent-style-name="955" style:display-name="T132" style:family="text" style:name="1350">
      <style:paragraph-properties/>
    </style:style>
    <style:style style:parent-style-name="955" style:display-name="T133" style:family="text" style:name="1351">
      <style:paragraph-properties/>
    </style:style>
    <style:style style:parent-style-name="955" style:display-name="T134" style:family="text" style:name="1352">
      <style:paragraph-properties/>
    </style:style>
    <style:style style:parent-style-name="955" style:display-name="T135" style:family="text" style:name="1353">
      <style:paragraph-properties/>
    </style:style>
    <style:style style:parent-style-name="955" style:display-name="T136" style:family="text" style:name="1354">
      <style:paragraph-properties/>
    </style:style>
    <style:style style:parent-style-name="955" style:display-name="T137" style:family="text" style:name="1355">
      <style:paragraph-properties/>
    </style:style>
    <style:style style:parent-style-name="955" style:display-name="T138" style:family="text" style:name="1356">
      <style:paragraph-properties/>
    </style:style>
    <style:style style:parent-style-name="955" style:display-name="T139" style:family="text" style:name="1357">
      <style:paragraph-properties/>
    </style:style>
    <style:style style:parent-style-name="955" style:display-name="T140" style:family="text" style:name="1358">
      <style:paragraph-properties/>
    </style:style>
    <style:style style:parent-style-name="955" style:display-name="T141" style:family="text" style:name="1359">
      <style:paragraph-properties/>
    </style:style>
    <style:style style:parent-style-name="955" style:display-name="T142" style:family="text" style:name="1360">
      <style:paragraph-properties/>
    </style:style>
    <style:style style:parent-style-name="955" style:display-name="T143" style:family="text" style:name="1361">
      <style:paragraph-properties/>
    </style:style>
    <style:style style:parent-style-name="955" style:display-name="T144" style:family="text" style:name="1362">
      <style:paragraph-properties/>
    </style:style>
    <style:style style:parent-style-name="955" style:display-name="T1" style:family="text" style:name="1363">
      <style:paragraph-properties/>
    </style:style>
    <style:style style:parent-style-name="955" style:display-name="T2" style:family="text" style:name="1364">
      <style:paragraph-properties/>
    </style:style>
    <style:style style:parent-style-name="955" style:display-name="T3" style:family="text" style:name="1365">
      <style:paragraph-properties/>
    </style:style>
    <style:style style:parent-style-name="955" style:display-name="T4" style:family="text" style:name="1366">
      <style:paragraph-properties/>
    </style:style>
    <style:style style:parent-style-name="955" style:display-name="T5" style:family="text" style:name="1367">
      <style:paragraph-properties/>
    </style:style>
    <style:style style:parent-style-name="955" style:display-name="T6" style:family="text" style:name="1368">
      <style:paragraph-properties/>
    </style:style>
    <style:style style:parent-style-name="955" style:display-name="T7" style:family="text" style:name="1369">
      <style:paragraph-properties/>
    </style:style>
    <style:style style:parent-style-name="955" style:display-name="T8" style:family="text" style:name="1370">
      <style:paragraph-properties/>
    </style:style>
    <style:style style:parent-style-name="955" style:display-name="T9" style:family="text" style:name="1371">
      <style:paragraph-properties/>
    </style:style>
    <style:style style:parent-style-name="955" style:display-name="T10" style:family="text" style:name="1372">
      <style:paragraph-properties/>
    </style:style>
    <style:style style:parent-style-name="955" style:display-name="T11" style:family="text" style:name="1373">
      <style:paragraph-properties/>
    </style:style>
    <style:style style:parent-style-name="955" style:display-name="T12" style:family="text" style:name="1374">
      <style:paragraph-properties/>
    </style:style>
    <style:style style:parent-style-name="955" style:display-name="T13" style:family="text" style:name="1375">
      <style:paragraph-properties/>
    </style:style>
    <style:style style:parent-style-name="955" style:display-name="T14" style:family="text" style:name="1376">
      <style:paragraph-properties/>
    </style:style>
    <style:style style:parent-style-name="955" style:display-name="T15" style:family="text" style:name="1377">
      <style:paragraph-properties/>
    </style:style>
    <style:style style:parent-style-name="955" style:display-name="T16" style:family="text" style:name="1378">
      <style:paragraph-properties/>
    </style:style>
    <style:style style:parent-style-name="955" style:display-name="T17" style:family="text" style:name="1379">
      <style:paragraph-properties/>
    </style:style>
    <style:style style:parent-style-name="955" style:display-name="T18" style:family="text" style:name="1380">
      <style:paragraph-properties/>
    </style:style>
    <style:style style:parent-style-name="955" style:display-name="T19" style:family="text" style:name="1381">
      <style:paragraph-properties/>
    </style:style>
    <style:style style:parent-style-name="955" style:display-name="T20" style:family="text" style:name="1382">
      <style:paragraph-properties/>
    </style:style>
    <style:style style:parent-style-name="955" style:display-name="T21" style:family="text" style:name="1383">
      <style:paragraph-properties/>
    </style:style>
    <style:style style:parent-style-name="955" style:display-name="T22" style:family="text" style:name="1384">
      <style:paragraph-properties/>
    </style:style>
    <style:style style:parent-style-name="955" style:display-name="T23" style:family="text" style:name="1385">
      <style:paragraph-properties/>
    </style:style>
    <style:style style:parent-style-name="955" style:display-name="T24" style:family="text" style:name="1386">
      <style:paragraph-properties/>
    </style:style>
    <style:style style:parent-style-name="955" style:display-name="T25" style:family="text" style:name="1387">
      <style:paragraph-properties/>
    </style:style>
    <style:style style:parent-style-name="955" style:display-name="T26" style:family="text" style:name="1388">
      <style:paragraph-properties/>
    </style:style>
    <style:style style:parent-style-name="955" style:display-name="T27" style:family="text" style:name="1389">
      <style:paragraph-properties/>
    </style:style>
    <style:style style:parent-style-name="955" style:display-name="T28" style:family="text" style:name="1390">
      <style:paragraph-properties/>
    </style:style>
    <style:style style:parent-style-name="955" style:display-name="T29" style:family="text" style:name="1391">
      <style:paragraph-properties/>
    </style:style>
    <style:style style:parent-style-name="955" style:display-name="T30" style:family="text" style:name="1392">
      <style:paragraph-properties/>
    </style:style>
    <style:style style:parent-style-name="955" style:display-name="T31" style:family="text" style:name="1393">
      <style:paragraph-properties/>
    </style:style>
    <style:style style:parent-style-name="955" style:display-name="T32" style:family="text" style:name="1394">
      <style:paragraph-properties/>
    </style:style>
    <style:style style:parent-style-name="955" style:display-name="T33" style:family="text" style:name="1395">
      <style:paragraph-properties/>
    </style:style>
    <style:style style:parent-style-name="955" style:display-name="T34" style:family="text" style:name="1396">
      <style:paragraph-properties/>
    </style:style>
    <style:style style:parent-style-name="955" style:display-name="T35" style:family="text" style:name="1397">
      <style:paragraph-properties/>
    </style:style>
    <style:style style:parent-style-name="955" style:display-name="T36" style:family="text" style:name="1398">
      <style:paragraph-properties/>
    </style:style>
    <style:style style:parent-style-name="955" style:display-name="T37" style:family="text" style:name="1399">
      <style:paragraph-properties/>
    </style:style>
    <style:style style:parent-style-name="955" style:display-name="T38" style:family="text" style:name="1400">
      <style:paragraph-properties/>
    </style:style>
    <style:style style:parent-style-name="955" style:display-name="T39" style:family="text" style:name="1401">
      <style:paragraph-properties/>
    </style:style>
    <style:style style:parent-style-name="955" style:display-name="T40" style:family="text" style:name="1402">
      <style:paragraph-properties/>
    </style:style>
    <style:style style:parent-style-name="955" style:display-name="T41" style:family="text" style:name="1403">
      <style:paragraph-properties/>
    </style:style>
    <style:style style:parent-style-name="955" style:display-name="T42" style:family="text" style:name="1404">
      <style:paragraph-properties/>
    </style:style>
    <style:style style:parent-style-name="955" style:display-name="T43" style:family="text" style:name="1405">
      <style:paragraph-properties/>
    </style:style>
    <style:style style:parent-style-name="955" style:display-name="T44" style:family="text" style:name="1406">
      <style:paragraph-properties/>
    </style:style>
    <style:style style:parent-style-name="955" style:display-name="T45" style:family="text" style:name="1407">
      <style:paragraph-properties/>
    </style:style>
    <style:style style:parent-style-name="955" style:display-name="T46" style:family="text" style:name="1408">
      <style:paragraph-properties/>
    </style:style>
    <style:style style:parent-style-name="955" style:display-name="T47" style:family="text" style:name="1409">
      <style:paragraph-properties/>
    </style:style>
    <style:style style:parent-style-name="955" style:display-name="T48" style:family="text" style:name="1410">
      <style:paragraph-properties/>
    </style:style>
    <style:style style:parent-style-name="955" style:display-name="T49" style:family="text" style:name="1411">
      <style:paragraph-properties/>
    </style:style>
    <style:style style:parent-style-name="955" style:display-name="T50" style:family="text" style:name="1412">
      <style:paragraph-properties/>
    </style:style>
    <style:style style:parent-style-name="955" style:display-name="T51" style:family="text" style:name="1413">
      <style:paragraph-properties/>
    </style:style>
    <style:style style:parent-style-name="955" style:display-name="T52" style:family="text" style:name="1414">
      <style:paragraph-properties/>
    </style:style>
    <style:style style:parent-style-name="955" style:display-name="T53" style:family="text" style:name="1415">
      <style:paragraph-properties/>
    </style:style>
    <style:style style:parent-style-name="955" style:display-name="T54" style:family="text" style:name="1416">
      <style:paragraph-properties/>
    </style:style>
    <style:style style:parent-style-name="955" style:display-name="T55" style:family="text" style:name="1417">
      <style:paragraph-properties/>
    </style:style>
    <style:style style:parent-style-name="955" style:display-name="T56" style:family="text" style:name="1418">
      <style:paragraph-properties/>
    </style:style>
    <style:style style:parent-style-name="955" style:display-name="T57" style:family="text" style:name="1419">
      <style:paragraph-properties/>
    </style:style>
    <style:style style:parent-style-name="955" style:display-name="T58" style:family="text" style:name="1420">
      <style:paragraph-properties/>
    </style:style>
    <style:style style:parent-style-name="955" style:display-name="T59" style:family="text" style:name="1421">
      <style:paragraph-properties/>
    </style:style>
    <style:style style:parent-style-name="955" style:display-name="T60" style:family="text" style:name="1422">
      <style:paragraph-properties/>
    </style:style>
    <style:style style:parent-style-name="955" style:display-name="T61" style:family="text" style:name="1423">
      <style:paragraph-properties/>
    </style:style>
    <style:style style:parent-style-name="955" style:display-name="T62" style:family="text" style:name="1424">
      <style:paragraph-properties/>
    </style:style>
    <style:style style:parent-style-name="955" style:display-name="T63" style:family="text" style:name="1425">
      <style:paragraph-properties/>
    </style:style>
    <style:style style:parent-style-name="955" style:display-name="T64" style:family="text" style:name="1426">
      <style:paragraph-properties/>
    </style:style>
    <style:style style:parent-style-name="955" style:display-name="T65" style:family="text" style:name="1427">
      <style:paragraph-properties/>
    </style:style>
    <style:style style:parent-style-name="955" style:display-name="T66" style:family="text" style:name="1428">
      <style:paragraph-properties/>
    </style:style>
    <style:style style:parent-style-name="955" style:display-name="T67" style:family="text" style:name="1429">
      <style:paragraph-properties/>
    </style:style>
    <style:style style:parent-style-name="955" style:display-name="T68" style:family="text" style:name="1430">
      <style:paragraph-properties/>
    </style:style>
    <style:style style:parent-style-name="955" style:display-name="T69" style:family="text" style:name="1431">
      <style:paragraph-properties/>
    </style:style>
    <style:style style:parent-style-name="955" style:display-name="T70" style:family="text" style:name="1432">
      <style:paragraph-properties/>
    </style:style>
    <style:style style:parent-style-name="955" style:display-name="T71" style:family="text" style:name="1433">
      <style:paragraph-properties/>
    </style:style>
    <style:style style:parent-style-name="955" style:display-name="T72" style:family="text" style:name="1434">
      <style:paragraph-properties/>
    </style:style>
    <style:style style:parent-style-name="955" style:display-name="T73" style:family="text" style:name="1435">
      <style:paragraph-properties/>
    </style:style>
    <style:style style:parent-style-name="955" style:display-name="T74" style:family="text" style:name="1436">
      <style:paragraph-properties/>
    </style:style>
    <style:style style:parent-style-name="955" style:display-name="T75" style:family="text" style:name="1437">
      <style:paragraph-properties/>
    </style:style>
    <style:style style:parent-style-name="955" style:display-name="T76" style:family="text" style:name="1438">
      <style:paragraph-properties/>
    </style:style>
    <style:style style:parent-style-name="955" style:display-name="T77" style:family="text" style:name="1439">
      <style:paragraph-properties/>
    </style:style>
    <style:style style:parent-style-name="955" style:display-name="T78" style:family="text" style:name="1440">
      <style:paragraph-properties/>
    </style:style>
    <style:style style:parent-style-name="955" style:display-name="T79" style:family="text" style:name="1441">
      <style:paragraph-properties/>
    </style:style>
    <style:style style:parent-style-name="955" style:display-name="T80" style:family="text" style:name="1442">
      <style:paragraph-properties/>
    </style:style>
    <style:style style:parent-style-name="955" style:display-name="T81" style:family="text" style:name="1443">
      <style:paragraph-properties/>
    </style:style>
    <style:style style:parent-style-name="955" style:display-name="T82" style:family="text" style:name="1444">
      <style:paragraph-properties/>
    </style:style>
    <style:style style:parent-style-name="955" style:display-name="T83" style:family="text" style:name="1445">
      <style:paragraph-properties/>
    </style:style>
    <style:style style:parent-style-name="955" style:display-name="T84" style:family="text" style:name="1446">
      <style:paragraph-properties/>
    </style:style>
    <style:style style:parent-style-name="955" style:display-name="T85" style:family="text" style:name="1447">
      <style:paragraph-properties/>
    </style:style>
    <style:style style:parent-style-name="955" style:display-name="T86" style:family="text" style:name="1448">
      <style:paragraph-properties/>
    </style:style>
    <style:style style:parent-style-name="955" style:display-name="T87" style:family="text" style:name="1449">
      <style:paragraph-properties/>
    </style:style>
    <style:style style:parent-style-name="955" style:display-name="T88" style:family="text" style:name="1450">
      <style:paragraph-properties/>
    </style:style>
    <style:style style:parent-style-name="955" style:display-name="T89" style:family="text" style:name="1451">
      <style:paragraph-properties/>
    </style:style>
    <style:style style:parent-style-name="955" style:display-name="T90" style:family="text" style:name="1452">
      <style:paragraph-properties/>
    </style:style>
    <style:style style:parent-style-name="955" style:display-name="T91" style:family="text" style:name="1453">
      <style:paragraph-properties/>
    </style:style>
    <style:style style:parent-style-name="955" style:display-name="T92" style:family="text" style:name="1454">
      <style:paragraph-properties/>
    </style:style>
    <style:style style:parent-style-name="955" style:display-name="T93" style:family="text" style:name="1455">
      <style:paragraph-properties/>
    </style:style>
    <style:style style:parent-style-name="955" style:display-name="T94" style:family="text" style:name="1456">
      <style:paragraph-properties/>
    </style:style>
    <style:style style:parent-style-name="955" style:display-name="T95" style:family="text" style:name="1457">
      <style:paragraph-properties/>
    </style:style>
    <style:style style:parent-style-name="955" style:display-name="T96" style:family="text" style:name="1458">
      <style:paragraph-properties/>
    </style:style>
    <style:style style:parent-style-name="955" style:display-name="T97" style:family="text" style:name="1459">
      <style:paragraph-properties/>
    </style:style>
    <style:style style:parent-style-name="955" style:display-name="T98" style:family="text" style:name="1460">
      <style:paragraph-properties/>
    </style:style>
    <style:style style:parent-style-name="955" style:display-name="T99" style:family="text" style:name="1461">
      <style:paragraph-properties/>
    </style:style>
    <style:style style:parent-style-name="955" style:display-name="T100" style:family="text" style:name="1462">
      <style:paragraph-properties/>
    </style:style>
    <style:style style:parent-style-name="955" style:display-name="T101" style:family="text" style:name="1463">
      <style:paragraph-properties/>
    </style:style>
    <style:style style:parent-style-name="955" style:display-name="T102" style:family="text" style:name="1464">
      <style:paragraph-properties/>
    </style:style>
    <style:style style:parent-style-name="955" style:display-name="T103" style:family="text" style:name="1465">
      <style:paragraph-properties/>
    </style:style>
    <style:style style:parent-style-name="955" style:display-name="T104" style:family="text" style:name="1466">
      <style:paragraph-properties/>
    </style:style>
    <style:style style:parent-style-name="955" style:display-name="T105" style:family="text" style:name="1467">
      <style:paragraph-properties/>
    </style:style>
    <style:style style:parent-style-name="955" style:display-name="T106" style:family="text" style:name="1468">
      <style:paragraph-properties/>
    </style:style>
    <style:style style:parent-style-name="955" style:display-name="T107" style:family="text" style:name="1469">
      <style:paragraph-properties/>
    </style:style>
    <style:style style:parent-style-name="955" style:display-name="T108" style:family="text" style:name="1470">
      <style:paragraph-properties/>
    </style:style>
    <style:style style:parent-style-name="955" style:display-name="T109" style:family="text" style:name="1471">
      <style:paragraph-properties/>
    </style:style>
    <style:style style:parent-style-name="955" style:display-name="T110" style:family="text" style:name="1472">
      <style:paragraph-properties/>
    </style:style>
    <style:style style:parent-style-name="955" style:display-name="T111" style:family="text" style:name="1473">
      <style:paragraph-properties/>
    </style:style>
    <style:style style:parent-style-name="955" style:display-name="T112" style:family="text" style:name="1474">
      <style:paragraph-properties/>
    </style:style>
    <style:style style:parent-style-name="955" style:display-name="T113" style:family="text" style:name="1475">
      <style:paragraph-properties/>
    </style:style>
    <style:style style:parent-style-name="955" style:display-name="T114" style:family="text" style:name="1476">
      <style:paragraph-properties/>
    </style:style>
    <style:style style:parent-style-name="955" style:display-name="T115" style:family="text" style:name="1477">
      <style:paragraph-properties/>
    </style:style>
    <style:style style:parent-style-name="955" style:display-name="T116" style:family="text" style:name="1478">
      <style:paragraph-properties/>
    </style:style>
    <style:style style:parent-style-name="955" style:display-name="T117" style:family="text" style:name="1479">
      <style:paragraph-properties/>
    </style:style>
    <style:style style:parent-style-name="955" style:display-name="T118" style:family="text" style:name="1480">
      <style:paragraph-properties/>
    </style:style>
    <style:style style:parent-style-name="955" style:display-name="T119" style:family="text" style:name="1481">
      <style:paragraph-properties/>
    </style:style>
    <style:style style:parent-style-name="955" style:display-name="T120" style:family="text" style:name="1482">
      <style:paragraph-properties/>
    </style:style>
    <style:style style:parent-style-name="955" style:display-name="T121" style:family="text" style:name="1483">
      <style:paragraph-properties/>
    </style:style>
    <style:style style:parent-style-name="955" style:display-name="T122" style:family="text" style:name="1484">
      <style:paragraph-properties/>
    </style:style>
    <style:style style:parent-style-name="955" style:display-name="T123" style:family="text" style:name="1485">
      <style:paragraph-properties/>
    </style:style>
    <style:style style:parent-style-name="955" style:display-name="T124" style:family="text" style:name="1486">
      <style:paragraph-properties/>
    </style:style>
    <style:style style:parent-style-name="955" style:display-name="T125" style:family="text" style:name="1487">
      <style:paragraph-properties/>
    </style:style>
    <style:style style:parent-style-name="955" style:display-name="T126" style:family="text" style:name="1488">
      <style:paragraph-properties/>
    </style:style>
    <style:style style:parent-style-name="955" style:display-name="T127" style:family="text" style:name="1489">
      <style:paragraph-properties/>
    </style:style>
    <style:style style:parent-style-name="955" style:display-name="T128" style:family="text" style:name="1490">
      <style:paragraph-properties/>
    </style:style>
    <style:style style:parent-style-name="955" style:display-name="T129" style:family="text" style:name="1491">
      <style:paragraph-properties/>
    </style:style>
    <style:style style:parent-style-name="955" style:display-name="T130" style:family="text" style:name="1492">
      <style:paragraph-properties/>
    </style:style>
    <style:style style:parent-style-name="955" style:display-name="T131" style:family="text" style:name="1493">
      <style:paragraph-properties/>
    </style:style>
    <style:style style:parent-style-name="955" style:display-name="T132" style:family="text" style:name="1494">
      <style:paragraph-properties/>
    </style:style>
    <style:style style:parent-style-name="955" style:display-name="T133" style:family="text" style:name="1495">
      <style:paragraph-properties/>
    </style:style>
    <style:style style:parent-style-name="955" style:display-name="T134" style:family="text" style:name="1496">
      <style:paragraph-properties/>
    </style:style>
    <style:style style:parent-style-name="955" style:display-name="T135" style:family="text" style:name="1497">
      <style:paragraph-properties/>
    </style:style>
    <style:style style:parent-style-name="955" style:display-name="T136" style:family="text" style:name="1498">
      <style:paragraph-properties/>
    </style:style>
    <style:style style:parent-style-name="955" style:display-name="T137" style:family="text" style:name="1499">
      <style:paragraph-properties/>
    </style:style>
    <style:style style:parent-style-name="955" style:display-name="T138" style:family="text" style:name="1500">
      <style:paragraph-properties/>
    </style:style>
    <style:style style:parent-style-name="955" style:display-name="T139" style:family="text" style:name="1501">
      <style:paragraph-properties/>
    </style:style>
    <style:style style:parent-style-name="955" style:display-name="T140" style:family="text" style:name="1502">
      <style:paragraph-properties/>
    </style:style>
    <style:style style:parent-style-name="955" style:display-name="T141" style:family="text" style:name="1503">
      <style:paragraph-properties/>
    </style:style>
    <style:style style:parent-style-name="955" style:display-name="T142" style:family="text" style:name="1504">
      <style:paragraph-properties/>
    </style:style>
    <style:style style:parent-style-name="955" style:display-name="T143" style:family="text" style:name="1505">
      <style:paragraph-properties/>
    </style:style>
    <style:style style:parent-style-name="955" style:display-name="T144" style:family="text" style:name="1506">
      <style:paragraph-properties/>
    </style:style>
    <style:style style:parent-style-name="955" style:display-name="T145" style:family="text" style:name="1507">
      <style:paragraph-properties/>
    </style:style>
    <style:style style:parent-style-name="955" style:display-name="T146" style:family="text" style:name="1508">
      <style:paragraph-properties/>
      <style:text-properties fo:font-family="Courier New" style:font-family-complex="Courier New"/>
    </style:style>
    <style:style style:parent-style-name="955" style:display-name="T147" style:family="text" style:name="1509">
      <style:paragraph-properties/>
      <style:text-properties fo:font-family="Wingdings" style:font-family-complex="Wingdings"/>
    </style:style>
    <style:style style:parent-style-name="955" style:display-name="T148" style:family="text" style:name="1510">
      <style:paragraph-properties/>
      <style:text-properties fo:font-family="Symbol" style:font-family-complex="Symbol"/>
    </style:style>
    <style:style style:parent-style-name="955" style:display-name="T149" style:family="text" style:name="1511">
      <style:paragraph-properties/>
      <style:text-properties fo:font-family="Courier New" style:font-family-complex="Courier New"/>
    </style:style>
    <style:style style:parent-style-name="955" style:display-name="T150" style:family="text" style:name="1512">
      <style:paragraph-properties/>
      <style:text-properties fo:font-family="Wingdings" style:font-family-complex="Wingdings"/>
    </style:style>
    <style:style style:parent-style-name="955" style:display-name="T151" style:family="text" style:name="1513">
      <style:paragraph-properties/>
      <style:text-properties fo:font-family="Symbol" style:font-family-complex="Symbol"/>
    </style:style>
    <style:style style:parent-style-name="955" style:display-name="T152" style:family="text" style:name="1514">
      <style:paragraph-properties/>
      <style:text-properties fo:font-family="Courier New" style:font-family-complex="Courier New"/>
    </style:style>
    <style:style style:parent-style-name="955" style:display-name="T153" style:family="text" style:name="1515">
      <style:paragraph-properties/>
      <style:text-properties fo:font-family="Wingdings" style:font-family-complex="Wingdings"/>
    </style:style>
    <style:style style:parent-style-name="955" style:display-name="T154" style:family="text" style:name="1516">
      <style:paragraph-properties/>
      <style:text-properties fo:font-family="Symbol" style:font-family-complex="Symbol"/>
    </style:style>
    <style:style style:parent-style-name="955" style:display-name="T155" style:family="text" style:name="1517">
      <style:paragraph-properties/>
      <style:text-properties fo:font-family="Courier New" style:font-family-complex="Courier New"/>
    </style:style>
    <style:style style:parent-style-name="955" style:display-name="T156" style:family="text" style:name="1518">
      <style:paragraph-properties/>
      <style:text-properties fo:font-family="Wingdings" style:font-family-complex="Wingdings"/>
    </style:style>
    <style:style style:parent-style-name="955" style:display-name="T157" style:family="text" style:name="1519">
      <style:paragraph-properties/>
      <style:text-properties fo:font-family="Symbol" style:font-family-complex="Symbol"/>
    </style:style>
    <style:style style:parent-style-name="955" style:display-name="T158" style:family="text" style:name="1520">
      <style:paragraph-properties/>
      <style:text-properties fo:font-family="Courier New" style:font-family-complex="Courier New"/>
    </style:style>
    <style:style style:parent-style-name="955" style:display-name="T159" style:family="text" style:name="1521">
      <style:paragraph-properties/>
      <style:text-properties fo:font-family="Wingdings" style:font-family-complex="Wingdings"/>
    </style:style>
    <style:style style:parent-style-name="955" style:display-name="T160" style:family="text" style:name="1522">
      <style:paragraph-properties/>
      <style:text-properties fo:font-family="Symbol" style:font-family-complex="Symbol"/>
    </style:style>
    <style:style style:parent-style-name="955" style:display-name="T161" style:family="text" style:name="1523">
      <style:paragraph-properties/>
      <style:text-properties fo:font-family="Courier New" style:font-family-complex="Courier New"/>
    </style:style>
    <style:style style:parent-style-name="955" style:display-name="T162" style:family="text" style:name="1524">
      <style:paragraph-properties/>
      <style:text-properties fo:font-family="Wingdings" style:font-family-complex="Wingdings"/>
    </style:style>
    <style:style style:parent-style-name="955" style:display-name="T163" style:family="text" style:name="1525">
      <style:paragraph-properties/>
      <style:text-properties fo:font-family="Symbol" style:font-family-complex="Symbol" fo:font-weight="bold"/>
    </style:style>
    <style:style style:parent-style-name="955" style:display-name="T164" style:family="text" style:name="1526">
      <style:paragraph-properties/>
      <style:text-properties fo:font-family="Symbol" style:font-family-complex="Symbol"/>
    </style:style>
    <style:style style:parent-style-name="955" style:display-name="T165" style:family="text" style:name="1527">
      <style:paragraph-properties/>
      <style:text-properties fo:font-family="Wingdings" style:font-family-complex="Wingdings"/>
    </style:style>
    <style:style style:parent-style-name="955" style:display-name="T166" style:family="text" style:name="1528">
      <style:paragraph-properties/>
      <style:text-properties fo:font-family="Symbol" style:font-family-complex="Symbol"/>
    </style:style>
    <style:style style:parent-style-name="955" style:display-name="T167" style:family="text" style:name="1529">
      <style:paragraph-properties/>
      <style:text-properties fo:font-family="Courier New" style:font-family-complex="Courier New"/>
    </style:style>
    <style:style style:parent-style-name="955" style:display-name="T168" style:family="text" style:name="1530">
      <style:paragraph-properties/>
      <style:text-properties fo:font-family="Wingdings" style:font-family-complex="Wingdings"/>
    </style:style>
    <style:style style:parent-style-name="955" style:display-name="T169" style:family="text" style:name="1531">
      <style:paragraph-properties/>
      <style:text-properties fo:font-family="Symbol" style:font-family-complex="Symbol"/>
    </style:style>
    <style:style style:parent-style-name="955" style:display-name="T170" style:family="text" style:name="1532">
      <style:paragraph-properties/>
      <style:text-properties fo:font-family="Courier New" style:font-family-complex="Courier New"/>
    </style:style>
    <style:style style:parent-style-name="955" style:display-name="T171" style:family="text" style:name="1533">
      <style:paragraph-properties/>
      <style:text-properties fo:font-family="Wingdings" style:font-family-complex="Wingdings"/>
    </style:style>
    <style:style style:parent-style-name="955" style:display-name="T172" style:family="text" style:name="1534">
      <style:paragraph-properties/>
      <style:text-properties fo:font-family="Symbol" style:font-family-complex="Symbol"/>
    </style:style>
    <style:style style:parent-style-name="955" style:display-name="T173" style:family="text" style:name="1535">
      <style:paragraph-properties/>
      <style:text-properties fo:font-family="Courier New" style:font-family-complex="Courier New"/>
    </style:style>
    <style:style style:parent-style-name="955" style:display-name="T174" style:family="text" style:name="1536">
      <style:paragraph-properties/>
      <style:text-properties fo:font-family="Wingdings" style:font-family-complex="Wingdings"/>
    </style:style>
    <style:style style:parent-style-name="955" style:display-name="T175" style:family="text" style:name="1537">
      <style:paragraph-properties/>
      <style:text-properties fo:font-family="Symbol" style:font-family-complex="Symbol"/>
    </style:style>
    <style:style style:parent-style-name="955" style:display-name="T176" style:family="text" style:name="1538">
      <style:paragraph-properties/>
      <style:text-properties fo:font-family="Courier New" style:font-family-complex="Courier New"/>
    </style:style>
    <style:style style:parent-style-name="955" style:display-name="T177" style:family="text" style:name="1539">
      <style:paragraph-properties/>
      <style:text-properties fo:font-family="Wingdings" style:font-family-complex="Wingdings"/>
    </style:style>
    <style:style style:parent-style-name="955" style:display-name="T178" style:family="text" style:name="1540">
      <style:paragraph-properties/>
      <style:text-properties fo:font-family="Symbol" style:font-family-complex="Symbol"/>
    </style:style>
    <style:style style:parent-style-name="955" style:display-name="T179" style:family="text" style:name="1541">
      <style:paragraph-properties/>
      <style:text-properties fo:font-family="Courier New" style:font-family-complex="Courier New"/>
    </style:style>
    <style:style style:parent-style-name="955" style:display-name="T180" style:family="text" style:name="1542">
      <style:paragraph-properties/>
      <style:text-properties fo:font-family="Wingdings" style:font-family-complex="Wingdings"/>
    </style:style>
    <style:style style:parent-style-name="955" style:display-name="T181" style:family="text" style:name="1543">
      <style:paragraph-properties/>
      <style:text-properties fo:font-family="Symbol" style:font-family-complex="Symbol"/>
    </style:style>
    <style:style style:parent-style-name="955" style:display-name="T182" style:family="text" style:name="1544">
      <style:paragraph-properties/>
    </style:style>
    <style:style style:parent-style-name="955" style:display-name="T183" style:family="text" style:name="1545">
      <style:paragraph-properties/>
      <style:text-properties fo:font-family="Wingdings" style:font-family-complex="Wingdings"/>
    </style:style>
    <style:style style:parent-style-name="955" style:display-name="T184" style:family="text" style:name="1546">
      <style:paragraph-properties/>
      <style:text-properties fo:font-family="Symbol" style:font-family-complex="Symbol"/>
    </style:style>
    <style:style style:parent-style-name="955" style:display-name="T185" style:family="text" style:name="1547">
      <style:paragraph-properties/>
      <style:text-properties fo:font-family="Courier New" style:font-family-complex="Courier New"/>
    </style:style>
    <style:style style:parent-style-name="955" style:display-name="T186" style:family="text" style:name="1548">
      <style:paragraph-properties/>
      <style:text-properties fo:font-family="Wingdings" style:font-family-complex="Wingdings"/>
    </style:style>
    <style:style style:parent-style-name="955" style:display-name="T187" style:family="text" style:name="1549">
      <style:paragraph-properties/>
      <style:text-properties fo:font-family="Symbol" style:font-family-complex="Symbol"/>
    </style:style>
    <style:style style:parent-style-name="955" style:display-name="T188" style:family="text" style:name="1550">
      <style:paragraph-properties/>
      <style:text-properties fo:font-family="Courier New" style:font-family-complex="Courier New"/>
    </style:style>
    <style:style style:parent-style-name="955" style:display-name="T189" style:family="text" style:name="1551">
      <style:paragraph-properties/>
      <style:text-properties fo:font-family="Wingdings" style:font-family-complex="Wingdings"/>
    </style:style>
    <style:style style:parent-style-name="955" style:display-name="T190" style:family="text" style:name="1552">
      <style:paragraph-properties/>
      <style:text-properties fo:font-family="Symbol" style:font-family-complex="Symbol"/>
    </style:style>
    <style:style style:parent-style-name="955" style:display-name="T191" style:family="text" style:name="1553">
      <style:paragraph-properties/>
    </style:style>
    <style:style style:parent-style-name="955" style:display-name="T192" style:family="text" style:name="1554">
      <style:paragraph-properties/>
      <style:text-properties fo:font-family="Wingdings" style:font-family-complex="Wingdings"/>
    </style:style>
    <style:style style:parent-style-name="955" style:display-name="T193" style:family="text" style:name="1555">
      <style:paragraph-properties/>
      <style:text-properties fo:font-family="Symbol" style:font-family-complex="Symbol"/>
    </style:style>
    <style:style style:parent-style-name="955" style:display-name="T194" style:family="text" style:name="1556">
      <style:paragraph-properties/>
      <style:text-properties fo:font-family="Courier New" style:font-family-complex="Courier New"/>
    </style:style>
    <style:style style:parent-style-name="955" style:display-name="T195" style:family="text" style:name="1557">
      <style:paragraph-properties/>
      <style:text-properties fo:font-family="Wingdings" style:font-family-complex="Wingdings"/>
    </style:style>
    <style:style style:parent-style-name="955" style:display-name="T196" style:family="text" style:name="1558">
      <style:paragraph-properties/>
      <style:text-properties fo:font-family="Symbol" style:font-family-complex="Symbol"/>
    </style:style>
    <style:style style:parent-style-name="955" style:display-name="T197" style:family="text" style:name="1559">
      <style:paragraph-properties/>
      <style:text-properties fo:font-family="Courier New" style:font-family-complex="Courier New"/>
    </style:style>
    <style:style style:parent-style-name="955" style:display-name="T198" style:family="text" style:name="1560">
      <style:paragraph-properties/>
      <style:text-properties fo:font-family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 fo:font-family="Courier New" style:font-family-complex="Courier New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Courier New" style:font-family-complex="Courier New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Courier New" style:font-family-complex="Courier New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Courier New" style:font-family-complex="Courier New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Courier New" style:font-family-complex="Courier New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Courier New" style:font-family-complex="Courier New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Symbol" style:font-family-complex="Symbol" fo:font-weight="bold"/>
    </style:style>
    <style:style style:family="text" style:name="T164">
      <style:text-properties fo:font-family="Symbol" style:font-family-complex="Symbol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Courier New" style:font-family-complex="Courier New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Courier New" style:font-family-complex="Courier New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Symbol" style:font-family-complex="Symbol"/>
    </style:style>
    <style:style style:family="text" style:name="T173">
      <style:text-properties fo:font-family="Courier New" style:font-family-complex="Courier New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Symbol" style:font-family-complex="Symbol"/>
    </style:style>
    <style:style style:family="text" style:name="T176">
      <style:text-properties fo:font-family="Courier New" style:font-family-complex="Courier New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Symbol" style:font-family-complex="Symbol"/>
    </style:style>
    <style:style style:family="text" style:name="T179">
      <style:text-properties fo:font-family="Courier New" style:font-family-complex="Courier New"/>
    </style:style>
    <style:style style:family="text" style:name="T180">
      <style:text-properties fo:font-family="Wingdings" style:font-family-complex="Wingdings"/>
    </style:style>
    <style:style style:family="text" style:name="T181">
      <style:text-properties fo:font-family="Symbol" style:font-family-complex="Symbol"/>
    </style:style>
    <style:style style:family="text" style:name="T182">
      <style:text-properties/>
    </style:style>
    <style:style style:family="text" style:name="T183">
      <style:text-properties fo:font-family="Wingdings" style:font-family-complex="Wingdings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Courier New" style:font-family-complex="Courier New"/>
    </style:style>
    <style:style style:family="text" style:name="T186">
      <style:text-properties fo:font-family="Wingdings" style:font-family-complex="Wingdings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Courier New" style:font-family-complex="Courier New"/>
    </style:style>
    <style:style style:family="text" style:name="T189">
      <style:text-properties fo:font-family="Wingdings" style:font-family-complex="Wingdings"/>
    </style:style>
    <style:style style:family="text" style:name="T190">
      <style:text-properties fo:font-family="Symbol" style:font-family-complex="Symbol"/>
    </style:style>
    <style:style style:family="text" style:name="T191">
      <style:text-properties/>
    </style:style>
    <style:style style:family="text" style:name="T192">
      <style:text-properties fo:font-family="Wingdings" style:font-family-complex="Wingdings"/>
    </style:style>
    <style:style style:family="text" style:name="T193">
      <style:text-properties fo:font-family="Symbol" style:font-family-complex="Symbol"/>
    </style:style>
    <style:style style:family="text" style:name="T194">
      <style:text-properties fo:font-family="Courier New" style:font-family-complex="Courier New"/>
    </style:style>
    <style:style style:family="text" style:name="T195">
      <style:text-properties fo:font-family="Wingdings" style:font-family-complex="Wingdings"/>
    </style:style>
    <style:style style:family="text" style:name="T196">
      <style:text-properties fo:font-family="Symbol" style:font-family-complex="Symbol"/>
    </style:style>
    <style:style style:family="text" style:name="T197">
      <style:text-properties fo:font-family="Courier New" style:font-family-complex="Courier New"/>
    </style:style>
    <style:style style:family="text" style:name="T198">
      <style:text-properties fo:font-family="Wingdings" style:font-family-complex="Wingdings"/>
    </style:style>
    <text:list-style style:name="WWNum1">
      <text:list-level-style-bullet text:level="1" text:style-name="T1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3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3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7">
      <text:list-level-style-number text:level="1" text:style-name="T14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 fo:font-weight="bold"/>
      </text:list-level-style-bullet>
      <text:list-level-style-bullet text:level="2" text:style-name="T164" text:bullet-char="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complex="Symbol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number text:level="2" text:style-name="T18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number text:level="2" text:style-name="T191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4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5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6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7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8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style style:parent-style-name="1031" style:family="paragraph" style:name="P5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765">
      <style:text-properties fo:font-size="8pt" style:font-size-complex="8pt" fo:language="it" fo:country="IT" fo:font-weight="bold"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66">
      <style:text-properties fo:font-size="8pt" style:font-size-complex="8pt" fo:language="it" fo:country="IT" fo:font-weight="bold"/>
    </style:style>
    <style:style style:family="text" style:name="T76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768">
      <style:text-properties fo:font-size="8pt" style:font-size-complex="8pt" fo:language="it" fo:country="IT" fo:font-weight="bold"/>
    </style:style>
    <style:style style:family="text" style:name="T769">
      <style:text-properties fo:font-size="8pt" style:font-size-complex="8pt" fo:language="it" fo:country="IT" fo:font-weight="normal"/>
    </style:style>
    <style:style style:family="text" style:name="T770">
      <style:text-properties fo:font-size="8pt" style:font-size-complex="8pt" fo:language="it" fo:country="IT" fo:font-weight="normal"/>
    </style:style>
    <style:style style:family="text" style:name="T771">
      <style:text-properties fo:font-size="8pt" style:font-size-complex="8pt" fo:language="it" fo:country="IT" fo:font-weight="bold"/>
    </style:style>
    <style:style style:parent-style-name="1031" style:family="paragraph" style:name="P7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61">
      <style:text-properties fo:font-size="8pt" style:font-size-complex="8pt" fo:language="it" fo:country="IT" fo:font-weight="bold"/>
    </style:style>
    <style:style style:parent-style-name="Graphics" style:family="graphic" style:name="gr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62">
      <style:text-properties fo:font-size="8pt" style:font-size-complex="8pt" fo:language="it" fo:country="IT" fo:font-weight="bold"/>
    </style:style>
    <style:style style:family="text" style:name="T86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64">
      <style:text-properties fo:font-size="8pt" style:font-size-complex="8pt" fo:language="it" fo:country="IT" fo:font-weight="bold"/>
    </style:style>
    <style:style style:family="text" style:name="T865">
      <style:text-properties fo:font-size="8pt" style:font-size-complex="8pt" fo:language="it" fo:country="IT" fo:font-weight="normal"/>
    </style:style>
    <style:style style:family="text" style:name="T866">
      <style:text-properties fo:font-size="8pt" style:font-size-complex="8pt" fo:language="it" fo:country="IT" fo:font-weight="normal"/>
    </style:style>
    <style:style style:family="text" style:name="T867">
      <style:text-properties fo:font-size="8pt" style:font-size-complex="8pt" fo:language="it" fo:country="IT" fo:font-weight="bold"/>
    </style:style>
    <style:style style:parent-style-name="1031" style:family="paragraph" style:name="P8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68">
      <style:text-properties fo:font-size="8pt" style:font-size-complex="8pt" fo:language="it" fo:country="IT" fo:font-weight="bold"/>
    </style:style>
    <style:style style:parent-style-name="Graphics" style:family="graphic" style:name="gr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69">
      <style:text-properties fo:font-size="8pt" style:font-size-complex="8pt" fo:language="it" fo:country="IT" fo:font-weight="bold"/>
    </style:style>
    <style:style style:family="text" style:name="T87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71">
      <style:text-properties fo:font-size="8pt" style:font-size-complex="8pt" fo:language="it" fo:country="IT" fo:font-weight="bold"/>
    </style:style>
    <style:style style:family="text" style:name="T872">
      <style:text-properties fo:font-size="8pt" style:font-size-complex="8pt" fo:language="it" fo:country="IT" fo:font-weight="normal"/>
    </style:style>
    <style:style style:family="text" style:name="T873">
      <style:text-properties fo:font-size="8pt" style:font-size-complex="8pt" fo:language="it" fo:country="IT" fo:font-weight="normal"/>
    </style:style>
    <style:style style:family="text" style:name="T874">
      <style:text-properties fo:font-size="8pt" style:font-size-complex="8pt" fo:language="it" fo:country="IT" fo:font-weight="bold"/>
    </style:style>
    <style:style style:parent-style-name="1031" style:family="paragraph" style:name="P8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84">
      <style:text-properties fo:font-size="8pt" style:font-size-complex="8pt" fo:language="it" fo:country="IT" fo:font-weight="bold"/>
    </style:style>
    <style:style style:parent-style-name="Graphics" style:family="graphic" style:name="gr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85">
      <style:text-properties fo:font-size="8pt" style:font-size-complex="8pt" fo:language="it" fo:country="IT" fo:font-weight="bold"/>
    </style:style>
    <style:style style:family="text" style:name="T88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87">
      <style:text-properties fo:font-size="8pt" style:font-size-complex="8pt" fo:language="it" fo:country="IT" fo:font-weight="bold"/>
    </style:style>
    <style:style style:family="text" style:name="T888">
      <style:text-properties fo:font-size="8pt" style:font-size-complex="8pt" fo:language="it" fo:country="IT" fo:font-weight="normal"/>
    </style:style>
    <style:style style:family="text" style:name="T889">
      <style:text-properties fo:font-size="8pt" style:font-size-complex="8pt" fo:language="it" fo:country="IT" fo:font-weight="normal"/>
    </style:style>
    <style:style style:family="text" style:name="T890">
      <style:text-properties fo:font-size="8pt" style:font-size-complex="8pt" fo:language="it" fo:country="IT" fo:font-weight="bold"/>
    </style:style>
    <style:style style:parent-style-name="1031" style:family="paragraph" style:name="P8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91">
      <style:text-properties fo:font-size="8pt" style:font-size-complex="8pt" fo:language="it" fo:country="IT" fo:font-weight="bold"/>
    </style:style>
    <style:style style:parent-style-name="Graphics" style:family="graphic" style:name="gr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92">
      <style:text-properties fo:font-size="8pt" style:font-size-complex="8pt" fo:language="it" fo:country="IT" fo:font-weight="bold"/>
    </style:style>
    <style:style style:family="text" style:name="T89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94">
      <style:text-properties fo:font-size="8pt" style:font-size-complex="8pt" fo:language="it" fo:country="IT" fo:font-weight="bold"/>
    </style:style>
    <style:style style:family="text" style:name="T895">
      <style:text-properties fo:font-size="8pt" style:font-size-complex="8pt" fo:language="it" fo:country="IT" fo:font-weight="normal"/>
    </style:style>
    <style:style style:family="text" style:name="T896">
      <style:text-properties fo:font-size="8pt" style:font-size-complex="8pt" fo:language="it" fo:country="IT" fo:font-weight="normal"/>
    </style:style>
    <style:style style:family="text" style:name="T897">
      <style:text-properties fo:font-size="8pt" style:font-size-complex="8pt" fo:language="it" fo:country="IT" fo:font-weight="bold"/>
    </style:style>
    <style:style style:parent-style-name="1031" style:family="paragraph" style:name="P8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98">
      <style:text-properties fo:font-size="8pt" style:font-size-complex="8pt" fo:language="it" fo:country="IT" fo:font-weight="bold"/>
    </style:style>
    <style:style style:parent-style-name="Graphics" style:family="graphic" style:name="gr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99">
      <style:text-properties fo:font-size="8pt" style:font-size-complex="8pt" fo:language="it" fo:country="IT" fo:font-weight="bold"/>
    </style:style>
    <style:style style:family="text" style:name="T90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901">
      <style:text-properties fo:font-size="8pt" style:font-size-complex="8pt" fo:language="it" fo:country="IT" fo:font-weight="bold"/>
    </style:style>
    <style:style style:family="text" style:name="T902">
      <style:text-properties fo:font-size="8pt" style:font-size-complex="8pt" fo:language="it" fo:country="IT" fo:font-weight="normal"/>
    </style:style>
    <style:style style:family="text" style:name="T903">
      <style:text-properties fo:font-size="8pt" style:font-size-complex="8pt" fo:language="it" fo:country="IT" fo:font-weight="normal"/>
    </style:style>
    <style:style style:family="text" style:name="T904">
      <style:text-properties fo:font-size="8pt" style:font-size-complex="8pt" fo:language="it" fo:country="IT" fo:font-weight="bold"/>
    </style:style>
    <style:style style:parent-style-name="1031" style:family="paragraph" style:name="P20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277">
      <style:text-properties fo:font-size="8pt" style:font-size-complex="8pt" fo:language="it" fo:country="IT" fo:font-weight="bold"/>
    </style:style>
    <style:style style:parent-style-name="Graphics" style:family="graphic" style:name="gr1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78">
      <style:text-properties fo:font-size="8pt" style:font-size-complex="8pt" fo:language="it" fo:country="IT" fo:font-weight="bold"/>
    </style:style>
    <style:style style:family="text" style:name="T127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280">
      <style:text-properties fo:font-size="8pt" style:font-size-complex="8pt" fo:language="it" fo:country="IT" fo:font-weight="bold"/>
    </style:style>
    <style:style style:family="text" style:name="T1281">
      <style:text-properties fo:font-size="8pt" style:font-size-complex="8pt" fo:language="it" fo:country="IT" fo:font-weight="normal"/>
    </style:style>
    <style:style style:family="text" style:name="T1282">
      <style:text-properties fo:font-size="8pt" style:font-size-complex="8pt" fo:language="it" fo:country="IT" fo:font-weight="normal"/>
    </style:style>
    <style:style style:family="text" style:name="T1283">
      <style:text-properties fo:font-size="8pt" style:font-size-complex="8pt" fo:language="it" fo:country="IT" fo:font-weight="bold"/>
    </style:style>
    <style:style style:parent-style-name="1031" style:family="paragraph" style:name="P20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284">
      <style:text-properties fo:font-size="8pt" style:font-size-complex="8pt" fo:language="it" fo:country="IT" fo:font-weight="bold"/>
    </style:style>
    <style:style style:parent-style-name="Graphics" style:family="graphic" style:name="gr1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85">
      <style:text-properties fo:font-size="8pt" style:font-size-complex="8pt" fo:language="it" fo:country="IT" fo:font-weight="bold"/>
    </style:style>
    <style:style style:family="text" style:name="T128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287">
      <style:text-properties fo:font-size="8pt" style:font-size-complex="8pt" fo:language="it" fo:country="IT" fo:font-weight="bold"/>
    </style:style>
    <style:style style:family="text" style:name="T1288">
      <style:text-properties fo:font-size="8pt" style:font-size-complex="8pt" fo:language="it" fo:country="IT" fo:font-weight="normal"/>
    </style:style>
    <style:style style:family="text" style:name="T1289">
      <style:text-properties fo:font-size="8pt" style:font-size-complex="8pt" fo:language="it" fo:country="IT" fo:font-weight="normal"/>
    </style:style>
    <style:style style:family="text" style:name="T1290">
      <style:text-properties fo:font-size="8pt" style:font-size-complex="8pt" fo:language="it" fo:country="IT" fo:font-weight="bold"/>
    </style:style>
    <style:style style:parent-style-name="1031" style:family="paragraph" style:name="P20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291">
      <style:text-properties fo:font-size="8pt" style:font-size-complex="8pt" fo:language="it" fo:country="IT" fo:font-weight="bold"/>
    </style:style>
    <style:style style:parent-style-name="Graphics" style:family="graphic" style:name="gr1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92">
      <style:text-properties fo:font-size="8pt" style:font-size-complex="8pt" fo:language="it" fo:country="IT" fo:font-weight="bold"/>
    </style:style>
    <style:style style:family="text" style:name="T129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294">
      <style:text-properties fo:font-size="8pt" style:font-size-complex="8pt" fo:language="it" fo:country="IT" fo:font-weight="bold"/>
    </style:style>
    <style:style style:family="text" style:name="T1295">
      <style:text-properties fo:font-size="8pt" style:font-size-complex="8pt" fo:language="it" fo:country="IT" fo:font-weight="normal"/>
    </style:style>
    <style:style style:family="text" style:name="T1296">
      <style:text-properties fo:font-size="8pt" style:font-size-complex="8pt" fo:language="it" fo:country="IT" fo:font-weight="normal"/>
    </style:style>
    <style:style style:family="text" style:name="T1297">
      <style:text-properties fo:font-size="8pt" style:font-size-complex="8pt" fo:language="it" fo:country="IT" fo:font-weight="bold"/>
    </style:style>
    <style:style style:parent-style-name="1031" style:family="paragraph" style:name="P20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298">
      <style:text-properties fo:font-size="8pt" style:font-size-complex="8pt" fo:language="it" fo:country="IT" fo:font-weight="bold"/>
    </style:style>
    <style:style style:parent-style-name="Graphics" style:family="graphic" style:name="gr1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99">
      <style:text-properties fo:font-size="8pt" style:font-size-complex="8pt" fo:language="it" fo:country="IT" fo:font-weight="bold"/>
    </style:style>
    <style:style style:family="text" style:name="T130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01">
      <style:text-properties fo:font-size="8pt" style:font-size-complex="8pt" fo:language="it" fo:country="IT" fo:font-weight="bold"/>
    </style:style>
    <style:style style:family="text" style:name="T1302">
      <style:text-properties fo:font-size="8pt" style:font-size-complex="8pt" fo:language="it" fo:country="IT" fo:font-weight="normal"/>
    </style:style>
    <style:style style:family="text" style:name="T1303">
      <style:text-properties fo:font-size="8pt" style:font-size-complex="8pt" fo:language="it" fo:country="IT" fo:font-weight="normal"/>
    </style:style>
    <style:style style:family="text" style:name="T1304">
      <style:text-properties fo:font-size="8pt" style:font-size-complex="8pt" fo:language="it" fo:country="IT" fo:font-weight="bold"/>
    </style:style>
    <style:style style:parent-style-name="1031" style:family="paragraph" style:name="P23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409">
      <style:text-properties fo:font-size="8pt" style:font-size-complex="8pt" fo:language="it" fo:country="IT" fo:font-weight="bold"/>
    </style:style>
    <style:style style:parent-style-name="Graphics" style:family="graphic" style:name="gr2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10">
      <style:text-properties fo:font-size="8pt" style:font-size-complex="8pt" fo:language="it" fo:country="IT" fo:font-weight="bold"/>
    </style:style>
    <style:style style:family="text" style:name="T141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412">
      <style:text-properties fo:font-size="8pt" style:font-size-complex="8pt" fo:language="it" fo:country="IT" fo:font-weight="bold"/>
    </style:style>
    <style:style style:family="text" style:name="T1413">
      <style:text-properties fo:font-size="8pt" style:font-size-complex="8pt" fo:language="it" fo:country="IT" fo:font-weight="normal"/>
    </style:style>
    <style:style style:family="text" style:name="T1414">
      <style:text-properties fo:font-size="8pt" style:font-size-complex="8pt" fo:language="it" fo:country="IT" fo:font-weight="normal"/>
    </style:style>
    <style:style style:family="text" style:name="T1415">
      <style:text-properties fo:font-size="8pt" style:font-size-complex="8pt" fo:language="it" fo:country="IT" fo:font-weight="bold"/>
    </style:style>
    <style:style style:parent-style-name="1031" style:family="paragraph" style:name="P23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416">
      <style:text-properties fo:font-size="8pt" style:font-size-complex="8pt" fo:language="it" fo:country="IT" fo:font-weight="bold"/>
    </style:style>
    <style:style style:parent-style-name="Graphics" style:family="graphic" style:name="gr2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17">
      <style:text-properties fo:font-size="8pt" style:font-size-complex="8pt" fo:language="it" fo:country="IT" fo:font-weight="bold"/>
    </style:style>
    <style:style style:family="text" style:name="T141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419">
      <style:text-properties fo:font-size="8pt" style:font-size-complex="8pt" fo:language="it" fo:country="IT" fo:font-weight="bold"/>
    </style:style>
    <style:style style:family="text" style:name="T1420">
      <style:text-properties fo:font-size="8pt" style:font-size-complex="8pt" fo:language="it" fo:country="IT" fo:font-weight="normal"/>
    </style:style>
    <style:style style:family="text" style:name="T1421">
      <style:text-properties fo:font-size="8pt" style:font-size-complex="8pt" fo:language="it" fo:country="IT" fo:font-weight="normal"/>
    </style:style>
    <style:style style:family="text" style:name="T1422">
      <style:text-properties fo:font-size="8pt" style:font-size-complex="8pt" fo:language="it" fo:country="IT" fo:font-weight="bold"/>
    </style:style>
    <style:style style:parent-style-name="1031" style:family="paragraph" style:name="P23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423">
      <style:text-properties fo:font-size="8pt" style:font-size-complex="8pt" fo:language="it" fo:country="IT" fo:font-weight="bold"/>
    </style:style>
    <style:style style:parent-style-name="Graphics" style:family="graphic" style:name="gr2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24">
      <style:text-properties fo:font-size="8pt" style:font-size-complex="8pt" fo:language="it" fo:country="IT" fo:font-weight="bold"/>
    </style:style>
    <style:style style:family="text" style:name="T142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426">
      <style:text-properties fo:font-size="8pt" style:font-size-complex="8pt" fo:language="it" fo:country="IT" fo:font-weight="bold"/>
    </style:style>
    <style:style style:family="text" style:name="T1427">
      <style:text-properties fo:font-size="8pt" style:font-size-complex="8pt" fo:language="it" fo:country="IT" fo:font-weight="normal"/>
    </style:style>
    <style:style style:family="text" style:name="T1428">
      <style:text-properties fo:font-size="8pt" style:font-size-complex="8pt" fo:language="it" fo:country="IT" fo:font-weight="normal"/>
    </style:style>
    <style:style style:family="text" style:name="T1429">
      <style:text-properties fo:font-size="8pt" style:font-size-complex="8pt" fo:language="it" fo:country="IT" fo:font-weight="bold"/>
    </style:style>
    <style:style style:parent-style-name="1031" style:family="paragraph" style:name="P24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430">
      <style:text-properties fo:font-size="8pt" style:font-size-complex="8pt" fo:language="it" fo:country="IT" fo:font-weight="bold"/>
    </style:style>
    <style:style style:parent-style-name="Graphics" style:family="graphic" style:name="gr2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31">
      <style:text-properties fo:font-size="8pt" style:font-size-complex="8pt" fo:language="it" fo:country="IT" fo:font-weight="bold"/>
    </style:style>
    <style:style style:family="text" style:name="T143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433">
      <style:text-properties fo:font-size="8pt" style:font-size-complex="8pt" fo:language="it" fo:country="IT" fo:font-weight="bold"/>
    </style:style>
    <style:style style:family="text" style:name="T1434">
      <style:text-properties fo:font-size="8pt" style:font-size-complex="8pt" fo:language="it" fo:country="IT" fo:font-weight="normal"/>
    </style:style>
    <style:style style:family="text" style:name="T1435">
      <style:text-properties fo:font-size="8pt" style:font-size-complex="8pt" fo:language="it" fo:country="IT" fo:font-weight="normal"/>
    </style:style>
    <style:style style:family="text" style:name="T1436">
      <style:text-properties fo:font-size="8pt" style:font-size-complex="8pt" fo:language="it" fo:country="IT" fo:font-weight="bold"/>
    </style:style>
    <style:style style:parent-style-name="1031" style:family="paragraph" style:name="P24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437">
      <style:text-properties fo:font-size="8pt" style:font-size-complex="8pt" fo:language="it" fo:country="IT" fo:font-weight="bold"/>
    </style:style>
    <style:style style:parent-style-name="Graphics" style:family="graphic" style:name="gr2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38">
      <style:text-properties fo:font-size="8pt" style:font-size-complex="8pt" fo:language="it" fo:country="IT" fo:font-weight="bold"/>
    </style:style>
    <style:style style:family="text" style:name="T143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440">
      <style:text-properties fo:font-size="8pt" style:font-size-complex="8pt" fo:language="it" fo:country="IT" fo:font-weight="bold"/>
    </style:style>
    <style:style style:family="text" style:name="T1441">
      <style:text-properties fo:font-size="8pt" style:font-size-complex="8pt" fo:language="it" fo:country="IT" fo:font-weight="normal"/>
    </style:style>
    <style:style style:family="text" style:name="T1442">
      <style:text-properties fo:font-size="8pt" style:font-size-complex="8pt" fo:language="it" fo:country="IT" fo:font-weight="normal"/>
    </style:style>
    <style:style style:family="text" style:name="T1443">
      <style:text-properties fo:font-size="8pt" style:font-size-complex="8pt" fo:language="it" fo:country="IT" fo:font-weight="bold"/>
    </style:style>
    <style:style style:parent-style-name="1031" style:family="paragraph" style:name="P27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581">
      <style:text-properties fo:font-size="8pt" style:font-size-complex="8pt" fo:language="it" fo:country="IT" fo:font-weight="bold"/>
    </style:style>
    <style:style style:parent-style-name="Graphics" style:family="graphic" style:name="gr32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82">
      <style:text-properties fo:font-size="8pt" style:font-size-complex="8pt" fo:language="it" fo:country="IT" fo:font-weight="bold"/>
    </style:style>
    <style:style style:family="text" style:name="T158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584">
      <style:text-properties fo:font-size="8pt" style:font-size-complex="8pt" fo:language="it" fo:country="IT" fo:font-weight="bold"/>
    </style:style>
    <style:style style:family="text" style:name="T1585">
      <style:text-properties fo:font-size="8pt" style:font-size-complex="8pt" fo:language="it" fo:country="IT" fo:font-weight="normal"/>
    </style:style>
    <style:style style:family="text" style:name="T1586">
      <style:text-properties fo:font-size="8pt" style:font-size-complex="8pt" fo:language="it" fo:country="IT" fo:font-weight="normal"/>
    </style:style>
    <style:style style:family="text" style:name="T1587">
      <style:text-properties fo:font-size="8pt" style:font-size-complex="8pt" fo:language="it" fo:country="IT" fo:font-weight="bold"/>
    </style:style>
    <style:style style:parent-style-name="1031" style:family="paragraph" style:name="P27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588">
      <style:text-properties fo:font-size="8pt" style:font-size-complex="8pt" fo:language="it" fo:country="IT" fo:font-weight="bold"/>
    </style:style>
    <style:style style:parent-style-name="Graphics" style:family="graphic" style:name="gr3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89">
      <style:text-properties fo:font-size="8pt" style:font-size-complex="8pt" fo:language="it" fo:country="IT" fo:font-weight="bold"/>
    </style:style>
    <style:style style:family="text" style:name="T159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591">
      <style:text-properties fo:font-size="8pt" style:font-size-complex="8pt" fo:language="it" fo:country="IT" fo:font-weight="bold"/>
    </style:style>
    <style:style style:family="text" style:name="T1592">
      <style:text-properties fo:font-size="8pt" style:font-size-complex="8pt" fo:language="it" fo:country="IT" fo:font-weight="normal"/>
    </style:style>
    <style:style style:family="text" style:name="T1593">
      <style:text-properties fo:font-size="8pt" style:font-size-complex="8pt" fo:language="it" fo:country="IT" fo:font-weight="normal"/>
    </style:style>
    <style:style style:family="text" style:name="T1594">
      <style:text-properties fo:font-size="8pt" style:font-size-complex="8pt" fo:language="it" fo:country="IT" fo:font-weight="bold"/>
    </style:style>
    <style:style style:parent-style-name="1031" style:family="paragraph" style:name="P27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595">
      <style:text-properties fo:font-size="8pt" style:font-size-complex="8pt" fo:language="it" fo:country="IT" fo:font-weight="bold"/>
    </style:style>
    <style:style style:parent-style-name="Graphics" style:family="graphic" style:name="gr3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96">
      <style:text-properties fo:font-size="8pt" style:font-size-complex="8pt" fo:language="it" fo:country="IT" fo:font-weight="bold"/>
    </style:style>
    <style:style style:family="text" style:name="T159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598">
      <style:text-properties fo:font-size="8pt" style:font-size-complex="8pt" fo:language="it" fo:country="IT" fo:font-weight="bold"/>
    </style:style>
    <style:style style:family="text" style:name="T1599">
      <style:text-properties fo:font-size="8pt" style:font-size-complex="8pt" fo:language="it" fo:country="IT" fo:font-weight="normal"/>
    </style:style>
    <style:style style:family="text" style:name="T1600">
      <style:text-properties fo:font-size="8pt" style:font-size-complex="8pt" fo:language="it" fo:country="IT" fo:font-weight="normal"/>
    </style:style>
    <style:style style:family="text" style:name="T1601">
      <style:text-properties fo:font-size="8pt" style:font-size-complex="8pt" fo:language="it" fo:country="IT" fo:font-weight="bold"/>
    </style:style>
    <style:style style:parent-style-name="1031" style:family="paragraph" style:name="P27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602">
      <style:text-properties fo:font-size="8pt" style:font-size-complex="8pt" fo:language="it" fo:country="IT" fo:font-weight="bold"/>
    </style:style>
    <style:style style:parent-style-name="Graphics" style:family="graphic" style:name="gr3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03">
      <style:text-properties fo:font-size="8pt" style:font-size-complex="8pt" fo:language="it" fo:country="IT" fo:font-weight="bold"/>
    </style:style>
    <style:style style:family="text" style:name="T160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605">
      <style:text-properties fo:font-size="8pt" style:font-size-complex="8pt" fo:language="it" fo:country="IT" fo:font-weight="bold"/>
    </style:style>
    <style:style style:family="text" style:name="T1606">
      <style:text-properties fo:font-size="8pt" style:font-size-complex="8pt" fo:language="it" fo:country="IT" fo:font-weight="normal"/>
    </style:style>
    <style:style style:family="text" style:name="T1607">
      <style:text-properties fo:font-size="8pt" style:font-size-complex="8pt" fo:language="it" fo:country="IT" fo:font-weight="normal"/>
    </style:style>
    <style:style style:family="text" style:name="T1608">
      <style:text-properties fo:font-size="8pt" style:font-size-complex="8pt" fo:language="it" fo:country="IT" fo:font-weight="bold"/>
    </style:style>
    <style:style style:parent-style-name="1031" style:family="paragraph" style:name="P28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609">
      <style:text-properties fo:font-size="8pt" style:font-size-complex="8pt" fo:language="it" fo:country="IT" fo:font-weight="bold"/>
    </style:style>
    <style:style style:parent-style-name="Graphics" style:family="graphic" style:name="gr3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10">
      <style:text-properties fo:font-size="8pt" style:font-size-complex="8pt" fo:language="it" fo:country="IT" fo:font-weight="bold"/>
    </style:style>
    <style:style style:family="text" style:name="T161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612">
      <style:text-properties fo:font-size="8pt" style:font-size-complex="8pt" fo:language="it" fo:country="IT" fo:font-weight="bold"/>
    </style:style>
    <style:style style:family="text" style:name="T1613">
      <style:text-properties fo:font-size="8pt" style:font-size-complex="8pt" fo:language="it" fo:country="IT" fo:font-weight="normal"/>
    </style:style>
    <style:style style:family="text" style:name="T1614">
      <style:text-properties fo:font-size="8pt" style:font-size-complex="8pt" fo:language="it" fo:country="IT" fo:font-weight="normal"/>
    </style:style>
    <style:style style:family="text" style:name="T1615">
      <style:text-properties fo:font-size="8pt" style:font-size-complex="8pt" fo:language="it" fo:country="IT" fo:font-weight="bold"/>
    </style:style>
    <style:style style:parent-style-name="1031" style:family="paragraph" style:name="P28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616">
      <style:text-properties fo:font-size="8pt" style:font-size-complex="8pt" fo:language="it" fo:country="IT" fo:font-weight="bold"/>
    </style:style>
    <style:style style:parent-style-name="Graphics" style:family="graphic" style:name="gr3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17">
      <style:text-properties fo:font-size="8pt" style:font-size-complex="8pt" fo:language="it" fo:country="IT" fo:font-weight="bold"/>
    </style:style>
    <style:style style:family="text" style:name="T161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619">
      <style:text-properties fo:font-size="8pt" style:font-size-complex="8pt" fo:language="it" fo:country="IT" fo:font-weight="bold"/>
    </style:style>
    <style:style style:family="text" style:name="T1620">
      <style:text-properties fo:font-size="8pt" style:font-size-complex="8pt" fo:language="it" fo:country="IT" fo:font-weight="normal"/>
    </style:style>
    <style:style style:family="text" style:name="T1621">
      <style:text-properties fo:font-size="8pt" style:font-size-complex="8pt" fo:language="it" fo:country="IT" fo:font-weight="normal"/>
    </style:style>
    <style:style style:family="text" style:name="T1622">
      <style:text-properties fo:font-size="8pt" style:font-size-complex="8pt" fo:language="it" fo:country="IT" fo:font-weight="bold"/>
    </style:style>
    <style:style style:parent-style-name="1031" style:family="paragraph" style:name="P30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28">
      <style:text-properties fo:font-size="8pt" style:font-size-complex="8pt" fo:language="it" fo:country="IT" fo:font-weight="bold"/>
    </style:style>
    <style:style style:parent-style-name="Graphics" style:family="graphic" style:name="gr42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29">
      <style:text-properties fo:font-size="8pt" style:font-size-complex="8pt" fo:language="it" fo:country="IT" fo:font-weight="bold"/>
    </style:style>
    <style:style style:family="text" style:name="T173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31">
      <style:text-properties fo:font-size="8pt" style:font-size-complex="8pt" fo:language="it" fo:country="IT" fo:font-weight="bold"/>
    </style:style>
    <style:style style:family="text" style:name="T1732">
      <style:text-properties fo:font-size="8pt" style:font-size-complex="8pt" fo:language="it" fo:country="IT" fo:font-weight="normal"/>
    </style:style>
    <style:style style:family="text" style:name="T1733">
      <style:text-properties fo:font-size="8pt" style:font-size-complex="8pt" fo:language="it" fo:country="IT" fo:font-weight="normal"/>
    </style:style>
    <style:style style:family="text" style:name="T1734">
      <style:text-properties fo:font-size="8pt" style:font-size-complex="8pt" fo:language="it" fo:country="IT" fo:font-weight="bold"/>
    </style:style>
    <style:style style:parent-style-name="1031" style:family="paragraph" style:name="P30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35">
      <style:text-properties fo:font-size="8pt" style:font-size-complex="8pt" fo:language="it" fo:country="IT" fo:font-weight="bold"/>
    </style:style>
    <style:style style:parent-style-name="Graphics" style:family="graphic" style:name="gr4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36">
      <style:text-properties fo:font-size="8pt" style:font-size-complex="8pt" fo:language="it" fo:country="IT" fo:font-weight="bold"/>
    </style:style>
    <style:style style:family="text" style:name="T173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38">
      <style:text-properties fo:font-size="8pt" style:font-size-complex="8pt" fo:language="it" fo:country="IT" fo:font-weight="bold"/>
    </style:style>
    <style:style style:family="text" style:name="T1739">
      <style:text-properties fo:font-size="8pt" style:font-size-complex="8pt" fo:language="it" fo:country="IT" fo:font-weight="normal"/>
    </style:style>
    <style:style style:family="text" style:name="T1740">
      <style:text-properties fo:font-size="8pt" style:font-size-complex="8pt" fo:language="it" fo:country="IT" fo:font-weight="normal"/>
    </style:style>
    <style:style style:family="text" style:name="T1741">
      <style:text-properties fo:font-size="8pt" style:font-size-complex="8pt" fo:language="it" fo:country="IT" fo:font-weight="bold"/>
    </style:style>
    <style:style style:parent-style-name="1031" style:family="paragraph" style:name="P31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42">
      <style:text-properties fo:font-size="8pt" style:font-size-complex="8pt" fo:language="it" fo:country="IT" fo:font-weight="bold"/>
    </style:style>
    <style:style style:parent-style-name="Graphics" style:family="graphic" style:name="gr4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43">
      <style:text-properties fo:font-size="8pt" style:font-size-complex="8pt" fo:language="it" fo:country="IT" fo:font-weight="bold"/>
    </style:style>
    <style:style style:family="text" style:name="T174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45">
      <style:text-properties fo:font-size="8pt" style:font-size-complex="8pt" fo:language="it" fo:country="IT" fo:font-weight="bold"/>
    </style:style>
    <style:style style:family="text" style:name="T1746">
      <style:text-properties fo:font-size="8pt" style:font-size-complex="8pt" fo:language="it" fo:country="IT" fo:font-weight="normal"/>
    </style:style>
    <style:style style:family="text" style:name="T1747">
      <style:text-properties fo:font-size="8pt" style:font-size-complex="8pt" fo:language="it" fo:country="IT" fo:font-weight="normal"/>
    </style:style>
    <style:style style:family="text" style:name="T1748">
      <style:text-properties fo:font-size="8pt" style:font-size-complex="8pt" fo:language="it" fo:country="IT" fo:font-weight="bold"/>
    </style:style>
    <style:style style:parent-style-name="1031" style:family="paragraph" style:name="P31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49">
      <style:text-properties fo:font-size="8pt" style:font-size-complex="8pt" fo:language="it" fo:country="IT" fo:font-weight="bold"/>
    </style:style>
    <style:style style:parent-style-name="Graphics" style:family="graphic" style:name="gr4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50">
      <style:text-properties fo:font-size="8pt" style:font-size-complex="8pt" fo:language="it" fo:country="IT" fo:font-weight="bold"/>
    </style:style>
    <style:style style:family="text" style:name="T175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52">
      <style:text-properties fo:font-size="8pt" style:font-size-complex="8pt" fo:language="it" fo:country="IT" fo:font-weight="bold"/>
    </style:style>
    <style:style style:family="text" style:name="T1753">
      <style:text-properties fo:font-size="8pt" style:font-size-complex="8pt" fo:language="it" fo:country="IT" fo:font-weight="normal"/>
    </style:style>
    <style:style style:family="text" style:name="T1754">
      <style:text-properties fo:font-size="8pt" style:font-size-complex="8pt" fo:language="it" fo:country="IT" fo:font-weight="normal"/>
    </style:style>
    <style:style style:family="text" style:name="T1755">
      <style:text-properties fo:font-size="8pt" style:font-size-complex="8pt" fo:language="it" fo:country="IT" fo:font-weight="bold"/>
    </style:style>
    <style:style style:parent-style-name="1031" style:family="paragraph" style:name="P31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56">
      <style:text-properties fo:font-size="8pt" style:font-size-complex="8pt" fo:language="it" fo:country="IT" fo:font-weight="bold"/>
    </style:style>
    <style:style style:parent-style-name="Graphics" style:family="graphic" style:name="gr4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57">
      <style:text-properties fo:font-size="8pt" style:font-size-complex="8pt" fo:language="it" fo:country="IT" fo:font-weight="bold"/>
    </style:style>
    <style:style style:family="text" style:name="T175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59">
      <style:text-properties fo:font-size="8pt" style:font-size-complex="8pt" fo:language="it" fo:country="IT" fo:font-weight="bold"/>
    </style:style>
    <style:style style:family="text" style:name="T1760">
      <style:text-properties fo:font-size="8pt" style:font-size-complex="8pt" fo:language="it" fo:country="IT" fo:font-weight="normal"/>
    </style:style>
    <style:style style:family="text" style:name="T1761">
      <style:text-properties fo:font-size="8pt" style:font-size-complex="8pt" fo:language="it" fo:country="IT" fo:font-weight="normal"/>
    </style:style>
    <style:style style:family="text" style:name="T1762">
      <style:text-properties fo:font-size="8pt" style:font-size-complex="8pt" fo:language="it" fo:country="IT" fo:font-weight="bold"/>
    </style:style>
    <style:style style:parent-style-name="1031" style:family="paragraph" style:name="P31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63">
      <style:text-properties fo:font-size="8pt" style:font-size-complex="8pt" fo:language="it" fo:country="IT" fo:font-weight="bold"/>
    </style:style>
    <style:style style:parent-style-name="Graphics" style:family="graphic" style:name="gr4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64">
      <style:text-properties fo:font-size="8pt" style:font-size-complex="8pt" fo:language="it" fo:country="IT" fo:font-weight="bold"/>
    </style:style>
    <style:style style:family="text" style:name="T176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66">
      <style:text-properties fo:font-size="8pt" style:font-size-complex="8pt" fo:language="it" fo:country="IT" fo:font-weight="bold"/>
    </style:style>
    <style:style style:family="text" style:name="T1767">
      <style:text-properties fo:font-size="8pt" style:font-size-complex="8pt" fo:language="it" fo:country="IT" fo:font-weight="normal"/>
    </style:style>
    <style:style style:family="text" style:name="T1768">
      <style:text-properties fo:font-size="8pt" style:font-size-complex="8pt" fo:language="it" fo:country="IT" fo:font-weight="normal"/>
    </style:style>
    <style:style style:family="text" style:name="T1769">
      <style:text-properties fo:font-size="8pt" style:font-size-complex="8pt" fo:language="it" fo:country="IT" fo:font-weight="bold"/>
    </style:style>
  </office:automatic-styles>
  <office:master-styles>
    <style:master-page style:name="Standard" style:page-layout-name="Mpm1"/>
    <style:master-page style:name="MasterPage2" style:page-layout-name="Mpm2">
      <style:footer>
        <text:p text:style-name="P51"><text:span text:style-name="T765"/><text:span/><draw:frame draw:name="Copia Immagine13 1" draw:style-name="gr3" text:anchor-type="as-char" svg:width="0.619cm" svg:height="0.619cm" svg:x="0cm" svg:y="0cm"><draw:image xlink:href="Pictures/image1.png" xlink:type="simple" xlink:show="embed" xlink:actuate="onLoad"/></draw:frame><text:span text:style-name="T766"><text:tab/>GIACENZE CRYPTO : </text:span><text:span text:style-name="T767">Esportazione files CSV</text:span><text:span text:style-name="T768"><text:s/></text:span><text:span text:style-name="T769">(Aggiornato alla versione 1.</text:span><text:span text:style-name="T770">49)</text:span><text:span text:style-name="T77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3" style:page-layout-name="Mpm3">
      <style:footer>
        <text:p text:style-name="P80"><text:span text:style-name="T868"/><text:span/><draw:frame draw:name="Copia Immagine13 1" draw:style-name="gr6" text:anchor-type="as-char" svg:width="0.619cm" svg:height="0.619cm" svg:x="0cm" svg:y="0cm"><draw:image xlink:href="Pictures/image1.png" xlink:type="simple" xlink:show="embed" xlink:actuate="onLoad"/></draw:frame><text:span text:style-name="T869"><text:tab/>GIACENZE CRYPTO : </text:span><text:span text:style-name="T870">Esportazione files CSV</text:span><text:span text:style-name="T871"><text:s/></text:span><text:span text:style-name="T872">(Aggiornato alla versione 1.</text:span><text:span text:style-name="T873">49)</text:span><text:span text:style-name="T874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4" style:page-layout-name="Mpm4">
      <style:footer>
        <text:p text:style-name="P86"><text:span text:style-name="T898"/><text:span/><draw:frame draw:name="Copia Immagine13 1" draw:style-name="gr9" text:anchor-type="as-char" svg:width="0.619cm" svg:height="0.619cm" svg:x="0cm" svg:y="0cm"><draw:image xlink:href="Pictures/image1.png" xlink:type="simple" xlink:show="embed" xlink:actuate="onLoad"/></draw:frame><text:span text:style-name="T899"><text:tab/>GIACENZE CRYPTO : </text:span><text:span text:style-name="T900">Esportazione files CSV</text:span><text:span text:style-name="T901"><text:s/></text:span><text:span text:style-name="T902">(Aggiornato alla versione 1.</text:span><text:span text:style-name="T903">49)</text:span><text:span text:style-name="T904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5" style:page-layout-name="Mpm5">
      <style:footer>
        <text:p text:style-name="P208"><text:span text:style-name="T1298"/><text:span/><draw:frame draw:name="Copia Immagine13 1" draw:style-name="gr18" text:anchor-type="as-char" svg:width="0.619cm" svg:height="0.619cm" svg:x="0cm" svg:y="0cm"><draw:image xlink:href="Pictures/image1.png" xlink:type="simple" xlink:show="embed" xlink:actuate="onLoad"/></draw:frame><text:span text:style-name="T1299"><text:tab/>GIACENZE CRYPTO : </text:span><text:span text:style-name="T1300">Esportazione files CSV</text:span><text:span text:style-name="T1301"><text:s/></text:span><text:span text:style-name="T1302">(Aggiornato alla versione 1.</text:span><text:span text:style-name="T1303">49)</text:span><text:span text:style-name="T1304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6" style:page-layout-name="Mpm6">
      <style:footer>
        <text:p text:style-name="P241"><text:span text:style-name="T1437"/><text:span/><draw:frame draw:name="Copia Immagine13 1" draw:style-name="gr27" text:anchor-type="as-char" svg:width="0.619cm" svg:height="0.619cm" svg:x="0cm" svg:y="0cm"><draw:image xlink:href="Pictures/image1.png" xlink:type="simple" xlink:show="embed" xlink:actuate="onLoad"/></draw:frame><text:span text:style-name="T1438"><text:tab/>GIACENZE CRYPTO : </text:span><text:span text:style-name="T1439">Esportazione files CSV</text:span><text:span text:style-name="T1440"><text:s/></text:span><text:span text:style-name="T1441">(Aggiornato alla versione 1.</text:span><text:span text:style-name="T1442">49)</text:span><text:span text:style-name="T1443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7" style:page-layout-name="Mpm7">
      <style:footer>
        <text:p text:style-name="P281"><text:span text:style-name="T1616"/><text:span/><draw:frame draw:name="Copia Immagine13 1" draw:style-name="gr37" text:anchor-type="as-char" svg:width="0.619cm" svg:height="0.619cm" svg:x="0cm" svg:y="0cm"><draw:image xlink:href="Pictures/image1.png" xlink:type="simple" xlink:show="embed" xlink:actuate="onLoad"/></draw:frame><text:span text:style-name="T1617"><text:tab/>GIACENZE CRYPTO : </text:span><text:span text:style-name="T1618">Esportazione files CSV</text:span><text:span text:style-name="T1619"><text:s/></text:span><text:span text:style-name="T1620">(Aggiornato alla versione 1.</text:span><text:span text:style-name="T1621">49)</text:span><text:span text:style-name="T1622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8" style:page-layout-name="Mpm8">
      <style:footer>
        <text:p text:style-name="P313"><text:span text:style-name="T1763"/><text:span/><draw:frame draw:name="Copia Immagine13 1" draw:style-name="gr47" text:anchor-type="as-char" svg:width="0.619cm" svg:height="0.619cm" svg:x="0cm" svg:y="0cm"><draw:image xlink:href="Pictures/image1.png" xlink:type="simple" xlink:show="embed" xlink:actuate="onLoad"/></draw:frame><text:span text:style-name="T1764"><text:tab/>GIACENZE CRYPTO : </text:span><text:span text:style-name="T1765">Esportazione files CSV</text:span><text:span text:style-name="T1766"><text:s/></text:span><text:span text:style-name="T1767">(Aggiornato alla versione 1.</text:span><text:span text:style-name="T1768">49)</text:span><text:span text:style-name="T1769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meta:creation-date>2024-07-12T21:04:48Z</meta:creation-date>
  </office:meta>
</office:document-meta>
</file>