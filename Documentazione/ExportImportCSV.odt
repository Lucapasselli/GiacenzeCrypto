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jpg" manifest:media-type=""/>
  <manifest:file-entry manifest:full-path="Pictures/image4.jpg" manifest:media-type=""/>
  <manifest:file-entry manifest:full-path="Pictures/image5.jpg" manifest:media-type=""/>
  <manifest:file-entry manifest:full-path="Pictures/image6.jpg" manifest:media-type=""/>
  <manifest:file-entry manifest:full-path="Pictures/image7.jpg" manifest:media-type=""/>
  <manifest:file-entry manifest:full-path="Pictures/image8.png" manifest:media-type=""/>
  <manifest:file-entry manifest:full-path="Pictures/image9.png" manifest:media-type=""/>
  <manifest:file-entry manifest:full-path="Pictures/image10.png" manifest:media-type=""/>
  <manifest:file-entry manifest:full-path="Pictures/image11.png" manifest:media-type=""/>
  <manifest:file-entry manifest:full-path="Pictures/image12.png" manifest:media-type=""/>
  <manifest:file-entry manifest:full-path="Pictures/image13.png" manifest:media-type=""/>
  <manifest:file-entry manifest:full-path="Pictures/image14.png" manifest:media-type=""/>
  <manifest:file-entry manifest:full-path="Pictures/image15.png" manifest:media-type=""/>
  <manifest:file-entry manifest:full-path="Pictures/image16.png" manifest:media-type=""/>
  <manifest:file-entry manifest:full-path="Pictures/image17.png" manifest:media-type=""/>
  <manifest:file-entry manifest:full-path="Pictures/image18.png" manifest:media-type=""/>
  <manifest:file-entry manifest:full-path="Pictures/image19.png" manifest:media-type=""/>
  <manifest:file-entry manifest:full-path="Pictures/image20.png" manifest:media-type=""/>
  <manifest:file-entry manifest:full-path="Pictures/image21.png" manifest:media-type=""/>
  <manifest:file-entry manifest:full-path="Pictures/image22.png" manifest:media-type=""/>
  <manifest:file-entry manifest:full-path="Pictures/image23.png" manifest:media-type=""/>
  <manifest:file-entry manifest:full-path="Pictures/image24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1065" style:master-page-name="MasterPage2" style:family="paragraph" style:name="P54">
      <style:paragraph-properties fo:text-align="center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79">
      <style:text-properties fo:color="#000000" fo:font-family="Eras Bold ITC" style:font-family-complex="Eras Bold ITC" fo:font-size="15pt" style:font-size-complex="15pt" fo:language="it" style:language-complex="hi" fo:country="IT" style:country-complex="IN" fo:font-weight="normal"/>
    </style:style>
    <style:style style:parent-style-name="Graphics" style:family="graphic" style:name="gr5">
      <style:graphic-properties draw:image-opacity="100%"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1380">
      <style:text-properties fo:color="#000000" fo:font-family="Eras Bold ITC" style:font-family-complex="Eras Bold ITC" fo:font-size="15pt" style:font-size-complex="15pt" fo:language="it" style:language-complex="hi" fo:country="IT" style:country-complex="IN" fo:font-weight="normal"/>
    </style:style>
    <style:style style:family="text" style:name="T138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8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family="paragraph" style:name="P56">
      <style:paragraph-properties fo:text-align="center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383">
      <style:text-properties fo:color="#000000" fo:font-family="Eras Bold ITC" style:font-family-complex="Eras Bold ITC" fo:font-size="15pt" style:font-size-complex="15pt" fo:language="it" style:language-complex="hi" fo:country="IT" style:country-complex="IN" fo:font-weight="bold"/>
    </style:style>
    <style:style style:family="text" style:name="T138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38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57">
      <style:paragraph-properties fo:text-align="center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386">
      <style:text-properties fo:color="#000000" fo:font-family="Eras Bold ITC" style:font-family-complex="Eras Bold ITC" fo:font-size="15pt" style:font-size-complex="15pt" fo:language="it" style:language-complex="hi" fo:country="IT" style:country-complex="IN" fo:font-weight="normal"/>
    </style:style>
    <style:style style:family="text" style:name="T1387">
      <style:text-properties fo:color="#000000" fo:font-family="Eras Bold ITC" style:font-family-complex="Eras Bold ITC" fo:font-size="20pt" style:font-size-complex="20pt" fo:language="it" style:language-complex="hi" fo:country="IT" style:country-complex="IN" fo:font-weight="bold"/>
    </style:style>
    <style:style style:family="text" style:name="T1388">
      <style:text-properties fo:color="#000000" fo:font-family="Eras Bold ITC" style:font-family-complex="Eras Bold ITC" fo:font-size="15pt" style:font-size-complex="15pt" fo:language="it" style:language-complex="hi" fo:country="IT" style:country-complex="IN" fo:font-weight="bold"/>
    </style:style>
    <style:style style:family="text" style:name="T1389">
      <style:text-properties fo:color="#000000" fo:font-family="Eras Bold ITC" style:font-family-complex="Eras Bold ITC" fo:font-size="15pt" style:font-size-complex="15pt" fo:language="it" style:language-complex="hi" fo:country="IT" style:country-complex="IN" fo:font-weight="bold"/>
    </style:style>
    <style:style style:family="text" style:name="T139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39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58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92">
      <style:text-properties fo:color="#000000" fo:font-family="Eras Bold ITC" style:font-family-complex="Eras Bold ITC" fo:font-size="10pt" style:font-size-complex="10pt" fo:language="it" style:language-complex="hi" fo:country="IT" style:country-complex="IN" fo:font-weight="normal"/>
    </style:style>
    <style:style style:family="text" style:name="T139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9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family="paragraph" style:name="P59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95">
      <style:text-properties fo:color="#000000" fo:font-family="Eras Bold ITC" style:font-family-complex="Eras Bold ITC" fo:font-size="10pt" style:font-size-complex="10pt" fo:language="it" style:language-complex="hi" fo:country="IT" style:country-complex="IN" fo:font-weight="normal"/>
    </style:style>
    <style:style style:family="text" style:name="T139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9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family="paragraph" style:name="P60">
      <style:paragraph-properties fo:text-align="left" fo:margin-left="0cm" fo:margin-right="0cm" fo:text-indent="1.238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98">
      <style:text-properties fo:color="#000000" fo:font-family="Eras Bold ITC" style:font-family-complex="Eras Bold ITC" fo:font-size="10pt" style:font-size-complex="10pt" fo:language="it" style:language-complex="hi" fo:country="IT" style:country-complex="IN" fo:font-weight="normal"/>
    </style:style>
    <style:style style:family="text" style:name="T139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0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family="paragraph" style:name="P61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01">
      <style:text-properties fo:color="#000000" fo:font-family="Eras Bold ITC" style:font-family-complex="Eras Bold ITC" fo:font-size="15pt" style:font-size-complex="15pt" fo:language="it" style:language-complex="hi" fo:country="IT" style:country-complex="IN" fo:font-weight="normal"/>
    </style:style>
    <style:style style:family="text" style:name="T140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0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74" style:family="paragraph" style:name="P62">
      <style:paragraph-properties/>
      <style:text-properties fo:color="#000000" fo:font-family="Liberation Sans" style:font-family-complex="Liberation Sans" fo:font-size="16pt" style:font-size-complex="16pt" fo:language="it" style:language-complex="hi" fo:country="IT" style:country-complex="IN" fo:font-weight="bold"/>
    </style:style>
    <style:style style:family="text" style:name="T1404">
      <style:text-properties fo:color="#000000" fo:font-family="Liberation Sans" style:font-family-complex="Liberation Sans" fo:font-size="16pt" style:font-size-complex="16pt" fo:language="it" style:language-complex="hi" fo:country="IT" style:country-complex="IN" fo:font-weight="bold"/>
    </style:style>
    <style:style style:family="text" style:name="T1405">
      <style:text-properties fo:color="#000000" fo:font-family="Liberation Sans" style:font-family-complex="Liberation Sans" fo:font-size="16pt" style:font-size-complex="16pt" fo:language="it" style:language-complex="hi" fo:country="IT" style:country-complex="IN" fo:font-weight="bold"/>
    </style:style>
    <style:style style:family="text" style:name="T1406">
      <style:text-properties fo:color="#000000" fo:font-family="Liberation Sans" style:font-family-complex="Liberation Sans" fo:font-size="16pt" style:font-size-complex="16pt" fo:language="it" style:language-complex="hi" fo:country="IT" style:country-complex="IN" fo:font-weight="bold"/>
    </style:style>
    <style:style style:parent-style-name="1052" style:family="paragraph" style:name="P63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/>
    </style:style>
    <style:style style:parent-style-name="1052" style:family="paragraph" style:name="P64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Liberation Sans" style:font-family-complex="Liberation Sans"/>
    </style:style>
    <style:style style:family="text" style:name="T1407">
      <style:text-properties fo:font-family="Liberation Sans" style:font-family-complex="Liberation Sans"/>
    </style:style>
    <style:style style:family="text" style:name="T1408">
      <style:text-properties fo:font-family="Liberation Sans" style:font-family-complex="Liberation Sans"/>
    </style:style>
    <style:style style:family="text" style:name="T1409">
      <style:text-properties fo:font-family="Liberation Sans" style:font-family-complex="Liberation Sans"/>
    </style:style>
    <style:style style:parent-style-name="1052" style:family="paragraph" style:name="P65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Liberation Sans" style:font-family-complex="Liberation Sans"/>
    </style:style>
    <style:style style:family="text" style:name="T1410">
      <style:text-properties fo:font-family="Liberation Sans" style:font-family-complex="Liberation Sans"/>
    </style:style>
    <style:style style:family="text" style:name="T1411">
      <style:text-properties fo:font-family="Liberation Sans" style:font-family-complex="Liberation Sans"/>
    </style:style>
    <style:style style:family="text" style:name="T1412">
      <style:text-properties fo:font-family="Liberation Sans" style:font-family-complex="Liberation Sans"/>
    </style:style>
    <style:style style:parent-style-name="1052" style:family="paragraph" style:name="P66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Liberation Sans" style:font-family-complex="Liberation Sans"/>
    </style:style>
    <style:style style:family="text" style:name="T1413">
      <style:text-properties fo:font-family="Liberation Sans" style:font-family-complex="Liberation Sans"/>
    </style:style>
    <style:style style:family="text" style:name="T1414">
      <style:text-properties fo:font-family="Liberation Sans" style:font-family-complex="Liberation Sans"/>
    </style:style>
    <style:style style:family="text" style:name="T1415">
      <style:text-properties fo:font-family="Liberation Sans" style:font-family-complex="Liberation Sans"/>
    </style:style>
    <style:style style:parent-style-name="1052" style:family="paragraph" style:name="P67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Liberation Sans" style:font-family-complex="Liberation Sans"/>
    </style:style>
    <style:style style:family="text" style:name="T1416">
      <style:text-properties fo:font-family="Liberation Sans" style:font-family-complex="Liberation Sans"/>
    </style:style>
    <style:style style:family="text" style:name="T1417">
      <style:text-properties fo:font-family="Liberation Sans" style:font-family-complex="Liberation Sans"/>
    </style:style>
    <style:style style:family="text" style:name="T1418">
      <style:text-properties fo:font-family="Liberation Sans" style:font-family-complex="Liberation Sans"/>
    </style:style>
    <style:style style:family="paragraph" style:name="P68">
      <style:paragraph-properties/>
      <style:text-properties/>
    </style:style>
    <style:style style:family="paragraph" style:name="P69">
      <style:paragraph-properties/>
      <style:text-properties/>
    </style:style>
    <style:style style:family="paragraph" style:name="P70">
      <style:paragraph-properties/>
      <style:text-properties/>
    </style:style>
    <style:style style:parent-style-name="1052" style:family="paragraph" style:name="P71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Liberation Sans" style:font-family-complex="Liberation Sans"/>
    </style:style>
    <style:style style:family="text" style:name="T1419">
      <style:text-properties fo:font-family="Liberation Sans" style:font-family-complex="Liberation Sans"/>
    </style:style>
    <style:style style:family="text" style:name="T1420">
      <style:text-properties fo:font-family="Liberation Sans" style:font-family-complex="Liberation Sans"/>
    </style:style>
    <style:style style:family="text" style:name="T1421">
      <style:text-properties fo:font-family="Liberation Sans" style:font-family-complex="Liberation Sans"/>
    </style:style>
    <style:style style:family="text" style:name="T1422">
      <style:text-properties fo:font-family="Liberation Sans" style:font-family-complex="Liberation Sans"/>
    </style:style>
    <style:style style:parent-style-name="1043" style:family="text" style:name="T1423">
      <style:text-properties fo:font-family="Liberation Sans" style:font-family-complex="Liberation Sans"/>
    </style:style>
    <style:style style:parent-style-name="1043" style:family="text" style:name="T1424">
      <style:text-properties fo:font-family="Liberation Sans" style:font-family-complex="Liberation Sans" fo:language="it" style:language-complex="hi" fo:country="IT" style:country-complex="IN"/>
    </style:style>
    <style:style style:parent-style-name="1043" style:family="text" style:name="T1425">
      <style:text-properties fo:font-family="Liberation Sans" style:font-family-complex="Liberation Sans" fo:language="it" style:language-complex="hi" fo:country="IT" style:country-complex="IN"/>
    </style:style>
    <style:style style:family="text" style:name="T1426">
      <style:text-properties fo:font-family="Liberation Sans" style:font-family-complex="Liberation Sans"/>
    </style:style>
    <style:style style:family="text" style:name="T1427">
      <style:text-properties fo:font-family="Liberation Sans" style:font-family-complex="Liberation Sans"/>
    </style:style>
    <style:style style:family="text" style:name="T1428">
      <style:text-properties fo:font-family="Liberation Sans" style:font-family-complex="Liberation Sans"/>
    </style:style>
    <style:style style:family="text" style:name="T1429">
      <style:text-properties fo:font-family="Liberation Sans" style:font-family-complex="Liberation Sans"/>
    </style:style>
    <style:style style:parent-style-name="1052" style:family="paragraph" style:name="P72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Liberation Sans" style:font-family-complex="Liberation Sans"/>
    </style:style>
    <style:style style:family="text" style:name="T1430">
      <style:text-properties fo:font-family="Liberation Sans" style:font-family-complex="Liberation Sans"/>
    </style:style>
    <style:style style:family="text" style:name="T1431">
      <style:text-properties fo:font-family="Liberation Sans" style:font-family-complex="Liberation Sans"/>
    </style:style>
    <style:style style:family="text" style:name="T1432">
      <style:text-properties fo:font-family="Liberation Sans" style:font-family-complex="Liberation Sans"/>
    </style:style>
    <style:style style:family="text" style:name="T1433">
      <style:text-properties fo:font-family="Liberation Sans" style:font-family-complex="Liberation Sans"/>
    </style:style>
    <style:style style:parent-style-name="1043" style:family="text" style:name="T1434">
      <style:text-properties fo:font-family="Liberation Sans" style:font-family-complex="Liberation Sans"/>
    </style:style>
    <style:style style:parent-style-name="1043" style:family="text" style:name="T1435">
      <style:text-properties fo:font-family="Liberation Sans" style:font-family-complex="Liberation Sans" fo:language="it" style:language-complex="hi" fo:country="IT" style:country-complex="IN"/>
    </style:style>
    <style:style style:parent-style-name="1043" style:family="text" style:name="T1436">
      <style:text-properties fo:font-family="Liberation Sans" style:font-family-complex="Liberation Sans" fo:language="it" style:language-complex="hi" fo:country="IT" style:country-complex="IN"/>
    </style:style>
    <style:style style:family="text" style:name="T1437">
      <style:text-properties fo:font-family="Liberation Sans" style:font-family-complex="Liberation Sans"/>
    </style:style>
    <style:style style:family="text" style:name="T1438">
      <style:text-properties fo:font-family="Liberation Sans" style:font-family-complex="Liberation Sans"/>
    </style:style>
    <style:style style:family="text" style:name="T1439">
      <style:text-properties fo:font-family="Liberation Sans" style:font-family-complex="Liberation Sans"/>
    </style:style>
    <style:style style:family="text" style:name="T1440">
      <style:text-properties fo:font-family="Liberation Sans" style:font-family-complex="Liberation Sans"/>
    </style:style>
    <style:style style:parent-style-name="1052" style:family="paragraph" style:name="P73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Liberation Sans" style:font-family-complex="Liberation Sans"/>
    </style:style>
    <style:style style:family="text" style:name="T1441">
      <style:text-properties fo:font-family="Liberation Sans" style:font-family-complex="Liberation Sans"/>
    </style:style>
    <style:style style:family="text" style:name="T1442">
      <style:text-properties fo:font-family="Liberation Sans" style:font-family-complex="Liberation Sans"/>
    </style:style>
    <style:style style:family="text" style:name="T1443">
      <style:text-properties fo:font-family="Liberation Sans" style:font-family-complex="Liberation Sans"/>
    </style:style>
    <style:style style:family="text" style:name="T1444">
      <style:text-properties fo:font-family="Liberation Sans" style:font-family-complex="Liberation Sans"/>
    </style:style>
    <style:style style:parent-style-name="1043" style:family="text" style:name="T1445">
      <style:text-properties fo:font-family="Liberation Sans" style:font-family-complex="Liberation Sans"/>
    </style:style>
    <style:style style:parent-style-name="1043" style:family="text" style:name="T1446">
      <style:text-properties fo:font-family="Liberation Sans" style:font-family-complex="Liberation Sans" fo:language="it" style:language-complex="hi" fo:country="IT" style:country-complex="IN"/>
    </style:style>
    <style:style style:parent-style-name="1043" style:family="text" style:name="T1447">
      <style:text-properties fo:font-family="Liberation Sans" style:font-family-complex="Liberation Sans" fo:language="it" style:language-complex="hi" fo:country="IT" style:country-complex="IN"/>
    </style:style>
    <style:style style:family="text" style:name="T1448">
      <style:text-properties fo:font-family="Liberation Sans" style:font-family-complex="Liberation Sans"/>
    </style:style>
    <style:style style:family="text" style:name="T1449">
      <style:text-properties fo:font-family="Liberation Sans" style:font-family-complex="Liberation Sans"/>
    </style:style>
    <style:style style:family="text" style:name="T1450">
      <style:text-properties fo:font-family="Liberation Sans" style:font-family-complex="Liberation Sans"/>
    </style:style>
    <style:style style:family="text" style:name="T1451">
      <style:text-properties fo:font-family="Liberation Sans" style:font-family-complex="Liberation Sans"/>
    </style:style>
    <style:style style:parent-style-name="1054" style:family="paragraph" style:name="P74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Arial" style:font-family-complex="Arial" fo:font-weight="bold"/>
    </style:style>
    <style:style style:family="text" style:name="T1452">
      <style:text-properties fo:font-family="Arial" style:font-family-complex="Arial" fo:font-weight="bold"/>
    </style:style>
    <style:style style:family="text" style:name="T1453">
      <style:text-properties fo:font-family="Arial" style:font-family-complex="Arial" fo:font-weight="bold"/>
    </style:style>
    <style:style style:family="text" style:name="T1454">
      <style:text-properties fo:font-family="Arial" style:font-family-complex="Arial" fo:font-weight="bold"/>
    </style:style>
    <style:style style:family="text" style:name="T1455">
      <style:text-properties fo:font-family="Arial" style:font-family-complex="Arial" fo:font-weight="bold"/>
    </style:style>
    <style:style style:parent-style-name="1043" style:family="text" style:name="T1456">
      <style:text-properties fo:font-family="Arial" style:font-family-complex="Arial" fo:font-weight="bold"/>
    </style:style>
    <style:style style:parent-style-name="1043" style:family="text" style:name="T1457">
      <style:text-properties fo:font-family="Arial" style:font-family-complex="Arial" fo:font-weight="bold"/>
    </style:style>
    <style:style style:parent-style-name="1043" style:family="text" style:name="T1458">
      <style:text-properties fo:font-family="Arial" style:font-family-complex="Arial" fo:font-weight="bold"/>
    </style:style>
    <style:style style:family="text" style:name="T1459">
      <style:text-properties fo:font-family="Arial" style:font-family-complex="Arial" fo:font-weight="bold"/>
    </style:style>
    <style:style style:family="text" style:name="T1460">
      <style:text-properties fo:font-family="Arial" style:font-family-complex="Arial" fo:font-weight="bold"/>
    </style:style>
    <style:style style:family="text" style:name="T1461">
      <style:text-properties fo:font-family="Arial" style:font-family-complex="Arial" fo:font-weight="bold"/>
    </style:style>
    <style:style style:family="text" style:name="T1462">
      <style:text-properties fo:font-family="Arial" style:font-family-complex="Arial" fo:font-weight="bold"/>
    </style:style>
    <style:style style:parent-style-name="1054" style:family="paragraph" style:name="P75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Arial" style:font-family-complex="Arial" fo:font-weight="bold"/>
    </style:style>
    <style:style style:family="text" style:name="T1463">
      <style:text-properties fo:font-family="Arial" style:font-family-complex="Arial" fo:font-weight="bold"/>
    </style:style>
    <style:style style:family="text" style:name="T1464">
      <style:text-properties fo:font-family="Arial" style:font-family-complex="Arial" fo:font-weight="bold"/>
    </style:style>
    <style:style style:family="text" style:name="T1465">
      <style:text-properties fo:font-family="Arial" style:font-family-complex="Arial" fo:font-weight="bold"/>
    </style:style>
    <style:style style:family="text" style:name="T1466">
      <style:text-properties fo:font-family="Arial" style:font-family-complex="Arial" fo:font-weight="bold"/>
    </style:style>
    <style:style style:parent-style-name="1043" style:family="text" style:name="T1467">
      <style:text-properties fo:font-family="Arial" style:font-family-complex="Arial" fo:font-weight="bold"/>
    </style:style>
    <style:style style:parent-style-name="1043" style:family="text" style:name="T1468">
      <style:text-properties fo:font-family="Arial" style:font-family-complex="Arial" fo:font-weight="bold"/>
    </style:style>
    <style:style style:parent-style-name="1043" style:family="text" style:name="T1469">
      <style:text-properties fo:font-family="Arial" style:font-family-complex="Arial" fo:font-weight="bold"/>
    </style:style>
    <style:style style:family="text" style:name="T1470">
      <style:text-properties fo:font-family="Arial" style:font-family-complex="Arial" fo:font-weight="bold"/>
    </style:style>
    <style:style style:family="text" style:name="T1471">
      <style:text-properties fo:font-family="Arial" style:font-family-complex="Arial" fo:font-weight="bold"/>
    </style:style>
    <style:style style:family="text" style:name="T1472">
      <style:text-properties fo:font-family="Arial" style:font-family-complex="Arial" fo:font-weight="bold"/>
    </style:style>
    <style:style style:family="text" style:name="T1473">
      <style:text-properties fo:font-family="Arial" style:font-family-complex="Arial" fo:font-weight="bold"/>
    </style:style>
    <style:style style:parent-style-name="1052" style:family="paragraph" style:name="P76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Liberation Sans" style:font-family-complex="Liberation Sans"/>
    </style:style>
    <style:style style:family="text" style:name="T1474">
      <style:text-properties fo:font-family="Liberation Sans" style:font-family-complex="Liberation Sans"/>
    </style:style>
    <style:style style:family="text" style:name="T1475">
      <style:text-properties fo:font-family="Liberation Sans" style:font-family-complex="Liberation Sans"/>
    </style:style>
    <style:style style:family="text" style:name="T1476">
      <style:text-properties fo:font-family="Liberation Sans" style:font-family-complex="Liberation Sans"/>
    </style:style>
    <style:style style:family="text" style:name="T1477">
      <style:text-properties fo:font-family="Liberation Sans" style:font-family-complex="Liberation Sans"/>
    </style:style>
    <style:style style:parent-style-name="1043" style:family="text" style:name="T1478">
      <style:text-properties fo:font-family="Liberation Sans" style:font-family-complex="Liberation Sans"/>
    </style:style>
    <style:style style:parent-style-name="1043" style:family="text" style:name="T1479">
      <style:text-properties fo:font-family="Liberation Sans" style:font-family-complex="Liberation Sans" fo:language="it" style:language-complex="hi" fo:country="IT" style:country-complex="IN"/>
    </style:style>
    <style:style style:parent-style-name="1043" style:family="text" style:name="T1480">
      <style:text-properties fo:font-family="Liberation Sans" style:font-family-complex="Liberation Sans" fo:language="it" style:language-complex="hi" fo:country="IT" style:country-complex="IN"/>
    </style:style>
    <style:style style:family="text" style:name="T1481">
      <style:text-properties fo:font-family="Liberation Sans" style:font-family-complex="Liberation Sans"/>
    </style:style>
    <style:style style:family="text" style:name="T1482">
      <style:text-properties fo:font-family="Liberation Sans" style:font-family-complex="Liberation Sans"/>
    </style:style>
    <style:style style:family="text" style:name="T1483">
      <style:text-properties fo:font-family="Liberation Sans" style:font-family-complex="Liberation Sans"/>
    </style:style>
    <style:style style:family="text" style:name="T1484">
      <style:text-properties fo:font-family="Liberation Sans" style:font-family-complex="Liberation Sans"/>
    </style:style>
    <style:style style:parent-style-name="1054" style:family="paragraph" style:name="P77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Arial" style:font-family-complex="Arial" fo:font-weight="bold"/>
    </style:style>
    <style:style style:family="text" style:name="T1485">
      <style:text-properties fo:font-family="Arial" style:font-family-complex="Arial" fo:font-weight="bold"/>
    </style:style>
    <style:style style:family="text" style:name="T1486">
      <style:text-properties fo:font-family="Arial" style:font-family-complex="Arial" fo:font-weight="bold"/>
    </style:style>
    <style:style style:family="text" style:name="T1487">
      <style:text-properties fo:font-family="Arial" style:font-family-complex="Arial" fo:font-weight="bold"/>
    </style:style>
    <style:style style:family="text" style:name="T1488">
      <style:text-properties fo:font-family="Arial" style:font-family-complex="Arial" fo:font-weight="bold"/>
    </style:style>
    <style:style style:parent-style-name="1043" style:family="text" style:name="T1489">
      <style:text-properties fo:font-family="Arial" style:font-family-complex="Arial" fo:font-weight="bold"/>
    </style:style>
    <style:style style:parent-style-name="1043" style:family="text" style:name="T1490">
      <style:text-properties fo:font-family="Arial" style:font-family-complex="Arial" fo:font-weight="bold"/>
    </style:style>
    <style:style style:parent-style-name="1043" style:family="text" style:name="T1491">
      <style:text-properties fo:font-family="Arial" style:font-family-complex="Arial" fo:font-weight="bold"/>
    </style:style>
    <style:style style:family="text" style:name="T1492">
      <style:text-properties fo:font-family="Arial" style:font-family-complex="Arial" fo:font-weight="bold"/>
    </style:style>
    <style:style style:family="text" style:name="T1493">
      <style:text-properties fo:font-family="Arial" style:font-family-complex="Arial" fo:font-weight="bold"/>
    </style:style>
    <style:style style:family="text" style:name="T1494">
      <style:text-properties fo:font-family="Arial" style:font-family-complex="Arial" fo:font-weight="bold"/>
    </style:style>
    <style:style style:family="text" style:name="T1495">
      <style:text-properties fo:font-family="Arial" style:font-family-complex="Arial" fo:font-weight="bold"/>
    </style:style>
    <style:style style:parent-style-name="1054" style:family="paragraph" style:name="P78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Arial" style:font-family-complex="Arial" fo:font-weight="bold"/>
    </style:style>
    <style:style style:family="text" style:name="T1496">
      <style:text-properties fo:font-family="Arial" style:font-family-complex="Arial" fo:font-weight="bold"/>
    </style:style>
    <style:style style:family="text" style:name="T1497">
      <style:text-properties fo:font-family="Arial" style:font-family-complex="Arial" fo:font-weight="bold"/>
    </style:style>
    <style:style style:family="text" style:name="T1498">
      <style:text-properties fo:font-family="Arial" style:font-family-complex="Arial" fo:font-weight="bold"/>
    </style:style>
    <style:style style:family="text" style:name="T1499">
      <style:text-properties fo:font-family="Arial" style:font-family-complex="Arial" fo:font-weight="bold"/>
    </style:style>
    <style:style style:parent-style-name="1043" style:family="text" style:name="T1500">
      <style:text-properties fo:font-family="Arial" style:font-family-complex="Arial" fo:font-weight="bold"/>
    </style:style>
    <style:style style:parent-style-name="1043" style:family="text" style:name="T1501">
      <style:text-properties fo:font-family="Arial" style:font-family-complex="Arial" fo:font-weight="bold"/>
    </style:style>
    <style:style style:parent-style-name="1043" style:family="text" style:name="T1502">
      <style:text-properties fo:font-family="Arial" style:font-family-complex="Arial" fo:font-weight="bold"/>
    </style:style>
    <style:style style:family="text" style:name="T1503">
      <style:text-properties fo:font-family="Arial" style:font-family-complex="Arial" fo:font-weight="bold"/>
    </style:style>
    <style:style style:family="text" style:name="T1504">
      <style:text-properties fo:font-family="Arial" style:font-family-complex="Arial" fo:font-weight="bold"/>
    </style:style>
    <style:style style:family="text" style:name="T1505">
      <style:text-properties fo:font-family="Arial" style:font-family-complex="Arial" fo:font-weight="bold"/>
    </style:style>
    <style:style style:family="text" style:name="T1506">
      <style:text-properties fo:font-family="Arial" style:font-family-complex="Arial" fo:font-weight="bold"/>
    </style:style>
    <style:style style:parent-style-name="1052" style:family="paragraph" style:name="P79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Liberation Sans" style:font-family-complex="Liberation Sans"/>
    </style:style>
    <style:style style:family="text" style:name="T1507">
      <style:text-properties fo:font-family="Liberation Sans" style:font-family-complex="Liberation Sans"/>
    </style:style>
    <style:style style:family="text" style:name="T1508">
      <style:text-properties fo:font-family="Liberation Sans" style:font-family-complex="Liberation Sans"/>
    </style:style>
    <style:style style:family="text" style:name="T1509">
      <style:text-properties fo:font-family="Liberation Sans" style:font-family-complex="Liberation Sans"/>
    </style:style>
    <style:style style:family="text" style:name="T1510">
      <style:text-properties fo:font-family="Liberation Sans" style:font-family-complex="Liberation Sans"/>
    </style:style>
    <style:style style:parent-style-name="1043" style:family="text" style:name="T1511">
      <style:text-properties fo:font-family="Liberation Sans" style:font-family-complex="Liberation Sans"/>
    </style:style>
    <style:style style:parent-style-name="1043" style:family="text" style:name="T1512">
      <style:text-properties fo:font-family="Liberation Sans" style:font-family-complex="Liberation Sans" fo:language="it" style:language-complex="hi" fo:country="IT" style:country-complex="IN"/>
    </style:style>
    <style:style style:parent-style-name="1043" style:family="text" style:name="T1513">
      <style:text-properties fo:font-family="Liberation Sans" style:font-family-complex="Liberation Sans" fo:language="it" style:language-complex="hi" fo:country="IT" style:country-complex="IN"/>
    </style:style>
    <style:style style:family="text" style:name="T1514">
      <style:text-properties fo:font-family="Liberation Sans" style:font-family-complex="Liberation Sans"/>
    </style:style>
    <style:style style:family="text" style:name="T1515">
      <style:text-properties fo:font-family="Liberation Sans" style:font-family-complex="Liberation Sans"/>
    </style:style>
    <style:style style:family="text" style:name="T1516">
      <style:text-properties fo:font-family="Liberation Sans" style:font-family-complex="Liberation Sans"/>
    </style:style>
    <style:style style:family="text" style:name="T1517">
      <style:text-properties fo:font-family="Liberation Sans" style:font-family-complex="Liberation Sans"/>
    </style:style>
    <style:style style:parent-style-name="1052" style:family="paragraph" style:name="P80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Liberation Sans" style:font-family-complex="Liberation Sans"/>
    </style:style>
    <style:style style:family="text" style:name="T1518">
      <style:text-properties fo:font-family="Liberation Sans" style:font-family-complex="Liberation Sans"/>
    </style:style>
    <style:style style:family="text" style:name="T1519">
      <style:text-properties fo:font-family="Liberation Sans" style:font-family-complex="Liberation Sans"/>
    </style:style>
    <style:style style:family="text" style:name="T1520">
      <style:text-properties fo:font-family="Liberation Sans" style:font-family-complex="Liberation Sans"/>
    </style:style>
    <style:style style:family="text" style:name="T1521">
      <style:text-properties fo:font-family="Liberation Sans" style:font-family-complex="Liberation Sans"/>
    </style:style>
    <style:style style:parent-style-name="1043" style:family="text" style:name="T1522">
      <style:text-properties fo:font-family="Liberation Sans" style:font-family-complex="Liberation Sans"/>
    </style:style>
    <style:style style:parent-style-name="1043" style:family="text" style:name="T1523">
      <style:text-properties fo:font-family="Liberation Serif" style:font-family-complex="Liberation Serif" fo:language="it" style:language-complex="it" fo:country="IT" style:country-complex="IT"/>
    </style:style>
    <style:style style:parent-style-name="1043" style:family="text" style:name="T1524">
      <style:text-properties fo:font-family="Liberation Sans" style:font-family-complex="Liberation Sans" fo:language="it" style:language-complex="hi" fo:country="IT" style:country-complex="IN"/>
    </style:style>
    <style:style style:family="text" style:name="T1525">
      <style:text-properties fo:font-family="Liberation Sans" style:font-family-complex="Liberation Sans"/>
    </style:style>
    <style:style style:family="text" style:name="T1526">
      <style:text-properties fo:font-family="Liberation Sans" style:font-family-complex="Liberation Sans"/>
    </style:style>
    <style:style style:family="text" style:name="T1527">
      <style:text-properties fo:font-family="Liberation Sans" style:font-family-complex="Liberation Sans"/>
    </style:style>
    <style:style style:family="text" style:name="T1528">
      <style:text-properties fo:font-family="Liberation Sans" style:font-family-complex="Liberation Sans"/>
    </style:style>
    <style:style style:family="paragraph" style:name="P81">
      <style:paragraph-properties/>
      <style:text-properties/>
    </style:style>
    <style:style style:family="paragraph" style:name="P82">
      <style:paragraph-properties/>
      <style:text-properties/>
    </style:style>
    <style:style style:family="paragraph" style:name="P83">
      <style:paragraph-properties/>
      <style:text-properties/>
    </style:style>
    <style:style style:family="paragraph" style:name="P84">
      <style:paragraph-properties/>
      <style:text-properties/>
    </style:style>
    <style:style style:parent-style-name="1065" style:family="paragraph" style:name="P8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29">
      <style:text-properties fo:color="#000000" fo:font-family="Liberation Serif" style:font-family-complex="Liberation Serif" fo:font-size="18pt" style:font-size-complex="18pt" fo:language="it" style:language-complex="hi" fo:country="IT" style:country-complex="IN" fo:font-weight="bold"/>
    </style:style>
    <style:style style:family="text" style:name="T153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3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8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32">
      <style:text-properties fo:color="#000000" fo:font-family="Liberation Serif" style:font-family-complex="Liberation Serif" fo:font-size="18pt" style:font-size-complex="18pt" fo:language="it" style:language-complex="hi" fo:country="IT" style:country-complex="IN" fo:font-weight="bold"/>
    </style:style>
    <style:style style:family="text" style:name="T153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3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8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35">
      <style:text-properties fo:color="#000000" fo:font-family="Liberation Serif" style:font-family-complex="Liberation Serif" fo:font-size="18pt" style:font-size-complex="18pt" fo:language="it" style:language-complex="hi" fo:country="IT" style:country-complex="IN" fo:font-weight="bold"/>
    </style:style>
    <style:style style:family="text" style:name="T153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3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8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53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53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54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76" style:master-page-name="MasterPage3" style:family="paragraph" style:name="P89">
      <style:paragraph-properties fo:break-before="page"/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1555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1556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1557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1558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1559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parent-style-name="1067" style:family="paragraph" style:name="P9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56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56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56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7" style:family="paragraph" style:name="P9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56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56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56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76" style:master-page-name="MasterPage4" style:family="paragraph" style:name="P94">
      <style:paragraph-properties fo:break-before="page"/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1587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1588">
      <style:text-properties fo:color="#1f497d" fo:font-family="Liberation Sans" style:font-family-complex="Liberation Sans" fo:font-size="20pt" style:font-size-complex="20pt" fo:language="it" style:language-complex="hi" fo:country="IT" style:country-complex="IN" fo:font-weight="bold"/>
    </style:style>
    <style:style style:family="text" style:name="T1589">
      <style:text-properties fo:color="#1f497d" fo:font-family="Liberation Sans" style:font-family-complex="Liberation Sans" fo:font-size="20pt" style:font-size-complex="20pt" fo:language="it" style:language-complex="hi" fo:country="IT" style:country-complex="IN" fo:font-weight="bold"/>
    </style:style>
    <style:style style:family="text" style:name="T1590">
      <style:text-properties fo:color="#1f497d" fo:font-family="Liberation Sans" style:font-family-complex="Liberation Sans" fo:font-size="20pt" style:font-size-complex="20pt" fo:language="it" style:language-complex="hi" fo:country="IT" style:country-complex="IN" fo:font-weight="bold"/>
    </style:style>
    <style:style style:family="text" style:name="T1591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1592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1593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parent-style-name="1065" style:family="paragraph" style:name="P9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59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59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59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5" style:family="paragraph" style:name="P9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59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59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59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5" style:family="paragraph" style:name="P10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0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0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0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5" style:family="paragraph" style:name="P10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0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Graphics" style:family="graphic" style:name="gr11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160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0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5" style:family="paragraph" style:name="P10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0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0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0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5" style:family="paragraph" style:name="P10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0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1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1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5" style:family="paragraph" style:name="P10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1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1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1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5" style:family="paragraph" style:name="P10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1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1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1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5" style:family="paragraph" style:name="P10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1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1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2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5" style:family="paragraph" style:name="P10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2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2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2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5" style:family="paragraph" style:name="P10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2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2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2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5" style:list-style-name="WWNum7" style:family="paragraph" style:name="P10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27">
      <style:text-properties fo:color="#000000" fo:font-family="Liberation Serif" style:font-family-complex="Liberation Serif" fo:font-size="12pt" style:font-size-complex="12pt" fo:language="it" style:language-complex="it" fo:country="IT" style:country-complex="IT"/>
    </style:style>
    <style:style style:family="text" style:name="T162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629">
      <style:text-properties fo:color="#000000" fo:font-family="Liberation Serif" style:font-family-complex="Liberation Serif" fo:font-size="12pt" style:font-size-complex="12pt" fo:language="it" style:language-complex="it" fo:country="IT" style:country-complex="IT"/>
    </style:style>
    <style:style style:family="text" style:name="T1630">
      <style:text-properties fo:color="#000000" fo:font-family="Liberation Serif" style:font-family-complex="Liberation Serif" fo:font-size="12pt" style:font-size-complex="12pt" fo:language="it" style:language-complex="it" fo:country="IT" style:country-complex="IT"/>
    </style:style>
    <style:style style:parent-style-name="1065" style:family="paragraph" style:name="P11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3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3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3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5" style:family="paragraph" style:name="P11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3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3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3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5" style:family="paragraph" style:name="P11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3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3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3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5" style:family="paragraph" style:name="P11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4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4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4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5" style:family="paragraph" style:name="P11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4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4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4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5" style:family="paragraph" style:name="P11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4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4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4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5" style:family="paragraph" style:name="P11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4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5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5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5" style:family="paragraph" style:name="P11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5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5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5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5" style:family="paragraph" style:name="P11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5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5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5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5" style:family="paragraph" style:name="P11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5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5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6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5" style:family="paragraph" style:name="P12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6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6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6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5" style:family="paragraph" style:name="P12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6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6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6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5" style:family="paragraph" style:name="P12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67">
      <style:text-properties fo:color="#000000" fo:font-family="Liberation Serif" style:font-family-complex="Liberation Serif" fo:font-size="12pt" style:font-size-complex="12pt" fo:language="it" style:language-complex="it" fo:country="IT" style:country-complex="IT"/>
    </style:style>
    <style:style style:family="text" style:name="T166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66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5" style:list-style-name="WWNum7" style:family="paragraph" style:name="P12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7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67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67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67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parent-style-name="1065" style:family="paragraph" style:name="P12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7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7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7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2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7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7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7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2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8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8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8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2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8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8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8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2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8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8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8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2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8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9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9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3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9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9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9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3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9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9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9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3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9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9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0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3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0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0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0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3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0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0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0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3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0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0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0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3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1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1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1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3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1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1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1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3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1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1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1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3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1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2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2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4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2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2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2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4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2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2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2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4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2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Graphics" style:family="graphic" style:name="gr12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172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3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4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3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3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3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4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3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3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3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4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3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3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3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4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4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4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4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4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4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4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4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4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4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4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4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4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4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5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5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5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5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5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5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5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5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75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5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list-style-name="WWNum7" style:family="paragraph" style:name="P15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75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75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76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76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76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65" style:family="paragraph" style:name="P15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6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6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6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5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6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6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6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5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6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7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7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5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7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7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7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5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7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7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7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5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7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7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8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5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8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8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8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6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8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8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8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6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8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8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8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6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9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9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9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6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9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9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9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6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9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9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9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6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9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0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0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6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0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Graphics" style:family="graphic" style:name="gr13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180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0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6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0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0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0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6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0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0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1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6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1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1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1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7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1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1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1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7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1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81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1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list-style-name="WWNum7" style:family="paragraph" style:name="P17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82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82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82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82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82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65" style:family="paragraph" style:name="P17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2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2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2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7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2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2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3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7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3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3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3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7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3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3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3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7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3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3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3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7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4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4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4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7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4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4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4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8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4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Graphics" style:family="graphic" style:name="gr14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184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4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8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4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5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5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8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5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5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5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8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5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5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5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8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5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5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6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8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6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6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6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8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6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6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6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8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6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6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6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8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7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7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7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list-style-name="WWNum7" style:family="paragraph" style:name="P18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87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87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87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87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87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87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87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88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88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88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88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65" style:family="paragraph" style:name="P19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8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8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8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9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8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8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8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9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9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9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9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9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9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9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9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9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9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9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9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9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9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0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0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9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0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0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0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9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0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0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0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9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0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0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1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19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1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1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1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20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1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1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1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20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1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1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1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20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2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2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2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20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2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2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2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20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2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2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2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20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2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3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3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20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3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Graphics" style:family="graphic" style:name="gr15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193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3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20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3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3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3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20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3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3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4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family="paragraph" style:name="P20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4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94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4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5" style:list-style-name="WWNum7" style:family="paragraph" style:name="P21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94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94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94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94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94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65" style:family="paragraph" style:name="P21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94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95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95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5" style:family="paragraph" style:name="P21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95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95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95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5" style:family="paragraph" style:name="P21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955">
      <style:text-properties fo:color="#000000" fo:font-family="Liberation Serif" style:font-family-complex="Liberation Serif" fo:font-size="12pt" style:font-size-complex="12pt" fo:language="it" style:language-complex="it" fo:country="IT" style:country-complex="IT"/>
    </style:style>
    <style:style style:family="text" style:name="T195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95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5" style:family="paragraph" style:name="P21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style="italic"/>
    </style:style>
    <style:style style:family="text" style:name="T1958">
      <style:text-properties fo:color="#000000" fo:font-family="Liberation Serif" style:font-family-complex="Liberation Serif" fo:font-size="10pt" style:font-size-complex="10pt" fo:language="it" style:language-complex="hi" fo:country="IT" style:country-complex="IN" fo:font-style="italic"/>
    </style:style>
    <style:style style:family="text" style:name="T1959">
      <style:text-properties fo:color="#000000" fo:font-family="Liberation Serif" style:font-family-complex="Liberation Serif" fo:font-size="12pt" style:font-size-complex="12pt" fo:language="it" style:language-complex="hi" fo:country="IT" style:country-complex="IN" fo:font-style="italic"/>
    </style:style>
    <style:style style:family="text" style:name="T1960">
      <style:text-properties fo:color="#000000" fo:font-family="Liberation Serif" style:font-family-complex="Liberation Serif" fo:font-size="12pt" style:font-size-complex="12pt" fo:language="it" style:language-complex="hi" fo:country="IT" style:country-complex="IN" fo:font-style="italic"/>
    </style:style>
    <style:style style:parent-style-name="1076" style:master-page-name="MasterPage5" style:family="paragraph" style:name="P215">
      <style:paragraph-properties fo:break-before="page"/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1989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1990">
      <style:text-properties fo:color="#1f497d" fo:font-family="Liberation Sans" style:font-family-complex="Liberation Sans" fo:font-size="20pt" style:font-size-complex="20pt" fo:language="it" style:language-complex="hi" fo:country="IT" style:country-complex="IN" fo:font-weight="bold"/>
    </style:style>
    <style:style style:family="text" style:name="T1991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1992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1993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parent-style-name="1067" style:family="paragraph" style:name="P22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99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99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99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7" style:family="paragraph" style:name="P22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99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99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9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0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0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0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0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7" style:family="paragraph" style:name="P22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0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0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0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0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7" style:family="paragraph" style:name="P22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0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0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1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02" style:family="paragraph" style:name="P224">
      <style:paragraph-properties/>
      <style:text-properties fo:color="#0f4761" fo:font-family="Arial" style:font-family-complex="Arial" fo:font-size="14pt" style:font-size-complex="14pt" fo:font-weight="bold"/>
    </style:style>
    <style:style style:family="text" style:name="T2011">
      <style:text-properties fo:color="#0f4761" fo:font-family="Arial" style:font-family-complex="Arial" fo:font-size="14pt" style:font-size-complex="14pt" fo:font-weight="bold"/>
    </style:style>
    <style:style style:family="text" style:name="T2012">
      <style:text-properties fo:color="#0f4761" fo:font-family="Arial" style:font-family-complex="Arial" fo:font-size="14pt" style:font-size-complex="14pt" fo:font-weight="bold"/>
    </style:style>
    <style:style style:family="text" style:name="T2013">
      <style:text-properties fo:color="#0f4761" fo:font-family="Arial" style:font-family-complex="Arial" fo:font-size="14pt" style:font-size-complex="14pt" fo:font-weight="bold"/>
    </style:style>
    <style:style style:family="text" style:name="T2014">
      <style:text-properties fo:color="#0f4761" fo:font-family="Arial" style:font-family-complex="Arial" fo:font-size="14pt" style:font-size-complex="14pt" fo:font-weight="bold"/>
    </style:style>
    <style:style style:family="text" style:name="T2015">
      <style:text-properties fo:color="#0f4761" fo:font-family="Arial" style:font-family-complex="Arial" fo:font-size="14pt" style:font-size-complex="14pt" fo:font-weight="bold"/>
    </style:style>
    <style:style style:family="paragraph" style:name="P225">
      <style:paragraph-properties/>
      <style:text-properties/>
    </style:style>
    <style:style style:parent-style-name="1067" style:list-style-name="WWNum2" style:family="paragraph" style:name="P22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1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1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1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1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7" style:list-style-name="WWNum2" style:family="paragraph" style:name="P22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2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2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2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2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2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2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2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7" style:list-style-name="WWNum2" style:family="paragraph" style:name="P22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2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2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2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3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7" style:list-style-name="WWNum2" style:family="paragraph" style:name="P22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3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3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3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3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7" style:family="paragraph" style:name="P23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3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Graphics" style:family="graphic" style:name="gr20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03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3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7" style:list-style-name="WWNum2" style:family="paragraph" style:name="P23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3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3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4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4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4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7" style:family="paragraph" style:name="P232">
      <style:paragraph-properties fo:margin-left="1.251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4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Graphics" style:family="graphic" style:name="gr21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04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4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7" style:list-style-name="WWNum2" style:family="paragraph" style:name="P23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4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4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4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4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5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7" style:family="paragraph" style:name="P234">
      <style:paragraph-properties fo:margin-left="1.251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5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Graphics" style:family="graphic" style:name="gr22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05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5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7" style:list-style-name="WWNum2" style:family="paragraph" style:name="P23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5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5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5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5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5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7" style:family="paragraph" style:name="P23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5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6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6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02" style:family="paragraph" style:name="P237">
      <style:paragraph-properties/>
      <style:text-properties fo:color="#0f4761" fo:font-family="Arial" style:font-family-complex="Arial" fo:font-size="14pt" style:font-size-complex="14pt" fo:font-weight="bold"/>
    </style:style>
    <style:style style:family="text" style:name="T2062">
      <style:text-properties fo:color="#0f4761" fo:font-family="Arial" style:font-family-complex="Arial" fo:font-size="14pt" style:font-size-complex="14pt" fo:font-weight="bold"/>
    </style:style>
    <style:style style:family="text" style:name="T2063">
      <style:text-properties fo:color="#0f4761" fo:font-family="Arial" style:font-family-complex="Arial" fo:font-size="14pt" style:font-size-complex="14pt" fo:font-weight="bold"/>
    </style:style>
    <style:style style:family="text" style:name="T2064">
      <style:text-properties fo:color="#0f4761" fo:font-family="Arial" style:font-family-complex="Arial" fo:font-size="14pt" style:font-size-complex="14pt" fo:font-weight="bold"/>
    </style:style>
    <style:style style:family="text" style:name="T2065">
      <style:text-properties fo:color="#0f4761" fo:font-family="Arial" style:font-family-complex="Arial" fo:font-size="14pt" style:font-size-complex="14pt" fo:font-weight="bold"/>
    </style:style>
    <style:style style:family="text" style:name="T2066">
      <style:text-properties fo:color="#0f4761" fo:font-family="Arial" style:font-family-complex="Arial" fo:font-size="14pt" style:font-size-complex="14pt" fo:font-weight="bold"/>
    </style:style>
    <style:style style:family="paragraph" style:name="P238">
      <style:paragraph-properties/>
      <style:text-properties/>
    </style:style>
    <style:style style:parent-style-name="1067" style:list-style-name="WWNum6" style:family="paragraph" style:name="P23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6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6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6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7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7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7" style:list-style-name="WWNum6" style:family="paragraph" style:name="P24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7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7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7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7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7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7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7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7" style:list-style-name="WWNum6" style:family="paragraph" style:name="P24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7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8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8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8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8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7" style:family="paragraph" style:name="P24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8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Graphics" style:family="graphic" style:name="gr2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08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8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7" style:family="paragraph" style:name="P243">
      <style:paragraph-properties fo:margin-left="1.251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8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8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8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7" style:family="paragraph" style:name="P24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9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9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9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5" style:family="paragraph" style:name="P24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93">
      <style:text-properties fo:color="#000000" fo:font-family="Liberation Serif" style:font-family-complex="Liberation Serif" fo:font-size="10.5pt" style:font-size-complex="10.5pt" fo:language="it" style:language-complex="hi" fo:country="IT" style:country-complex="IN"/>
    </style:style>
    <style:style style:family="text" style:name="T209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9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5" style:family="paragraph" style:name="P24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96">
      <style:text-properties fo:color="#000000" fo:font-family="Liberation Serif" style:font-family-complex="Liberation Serif" fo:font-size="10.5pt" style:font-size-complex="10.5pt" fo:language="it" style:language-complex="hi" fo:country="IT" style:country-complex="IN"/>
    </style:style>
    <style:style style:family="text" style:name="T209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09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76" style:master-page-name="MasterPage6" style:family="paragraph" style:name="P247">
      <style:paragraph-properties fo:break-before="page"/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2134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2135">
      <style:text-properties fo:color="#1f497d" fo:font-family="Liberation Sans" style:font-family-complex="Liberation Sans" fo:font-size="20pt" style:font-size-complex="20pt" fo:language="it" style:language-complex="hi" fo:country="IT" style:country-complex="IN" fo:font-weight="bold"/>
    </style:style>
    <style:style style:family="text" style:name="T2136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2137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2138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parent-style-name="1067" style:family="paragraph" style:name="P25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13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14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14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7" style:family="paragraph" style:name="P25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14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14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14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14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14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14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14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5" style:family="paragraph" style:name="P255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4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5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5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5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family="paragraph" style:name="P256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5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15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5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family="paragraph" style:name="P257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5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15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15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15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6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family="paragraph" style:name="P258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6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6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6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02" style:family="paragraph" style:name="P259">
      <style:paragraph-properties/>
      <style:text-properties fo:color="#0f4761" fo:font-family="Arial" style:font-family-complex="Arial" fo:font-size="14pt" style:font-size-complex="14pt" fo:font-weight="bold"/>
    </style:style>
    <style:style style:family="text" style:name="T2164">
      <style:text-properties fo:color="#0f4761" fo:font-family="Arial" style:font-family-complex="Arial" fo:font-size="14pt" style:font-size-complex="14pt" fo:font-weight="bold"/>
    </style:style>
    <style:style style:family="text" style:name="T2165">
      <style:text-properties fo:color="#0f4761" fo:font-family="Arial" style:font-family-complex="Arial" fo:font-size="14pt" style:font-size-complex="14pt" fo:font-weight="bold"/>
    </style:style>
    <style:style style:family="text" style:name="T2166">
      <style:text-properties fo:color="#0f4761" fo:font-family="Arial" style:font-family-complex="Arial" fo:font-size="14pt" style:font-size-complex="14pt" fo:font-weight="bold"/>
    </style:style>
    <style:style style:family="text" style:name="T2167">
      <style:text-properties fo:color="#0f4761" fo:font-family="Arial" style:font-family-complex="Arial" fo:font-size="14pt" style:font-size-complex="14pt" fo:font-weight="bold"/>
    </style:style>
    <style:style style:family="text" style:name="T2168">
      <style:text-properties fo:color="#0f4761" fo:font-family="Arial" style:font-family-complex="Arial" fo:font-size="14pt" style:font-size-complex="14pt" fo:font-weight="bold"/>
    </style:style>
    <style:style style:parent-style-name="1065" style:family="paragraph" style:name="P260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6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7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7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list-style-name="WWNum10" style:family="paragraph" style:name="P261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7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7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7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Graphics" style:family="graphic" style:name="gr29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217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7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list-style-name="WWNum10" style:family="paragraph" style:name="P262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7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7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17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8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8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family="paragraph" style:name="P263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8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8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8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list-style-name="WWNum10" style:family="paragraph" style:name="P264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8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8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8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18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8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19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19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9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9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list-style-name="WWNum10" style:family="paragraph" style:name="P265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9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9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19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9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9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family="paragraph" style:name="P266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9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Graphics" style:family="graphic" style:name="gr30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220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0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family="paragraph" style:name="P267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0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0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0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family="paragraph" style:name="P268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0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0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0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family="paragraph" style:name="P269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0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0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1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family="paragraph" style:name="P270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1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1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1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family="paragraph" style:name="P271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1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1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1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family="paragraph" style:name="P272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1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1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1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family="paragraph" style:name="P273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2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2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2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family="paragraph" style:name="P274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2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2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2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family="paragraph" style:name="P275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2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2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2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family="paragraph" style:name="P276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2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3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3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family="paragraph" style:name="P277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3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3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3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family="paragraph" style:name="P278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3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3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3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family="paragraph" style:name="P279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3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3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4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family="paragraph" style:name="P280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4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4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4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family="paragraph" style:name="P281">
      <style:paragraph-properties fo:line-height="115%" fo:text-align="left" fo:margin-left="1.27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4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24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4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list-style-name="WWNum10" style:family="paragraph" style:name="P282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4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4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24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5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25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5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25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5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25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5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paragraph" style:name="P283">
      <style:paragraph-properties/>
      <style:text-properties/>
    </style:style>
    <style:style style:family="text" style:name="T225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Graphics" style:family="graphic" style:name="gr31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25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259">
      <style:text-properties fo:language="it" style:language-complex="hi" fo:country="IT" style:country-complex="IN"/>
    </style:style>
    <style:style style:family="paragraph" style:name="P284">
      <style:paragraph-properties/>
      <style:text-properties/>
    </style:style>
    <style:style style:family="text" style:name="T2260">
      <style:text-properties/>
    </style:style>
    <style:style style:family="text" style:name="T2261">
      <style:text-properties/>
    </style:style>
    <style:style style:family="text" style:name="T2262">
      <style:text-properties/>
    </style:style>
    <style:style style:parent-style-name="1065" style:list-style-name="WWNum10" style:family="paragraph" style:name="P285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6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6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26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6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6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6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family="paragraph" style:name="P286">
      <style:paragraph-properties fo:line-height="115%" fo:text-align="left" fo:margin-left="1.27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6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7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27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7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7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7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7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7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7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family="paragraph" style:name="P287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7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Graphics" style:family="graphic" style:name="gr32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27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8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paragraph" style:name="P288">
      <style:paragraph-properties/>
      <style:text-properties fo:language="it" style:language-complex="hi" fo:country="IT" style:country-complex="IN"/>
    </style:style>
    <style:style style:family="text" style:name="T228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28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283">
      <style:text-properties fo:language="it" fo:country="IT"/>
    </style:style>
    <style:style style:family="paragraph" style:name="P289">
      <style:paragraph-properties/>
      <style:text-properties fo:color="#000000" style:text-underline-type="single" style:text-underline-style="solid" style:text-underline-width="auto" style:text-underline-color="font-color" fo:font-weight="bold"/>
    </style:style>
    <style:style style:family="text" style:name="T2284">
      <style:text-properties fo:color="#000000" fo:font-family="Liberation Serif" style:font-family-complex="Liberation Serif" fo:font-size="12pt" style:font-size-complex="12pt" fo:language="it" style:language-complex="it" fo:country="IT" style:country-complex="IT" style:text-underline-type="single" style:text-underline-style="solid" style:text-underline-width="auto" style:text-underline-color="font-color" fo:font-weight="bold"/>
    </style:style>
    <style:style style:family="text" style:name="T2285">
      <style:text-properties fo:color="#000000" fo:font-family="Liberation Serif" style:font-family-complex="Liberation Serif" fo:font-size="12pt" style:font-size-complex="12pt" fo:language="it" style:language-complex="hi" fo:country="IT" style:country-complex="IN" style:text-underline-type="single" style:text-underline-style="solid" style:text-underline-width="auto" style:text-underline-color="font-color" fo:font-weight="normal"/>
    </style:style>
    <style:style style:family="text" style:name="T2286">
      <style:text-properties fo:color="#000000" style:text-underline-type="single" style:text-underline-style="solid" style:text-underline-width="auto" style:text-underline-color="font-color" fo:font-weight="bold"/>
    </style:style>
    <style:style style:parent-style-name="1002" style:family="paragraph" style:name="P290">
      <style:paragraph-properties/>
      <style:text-properties fo:color="#0f4761" fo:font-family="Arial" style:font-family-complex="Arial" fo:font-size="14pt" style:font-size-complex="14pt" fo:font-weight="bold"/>
    </style:style>
    <style:style style:family="text" style:name="T2287">
      <style:text-properties fo:color="#0f4761" fo:font-family="Arial" style:font-family-complex="Arial" fo:font-size="14pt" style:font-size-complex="14pt" fo:font-weight="bold"/>
    </style:style>
    <style:style style:family="text" style:name="T2288">
      <style:text-properties fo:color="#0f4761" fo:font-family="Arial" style:font-family-complex="Arial" fo:font-size="14pt" style:font-size-complex="14pt" fo:font-weight="bold"/>
    </style:style>
    <style:style style:family="text" style:name="T2289">
      <style:text-properties fo:color="#0f4761" fo:font-family="Arial" style:font-family-complex="Arial" fo:font-size="14pt" style:font-size-complex="14pt" fo:font-weight="bold"/>
    </style:style>
    <style:style style:family="text" style:name="T2290">
      <style:text-properties fo:color="#0f4761" fo:font-family="Arial" style:font-family-complex="Arial" fo:font-size="14pt" style:font-size-complex="14pt" fo:font-weight="bold"/>
    </style:style>
    <style:style style:family="text" style:name="T2291">
      <style:text-properties fo:color="#0f4761" fo:font-family="Arial" style:font-family-complex="Arial" fo:font-size="14pt" style:font-size-complex="14pt" fo:font-weight="bold"/>
    </style:style>
    <style:style style:parent-style-name="1065" style:family="paragraph" style:name="P291">
      <style:paragraph-properties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9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9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9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list-style-name="WWNum13" style:family="paragraph" style:name="P292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9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9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29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9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9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family="paragraph" style:name="P293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0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0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0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list-style-name="WWNum13" style:family="paragraph" style:name="P294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0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0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30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0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0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family="paragraph" style:name="P295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0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0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1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list-style-name="WWNum13" style:family="paragraph" style:name="P296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1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1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31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1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1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family="paragraph" style:name="P297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1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1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1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family="paragraph" style:name="P298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1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2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2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family="paragraph" style:name="P299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2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2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2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family="paragraph" style:name="P300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2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Graphics" style:family="graphic" style:name="gr3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32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2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family="paragraph" style:name="P301">
      <style:paragraph-properties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2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2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3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3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paragraph" style:name="P302">
      <style:paragraph-properties/>
      <style:text-properties/>
    </style:style>
    <style:style style:family="text" style:name="T233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3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76" style:master-page-name="MasterPage7" style:family="paragraph" style:name="P303">
      <style:paragraph-properties fo:break-before="page"/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2376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2377">
      <style:text-properties fo:color="#1f497d" fo:font-family="Liberation Sans" style:font-family-complex="Liberation Sans" fo:font-size="20pt" style:font-size-complex="20pt" fo:language="it" style:language-complex="hi" fo:country="IT" style:country-complex="IN" fo:font-weight="bold"/>
    </style:style>
    <style:style style:family="text" style:name="T2378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2379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2380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parent-style-name="1065" style:family="paragraph" style:name="P310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8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38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8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family="paragraph" style:name="P311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8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38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8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family="paragraph" style:name="P312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8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38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8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family="paragraph" style:name="P313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9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39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9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family="paragraph" style:name="P314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9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39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239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39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39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9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family="paragraph" style:name="P315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9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40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44" style:family="text" style:name="T240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45" style:family="text" style:name="T240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46" style:family="text" style:name="T240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47" style:family="text" style:name="T240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48" style:family="text" style:name="T240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43" style:family="text" style:name="T240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43" style:family="text" style:name="T240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43" style:family="text" style:name="T240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43" style:family="text" style:name="T240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41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1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family="paragraph" style:name="P316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1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1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1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family="paragraph" style:name="P317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1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41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1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list-style-name="WWNum14" style:family="paragraph" style:name="P318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1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41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42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65" style:family="paragraph" style:name="P319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2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Graphics" style:family="graphic" style:name="gr40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42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2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family="paragraph" style:name="P320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2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2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2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list-style-name="WWNum14" style:family="paragraph" style:name="P321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2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2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2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43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3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3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list-style-name="WWNum14" style:family="paragraph" style:name="P322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3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43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43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243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43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43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65" style:list-style-name="WWNum14" style:family="paragraph" style:name="P323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3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Graphics" style:family="graphic" style:name="gr41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244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44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244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44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44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65" style:list-style-name="WWNum14" style:family="paragraph" style:name="P324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4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44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44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244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44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45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45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65" style:family="paragraph" style:name="P325">
      <style:paragraph-properties fo:line-height="115%" fo:text-align="left" fo:margin-left="1.251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5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5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5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family="paragraph" style:name="P326">
      <style:paragraph-properties fo:line-height="115%" fo:text-align="left" fo:margin-left="1.251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5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Graphics" style:family="graphic" style:name="gr42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45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5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family="paragraph" style:name="P327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5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45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6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list-style-name="WWNum14" style:family="paragraph" style:name="P328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6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46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246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46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246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46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46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65" style:family="paragraph" style:name="P329">
      <style:paragraph-properties fo:line-height="115%" fo:text-align="left" fo:margin-left="1.251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6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46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7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family="paragraph" style:name="P330">
      <style:paragraph-properties fo:line-height="115%" fo:text-align="left" fo:margin-left="1.251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7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Graphics" style:family="graphic" style:name="gr4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47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7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family="paragraph" style:name="P331">
      <style:paragraph-properties fo:line-height="115%" fo:text-align="left" fo:margin-left="1.251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7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7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7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family="paragraph" style:name="P332">
      <style:paragraph-properties fo:line-height="115%" fo:text-align="left" fo:margin-left="1.251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47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47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47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5" style:family="paragraph" style:name="P333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8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48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48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8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paragraph" style:name="P334">
      <style:paragraph-properties/>
      <style:text-properties/>
    </style:style>
    <style:style style:family="text" style:name="T248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48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76" style:master-page-name="MasterPage8" style:family="paragraph" style:name="P335">
      <style:paragraph-properties fo:break-before="page"/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2535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2536">
      <style:text-properties fo:color="#1f497d" fo:font-family="Liberation Serif" style:font-family-complex="Liberation Serif" fo:font-size="20pt" style:font-size-complex="20pt" fo:language="it" style:language-complex="it" fo:country="IT" style:country-complex="IT" fo:font-weight="bold"/>
    </style:style>
    <style:style style:family="text" style:name="T2537">
      <style:text-properties fo:color="#1f497d" fo:font-family="Liberation Serif" style:font-family-complex="Liberation Serif" fo:font-size="20pt" style:font-size-complex="20pt" fo:language="it" style:language-complex="hi" fo:country="IT" style:country-complex="IN" fo:font-weight="bold"/>
    </style:style>
    <style:style style:family="text" style:name="T2538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2539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parent-style-name="1065" style:family="paragraph" style:name="P343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54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54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54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5" style:family="paragraph" style:name="P344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4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54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4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family="paragraph" style:name="P345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4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Graphics" style:family="graphic" style:name="gr51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254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4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family="paragraph" style:name="P346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4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55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5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list-style-name="WWNum19" style:family="paragraph" style:name="P347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5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55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255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55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255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55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55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65" style:family="paragraph" style:name="P348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55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56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56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5" style:family="paragraph" style:name="P349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56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56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56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5" style:family="paragraph" style:name="P350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56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56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56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5" style:family="paragraph" style:name="P351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56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56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57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5" style:family="paragraph" style:name="P352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57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57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57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5" style:family="paragraph" style:name="P353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57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57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57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5" style:family="paragraph" style:name="P354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57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Graphics" style:family="graphic" style:name="gr52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257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57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5" style:list-style-name="WWNum19" style:family="paragraph" style:name="P355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8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58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58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58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65" style:list-style-name="WWNum19" style:family="paragraph" style:name="P356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8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58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58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58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65" style:list-style-name="WWNum19" style:family="paragraph" style:name="P357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8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58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59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259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59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59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59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59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65" style:family="paragraph" style:name="P358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9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59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9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list-style-name="WWNum19" style:family="paragraph" style:name="P359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9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60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60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60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Graphics" style:family="graphic" style:name="gr53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260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60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60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65" style:list-style-name="WWNum19" style:family="paragraph" style:name="P360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60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260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60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260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61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61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261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parent-style-name="1065" style:family="paragraph" style:name="P361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61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61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61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61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61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5" style:list-style-name="WWNum18" style:family="paragraph" style:name="P362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61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Graphics" style:family="graphic" style:name="gr54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261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62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62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</office:automatic-styles>
  <office:body>
    <office:text text:use-soft-page-breaks="true">
      <text:p text:style-name="P54"><text:span text:style-name="T1379"/><text:span/><draw:frame draw:name="Image9" draw:style-name="gr5" draw:z-index="3094" text:anchor-type="paragraph" svg:width="3.45cm" svg:height="3.45cm" svg:x="1.267cm" svg:y="0cm"><draw:image xlink:href="Pictures/image2.png" xlink:type="simple" xlink:show="embed" xlink:actuate="onLoad"/></draw:frame><text:span text:style-name="T1380"><text:tab/></text:span><text:span text:style-name="T1381"/><text:span text:style-name="T1382"/></text:p>
      <text:p text:style-name="P56"><text:span text:style-name="T1383"/><text:span text:style-name="T1384"/><text:span text:style-name="T1385"/></text:p>
      <text:p text:style-name="P57"><text:span text:style-name="T1386"/><text:span text:style-name="T1387">Esportazione files CSV</text:span><text:span text:style-name="T1388"><text:s/></text:span><text:span text:style-name="T1389"> dalle varie piattaforme<text:s text:c="2"/></text:span><text:span text:style-name="T1390"/><text:span text:style-name="T1391"/></text:p>
      <text:p text:style-name="P58"><text:span text:style-name="T1392"><text:s text:c="10"/></text:span><text:span text:style-name="T1393"/><text:span text:style-name="T1394"/></text:p>
      <text:p text:style-name="P59"><text:span text:style-name="T1395"/><text:span text:style-name="T1396"/><text:span text:style-name="T1397"/></text:p>
      <text:p text:style-name="P60"><text:span text:style-name="T1398">GIACENZE CRYPTO</text:span><text:span text:style-name="T1399"/><text:span text:style-name="T1400"/></text:p>
      <text:p text:style-name="P61"><text:span text:style-name="T1401"/><text:span text:style-name="T1402"/><text:span text:style-name="T1403"/></text:p>
      <text:p text:style-name="P62"><text:span text:style-name="T1404">Indice</text:span><text:span text:style-name="T1405"/><text:span text:style-name="T1406"/></text:p>
      <text:p text:style-name="P63"><text:span/><text:span/></text:p>
      <text:p text:style-name="P64"><text:span text:style-name="T1407"/><text:span text:style-name="T1408"/><text:span text:style-name="T1409"/></text:p>
      <text:p text:style-name="P65"><text:span text:style-name="T1410"/><text:span text:style-name="T1411"/><text:span text:style-name="T1412"/></text:p>
      <text:p text:style-name="P66"><text:span text:style-name="T1413"/><text:span text:style-name="T1414"/><text:span text:style-name="T1415"/></text:p>
      <text:p text:style-name="P67"><text:span text:style-name="T1416"/><text:span text:style-name="T1417"/><text:span text:style-name="T1418"/></text:p>
      <text:p text:style-name="P68"><text:span/><text:span/></text:p>
      <text:p text:style-name="P69"><text:span/><text:span/></text:p>
      <text:p text:style-name="P70"><text:span/><text:span/><text:span/><text:span/></text:p>
      <text:table-of-content text:name="">
        <text:table-of-content-source/>
        <text:index-body>
          <text:p text:style-name="P71"><text:span text:style-name="T1419"/><text:a xlink:href="#_Toc1" xlink:type="simple"><text:span text:style-name="T1420"/><text:span text:style-name="T1421"/><text:span text:style-name="T1422"/><text:span text:style-name="T1423"/><text:span text:style-name="T1424">Introduzione</text:span><text:span text:style-name="T1425"/><text:span text:style-name="T1426"><text:tab/></text:span><text:span text:style-name="T1427">2</text:span></text:a><text:span text:style-name="T1428"/><text:span text:style-name="T1429"/></text:p>
          <text:p text:style-name="P72"><text:span text:style-name="T1430"/><text:a xlink:href="#_Toc2" xlink:type="simple"><text:span text:style-name="T1431"/><text:span text:style-name="T1432"/><text:span text:style-name="T1433"/><text:span text:style-name="T1434"/><text:span text:style-name="T1435">Crypto.com App</text:span><text:span text:style-name="T1436"/><text:span text:style-name="T1437"><text:tab/></text:span><text:span text:style-name="T1438">3</text:span></text:a><text:span text:style-name="T1439"/><text:span text:style-name="T1440"/></text:p>
          <text:p text:style-name="P73"><text:span text:style-name="T1441"/><text:a xlink:href="#_Toc3" xlink:type="simple"><text:span text:style-name="T1442"/><text:span text:style-name="T1443"/><text:span text:style-name="T1444"/><text:span text:style-name="T1445"/><text:span text:style-name="T1446">Crypto.com Exchange</text:span><text:span text:style-name="T1447"/><text:span text:style-name="T1448"><text:tab/></text:span><text:span text:style-name="T1449">6</text:span></text:a><text:span text:style-name="T1450"/><text:span text:style-name="T1451"/></text:p>
          <text:p text:style-name="P74"><text:span text:style-name="T1452"/><text:a xlink:href="#_Toc4" xlink:type="simple"><text:span text:style-name="T1453"/><text:span text:style-name="T1454"/><text:span text:style-name="T1455"/><text:span text:style-name="T1456"/><text:span text:style-name="T1457">1 - Come esportare il file delle Transazioni:</text:span><text:span text:style-name="T1458"/><text:span text:style-name="T1459"><text:tab/></text:span><text:span text:style-name="T1460">6</text:span></text:a><text:span text:style-name="T1461"/><text:span text:style-name="T1462"/></text:p>
          <text:p text:style-name="P75"><text:span text:style-name="T1463"/><text:a xlink:href="#_Toc5" xlink:type="simple"><text:span text:style-name="T1464"/><text:span text:style-name="T1465"/><text:span text:style-name="T1466"/><text:span text:style-name="T1467"/><text:span text:style-name="T1468">2 - Come esportare i file dei movimenti mensili:</text:span><text:span text:style-name="T1469"/><text:span text:style-name="T1470"><text:tab/></text:span><text:span text:style-name="T1471">7</text:span></text:a><text:span text:style-name="T1472"/><text:span text:style-name="T1473"/></text:p>
          <text:p text:style-name="P76"><text:span text:style-name="T1474"/><text:a xlink:href="#_Toc6" xlink:type="simple"><text:span text:style-name="T1475"/><text:span text:style-name="T1476"/><text:span text:style-name="T1477"/><text:span text:style-name="T1478"/><text:span text:style-name="T1479">Binance</text:span><text:span text:style-name="T1480"/><text:span text:style-name="T1481"><text:tab/></text:span><text:span text:style-name="T1482">9</text:span></text:a><text:span text:style-name="T1483"/><text:span text:style-name="T1484"/></text:p>
          <text:p text:style-name="P77"><text:span text:style-name="T1485"/><text:a xlink:href="#_Toc7" xlink:type="simple"><text:span text:style-name="T1486"/><text:span text:style-name="T1487"/><text:span text:style-name="T1488"/><text:span text:style-name="T1489"/><text:span text:style-name="T1490">1 - Come esportare il file delle Transazioni:</text:span><text:span text:style-name="T1491"/><text:span text:style-name="T1492"><text:tab/></text:span><text:span text:style-name="T1493">9</text:span></text:a><text:span text:style-name="T1494"/><text:span text:style-name="T1495"/></text:p>
          <text:p text:style-name="P78"><text:span text:style-name="T1496"/><text:a xlink:href="#_Toc8" xlink:type="simple"><text:span text:style-name="T1497"/><text:span text:style-name="T1498"/><text:span text:style-name="T1499"/><text:span text:style-name="T1500"/><text:span text:style-name="T1501">2 - Come esportare il Report Finanziario:</text:span><text:span text:style-name="T1502"/><text:span text:style-name="T1503"><text:tab/></text:span><text:span text:style-name="T1504">11</text:span></text:a><text:span text:style-name="T1505"/><text:span text:style-name="T1506"/></text:p>
          <text:p text:style-name="P79"><text:span text:style-name="T1507"/><text:a xlink:href="#_Toc9" xlink:type="simple"><text:span text:style-name="T1508"/><text:span text:style-name="T1509"/><text:span text:style-name="T1510"/><text:span text:style-name="T1511"/><text:span text:style-name="T1512">Cointraking.info</text:span><text:span text:style-name="T1513"/><text:span text:style-name="T1514"><text:tab/></text:span><text:span text:style-name="T1515">12</text:span></text:a><text:span text:style-name="T1516"/><text:span text:style-name="T1517"/></text:p>
          <text:p text:style-name="P80"><text:span text:style-name="T1518"/><text:a xlink:href="#_Toc10" xlink:type="simple"><text:span text:style-name="T1519"/><text:span text:style-name="T1520"/><text:span text:style-name="T1521"/><text:span text:style-name="T1522"/><text:span text:style-name="T1523">Import CSV sul software Giacenze Crypto</text:span><text:span text:style-name="T1524"/><text:span text:style-name="T1525"><text:tab/></text:span><text:span text:style-name="T1526">14</text:span></text:a><text:span text:style-name="T1527"/><text:span text:style-name="T1528"/></text:p>
          <text:p text:style-name="P81"><text:span/><text:span/></text:p>
          <text:p text:style-name="P82"><text:span/><text:span/></text:p>
          <text:p text:style-name="P83"><text:span/><text:span/></text:p>
          <text:p text:style-name="P84"><text:span/><text:span/></text:p>
        </text:index-body>
      </text:table-of-content>
      <text:p text:style-name="P85"><text:span text:style-name="T1529"/><text:span text:style-name="T1530"/><text:span text:style-name="T1531"/></text:p>
      <text:p text:style-name="P86"><text:span text:style-name="T1532"/><text:span text:style-name="T1533"/><text:span text:style-name="T1534"/></text:p>
      <text:p text:style-name="P87"><text:span text:style-name="T1535"/><text:span text:style-name="T1536"/><text:span text:style-name="T1537"/></text:p>
      <text:p text:style-name="P88"><text:span text:style-name="T1538"/><text:span text:style-name="T1539"/><text:span text:style-name="T1540"/></text:p>
      <text:list>
        <text:list-item>
          <text:p text:style-name="P89"><text:span text:style-name="T1555"/><text:bookmark-start text:name="_Toc1"/><text:span text:style-name="T1556">Introduzione</text:span><text:span text:style-name="T1557"/><text:bookmark-end text:name="_Toc1"/><text:span text:style-name="T1558"/><text:span text:style-name="T1559"/></text:p>
        </text:list-item>
      </text:list>
      <text:p text:style-name="P92"><text:span text:style-name="T1560"/><text:span text:style-name="T1561"/><text:span text:style-name="T1562"/></text:p>
      <text:p text:style-name="P93"><text:span text:style-name="T1563">Questa guida server per spiegare passo-passo come estrarre i file CSV dalle varie piattaforme che poi serviranno per essere importati sul programma.</text:span><text:span text:style-name="T1564"/><text:span text:style-name="T1565"/></text:p>
      <text:list>
        <text:list-item>
          <text:p text:style-name="P94"><text:span text:style-name="T1587"/><text:bookmark-start text:name="_Toc2"/><text:span text:style-name="T1588">Crypto.com App</text:span><text:span text:style-name="T1589"/><text:bookmark-start text:name="__RefHeading___Toc3187_1777463037"/><text:span text:style-name="T1590"/><text:bookmark-end text:name="__RefHeading___Toc3187_1777463037"/><text:span text:style-name="T1591"/><text:bookmark-end text:name="_Toc2"/><text:span text:style-name="T1592"/><text:span text:style-name="T1593"/></text:p>
        </text:list-item>
      </text:list>
      <text:p text:style-name="P98"><text:span text:style-name="T1594"/><text:span text:style-name="T1595"/><text:span text:style-name="T1596"/></text:p>
      <text:p text:style-name="P99"><text:span text:style-name="T1597">Per scaricare il file dall’app di Crypto.com seguire i seguenti passaggi :</text:span><text:span text:style-name="T1598"/><text:span text:style-name="T1599"/></text:p>
      <text:p text:style-name="P100"><text:span text:style-name="T1600"/><text:span text:style-name="T1601"/><text:span text:style-name="T1602"/></text:p>
      <text:p text:style-name="P101"><text:span text:style-name="T1603"/><text:span/><draw:frame draw:name="Object" draw:style-name="gr11" draw:z-index="25622" text:anchor-type="paragraph" svg:width="8.288cm" svg:height="16.26cm" svg:x="10.54cm" svg:y="0.341cm"><draw:image xlink:href="Pictures/image3.jpg" xlink:type="simple" xlink:show="embed" xlink:actuate="onLoad"/></draw:frame><text:span text:style-name="T1604"/><text:span text:style-name="T1605"/></text:p>
      <text:p text:style-name="P102"><text:span text:style-name="T1606"/><text:span text:style-name="T1607"/><text:span text:style-name="T1608"/></text:p>
      <text:p text:style-name="P103"><text:span text:style-name="T1609"/><text:span text:style-name="T1610"/><text:span text:style-name="T1611"/></text:p>
      <text:p text:style-name="P104"><text:span text:style-name="T1612"/><text:span text:style-name="T1613"/><text:span text:style-name="T1614"/></text:p>
      <text:p text:style-name="P105"><text:span text:style-name="T1615"/><text:span text:style-name="T1616"/><text:span text:style-name="T1617"/></text:p>
      <text:p text:style-name="P106"><text:span text:style-name="T1618"/><text:span text:style-name="T1619"/><text:span text:style-name="T1620"/></text:p>
      <text:p text:style-name="P107"><text:span text:style-name="T1621"/><text:span text:style-name="T1622"/><text:span text:style-name="T1623"/></text:p>
      <text:p text:style-name="P108"><text:span text:style-name="T1624"/><text:span text:style-name="T1625"/><text:span text:style-name="T1626"/></text:p>
      <text:list text:style-name="WWNum7" text:continue-numbering="true">
        <text:list-item>
          <text:p text:style-name="P109"><text:span text:style-name="T1627">Aprire l’app e andare nella sezione </text:span><text:span text:style-name="T1628">Conti</text:span><text:span text:style-name="T1629"/><text:span text:style-name="T1630"/></text:p>
        </text:list-item>
      </text:list>
      <text:p text:style-name="P110"><text:span text:style-name="T1631"/><text:span text:style-name="T1632"/><text:span text:style-name="T1633"/></text:p>
      <text:p text:style-name="P111"><text:span text:style-name="T1634"/><text:span text:style-name="T1635"/><text:span text:style-name="T1636"/></text:p>
      <text:p text:style-name="P112"><text:span text:style-name="T1637"/><text:span text:style-name="T1638"/><text:span text:style-name="T1639"/></text:p>
      <text:p text:style-name="P113"><text:span text:style-name="T1640"/><text:span text:style-name="T1641"/><text:span text:style-name="T1642"/></text:p>
      <text:p text:style-name="P114"><text:span text:style-name="T1643"/><text:span text:style-name="T1644"/><text:span text:style-name="T1645"/></text:p>
      <text:p text:style-name="P115"><text:span text:style-name="T1646"/><text:span text:style-name="T1647"/><text:span text:style-name="T1648"/></text:p>
      <text:p text:style-name="P116"><text:span text:style-name="T1649"/><text:span text:style-name="T1650"/><text:span text:style-name="T1651"/></text:p>
      <text:p text:style-name="P117"><text:span text:style-name="T1652"/><text:span text:style-name="T1653"/><text:span text:style-name="T1654"/></text:p>
      <text:p text:style-name="P118"><text:span text:style-name="T1655"/><text:span text:style-name="T1656"/><text:span text:style-name="T1657"/></text:p>
      <text:p text:style-name="P119"><text:span text:style-name="T1658"/><text:span text:style-name="T1659"/><text:span text:style-name="T1660"/></text:p>
      <text:p text:style-name="P120"><text:span text:style-name="T1661"/><text:span text:style-name="T1662"/><text:span text:style-name="T1663"/></text:p>
      <text:p text:style-name="P121"><text:span text:style-name="T1664"/><text:span text:style-name="T1665"/><text:span text:style-name="T1666"/></text:p>
      <text:p text:style-name="P122"><text:span text:style-name="T1667"/><text:span text:style-name="T1668"/><text:span text:style-name="T1669"/></text:p>
      <text:list text:style-name="WWNum7" text:continue-numbering="true">
        <text:list-item>
          <text:p text:style-name="P123"><text:span text:style-name="T1670">Premere quindi il tastino in alto a destra rappresentato da un </text:span><text:span text:style-name="T1671">orologio con il dollaro</text:span><text:span text:style-name="T1672"/><text:span text:style-name="T1673"/></text:p>
        </text:list-item>
      </text:list>
      <text:p text:style-name="P124"><text:span text:style-name="T1674"/><text:span text:style-name="T1675"/><text:span text:style-name="T1676"/></text:p>
      <text:p text:style-name="P125"><text:span text:style-name="T1677"/><text:span text:style-name="T1678"/><text:span text:style-name="T1679"/></text:p>
      <text:p text:style-name="P126"><text:span text:style-name="T1680"/><text:span text:style-name="T1681"/><text:span text:style-name="T1682"/></text:p>
      <text:p text:style-name="P127"><text:span text:style-name="T1683"/><text:span text:style-name="T1684"/><text:span text:style-name="T1685"/></text:p>
      <text:p text:style-name="P128"><text:span text:style-name="T1686"/><text:span text:style-name="T1687"/><text:span text:style-name="T1688"/></text:p>
      <text:p text:style-name="P129"><text:span text:style-name="T1689"/><text:span text:style-name="T1690"/><text:span text:style-name="T1691"/></text:p>
      <text:p text:style-name="P130"><text:span text:style-name="T1692"/><text:span text:style-name="T1693"/><text:span text:style-name="T1694"/></text:p>
      <text:p text:style-name="P131"><text:span text:style-name="T1695"/><text:span text:style-name="T1696"/><text:span text:style-name="T1697"/></text:p>
      <text:p text:style-name="P132"><text:span text:style-name="T1698"/><text:span text:style-name="T1699"/><text:span text:style-name="T1700"/></text:p>
      <text:p text:style-name="P133"><text:span text:style-name="T1701"/><text:span text:style-name="T1702"/><text:span text:style-name="T1703"/></text:p>
      <text:p text:style-name="P134"><text:span text:style-name="T1704"/><text:span text:style-name="T1705"/><text:span text:style-name="T1706"/></text:p>
      <text:p text:style-name="P135"><text:span text:style-name="T1707"/><text:span text:style-name="T1708"/><text:span text:style-name="T1709"/></text:p>
      <text:p text:style-name="P136"><text:span text:style-name="T1710"/><text:span text:style-name="T1711"/><text:span text:style-name="T1712"/></text:p>
      <text:p text:style-name="P137"><text:span text:style-name="T1713"/><text:span text:style-name="T1714"/><text:span text:style-name="T1715"/></text:p>
      <text:p text:style-name="P138"><text:span text:style-name="T1716"/><text:span text:style-name="T1717"/><text:span text:style-name="T1718"/></text:p>
      <text:p text:style-name="P139"><text:span text:style-name="T1719"/><text:span text:style-name="T1720"/><text:span text:style-name="T1721"/></text:p>
      <text:p text:style-name="P140"><text:span text:style-name="T1722"/><text:span text:style-name="T1723"/><text:span text:style-name="T1724"/></text:p>
      <text:p text:style-name="P141"><text:span text:style-name="T1725"/><text:span text:style-name="T1726"/><text:span text:style-name="T1727"/></text:p>
      <text:p text:style-name="P142"><text:span text:style-name="T1728"/><text:span/><draw:frame draw:name="Object" draw:style-name="gr12" draw:z-index="29718" text:anchor-type="paragraph" svg:width="5.615cm" svg:height="11.02cm" svg:x="12.32cm" svg:y="-0.3103cm"><draw:image xlink:href="Pictures/image4.jpg" xlink:type="simple" xlink:show="embed" xlink:actuate="onLoad"/></draw:frame><text:span text:style-name="T1729"/><text:span text:style-name="T1730"/></text:p>
      <text:p text:style-name="P143"><text:span text:style-name="T1731"/><text:span text:style-name="T1732"/><text:span text:style-name="T1733"/></text:p>
      <text:p text:style-name="P144"><text:span text:style-name="T1734"/><text:span text:style-name="T1735"/><text:span text:style-name="T1736"/></text:p>
      <text:p text:style-name="P145"><text:span text:style-name="T1737"/><text:span text:style-name="T1738"/><text:span text:style-name="T1739"/></text:p>
      <text:p text:style-name="P146"><text:span text:style-name="T1740"/><text:span text:style-name="T1741"/><text:span text:style-name="T1742"/></text:p>
      <text:p text:style-name="P147"><text:span text:style-name="T1743"/><text:span text:style-name="T1744"/><text:span text:style-name="T1745"/></text:p>
      <text:p text:style-name="P148"><text:span text:style-name="T1746"/><text:span text:style-name="T1747"/><text:span text:style-name="T1748"/></text:p>
      <text:p text:style-name="P149"><text:span text:style-name="T1749"/><text:span text:style-name="T1750"/><text:span text:style-name="T1751"/></text:p>
      <text:p text:style-name="P150"><text:span text:style-name="T1752"/><text:span text:style-name="T1753"/><text:span text:style-name="T1754"/></text:p>
      <text:p text:style-name="P151"><text:span text:style-name="T1755"/><text:span text:style-name="T1756"/><text:span text:style-name="T1757"/></text:p>
      <text:list text:style-name="WWNum7" text:continue-numbering="true">
        <text:list-item>
          <text:p text:style-name="P152"><text:span text:style-name="T1758">Premere su </text:span><text:span text:style-name="T1759">Crypto Wallet</text:span><text:span text:style-name="T1760">, si aprirà la cronologia delle Transazioni.</text:span><text:span text:style-name="T1761"/><text:span text:style-name="T1762"/></text:p>
        </text:list-item>
      </text:list>
      <text:p text:style-name="P153"><text:span text:style-name="T1763"/><text:span text:style-name="T1764"/><text:span text:style-name="T1765"/></text:p>
      <text:p text:style-name="P154"><text:span text:style-name="T1766"/><text:span text:style-name="T1767"/><text:span text:style-name="T1768"/></text:p>
      <text:p text:style-name="P155"><text:span text:style-name="T1769"/><text:span text:style-name="T1770"/><text:span text:style-name="T1771"/></text:p>
      <text:p text:style-name="P156"><text:span text:style-name="T1772"/><text:span text:style-name="T1773"/><text:span text:style-name="T1774"/></text:p>
      <text:p text:style-name="P157"><text:span text:style-name="T1775"/><text:span text:style-name="T1776"/><text:span text:style-name="T1777"/></text:p>
      <text:p text:style-name="P158"><text:span text:style-name="T1778"/><text:span text:style-name="T1779"/><text:span text:style-name="T1780"/></text:p>
      <text:p text:style-name="P159"><text:span text:style-name="T1781"/><text:span text:style-name="T1782"/><text:span text:style-name="T1783"/></text:p>
      <text:p text:style-name="P160"><text:span text:style-name="T1784"/><text:span text:style-name="T1785"/><text:span text:style-name="T1786"/></text:p>
      <text:p text:style-name="P161"><text:span text:style-name="T1787"/><text:span text:style-name="T1788"/><text:span text:style-name="T1789"/></text:p>
      <text:p text:style-name="P162"><text:span text:style-name="T1790"/><text:span text:style-name="T1791"/><text:span text:style-name="T1792"/></text:p>
      <text:p text:style-name="P163"><text:span text:style-name="T1793"/><text:span text:style-name="T1794"/><text:span text:style-name="T1795"/></text:p>
      <text:p text:style-name="P164"><text:span text:style-name="T1796"/><text:span text:style-name="T1797"/><text:span text:style-name="T1798"/></text:p>
      <text:p text:style-name="P165"><text:span text:style-name="T1799"/><text:span text:style-name="T1800"/><text:span text:style-name="T1801"/></text:p>
      <text:p text:style-name="P166"><text:span text:style-name="T1802"/><text:span/><draw:frame draw:name="Object" draw:style-name="gr13" draw:z-index="31766" text:anchor-type="paragraph" svg:width="8.72cm" svg:height="6.612cm" svg:x="9.215cm" svg:y="0.3377cm"><draw:image xlink:href="Pictures/image5.jpg" xlink:type="simple" xlink:show="embed" xlink:actuate="onLoad"/></draw:frame><text:span text:style-name="T1803"/><text:span text:style-name="T1804"/></text:p>
      <text:p text:style-name="P167"><text:span text:style-name="T1805"/><text:span text:style-name="T1806"/><text:span text:style-name="T1807"/></text:p>
      <text:p text:style-name="P168"><text:span text:style-name="T1808"/><text:span text:style-name="T1809"/><text:span text:style-name="T1810"/></text:p>
      <text:p text:style-name="P169"><text:span text:style-name="T1811"/><text:span text:style-name="T1812"/><text:span text:style-name="T1813"/></text:p>
      <text:p text:style-name="P170"><text:span text:style-name="T1814"/><text:span text:style-name="T1815"/><text:span text:style-name="T1816"/></text:p>
      <text:p text:style-name="P171"><text:span text:style-name="T1817"/><text:span text:style-name="T1818"/><text:span text:style-name="T1819"/></text:p>
      <text:list text:style-name="WWNum7" text:continue-numbering="true">
        <text:list-item>
          <text:p text:style-name="P172"><text:span text:style-name="T1820">Premere sull’</text:span><text:span text:style-name="T1821">icona in alto a destra</text:span><text:span text:style-name="T1822"> rappresentata da un quadrato con una freccia</text:span><text:span text:style-name="T1823"/><text:span text:style-name="T1824"/></text:p>
        </text:list-item>
      </text:list>
      <text:p text:style-name="P173"><text:span text:style-name="T1825"/><text:span text:style-name="T1826"/><text:span text:style-name="T1827"/></text:p>
      <text:p text:style-name="P174"><text:span text:style-name="T1828"/><text:span text:style-name="T1829"/><text:span text:style-name="T1830"/></text:p>
      <text:p text:style-name="P175"><text:span text:style-name="T1831"/><text:span text:style-name="T1832"/><text:span text:style-name="T1833"/></text:p>
      <text:p text:style-name="P176"><text:span text:style-name="T1834"/><text:span text:style-name="T1835"/><text:span text:style-name="T1836"/></text:p>
      <text:p text:style-name="P177"><text:span text:style-name="T1837"/><text:span text:style-name="T1838"/><text:span text:style-name="T1839"/></text:p>
      <text:p text:style-name="P178"><text:span text:style-name="T1840"/><text:span text:style-name="T1841"/><text:span text:style-name="T1842"/></text:p>
      <text:p text:style-name="P179"><text:span text:style-name="T1843"/><text:span text:style-name="T1844"/><text:span text:style-name="T1845"/></text:p>
      <text:p text:style-name="P180"><text:span text:style-name="T1846"/><text:span/><draw:frame draw:name="Object" draw:style-name="gr14" draw:z-index="34838" text:anchor-type="paragraph" svg:width="6.245cm" svg:height="12.25cm" svg:x="11.51cm" svg:y="-0.6281cm"><draw:image xlink:href="Pictures/image6.jpg" xlink:type="simple" xlink:show="embed" xlink:actuate="onLoad"/></draw:frame><text:span text:style-name="T1847"/><text:span text:style-name="T1848"/></text:p>
      <text:p text:style-name="P181"><text:span text:style-name="T1849"/><text:span text:style-name="T1850"/><text:span text:style-name="T1851"/></text:p>
      <text:p text:style-name="P182"><text:span text:style-name="T1852"/><text:span text:style-name="T1853"/><text:span text:style-name="T1854"/></text:p>
      <text:p text:style-name="P183"><text:span text:style-name="T1855"/><text:span text:style-name="T1856"/><text:span text:style-name="T1857"/></text:p>
      <text:p text:style-name="P184"><text:span text:style-name="T1858"/><text:span text:style-name="T1859"/><text:span text:style-name="T1860"/></text:p>
      <text:p text:style-name="P185"><text:span text:style-name="T1861"/><text:span text:style-name="T1862"/><text:span text:style-name="T1863"/></text:p>
      <text:p text:style-name="P186"><text:span text:style-name="T1864"/><text:span text:style-name="T1865"/><text:span text:style-name="T1866"/></text:p>
      <text:p text:style-name="P187"><text:span text:style-name="T1867"/><text:span text:style-name="T1868"/><text:span text:style-name="T1869"/></text:p>
      <text:p text:style-name="P188"><text:span text:style-name="T1870"/><text:span text:style-name="T1871"/><text:span text:style-name="T1872"/></text:p>
      <text:list text:style-name="WWNum7" text:continue-numbering="true">
        <text:list-item>
          <text:p text:style-name="P189"><text:span text:style-name="T1873">Assicurarsi che sia selezionato “</text:span><text:span text:style-name="T1874">Crypto Wallet</text:span><text:span text:style-name="T1875">” e scegliere le </text:span><text:span text:style-name="T1876">date</text:span><text:span text:style-name="T1877"> in base alle proprie</text:span><text:span text:style-name="T1878"> esigenze quindi premere sul tasto </text:span><text:span text:style-name="T1879">“</text:span><text:span text:style-name="T1880">Esporta in CSV</text:span><text:span text:style-name="T1881">”</text:span><text:span text:style-name="T1882"/><text:span text:style-name="T1883"/></text:p>
        </text:list-item>
      </text:list>
      <text:p text:style-name="P190"><text:span text:style-name="T1884"/><text:span text:style-name="T1885"/><text:span text:style-name="T1886"/></text:p>
      <text:p text:style-name="P191"><text:span text:style-name="T1887"/><text:span text:style-name="T1888"/><text:span text:style-name="T1889"/></text:p>
      <text:p text:style-name="P192"><text:span text:style-name="T1890"/><text:span text:style-name="T1891"/><text:span text:style-name="T1892"/></text:p>
      <text:p text:style-name="P193"><text:span text:style-name="T1893"/><text:span text:style-name="T1894"/><text:span text:style-name="T1895"/></text:p>
      <text:p text:style-name="P194"><text:span text:style-name="T1896"/><text:span text:style-name="T1897"/><text:span text:style-name="T1898"/></text:p>
      <text:p text:style-name="P195"><text:span text:style-name="T1899"/><text:span text:style-name="T1900"/><text:span text:style-name="T1901"/></text:p>
      <text:p text:style-name="P196"><text:span text:style-name="T1902"/><text:span text:style-name="T1903"/><text:span text:style-name="T1904"/></text:p>
      <text:p text:style-name="P197"><text:span text:style-name="T1905"/><text:span text:style-name="T1906"/><text:span text:style-name="T1907"/></text:p>
      <text:p text:style-name="P198"><text:span text:style-name="T1908"/><text:span text:style-name="T1909"/><text:span text:style-name="T1910"/></text:p>
      <text:p text:style-name="P199"><text:span text:style-name="T1911"/><text:span text:style-name="T1912"/><text:span text:style-name="T1913"/></text:p>
      <text:p text:style-name="P200"><text:span text:style-name="T1914"/><text:span text:style-name="T1915"/><text:span text:style-name="T1916"/></text:p>
      <text:p text:style-name="P201"><text:span text:style-name="T1917"/><text:span text:style-name="T1918"/><text:span text:style-name="T1919"/></text:p>
      <text:p text:style-name="P202"><text:span text:style-name="T1920"/><text:span text:style-name="T1921"/><text:span text:style-name="T1922"/></text:p>
      <text:p text:style-name="P203"><text:span text:style-name="T1923"/><text:span text:style-name="T1924"/><text:span text:style-name="T1925"/></text:p>
      <text:p text:style-name="P204"><text:span text:style-name="T1926"/><text:span text:style-name="T1927"/><text:span text:style-name="T1928"/></text:p>
      <text:p text:style-name="P205"><text:span text:style-name="T1929"/><text:span text:style-name="T1930"/><text:span text:style-name="T1931"/></text:p>
      <text:p text:style-name="P206"><text:span text:style-name="T1932"/><text:span/><draw:frame draw:name="Object" draw:style-name="gr15" draw:z-index="40982" text:anchor-type="paragraph" svg:width="8.055cm" svg:height="5.482cm" svg:x="9.535cm" svg:y="0.3987cm"><draw:image xlink:href="Pictures/image7.jpg" xlink:type="simple" xlink:show="embed" xlink:actuate="onLoad"/></draw:frame><text:span text:style-name="T1933"/><text:span text:style-name="T1934"/></text:p>
      <text:p text:style-name="P207"><text:span text:style-name="T1935"/><text:span text:style-name="T1936"/><text:span text:style-name="T1937"/></text:p>
      <text:p text:style-name="P208"><text:span text:style-name="T1938"/><text:span text:style-name="T1939"/><text:span text:style-name="T1940"/></text:p>
      <text:p text:style-name="P209"><text:span text:style-name="T1941"/><text:span text:style-name="T1942"/><text:span text:style-name="T1943"/></text:p>
      <text:list text:style-name="WWNum7" text:continue-numbering="true">
        <text:list-item>
          <text:p text:style-name="P210"><text:span text:style-name="T1944">Una volta terminata l’esportazione, premere sul pulsante “</text:span><text:span text:style-name="T1945">Scarica</text:span><text:span text:style-name="T1946">”</text:span><text:span text:style-name="T1947"/><text:span text:style-name="T1948"/></text:p>
        </text:list-item>
      </text:list>
      <text:p text:style-name="P211"><text:span text:style-name="T1949"/><text:span text:style-name="T1950"/><text:span text:style-name="T1951"/></text:p>
      <text:p text:style-name="P212"><text:span text:style-name="T1952"/><text:span text:style-name="T1953"/><text:span text:style-name="T1954"/></text:p>
      <text:p text:style-name="P213"><text:span text:style-name="T1955"/><text:span text:style-name="T1956"/><text:span text:style-name="T1957"/></text:p>
      <text:p text:style-name="P214"><text:span text:style-name="T1958"><text:s/></text:span><text:span text:style-name="T1959"/><text:span text:style-name="T1960"/></text:p>
      <text:list>
        <text:list-item>
          <text:p text:style-name="P215"><text:span text:style-name="T1989"/><text:bookmark-start text:name="_Toc3"/><text:span text:style-name="T1990">Crypto.com Exchange</text:span><text:span text:style-name="T1991"/><text:bookmark-end text:name="_Toc3"/><text:span text:style-name="T1992"/><text:span text:style-name="T1993"/></text:p>
        </text:list-item>
      </text:list>
      <text:p text:style-name="P220"><text:span text:style-name="T1994"/><text:span text:style-name="T1995"/><text:span text:style-name="T1996"/></text:p>
      <text:p text:style-name="P221"><text:span text:style-name="T1997">Da Crypto.com Exchange si possono scaricare 2 tipi di file da importare sul programma, il </text:span><text:span text:style-name="T1998">file delle transazioni</text:span><text:span text:style-name="T1999"> e il </text:span><text:span text:style-name="T2000">report mensile</text:span><text:span text:style-name="T2001"> delle transazioni.</text:span><text:span text:style-name="T2002"/><text:span text:style-name="T2003"/></text:p>
      <text:p text:style-name="P222"><text:span text:style-name="T2004">NB. Dal programma si posso importare entrambi ma è importante scegliere e utilizzare una sola tipologia per ogni periodo per evitare di avere dati doppi e incoerenti</text:span><text:span text:style-name="T2005">.</text:span><text:span text:style-name="T2006"/><text:span text:style-name="T2007"/></text:p>
      <text:p text:style-name="P223"><text:span text:style-name="T2008"/><text:span text:style-name="T2009"/><text:span text:style-name="T2010"/></text:p>
      <text:p text:style-name="P224"><text:span text:style-name="T2011"/><text:bookmark-start text:name="_Toc4"/><text:span text:style-name="T2012">1 - Come esportare il file delle Transazioni:</text:span><text:span text:style-name="T2013"/><text:bookmark-end text:name="_Toc4"/><text:span text:style-name="T2014"/><text:span text:style-name="T2015"/></text:p>
      <text:p text:style-name="P225"><text:span/><text:span/></text:p>
      <text:list text:style-name="WWNum2" text:continue-numbering="true">
        <text:list-item>
          <text:p text:style-name="P226"><text:span text:style-name="T2016">Collegarsi all’exchange da pc e andare nella sezione </text:span><text:span text:style-name="T2017">Ordini</text:span><text:span text:style-name="T2018"/><text:span text:style-name="T2019"/></text:p>
        </text:list-item>
        <text:list-item>
          <text:p text:style-name="P227"><text:span text:style-name="T2020">Selezionare la linguetta </text:span><text:span text:style-name="T2021">Transazioni</text:span><text:span text:style-name="T2022"> e selezionare “</text:span><text:span text:style-name="T2023">Tutte le transazioni</text:span><text:span text:style-name="T2024">”</text:span><text:span text:style-name="T2025"/><text:span text:style-name="T2026"/></text:p>
        </text:list-item>
        <text:list-item>
          <text:p text:style-name="P228"><text:span text:style-name="T2027">Impostare le date di cui si necessita l’importazione (max.180gg) nel </text:span><text:span text:style-name="T2028">calendario</text:span><text:span text:style-name="T2029"/><text:span text:style-name="T2030"/></text:p>
        </text:list-item>
        <text:list-item>
          <text:p text:style-name="P229"><text:span text:style-name="T2031">Premere il pulsante </text:span><text:span text:style-name="T2032">Esporta</text:span><text:span text:style-name="T2033"/><text:span text:style-name="T2034"/></text:p>
        </text:list-item>
      </text:list>
      <text:p text:style-name="P230"><text:span text:style-name="T2035"/><text:span/><draw:frame draw:name="Object" draw:style-name="gr20" text:anchor-type="as-char" svg:width="17.59cm" svg:height="4.814cm" svg:x="0cm" svg:y="0cm"><draw:image xlink:href="Pictures/image8.png" xlink:type="simple" xlink:show="embed" xlink:actuate="onLoad"/></draw:frame><text:span text:style-name="T2036"/><text:span text:style-name="T2037"/></text:p>
      <text:list text:style-name="WWNum2" text:continue-numbering="true">
        <text:list-item>
          <text:p text:style-name="P231"><text:span text:style-name="T2038">Premere su </text:span><text:span text:style-name="T2039">Esporta CSV</text:span><text:span text:style-name="T2040"> (l’esportazione potrebbe durare parecchi minuti)</text:span><text:span text:style-name="T2041"/><text:span text:style-name="T2042"/></text:p>
        </text:list-item>
      </text:list>
      <text:p text:style-name="P232"><text:span text:style-name="T2043"/><text:span/><draw:frame draw:name="Object" draw:style-name="gr21" text:anchor-type="as-char" svg:width="7.301cm" svg:height="6.641cm" svg:x="0cm" svg:y="0cm"><draw:image xlink:href="Pictures/image9.png" xlink:type="simple" xlink:show="embed" xlink:actuate="onLoad"/></draw:frame><text:span text:style-name="T2044"/><text:span text:style-name="T2045"/></text:p>
      <text:list text:style-name="WWNum2" text:continue-numbering="true">
        <text:list-item>
          <text:p text:style-name="P233"><text:span text:style-name="T2046">Una volta terminato troverete il file nella sezione </text:span><text:span text:style-name="T2047">Esporta Storico</text:span><text:span text:style-name="T2048"> della stessa maschera</text:span><text:span text:style-name="T2049"/><text:span text:style-name="T2050"/></text:p>
        </text:list-item>
      </text:list>
      <text:p text:style-name="P234"><text:span text:style-name="T2051"/><text:span/><draw:frame draw:name="Object" draw:style-name="gr22" text:anchor-type="as-char" svg:width="7.823cm" svg:height="5.786cm" svg:x="0cm" svg:y="0cm"><draw:image xlink:href="Pictures/image10.png" xlink:type="simple" xlink:show="embed" xlink:actuate="onLoad"/></draw:frame><text:span text:style-name="T2052"/><text:span text:style-name="T2053"/></text:p>
      <text:list text:style-name="WWNum2" text:continue-numbering="true">
        <text:list-item>
          <text:p text:style-name="P235"><text:span text:style-name="T2054">Premere su </text:span><text:span text:style-name="T2055">Scarica </text:span><text:span text:style-name="T2056">per scaricare il file sul pc.</text:span><text:span text:style-name="T2057"/><text:span text:style-name="T2058"/></text:p>
        </text:list-item>
      </text:list>
      <text:p text:style-name="P236"><text:span text:style-name="T2059"/><text:span text:style-name="T2060"/><text:span text:style-name="T2061"/></text:p>
      <text:p text:style-name="P237"><text:span text:style-name="T2062"/><text:bookmark-start text:name="_Toc5"/><text:span text:style-name="T2063">2 - Come esportare i file dei movimenti mensili:</text:span><text:span text:style-name="T2064"/><text:bookmark-end text:name="_Toc5"/><text:span text:style-name="T2065"/><text:span text:style-name="T2066"/></text:p>
      <text:p text:style-name="P238"><text:span/><text:span/></text:p>
      <text:list text:style-name="WWNum6" text:continue-numbering="true">
        <text:list-item>
          <text:p text:style-name="P239"><text:span text:style-name="T2067">Coll</text:span><text:span text:style-name="T2068">egarsi all’exchange da pc e andare nella sezione </text:span><text:span text:style-name="T2069">Ordini</text:span><text:span text:style-name="T2070"/><text:span text:style-name="T2071"/></text:p>
        </text:list-item>
        <text:list-item>
          <text:p text:style-name="P240"><text:span text:style-name="T2072">Premere sulla linguetta </text:span><text:span text:style-name="T2073">Transazioni</text:span><text:span text:style-name="T2074"> e selezionare “</text:span><text:span text:style-name="T2075">Estratti mensili</text:span><text:span text:style-name="T2076">”</text:span><text:span text:style-name="T2077"/><text:span text:style-name="T2078"/></text:p>
        </text:list-item>
        <text:list-item>
          <text:p text:style-name="P241"><text:span text:style-name="T2079">Su ogni rigo premere su </text:span><text:span text:style-name="T2080">CSV </text:span><text:span text:style-name="T2081">per scaricare il file</text:span><text:span text:style-name="T2082"/><text:span text:style-name="T2083"/></text:p>
        </text:list-item>
      </text:list>
      <text:p text:style-name="P242"><text:span text:style-name="T2084"/><text:span/><draw:frame draw:name="Object" draw:style-name="gr23" text:anchor-type="as-char" svg:width="17.59cm" svg:height="8.599cm" svg:x="0cm" svg:y="0cm"><draw:image xlink:href="Pictures/image11.png" xlink:type="simple" xlink:show="embed" xlink:actuate="onLoad"/></draw:frame><text:span text:style-name="T2085"/><text:span text:style-name="T2086"/></text:p>
      <text:p text:style-name="P243"><text:span text:style-name="T2087"/><text:span text:style-name="T2088"/><text:span text:style-name="T2089"/></text:p>
      <text:p text:style-name="P244"><text:span text:style-name="T2090"/><text:span text:style-name="T2091"/><text:span text:style-name="T2092"/></text:p>
      <text:p text:style-name="P245"><text:span text:style-name="T2093"/><text:span text:style-name="T2094"/><text:span text:style-name="T2095"/></text:p>
      <text:p text:style-name="P246"><text:span text:style-name="T2096"/><text:span text:style-name="T2097"/><text:span text:style-name="T2098"/></text:p>
      <text:list>
        <text:list-item>
          <text:p text:style-name="P247"><text:span text:style-name="T2134"/><text:bookmark-start text:name="_Toc6"/><text:span text:style-name="T2135">Binance</text:span><text:span text:style-name="T2136"/><text:bookmark-end text:name="_Toc6"/><text:span text:style-name="T2137"/><text:span text:style-name="T2138"/></text:p>
        </text:list-item>
      </text:list>
      <text:p text:style-name="P253"><text:span text:style-name="T2139"/><text:span text:style-name="T2140"/><text:span text:style-name="T2141"/></text:p>
      <text:p text:style-name="P254"><text:span text:style-name="T2142">Da Binance si possono scaricare 2 tipi di file da importare sul programma, il </text:span><text:span text:style-name="T2143">file delle transazioni</text:span><text:span text:style-name="T2144"> e il </text:span><text:span text:style-name="T2145">Report finanziario</text:span><text:span text:style-name="T2146"> delle transazioni.</text:span><text:span text:style-name="T2147"/><text:span text:style-name="T2148"/></text:p>
      <text:p text:style-name="P255"><text:span text:style-name="T2149">NB. Dalle prove fatte durante il 2025 non so come mai ma il file delle transazioni risulta essere più accurato nei movimenti</text:span><text:span text:style-name="T2150">, vedremo nel 2026 se cambia qualcosa.</text:span><text:span text:style-name="T2151"/><text:span text:style-name="T2152"/></text:p>
      <text:p text:style-name="P256"><text:span text:style-name="T2153"/><text:span text:style-name="T2154"/><text:span text:style-name="T2155"/></text:p>
      <text:p text:style-name="P257"><text:span text:style-name="T2156">NB2. </text:span><text:span text:style-name="T2157">E’ importante scegliere e utilizzare una sola tipologia per ogni periodo per evitare di avere dati doppi e incoerenti</text:span><text:span text:style-name="T2158">.</text:span><text:span text:style-name="T2159"/><text:span text:style-name="T2160"/></text:p>
      <text:p text:style-name="P258"><text:span text:style-name="T2161"/><text:span text:style-name="T2162"/><text:span text:style-name="T2163"/></text:p>
      <text:p text:style-name="P259"><text:span text:style-name="T2164"/><text:bookmark-start text:name="_Toc7"/><text:span text:style-name="T2165">1 - Come esportare il file delle Transazioni:</text:span><text:span text:style-name="T2166"/><text:bookmark-end text:name="_Toc7"/><text:span text:style-name="T2167"/><text:span text:style-name="T2168"/></text:p>
      <text:p text:style-name="P260"><text:span text:style-name="T2169"/><text:span text:style-name="T2170"/><text:span text:style-name="T2171"/></text:p>
      <text:list text:style-name="WWNum10" text:continue-numbering="true">
        <text:list-item>
          <text:p text:style-name="P261"><text:span text:style-name="T2172">Premere sull’icona a forma di </text:span><text:span text:style-name="T2173">Portafoglio</text:span><text:span text:style-name="T2174"> in alto a destra.</text:span><text:span/><draw:frame draw:name="Object" draw:style-name="gr29" draw:z-index="78870" text:anchor-type="paragraph" svg:width="8.645cm" svg:height="12.18cm" svg:x="10.13cm" svg:y="0.08357cm"><draw:image xlink:href="Pictures/image12.png" xlink:type="simple" xlink:show="embed" xlink:actuate="onLoad"/></draw:frame><text:span text:style-name="T2175"/><text:span text:style-name="T2176"/></text:p>
        </text:list-item>
        <text:list-item>
          <text:p text:style-name="P262"><text:span text:style-name="T2177">Premere su “</text:span><text:span text:style-name="T2178">Storico Asset</text:span><text:span text:style-name="T2179">”</text:span><text:span text:style-name="T2180"/><text:span text:style-name="T2181"/></text:p>
        </text:list-item>
      </text:list>
      <text:p text:style-name="P263"><text:span text:style-name="T2182"/><text:span text:style-name="T2183"/><text:span text:style-name="T2184"/></text:p>
      <text:list text:style-name="WWNum10" text:continue-numbering="true">
        <text:list-item>
          <text:p text:style-name="P264"><text:span text:style-name="T2185"/><text:span text:style-name="T2186">Nella schermata che si apre premere sull’</text:span><text:span text:style-name="T2187">icona</text:span><text:span text:style-name="T2188"> in alto a destra contenente un </text:span><text:span text:style-name="T2189">riquadro con frecc</text:span><text:span text:style-name="T2190">i</text:span><text:span text:style-name="T2191">a</text:span><text:span text:style-name="T2192"/><text:span text:style-name="T2193"/></text:p>
        </text:list-item>
        <text:list-item>
          <text:p text:style-name="P265"><text:span text:style-name="T2194">Selezionare l’opzione “</text:span><text:span text:style-name="T2195">Esporta i registri delle transazioni</text:span><text:span text:style-name="T2196">”</text:span><text:span text:style-name="T2197"/><text:span text:style-name="T2198"/></text:p>
        </text:list-item>
      </text:list>
      <text:p text:style-name="P266"><text:span text:style-name="T2199"/><text:span/><draw:frame draw:name="Object" draw:style-name="gr30" draw:z-index="80918" text:anchor-type="paragraph" svg:width="6.787cm" svg:height="5.705cm" svg:x="1.058cm" svg:y="0.2358cm"><draw:image xlink:href="Pictures/image13.png" xlink:type="simple" xlink:show="embed" xlink:actuate="onLoad"/></draw:frame><text:span text:style-name="T2200"/><text:span text:style-name="T2201"/></text:p>
      <text:p text:style-name="P267"><text:span text:style-name="T2202"/><text:span text:style-name="T2203"/><text:span text:style-name="T2204"/></text:p>
      <text:p text:style-name="P268"><text:span text:style-name="T2205"/><text:span text:style-name="T2206"/><text:span text:style-name="T2207"/></text:p>
      <text:p text:style-name="P269"><text:span text:style-name="T2208"/><text:span text:style-name="T2209"/><text:span text:style-name="T2210"/></text:p>
      <text:p text:style-name="P270"><text:span text:style-name="T2211"/><text:span text:style-name="T2212"/><text:span text:style-name="T2213"/></text:p>
      <text:p text:style-name="P271"><text:span text:style-name="T2214"/><text:span text:style-name="T2215"/><text:span text:style-name="T2216"/></text:p>
      <text:p text:style-name="P272"><text:span text:style-name="T2217"/><text:span text:style-name="T2218"/><text:span text:style-name="T2219"/></text:p>
      <text:p text:style-name="P273"><text:span text:style-name="T2220"/><text:span text:style-name="T2221"/><text:span text:style-name="T2222"/></text:p>
      <text:p text:style-name="P274"><text:span text:style-name="T2223"/><text:span text:style-name="T2224"/><text:span text:style-name="T2225"/></text:p>
      <text:p text:style-name="P275"><text:span text:style-name="T2226"/><text:span text:style-name="T2227"/><text:span text:style-name="T2228"/></text:p>
      <text:p text:style-name="P276"><text:span text:style-name="T2229"/><text:span text:style-name="T2230"/><text:span text:style-name="T2231"/></text:p>
      <text:p text:style-name="P277"><text:span text:style-name="T2232"/><text:span text:style-name="T2233"/><text:span text:style-name="T2234"/></text:p>
      <text:p text:style-name="P278"><text:span text:style-name="T2235"/><text:span text:style-name="T2236"/><text:span text:style-name="T2237"/></text:p>
      <text:p text:style-name="P279"><text:span text:style-name="T2238"/><text:span text:style-name="T2239"/><text:span text:style-name="T2240"/></text:p>
      <text:p text:style-name="P280"><text:span text:style-name="T2241"/><text:span text:style-name="T2242"/><text:span text:style-name="T2243"/></text:p>
      <text:p text:style-name="P281"><text:span text:style-name="T2244"/><text:span text:style-name="T2245"/><text:span text:style-name="T2246"/></text:p>
      <text:list text:style-name="WWNum10" text:continue-numbering="true">
        <text:list-item>
          <text:p text:style-name="P282"><text:span text:style-name="T2247">Nella maschera che si apre fare attenzione ai parametri evidenziati in Rosso : - In alto a destra selezionare </text:span><text:span text:style-name="T2248">UTC</text:span><text:span text:style-name="T2249"> (indica il fuso orario da utilizzare)- Scegliere poi il periodo da esportare premendo su </text:span><text:span text:style-name="T2250">Personalizza</text:span><text:span text:style-name="T2251"><text:line-break/>- Come tipo File scegliere </text:span><text:span text:style-name="T2252">CSV</text:span><text:span text:style-name="T2253"> e quindi premere sul pulsante </text:span><text:span text:style-name="T2254">Genera.</text:span><text:span text:style-name="T2255"/><text:span text:style-name="T2256"/></text:p>
        </text:list-item>
      </text:list>
      <text:p text:style-name="P283"><text:span text:style-name="T2257"/><text:span/><draw:frame draw:style-name="gr31" text:anchor-type="as-char" svg:width="17.59cm" svg:height="10.39cm" svg:x="0cm" svg:y="0cm"><draw:image xlink:href="Pictures/image14.png" xlink:type="simple" xlink:show="embed" xlink:actuate="onLoad"/></draw:frame><text:span text:style-name="T2258"/><text:span/><text:span text:style-name="T2259"/><text:span/><text:span/></text:p>
      <text:p text:style-name="P284"><text:span text:style-name="T2260"/><text:span text:style-name="T2261"/><text:span text:style-name="T2262"/></text:p>
      <text:list text:style-name="WWNum10" text:continue-numbering="true">
        <text:list-item>
          <text:p text:style-name="P285"><text:span text:style-name="T2263">Una volta premuto su esporta nella parte bassa della finestra comparirà un rigo con stato “</text:span><text:span text:style-name="T2264">Generando</text:span><text:span text:style-name="T2265">”, ora bisognerà aspettare che</text:span><text:span text:style-name="T2266"> il file venga generato e poi sempre dalla stessa maschera si potrà scaricare il file. </text:span><text:span text:style-name="T2267"/><text:span text:style-name="T2268"/></text:p>
        </text:list-item>
      </text:list>
      <text:p text:style-name="P286"><text:span text:style-name="T2269">Non serve aspettare, si può tranquillamente chiudere e tornare nella stessa maschera dopo qualche tempo a controllare se il file è stato generato, comparirà la scritta “</text:span><text:span text:style-name="T2270">Scarica</text:span><text:span text:style-name="T2271">” affianco allo stato.</text:span><text:span text:style-name="T2272"/><text:span text:style-name="T2273"/><text:span text:style-name="T2274"/><text:span text:style-name="T2275"/><text:span text:style-name="T2276"/><text:span text:style-name="T2277"/></text:p>
      <text:p text:style-name="P287"><text:span text:style-name="T2278"/><text:span/><draw:frame draw:name="Object" draw:style-name="gr32" text:anchor-type="as-char" svg:width="17.59cm" svg:height="3.674cm" svg:x="0cm" svg:y="0cm"><draw:image xlink:href="Pictures/image15.png" xlink:type="simple" xlink:show="embed" xlink:actuate="onLoad"/></draw:frame><text:span text:style-name="T2279"/><text:span text:style-name="T2280"/></text:p>
      <text:p text:style-name="P288"><text:span text:style-name="T2281"/><text:span text:style-name="T2282"/><text:span text:style-name="T2283"/></text:p>
      <text:p text:style-name="P289"><text:span text:style-name="T2284">NB: Il programma tenta di individuare il Fuso orario dal nome del file, non rinominarlo se possibile</text:span><text:span text:style-name="T2285"/><text:span text:style-name="T2286"/></text:p>
      <text:p text:style-name="P290"><text:span text:style-name="T2287"/><text:bookmark-start text:name="_Toc8"/><text:span text:style-name="T2288">2 - Come esportare il Report Finanziario:</text:span><text:span text:style-name="T2289"/><text:bookmark-end text:name="_Toc8"/><text:span text:style-name="T2290"/><text:span text:style-name="T2291"/></text:p>
      <text:p text:style-name="P291"><text:span text:style-name="T2292"/><text:span text:style-name="T2293"/><text:span text:style-name="T2294"/></text:p>
      <text:list text:style-name="WWNum13" text:continue-numbering="true">
        <text:list-item>
          <text:p text:style-name="P292"><text:span text:style-name="T2295">Nel Menù a sinistra premere su “</text:span><text:span text:style-name="T2296">Account</text:span><text:span text:style-name="T2297">”</text:span><text:span text:style-name="T2298"/><text:span text:style-name="T2299"/></text:p>
        </text:list-item>
      </text:list>
      <text:p text:style-name="P293"><text:span text:style-name="T2300"/><text:span text:style-name="T2301"/><text:span text:style-name="T2302"/></text:p>
      <text:list text:style-name="WWNum13" text:continue-numbering="true">
        <text:list-item>
          <text:p text:style-name="P294"><text:span text:style-name="T2303">Premere su “</text:span><text:span text:style-name="T2304">Report finanziari</text:span><text:span text:style-name="T2305">”</text:span><text:span text:style-name="T2306"/><text:span text:style-name="T2307"/></text:p>
        </text:list-item>
      </text:list>
      <text:p text:style-name="P295"><text:span text:style-name="T2308"/><text:span text:style-name="T2309"/><text:span text:style-name="T2310"/></text:p>
      <text:list text:style-name="WWNum13" text:continue-numbering="true">
        <text:list-item>
          <text:p text:style-name="P296"><text:span text:style-name="T2311">Selezionare il periodo desiderato e premere su “</text:span><text:span text:style-name="T2312">Visualizza</text:span><text:span text:style-name="T2313">”, verrà quindi scaricato il file.</text:span><text:span text:style-name="T2314"/><text:span text:style-name="T2315"/></text:p>
        </text:list-item>
      </text:list>
      <text:p text:style-name="P297"><text:span text:style-name="T2316"/><text:span text:style-name="T2317"/><text:span text:style-name="T2318"/></text:p>
      <text:p text:style-name="P298"><text:span text:style-name="T2319">NB. I file in questa sezione vengono generati una volta all’anno.</text:span><text:span text:style-name="T2320"/><text:span text:style-name="T2321"/></text:p>
      <text:p text:style-name="P299"><text:span text:style-name="T2322"/><text:span text:style-name="T2323"/><text:span text:style-name="T2324"/></text:p>
      <text:p text:style-name="P300"><text:span text:style-name="T2325"/><text:span/><draw:frame draw:name="Object" draw:style-name="gr33" text:anchor-type="as-char" svg:width="17.59cm" svg:height="6.681cm" svg:x="0cm" svg:y="0cm"><draw:image xlink:href="Pictures/image16.png" xlink:type="simple" xlink:show="embed" xlink:actuate="onLoad"/></draw:frame><text:span text:style-name="T2326"/><text:span text:style-name="T2327"/></text:p>
      <text:p text:style-name="P301"><text:span text:style-name="T2328"/><text:span text:style-name="T2329"><text:line-break/></text:span><text:span text:style-name="T2330"/><text:span text:style-name="T2331"/></text:p>
      <text:p text:style-name="P302"><text:span text:style-name="T2332"/><text:span text:style-name="T2333"/><text:span/></text:p>
      <text:list>
        <text:list-item>
          <text:p text:style-name="P303"><text:span text:style-name="T2376"/><text:bookmark-start text:name="_Toc9"/><text:span text:style-name="T2377">Cointraking.info</text:span><text:span text:style-name="T2378"/><text:bookmark-end text:name="_Toc9"/><text:span text:style-name="T2379"/><text:span text:style-name="T2380"/></text:p>
        </text:list-item>
      </text:list>
      <text:p text:style-name="P310"><text:span text:style-name="T2381"/><text:span text:style-name="T2382"/><text:span text:style-name="T2383"/></text:p>
      <text:p text:style-name="P311"><text:span text:style-name="T2384">Uno dei modi per poter importare i dati dei vostri exchange/blockchain non supportate da Giacenze Crypto è passare tramite un altra piattaforma di analisi dei dati.</text:span><text:span text:style-name="T2385"/><text:span text:style-name="T2386"/></text:p>
      <text:p text:style-name="P312"><text:span text:style-name="T2387">Bisognerà quindi importare i dati sulla piattaforma, quindi esportarli e caricarli su Giacenze Crypto.</text:span><text:span text:style-name="T2388"/><text:span text:style-name="T2389"/></text:p>
      <text:p text:style-name="P313"><text:span text:style-name="T2390"/><text:span text:style-name="T2391"/><text:span text:style-name="T2392"/></text:p>
      <text:p text:style-name="P314"><text:span text:style-name="T2393">In particolare se usate il software </text:span><text:span text:style-name="T2394">Cointraking </text:span><text:span text:style-name="T2395">per fare questo tipo di operazion</text:span><text:span text:style-name="T2396">e è opportuno ricordare che non permette se non a pagamento un importazione massiva dei vostri dati per cui bisognerà caricare, ad esempio, i dati di un singolo exchange, esportarli, cancellare i dati e ricominciare il giro con gli exchange che vi mancano.</text:span><text:span text:style-name="T2397"/><text:span text:style-name="T2398"/></text:p>
      <text:p text:style-name="P315"><text:span text:style-name="T2399">Il servizio è reperibile al seguente indirizzo </text:span><text:span text:style-name="T2400"/><text:a xlink:href="https://cointracking.info/dashboard.php" xlink:type="simple"><text:span text:style-name="T2401"/><text:span text:style-name="T2402"/><text:span text:style-name="T2403"/><text:span text:style-name="T2404"/><text:span text:style-name="T2405"/><text:span text:style-name="T2406">https://cointracking.info/dashboard.php</text:span><text:span text:style-name="T2407"/><text:span text:style-name="T2408"/><text:span text:style-name="T2409"/></text:a><text:span text:style-name="T2410"/><text:span text:style-name="T2411"/></text:p>
      <text:p text:style-name="P316"><text:span text:style-name="T2412"/><text:span text:style-name="T2413"/><text:span text:style-name="T2414"/></text:p>
      <text:p text:style-name="P317"><text:span text:style-name="T2415">Nei passaggi successivi verrà illustrato come esportare i dati da cointraking : </text:span><text:span text:style-name="T2416"/><text:span text:style-name="T2417"/></text:p>
      <text:list text:style-name="WWNum14" text:continue-numbering="true">
        <text:list-item>
          <text:p text:style-name="P318"><text:span text:style-name="T2418">Importare i dati premendo sull’apposito pulsante e seguendo le indicazioni a video</text:span><text:span text:style-name="T2419"/><text:span text:style-name="T2420"/></text:p>
        </text:list-item>
      </text:list>
      <text:p text:style-name="P319"><text:span text:style-name="T2421"/><text:span/><draw:frame draw:name="Object" draw:style-name="gr40" text:anchor-type="as-char" svg:width="17.59cm" svg:height="4.085cm" svg:x="0cm" svg:y="0cm"><draw:image xlink:href="Pictures/image17.png" xlink:type="simple" xlink:show="embed" xlink:actuate="onLoad"/></draw:frame><text:span text:style-name="T2422"/><text:span text:style-name="T2423"/></text:p>
      <text:p text:style-name="P320"><text:span text:style-name="T2424"/><text:span text:style-name="T2425"/><text:span text:style-name="T2426"/></text:p>
      <text:list text:style-name="WWNum14" text:continue-numbering="true">
        <text:list-item>
          <text:p text:style-name="P321"><text:span text:style-name="T2427"/><text:span text:style-name="T2428">Una volta terminata l’importazione premere su “</text:span><text:span text:style-name="T2429">Transazioni</text:span><text:span text:style-name="T2430">”</text:span><text:span text:style-name="T2431"/><text:span text:style-name="T2432"/></text:p>
        </text:list-item>
        <text:list-item>
          <text:p text:style-name="P322"><text:span text:style-name="T2433"/><text:span text:style-name="T2434">Premere sul pulsante “</text:span><text:span text:style-name="T2435">Export</text:span><text:span text:style-name="T2436">”</text:span><text:span text:style-name="T2437"/><text:span text:style-name="T2438"/></text:p>
        </text:list-item>
        <text:list-item>
          <text:p text:style-name="P323"><text:span text:style-name="T2439"/><text:span/><draw:frame draw:name="Object" draw:style-name="gr41" draw:z-index="64534" text:anchor-type="paragraph" svg:width="16.44cm" svg:height="6.702cm" svg:x="0.8795cm" svg:y="0.5326cm"><draw:image xlink:href="Pictures/image18.png" xlink:type="simple" xlink:show="embed" xlink:actuate="onLoad"/></draw:frame><text:span text:style-name="T2440">Selezionare il formato “</text:span><text:span text:style-name="T2441">CSV</text:span><text:span text:style-name="T2442">”, verrà quindi scaricato il file da importare su Giacenze Crypto.</text:span><text:span text:style-name="T2443"/><text:span text:style-name="T2444"/></text:p>
        </text:list-item>
        <text:list-item>
          <text:p text:style-name="P324"><text:span text:style-name="T2445"/><text:span text:style-name="T2446">Premere ora sul pulsante “</text:span><text:span text:style-name="T2447">Modifica/Elimina di massa</text:span><text:span text:style-name="T2448">”</text:span><text:span text:style-name="T2449"><text:s/></text:span><text:span text:style-name="T2450"/><text:span text:style-name="T2451"/></text:p>
        </text:list-item>
      </text:list>
      <text:p text:style-name="P325"><text:span text:style-name="T2452"/><text:span text:style-name="T2453"/><text:span text:style-name="T2454"/></text:p>
      <text:p text:style-name="P326"><text:span text:style-name="T2455"/><text:span/><draw:frame draw:name="Object" draw:style-name="gr42" text:anchor-type="as-char" svg:width="17.59cm" svg:height="4.085cm" svg:x="0cm" svg:y="0cm"><draw:image xlink:href="Pictures/image19.png" xlink:type="simple" xlink:show="embed" xlink:actuate="onLoad"/></draw:frame><text:span text:style-name="T2456"/><text:span text:style-name="T2457"/></text:p>
      <text:p text:style-name="P327"><text:span text:style-name="T2458"/><text:span text:style-name="T2459"/><text:span text:style-name="T2460"/></text:p>
      <text:list text:style-name="WWNum14" text:continue-numbering="true">
        <text:list-item>
          <text:p text:style-name="P328"><text:span text:style-name="T2461">Nella maschera che compare selezionare la voce “</text:span><text:span text:style-name="T2462">eliminare tutte le transazioni</text:span><text:span text:style-name="T2463">” e poi premere sul tasto rosso “</text:span><text:span text:style-name="T2464">eliminare le voci selezionate</text:span><text:span text:style-name="T2465">”, in questo modo potrete ricaricare altri dati partendo dal punto 1.</text:span><text:span text:style-name="T2466"/><text:span text:style-name="T2467"/></text:p>
        </text:list-item>
      </text:list>
      <text:p text:style-name="P329"><text:span text:style-name="T2468"/><text:span text:style-name="T2469"/><text:span text:style-name="T2470"/></text:p>
      <text:p text:style-name="P330"><text:span text:style-name="T2471"/><text:span/><draw:frame draw:name="Object" draw:style-name="gr43" text:anchor-type="as-char" svg:width="12.8cm" svg:height="10.34cm" svg:x="0cm" svg:y="0cm"><draw:image xlink:href="Pictures/image20.png" xlink:type="simple" xlink:show="embed" xlink:actuate="onLoad"/></draw:frame><text:span text:style-name="T2472"/><text:span text:style-name="T2473"/></text:p>
      <text:p text:style-name="P331"><text:span text:style-name="T2474"/><text:span text:style-name="T2475"/><text:span text:style-name="T2476"/></text:p>
      <text:p text:style-name="P332"><text:span text:style-name="T2477"/><text:span text:style-name="T2478"/><text:span text:style-name="T2479"/></text:p>
      <text:p text:style-name="P333"><text:span text:style-name="T2480"/><text:span text:style-name="T2481"><text:line-break/></text:span><text:span text:style-name="T2482"/><text:span text:style-name="T2483"/></text:p>
      <text:p text:style-name="P334"><text:span text:style-name="T2484"/><text:span text:style-name="T2485"/><text:span/></text:p>
      <text:p text:style-name="P335"><text:span text:style-name="T2535"/><text:bookmark-start text:name="_Toc10"/><text:span text:style-name="T2536">Import CSV sul software Giacenze Crypto</text:span><text:span text:style-name="T2537"/><text:bookmark-end text:name="_Toc10"/><text:span text:style-name="T2538"/><text:span text:style-name="T2539"/></text:p>
      <text:p text:style-name="P343"><text:span text:style-name="T2540"/><text:span text:style-name="T2541"/><text:span text:style-name="T2542"/></text:p>
      <text:p text:style-name="P344"><text:span text:style-name="T2543">Per importare invece i dati sul Software procedere come segue :</text:span><text:span text:style-name="T2544"/><text:span text:style-name="T2545"/></text:p>
      <text:p text:style-name="P345"><text:span text:style-name="T2546"/><text:span/><draw:frame draw:name="Object" draw:style-name="gr51" draw:z-index="67606" text:anchor-type="paragraph" svg:width="6.694cm" svg:height="4.578cm" svg:x="10.89cm" svg:y="0.3683cm"><draw:image xlink:href="Pictures/image21.png" xlink:type="simple" xlink:show="embed" xlink:actuate="onLoad"/></draw:frame><text:span text:style-name="T2547"/><text:span text:style-name="T2548"/></text:p>
      <text:p text:style-name="P346"><text:span text:style-name="T2549"/><text:span text:style-name="T2550"/><text:span text:style-name="T2551"/></text:p>
      <text:list text:style-name="WWNum19" text:continue-numbering="true">
        <text:list-item>
          <text:p text:style-name="P347"><text:span text:style-name="T2552">Premere sul pulsante “</text:span><text:span text:style-name="T2553">Carica CSV” </text:span><text:span text:style-name="T2554">presente nella sezione “</text:span><text:span text:style-name="T2555">Transazioni Crypto</text:span><text:span text:style-name="T2556">”</text:span><text:span text:style-name="T2557"/><text:span text:style-name="T2558"/></text:p>
        </text:list-item>
      </text:list>
      <text:p text:style-name="P348"><text:span text:style-name="T2559"/><text:span text:style-name="T2560"/><text:span text:style-name="T2561"/></text:p>
      <text:p text:style-name="P349"><text:span text:style-name="T2562"/><text:span text:style-name="T2563"/><text:span text:style-name="T2564"/></text:p>
      <text:p text:style-name="P350"><text:span text:style-name="T2565"/><text:span text:style-name="T2566"/><text:span text:style-name="T2567"/></text:p>
      <text:p text:style-name="P351"><text:span text:style-name="T2568"/><text:span text:style-name="T2569"/><text:span text:style-name="T2570"/></text:p>
      <text:p text:style-name="P352"><text:span text:style-name="T2571"/><text:span text:style-name="T2572"/><text:span text:style-name="T2573"/></text:p>
      <text:p text:style-name="P353"><text:span text:style-name="T2574"/><text:span text:style-name="T2575"/><text:span text:style-name="T2576"/></text:p>
      <text:p text:style-name="P354"><text:span text:style-name="T2577"/><text:span/><draw:frame draw:name="Object" draw:style-name="gr52" draw:z-index="70678" text:anchor-type="paragraph" svg:width="8.233cm" svg:height="10.7cm" svg:x="9.649cm" svg:y="0.518cm"><draw:image xlink:href="Pictures/image22.png" xlink:type="simple" xlink:show="embed" xlink:actuate="onLoad"/></draw:frame><text:span text:style-name="T2578"/><text:span text:style-name="T2579"/></text:p>
      <text:list text:style-name="WWNum19" text:continue-numbering="true">
        <text:list-item>
          <text:p text:style-name="P355"><text:span text:style-name="T2580"/><text:span text:style-name="T2581">A questo punto seguire i seguenti punti per procedere all’importazione :</text:span><text:span text:style-name="T2582"/><text:span text:style-name="T2583"/></text:p>
        </text:list-item>
        <text:list-item>
          <text:list>
            <text:list-item>
              <text:p text:style-name="P356"><text:span text:style-name="T2584"/><text:span text:style-name="T2585">Selezionare l’Exchange dal menù a tendina.</text:span><text:span text:style-name="T2586"/><text:span text:style-name="T2587"/></text:p>
            </text:list-item>
            <text:list-item>
              <text:p text:style-name="P357"><text:span text:style-name="T2588"/><text:span text:style-name="T2589">Decidere se usare l’opzione “</text:span><text:span text:style-name="T2590">Sovrascrivere movimenti già presenti</text:span><text:span text:style-name="T2591">”. Questa opzione permette di sovrascrivere movimenti già presenti</text:span><text:span text:style-name="T2592"> con quelli presenti nel file CSV che si andrà a selezionare nel caso si cerci di importare movimenti doppi.Tuttavia nel caso in cui si cerchi di reimportare uno stesso periodo è consigliabile cancellare le movimentazioni del periodo e reimportarle da capo</text:span><text:span text:style-name="T2593"> per evitare problematiche. I file degli exchange infatti talune volte se scaricati in periodi diversi dalla piattaforma, pur facendo riferimento al medesimo periodo operativo potrebbero presentare delle incongruenze (Ore cambiate, valori ritoccati etc...)</text:span><text:span text:style-name="T2594"/><text:span text:style-name="T2595"/></text:p>
            </text:list-item>
          </text:list>
        </text:list-item>
      </text:list>
      <text:p text:style-name="P358"><text:span text:style-name="T2596"/><text:span text:style-name="T2597"/><text:span text:style-name="T2598"/></text:p>
      <text:list text:style-name="WWNum19" text:continue-numbering="true">
        <text:list-item>
          <text:list>
            <text:list-item>
              <text:p text:style-name="P359"><text:span text:style-name="T2599"/><text:span text:style-name="T2600">Nel caso i</text:span><text:span text:style-name="T2601">n cui i</text:span><text:span text:style-name="T2602">nvece si voglia importare un CSV da<text:s text:c="8"/>una piattaforma come ad esempio Cointraking che permette di gestire molteplici Wallet/Exchange bisognerà selezionare anche la tipologia e il Wallet di destinazione prima di procedere con l’import. (Vedi immagine).</text:span><text:span/><draw:frame draw:name="Object" draw:style-name="gr53" draw:z-index="76822" text:anchor-type="paragraph" svg:width="7.027cm" svg:height="9.076cm" svg:x="10.56cm" svg:y="-0.3022cm"><draw:image xlink:href="Pictures/image23.png" xlink:type="simple" xlink:show="embed" xlink:actuate="onLoad"/></draw:frame><text:span text:style-name="T2603"><text:line-break/><text:line-break/><text:line-break/></text:span><text:span text:style-name="T2604"/><text:span text:style-name="T2605"/></text:p>
            </text:list-item>
            <text:list-item>
              <text:p text:style-name="P360"><text:span text:style-name="T2606"/><text:span text:style-name="T2607">Premere quindi su </text:span><text:span text:style-name="T2608">“Selezione file da importare”</text:span><text:span text:style-name="T2609"> per scegliere il file CSV da caricare</text:span><text:span text:style-name="T2610">.</text:span><text:span text:style-name="T2611"/><text:span text:style-name="T2612"/></text:p>
            </text:list-item>
          </text:list>
        </text:list-item>
      </text:list>
      <text:p text:style-name="P361"><text:span text:style-name="T2613"/><text:span text:style-name="T2614"><text:line-break/><text:line-break/><text:line-break/><text:line-break/><text:line-break/></text:span><text:span text:style-name="T2615"><text:line-break/></text:span><text:span text:style-name="T2616"/><text:span text:style-name="T2617"/></text:p>
      <text:list text:style-name="WWNum18" text:continue-numbering="true">
        <text:list-item>
          <text:p text:style-name="P362"><text:span text:style-name="T2618">Terminata l’importazione comparirà un resoconto ti</text:span><text:span/><draw:frame draw:name="Object" draw:style-name="gr54" draw:z-index="77846" text:anchor-type="paragraph" svg:width="7.463cm" svg:height="7.179cm" svg:x="10.13cm" svg:y="-0.08996cm"><draw:image xlink:href="Pictures/image24.png" xlink:type="simple" xlink:show="embed" xlink:actuate="onLoad"/></draw:frame><text:span text:style-name="T2619">po questo nel quale saranno visibili anche eventuali errori e dove sarà possibile copiarli per poi segnalarli via mail o sul canale telegram.</text:span><text:span text:style-name="T2620"/><text:span text:style-name="T262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987">
      <style:paragraph-properties/>
      <style:text-properties fo:font-size="10pt"/>
    </style:style>
    <style:style style:display-name="DStyle_text" style:family="text" style:name="988">
      <style:paragraph-properties/>
    </style:style>
    <style:style style:parent-style-name="987" style:display-name="DStyle_paragraph" style:family="paragraph" style:name="989">
      <style:paragraph-properties/>
      <style:text-properties fo:font-size="10pt"/>
    </style:style>
    <style:style style:parent-style-name="987" style:display-name="DStyle_text" style:family="text" style:name="990">
      <style:paragraph-properties/>
    </style:style>
    <style:style style:parent-style-name="989" style:display-name="DStyle_paragraph" style:family="paragraph" style:name="991">
      <style:paragraph-properties/>
      <style:text-properties fo:font-size="10pt"/>
    </style:style>
    <style:style style:parent-style-name="987" style:display-name="DStyle_text" style:family="text" style:name="992">
      <style:paragraph-properties/>
    </style:style>
    <style:style style:parent-style-name="991" style:display-name="DStyle_paragraph" style:family="paragraph" style:name="993">
      <style:paragraph-properties/>
      <style:text-properties fo:font-size="10pt"/>
    </style:style>
    <style:style style:parent-style-name="987" style:display-name="DStyle_text" style:family="text" style:name="994">
      <style:paragraph-properties/>
    </style:style>
    <style:style style:parent-style-name="993" style:display-name="DStyle_paragraph" style:family="paragraph" style:name="995">
      <style:paragraph-properties/>
      <style:text-properties fo:font-size="10pt"/>
    </style:style>
    <style:style style:parent-style-name="987" style:display-name="DStyle_text" style:family="text" style:name="996">
      <style:paragraph-properties/>
    </style:style>
    <style:style style:parent-style-name="995" style:display-name="DStyle_paragraph" style:family="paragraph" style:name="997">
      <style:paragraph-properties/>
      <style:text-properties fo:font-size="10pt"/>
    </style:style>
    <style:style style:parent-style-name="987" style:display-name="DStyle_text" style:family="text" style:name="998">
      <style:paragraph-properties/>
    </style:style>
    <style:style style:parent-style-name="997" style:display-name="DStyle_paragraph" style:family="paragraph" style:name="999">
      <style:paragraph-properties/>
      <style:text-properties fo:font-size="10pt"/>
    </style:style>
    <style:style style:parent-style-name="987" style:display-name="DStyle_text" style:family="text" style:name="1000">
      <style:paragraph-properties/>
    </style:style>
    <style:style style:class="default" style:display-name="Normal" style:family="paragraph" style:name="1001">
      <style:paragraph-properties/>
      <style:text-properties/>
    </style:style>
    <style:style style:parent-style-name="1001" style:display-name="Heading 3" style:family="paragraph" style:name="1002">
      <style:paragraph-properties fo:margin-top="8pt" fo:margin-bottom="4pt"/>
      <style:text-properties fo:color="#0f4761" fo:font-family="Arial" style:font-family-complex="Arial" fo:font-size="14pt" style:font-size-complex="14pt"/>
    </style:style>
    <style:style style:parent-style-name="1001" style:display-name="Heading 4" style:family="paragraph" style:name="1003">
      <style:paragraph-properties fo:margin-top="4pt" fo:margin-bottom="2pt"/>
      <style:text-properties fo:color="#0f4761" fo:font-family="Arial" style:font-family-complex="Arial" fo:font-style="italic"/>
    </style:style>
    <style:style style:parent-style-name="1001" style:display-name="Heading 5" style:family="paragraph" style:name="1004">
      <style:paragraph-properties fo:margin-top="4pt" fo:margin-bottom="2pt"/>
      <style:text-properties fo:color="#0f4761" fo:font-family="Arial" style:font-family-complex="Arial"/>
    </style:style>
    <style:style style:parent-style-name="1001" style:display-name="Heading 6" style:family="paragraph" style:name="1005">
      <style:paragraph-properties fo:margin-top="2pt" fo:margin-bottom="0pt"/>
      <style:text-properties fo:color="#595959" fo:font-family="Arial" style:font-family-complex="Arial" fo:font-style="italic"/>
    </style:style>
    <style:style style:parent-style-name="1001" style:display-name="Heading 7" style:family="paragraph" style:name="1006">
      <style:paragraph-properties fo:margin-top="2pt" fo:margin-bottom="0pt"/>
      <style:text-properties fo:color="#595959" fo:font-family="Arial" style:font-family-complex="Arial"/>
    </style:style>
    <style:style style:parent-style-name="1001" style:display-name="Heading 8" style:family="paragraph" style:name="1007">
      <style:paragraph-properties fo:margin-bottom="0pt"/>
      <style:text-properties fo:color="#272727" fo:font-family="Arial" style:font-family-complex="Arial" fo:font-style="italic"/>
    </style:style>
    <style:style style:parent-style-name="1001" style:display-name="Heading 9" style:family="paragraph" style:name="1008">
      <style:paragraph-properties fo:margin-bottom="0pt"/>
      <style:text-properties fo:color="#272727" fo:font-family="Arial" style:font-family-complex="Arial" fo:font-style="italic"/>
    </style:style>
    <style:style style:class="default" style:display-name="Default Paragraph Font" style:family="text" style:name="1009">
      <style:paragraph-properties/>
      <style:text-properties/>
    </style:style>
    <style:style style:parent-style-name="1009" style:display-name="Heading 1 Char" style:family="text" style:name="1010">
      <style:paragraph-properties/>
      <style:text-properties fo:color="#0f4761" fo:font-family="Arial" style:font-family-complex="Arial" fo:font-size="20pt" style:font-size-complex="20pt"/>
    </style:style>
    <style:style style:parent-style-name="1009" style:display-name="Heading 2 Char" style:family="text" style:name="1011">
      <style:paragraph-properties/>
      <style:text-properties fo:color="#0f4761" fo:font-family="Arial" style:font-family-complex="Arial" fo:font-size="16pt" style:font-size-complex="16pt"/>
    </style:style>
    <style:style style:parent-style-name="1009" style:display-name="Heading 3 Char" style:family="text" style:name="1012">
      <style:paragraph-properties/>
      <style:text-properties fo:color="#0f4761" fo:font-family="Arial" style:font-family-complex="Arial" fo:font-size="14pt" style:font-size-complex="14pt"/>
    </style:style>
    <style:style style:parent-style-name="1009" style:display-name="Heading 4 Char" style:family="text" style:name="1013">
      <style:paragraph-properties/>
      <style:text-properties fo:color="#0f4761" fo:font-family="Arial" style:font-family-complex="Arial" fo:font-style="italic"/>
    </style:style>
    <style:style style:parent-style-name="1009" style:display-name="Heading 5 Char" style:family="text" style:name="1014">
      <style:paragraph-properties/>
      <style:text-properties fo:color="#0f4761" fo:font-family="Arial" style:font-family-complex="Arial"/>
    </style:style>
    <style:style style:parent-style-name="1009" style:display-name="Heading 6 Char" style:family="text" style:name="1015">
      <style:paragraph-properties/>
      <style:text-properties fo:color="#595959" fo:font-family="Arial" style:font-family-complex="Arial" fo:font-style="italic"/>
    </style:style>
    <style:style style:parent-style-name="1009" style:display-name="Heading 7 Char" style:family="text" style:name="1016">
      <style:paragraph-properties/>
      <style:text-properties fo:color="#595959" fo:font-family="Arial" style:font-family-complex="Arial"/>
    </style:style>
    <style:style style:parent-style-name="1009" style:display-name="Heading 8 Char" style:family="text" style:name="1017">
      <style:paragraph-properties/>
      <style:text-properties fo:color="#272727" fo:font-family="Arial" style:font-family-complex="Arial" fo:font-style="italic"/>
    </style:style>
    <style:style style:parent-style-name="1009" style:display-name="Heading 9 Char" style:family="text" style:name="1018">
      <style:paragraph-properties/>
      <style:text-properties fo:color="#272727" fo:font-family="Arial" style:font-family-complex="Arial" fo:font-style="italic"/>
    </style:style>
    <style:style style:parent-style-name="1001" style:display-name="Title" style:family="paragraph" style:name="1019">
      <style:paragraph-properties fo:line-height="100%" fo:margin-bottom="4pt"/>
      <style:text-properties fo:font-family="Arial" style:font-family-complex="Arial" fo:font-size="28pt" style:font-size-complex="28pt" fo:letter-spacing="-0.5pt"/>
    </style:style>
    <style:style style:parent-style-name="1009" style:display-name="Title Char" style:family="text" style:name="1020">
      <style:paragraph-properties/>
      <style:text-properties fo:font-family="Arial" style:font-family-complex="Arial" fo:font-size="28pt" style:font-size-complex="28pt" fo:letter-spacing="-0.5pt"/>
    </style:style>
    <style:style style:parent-style-name="1001" style:display-name="Subtitle" style:family="paragraph" style:name="1021">
      <style:paragraph-properties/>
      <style:text-properties fo:color="#595959" fo:font-size="14pt" style:font-size-complex="14pt" fo:letter-spacing="0.75pt"/>
    </style:style>
    <style:style style:parent-style-name="1009" style:display-name="Subtitle Char" style:family="text" style:name="1022">
      <style:paragraph-properties/>
      <style:text-properties fo:color="#595959" fo:font-size="14pt" style:font-size-complex="14pt" fo:letter-spacing="0.75pt"/>
    </style:style>
    <style:style style:parent-style-name="1001" style:display-name="Quote" style:family="paragraph" style:name="1023">
      <style:paragraph-properties fo:text-align="center" fo:margin-top="8pt"/>
      <style:text-properties fo:color="#404040" fo:font-style="italic"/>
    </style:style>
    <style:style style:parent-style-name="1009" style:display-name="Quote Char" style:family="text" style:name="1024">
      <style:paragraph-properties/>
      <style:text-properties fo:color="#404040" fo:font-style="italic"/>
    </style:style>
    <style:style style:parent-style-name="1001" style:display-name="List Paragraph" style:family="paragraph" style:name="1025">
      <style:paragraph-properties fo:margin-left="1.27cm" fo:margin-right="0cm" fo:text-indent="0cm"/>
    </style:style>
    <style:style style:parent-style-name="1009" style:display-name="Intense Emphasis" style:family="text" style:name="1026">
      <style:paragraph-properties/>
      <style:text-properties fo:color="#0f4761" fo:font-style="italic"/>
    </style:style>
    <style:style style:parent-style-name="1001" style:display-name="Intense Quote" style:family="paragraph" style:name="1027">
      <style:paragraph-properties fo:text-align="center" fo:margin-left="1.524cm" fo:margin-right="1.524cm" fo:text-indent="0cm" fo:margin-top="18pt" fo:margin-bottom="18pt" fo:border-top="0.01764cm solid #0F4761" fo:border-bottom="0.01764cm solid #0F4761"/>
      <style:text-properties fo:color="#0f4761" fo:font-style="italic"/>
    </style:style>
    <style:style style:parent-style-name="1009" style:display-name="Intense Quote Char" style:family="text" style:name="1028">
      <style:paragraph-properties/>
      <style:text-properties fo:color="#0f4761" fo:font-style="italic"/>
    </style:style>
    <style:style style:parent-style-name="1009" style:display-name="Intense Reference" style:family="text" style:name="1029">
      <style:paragraph-properties/>
      <style:text-properties fo:font-variant="small-caps" fo:color="#0f4761" fo:letter-spacing="0.25pt" fo:font-weight="bold"/>
    </style:style>
    <style:style style:parent-style-name="1001" style:display-name="No Spacing" style:family="paragraph" style:name="1030">
      <style:paragraph-properties fo:line-height="100%" fo:margin-bottom="0pt"/>
    </style:style>
    <style:style style:parent-style-name="1009" style:display-name="Subtle Emphasis" style:family="text" style:name="1031">
      <style:paragraph-properties/>
      <style:text-properties fo:color="#404040" fo:font-style="italic"/>
    </style:style>
    <style:style style:parent-style-name="1009" style:display-name="Strong" style:family="text" style:name="1032">
      <style:paragraph-properties/>
      <style:text-properties fo:font-weight="bold"/>
    </style:style>
    <style:style style:parent-style-name="1009" style:display-name="Subtle Reference" style:family="text" style:name="1033">
      <style:paragraph-properties/>
      <style:text-properties fo:font-variant="small-caps" fo:color="#5a5a5a"/>
    </style:style>
    <style:style style:parent-style-name="1009" style:display-name="Book Title" style:family="text" style:name="1034">
      <style:paragraph-properties/>
      <style:text-properties fo:letter-spacing="0.25pt" fo:font-style="italic" fo:font-weight="bold"/>
    </style:style>
    <style:style style:parent-style-name="1009" style:display-name="Header Char" style:family="text" style:name="1035">
      <style:paragraph-properties/>
    </style:style>
    <style:style style:parent-style-name="1009" style:display-name="Footer Char" style:family="text" style:name="1036">
      <style:paragraph-properties/>
    </style:style>
    <style:style style:parent-style-name="1001" style:display-name="footnote text" style:family="paragraph" style:name="1037">
      <style:paragraph-properties fo:line-height="100%" fo:margin-bottom="0pt"/>
      <style:text-properties fo:font-size="10pt" style:font-size-complex="10pt"/>
    </style:style>
    <style:style style:parent-style-name="1009" style:display-name="Footnote Text Char" style:family="text" style:name="1038">
      <style:paragraph-properties/>
      <style:text-properties fo:font-size="10pt" style:font-size-complex="10pt"/>
    </style:style>
    <style:style style:parent-style-name="1009" style:display-name="footnote reference" style:family="text" style:name="1039">
      <style:paragraph-properties/>
      <style:text-properties style:text-position="super 58%"/>
    </style:style>
    <style:style style:parent-style-name="1001" style:display-name="endnote text" style:family="paragraph" style:name="1040">
      <style:paragraph-properties fo:line-height="100%" fo:margin-bottom="0pt"/>
      <style:text-properties fo:font-size="10pt" style:font-size-complex="10pt"/>
    </style:style>
    <style:style style:parent-style-name="1009" style:display-name="Endnote Text Char" style:family="text" style:name="1041">
      <style:paragraph-properties/>
      <style:text-properties fo:font-size="10pt" style:font-size-complex="10pt"/>
    </style:style>
    <style:style style:parent-style-name="1009" style:display-name="endnote reference" style:family="text" style:name="1042">
      <style:paragraph-properties/>
      <style:text-properties style:text-position="super 58%"/>
    </style:style>
    <style:style style:parent-style-name="1009" style:display-name="Hyperlink" style:family="text" style:name="1043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1001" style:display-name="Internet link" style:family="text" style:name="1044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1001" style:display-name="Internet link" style:family="text" style:name="1045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1001" style:display-name="Internet link" style:family="text" style:name="1046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1001" style:display-name="Internet link" style:family="text" style:name="1047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1001" style:display-name="Internet link" style:family="text" style:name="1048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1001" style:display-name="Internet link" style:family="text" style:name="1049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1001" style:display-name="Internet link" style:family="text" style:name="1050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1009" style:display-name="FollowedHyperlink" style:family="text" style:name="1051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1001" style:display-name="toc 1" style:family="paragraph" style:name="1052">
      <style:paragraph-properties fo:margin-bottom="5pt"/>
      <style:text-properties/>
    </style:style>
    <style:style style:parent-style-name="1001" style:display-name="toc 2" style:family="paragraph" style:name="1053">
      <style:paragraph-properties fo:margin-left="0.3881cm" fo:margin-right="0cm" fo:text-indent="0cm" fo:margin-bottom="5pt"/>
    </style:style>
    <style:style style:parent-style-name="1001" style:display-name="toc 3" style:family="paragraph" style:name="1054">
      <style:paragraph-properties fo:margin-left="0.7762cm" fo:margin-right="0cm" fo:text-indent="0cm" fo:margin-bottom="5pt"/>
      <style:text-properties/>
    </style:style>
    <style:style style:parent-style-name="1001" style:display-name="toc 4" style:family="paragraph" style:name="1055">
      <style:paragraph-properties fo:margin-left="1.164cm" fo:margin-right="0cm" fo:text-indent="0cm" fo:margin-bottom="5pt"/>
    </style:style>
    <style:style style:parent-style-name="1001" style:display-name="toc 5" style:family="paragraph" style:name="1056">
      <style:paragraph-properties fo:margin-left="1.552cm" fo:margin-right="0cm" fo:text-indent="0cm" fo:margin-bottom="5pt"/>
    </style:style>
    <style:style style:parent-style-name="1001" style:display-name="toc 6" style:family="paragraph" style:name="1057">
      <style:paragraph-properties fo:margin-left="1.94cm" fo:margin-right="0cm" fo:text-indent="0cm" fo:margin-bottom="5pt"/>
    </style:style>
    <style:style style:parent-style-name="1001" style:display-name="toc 7" style:family="paragraph" style:name="1058">
      <style:paragraph-properties fo:margin-left="2.328cm" fo:margin-right="0cm" fo:text-indent="0cm" fo:margin-bottom="5pt"/>
    </style:style>
    <style:style style:parent-style-name="1001" style:display-name="toc 8" style:family="paragraph" style:name="1059">
      <style:paragraph-properties fo:margin-left="2.717cm" fo:margin-right="0cm" fo:text-indent="0cm" fo:margin-bottom="5pt"/>
    </style:style>
    <style:style style:parent-style-name="1001" style:display-name="toc 9" style:family="paragraph" style:name="1060">
      <style:paragraph-properties fo:margin-left="3.105cm" fo:margin-right="0cm" fo:text-indent="0cm" fo:margin-bottom="5pt"/>
    </style:style>
    <style:style style:parent-style-name="1009" style:display-name="Placeholder Text" style:family="text" style:name="1061">
      <style:paragraph-properties/>
      <style:text-properties fo:color="#666666"/>
    </style:style>
    <style:style style:parent-style-name="1001" style:display-name="TOC Heading" style:family="paragraph" style:name="1062">
      <style:paragraph-properties/>
    </style:style>
    <style:style style:parent-style-name="1001" style:display-name="table of figures" style:family="paragraph" style:name="1063">
      <style:paragraph-properties fo:margin-bottom="0pt"/>
    </style:style>
    <style:style style:parent-style-name="1001" style:display-name="DStyle_paragraph" style:family="paragraph" style:name="106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4" style:display-name="Standard" style:family="paragraph" style:name="1065">
      <style:paragraph-properties/>
      <style:text-properties/>
    </style:style>
    <style:style style:parent-style-name="1065" style:display-name="Heading" style:family="paragraph" style:name="1066">
      <style:paragraph-properties fo:margin-top="12pt" fo:margin-bottom="6pt"/>
      <style:text-properties fo:font-family="Liberation Sans" style:font-family-complex="Liberation Sans" fo:font-size="14pt" style:font-size-complex="14pt"/>
    </style:style>
    <style:style style:parent-style-name="1065" style:display-name="Text body" style:family="paragraph" style:name="1067">
      <style:paragraph-properties fo:line-height="115%" fo:margin-top="0pt" fo:margin-bottom="7pt"/>
      <style:text-properties/>
    </style:style>
    <style:style style:parent-style-name="1067" style:display-name="List" style:family="paragraph" style:name="1068">
      <style:paragraph-properties/>
    </style:style>
    <style:style style:parent-style-name="1065" style:display-name="Caption" style:family="paragraph" style:name="1069">
      <style:paragraph-properties fo:margin-top="6pt" fo:margin-bottom="6pt"/>
      <style:text-properties fo:font-size="12pt" style:font-size-complex="12pt" fo:font-style="italic"/>
    </style:style>
    <style:style style:parent-style-name="1065" style:display-name="Index" style:family="paragraph" style:name="1070">
      <style:paragraph-properties/>
    </style:style>
    <style:style style:parent-style-name="1065" style:display-name="Table Contents" style:family="paragraph" style:name="1071">
      <style:paragraph-properties/>
    </style:style>
    <style:style style:parent-style-name="1071" style:display-name="Table Heading" style:family="paragraph" style:name="1072">
      <style:paragraph-properties fo:text-align="center"/>
      <style:text-properties fo:font-weight="bold"/>
    </style:style>
    <style:style style:parent-style-name="1066" style:display-name="Index Heading" style:family="paragraph" style:name="1073">
      <style:paragraph-properties fo:margin-left="0cm" fo:margin-right="0cm" fo:text-indent="0cm"/>
      <style:text-properties fo:font-size="16pt" style:font-size-complex="16pt" fo:font-weight="bold"/>
    </style:style>
    <style:style style:parent-style-name="1073" style:display-name="Contents Heading" style:family="paragraph" style:name="1074">
      <style:paragraph-properties fo:margin-left="0cm" fo:margin-right="0cm" fo:text-indent="0cm"/>
      <style:text-properties fo:font-size="16pt" style:font-size-complex="16pt" fo:font-weight="bold"/>
    </style:style>
    <style:style style:parent-style-name="1070" style:display-name="Contents 1" style:family="paragraph" style:name="1075">
      <style:paragraph-properties fo:margin-left="0cm" fo:margin-right="0cm" fo:text-indent="0cm">
        <style:tab-stops>
          <style:tab-stop style:position="17.59cm" style:type="right" style:leader-type="dotted" style:leader-style="dotted"/>
        </style:tab-stops>
      </style:paragraph-properties>
      <style:text-properties fo:language="it" fo:country="IT" fo:font-weight="bold"/>
    </style:style>
    <style:style style:parent-style-name="1066" style:display-name="Heading 1" style:family="paragraph" style:name="1076">
      <style:paragraph-properties fo:margin-top="12pt" fo:margin-bottom="6pt"/>
      <style:text-properties fo:font-size="18pt" style:font-size-complex="18pt" fo:font-weight="bold"/>
    </style:style>
    <style:style style:parent-style-name="1066" style:display-name="Heading 2" style:family="paragraph" style:name="1077">
      <style:paragraph-properties fo:margin-top="10pt" fo:margin-bottom="6pt"/>
      <style:text-properties fo:font-size="16pt" style:font-size-complex="16pt" fo:font-weight="bold"/>
    </style:style>
    <style:style style:parent-style-name="1070" style:display-name="Contents 2" style:family="paragraph" style:name="1078">
      <style:paragraph-properties fo:margin-left="0.4992cm" fo:margin-right="0cm" fo:text-indent="0cm">
        <style:tab-stops>
          <style:tab-stop style:position="21.09cm" style:type="right" style:leader-type="dotted" style:leader-style="dotted"/>
        </style:tab-stops>
      </style:paragraph-properties>
    </style:style>
    <style:style style:parent-style-name="1065" style:display-name="Header and Footer" style:family="paragraph" style:name="1079">
      <style:paragraph-properties>
        <style:tab-stops>
          <style:tab-stop style:position="8.794cm" style:type="center"/>
          <style:tab-stop style:position="17.59cm" style:type="right"/>
        </style:tab-stops>
      </style:paragraph-properties>
    </style:style>
    <style:style style:parent-style-name="1079" style:display-name="Footer" style:family="paragraph" style:name="1080">
      <style:paragraph-properties>
        <style:tab-stops>
          <style:tab-stop style:position="8.794cm" style:type="center"/>
          <style:tab-stop style:position="17.59cm" style:type="right"/>
        </style:tab-stops>
      </style:paragraph-properties>
    </style:style>
    <style:style style:parent-style-name="1079" style:display-name="Header" style:family="paragraph" style:name="1081">
      <style:paragraph-properties>
        <style:tab-stops>
          <style:tab-stop style:position="8.794cm" style:type="center"/>
          <style:tab-stop style:position="17.59cm" style:type="right"/>
        </style:tab-stops>
      </style:paragraph-properties>
    </style:style>
    <style:style style:parent-style-name="1001" style:display-name="Emphasis" style:family="text" style:name="1082">
      <style:paragraph-properties/>
      <style:text-properties fo:font-style="italic"/>
    </style:style>
    <style:style style:parent-style-name="1001" style:display-name="Strong Emphasis" style:family="text" style:name="1083">
      <style:paragraph-properties/>
      <style:text-properties fo:font-weight="bold"/>
    </style:style>
    <style:style style:parent-style-name="1001" style:display-name="Internet link" style:family="text" style:name="1084">
      <style:paragraph-properties/>
      <style:text-properties fo:color="#000080" style:text-underline-type="single" style:text-underline-style="solid" style:text-underline-width="auto" style:text-underline-color="font-color"/>
    </style:style>
    <style:style style:parent-style-name="1001" style:display-name="Index Link" style:family="text" style:name="1085">
      <style:paragraph-properties/>
    </style:style>
    <style:style style:parent-style-name="1001" style:display-name="Bullet Symbols" style:family="text" style:name="1086">
      <style:paragraph-properties/>
      <style:text-properties fo:font-family="OpenSymbol" style:font-family-complex="OpenSymbol"/>
    </style:style>
    <style:style style:parent-style-name="1001" style:display-name="Numbering Symbols" style:family="text" style:name="1087">
      <style:paragraph-properties/>
    </style:style>
    <style:style style:parent-style-name="1001" style:display-name="T1" style:family="text" style:name="1088">
      <style:paragraph-properties/>
    </style:style>
    <style:style style:parent-style-name="1001" style:display-name="T2" style:family="text" style:name="1089">
      <style:paragraph-properties/>
    </style:style>
    <style:style style:parent-style-name="1001" style:display-name="T3" style:family="text" style:name="1090">
      <style:paragraph-properties/>
    </style:style>
    <style:style style:parent-style-name="1001" style:display-name="T4" style:family="text" style:name="1091">
      <style:paragraph-properties/>
    </style:style>
    <style:style style:parent-style-name="1001" style:display-name="T5" style:family="text" style:name="1092">
      <style:paragraph-properties/>
    </style:style>
    <style:style style:parent-style-name="1001" style:display-name="T6" style:family="text" style:name="1093">
      <style:paragraph-properties/>
    </style:style>
    <style:style style:parent-style-name="1001" style:display-name="T7" style:family="text" style:name="1094">
      <style:paragraph-properties/>
    </style:style>
    <style:style style:parent-style-name="1001" style:display-name="T8" style:family="text" style:name="1095">
      <style:paragraph-properties/>
    </style:style>
    <style:style style:parent-style-name="1001" style:display-name="T9" style:family="text" style:name="1096">
      <style:paragraph-properties/>
    </style:style>
    <style:style style:parent-style-name="1001" style:display-name="T10" style:family="text" style:name="1097">
      <style:paragraph-properties/>
    </style:style>
    <style:style style:parent-style-name="1001" style:display-name="T11" style:family="text" style:name="1098">
      <style:paragraph-properties/>
    </style:style>
    <style:style style:parent-style-name="1001" style:display-name="T12" style:family="text" style:name="1099">
      <style:paragraph-properties/>
    </style:style>
    <style:style style:parent-style-name="1001" style:display-name="T13" style:family="text" style:name="1100">
      <style:paragraph-properties/>
    </style:style>
    <style:style style:parent-style-name="1001" style:display-name="T14" style:family="text" style:name="1101">
      <style:paragraph-properties/>
    </style:style>
    <style:style style:parent-style-name="1001" style:display-name="T15" style:family="text" style:name="1102">
      <style:paragraph-properties/>
    </style:style>
    <style:style style:parent-style-name="1001" style:display-name="T16" style:family="text" style:name="1103">
      <style:paragraph-properties/>
    </style:style>
    <style:style style:parent-style-name="1001" style:display-name="T17" style:family="text" style:name="1104">
      <style:paragraph-properties/>
    </style:style>
    <style:style style:parent-style-name="1001" style:display-name="T18" style:family="text" style:name="1105">
      <style:paragraph-properties/>
    </style:style>
    <style:style style:parent-style-name="1001" style:display-name="T19" style:family="text" style:name="1106">
      <style:paragraph-properties/>
    </style:style>
    <style:style style:parent-style-name="1001" style:display-name="T20" style:family="text" style:name="1107">
      <style:paragraph-properties/>
    </style:style>
    <style:style style:parent-style-name="1001" style:display-name="T21" style:family="text" style:name="1108">
      <style:paragraph-properties/>
    </style:style>
    <style:style style:parent-style-name="1001" style:display-name="T22" style:family="text" style:name="1109">
      <style:paragraph-properties/>
    </style:style>
    <style:style style:parent-style-name="1001" style:display-name="T23" style:family="text" style:name="1110">
      <style:paragraph-properties/>
    </style:style>
    <style:style style:parent-style-name="1001" style:display-name="T24" style:family="text" style:name="1111">
      <style:paragraph-properties/>
    </style:style>
    <style:style style:parent-style-name="1001" style:display-name="T25" style:family="text" style:name="1112">
      <style:paragraph-properties/>
    </style:style>
    <style:style style:parent-style-name="1001" style:display-name="T26" style:family="text" style:name="1113">
      <style:paragraph-properties/>
    </style:style>
    <style:style style:parent-style-name="1001" style:display-name="T27" style:family="text" style:name="1114">
      <style:paragraph-properties/>
    </style:style>
    <style:style style:parent-style-name="1001" style:display-name="T28" style:family="text" style:name="1115">
      <style:paragraph-properties/>
    </style:style>
    <style:style style:parent-style-name="1001" style:display-name="T29" style:family="text" style:name="1116">
      <style:paragraph-properties/>
    </style:style>
    <style:style style:parent-style-name="1001" style:display-name="T30" style:family="text" style:name="1117">
      <style:paragraph-properties/>
    </style:style>
    <style:style style:parent-style-name="1001" style:display-name="T31" style:family="text" style:name="1118">
      <style:paragraph-properties/>
    </style:style>
    <style:style style:parent-style-name="1001" style:display-name="T32" style:family="text" style:name="1119">
      <style:paragraph-properties/>
    </style:style>
    <style:style style:parent-style-name="1001" style:display-name="T33" style:family="text" style:name="1120">
      <style:paragraph-properties/>
    </style:style>
    <style:style style:parent-style-name="1001" style:display-name="T34" style:family="text" style:name="1121">
      <style:paragraph-properties/>
    </style:style>
    <style:style style:parent-style-name="1001" style:display-name="T35" style:family="text" style:name="1122">
      <style:paragraph-properties/>
    </style:style>
    <style:style style:parent-style-name="1001" style:display-name="T36" style:family="text" style:name="1123">
      <style:paragraph-properties/>
    </style:style>
    <style:style style:parent-style-name="1001" style:display-name="T37" style:family="text" style:name="1124">
      <style:paragraph-properties/>
    </style:style>
    <style:style style:parent-style-name="1001" style:display-name="T38" style:family="text" style:name="1125">
      <style:paragraph-properties/>
    </style:style>
    <style:style style:parent-style-name="1001" style:display-name="T39" style:family="text" style:name="1126">
      <style:paragraph-properties/>
    </style:style>
    <style:style style:parent-style-name="1001" style:display-name="T40" style:family="text" style:name="1127">
      <style:paragraph-properties/>
    </style:style>
    <style:style style:parent-style-name="1001" style:display-name="T41" style:family="text" style:name="1128">
      <style:paragraph-properties/>
    </style:style>
    <style:style style:parent-style-name="1001" style:display-name="T42" style:family="text" style:name="1129">
      <style:paragraph-properties/>
    </style:style>
    <style:style style:parent-style-name="1001" style:display-name="T43" style:family="text" style:name="1130">
      <style:paragraph-properties/>
    </style:style>
    <style:style style:parent-style-name="1001" style:display-name="T44" style:family="text" style:name="1131">
      <style:paragraph-properties/>
    </style:style>
    <style:style style:parent-style-name="1001" style:display-name="T45" style:family="text" style:name="1132">
      <style:paragraph-properties/>
    </style:style>
    <style:style style:parent-style-name="1001" style:display-name="T46" style:family="text" style:name="1133">
      <style:paragraph-properties/>
    </style:style>
    <style:style style:parent-style-name="1001" style:display-name="T47" style:family="text" style:name="1134">
      <style:paragraph-properties/>
    </style:style>
    <style:style style:parent-style-name="1001" style:display-name="T48" style:family="text" style:name="1135">
      <style:paragraph-properties/>
    </style:style>
    <style:style style:parent-style-name="1001" style:display-name="T49" style:family="text" style:name="1136">
      <style:paragraph-properties/>
    </style:style>
    <style:style style:parent-style-name="1001" style:display-name="T50" style:family="text" style:name="1137">
      <style:paragraph-properties/>
    </style:style>
    <style:style style:parent-style-name="1001" style:display-name="T51" style:family="text" style:name="1138">
      <style:paragraph-properties/>
    </style:style>
    <style:style style:parent-style-name="1001" style:display-name="T52" style:family="text" style:name="1139">
      <style:paragraph-properties/>
    </style:style>
    <style:style style:parent-style-name="1001" style:display-name="T53" style:family="text" style:name="1140">
      <style:paragraph-properties/>
    </style:style>
    <style:style style:parent-style-name="1001" style:display-name="T54" style:family="text" style:name="1141">
      <style:paragraph-properties/>
    </style:style>
    <style:style style:parent-style-name="1001" style:display-name="T55" style:family="text" style:name="1142">
      <style:paragraph-properties/>
    </style:style>
    <style:style style:parent-style-name="1001" style:display-name="T56" style:family="text" style:name="1143">
      <style:paragraph-properties/>
    </style:style>
    <style:style style:parent-style-name="1001" style:display-name="T57" style:family="text" style:name="1144">
      <style:paragraph-properties/>
    </style:style>
    <style:style style:parent-style-name="1001" style:display-name="T58" style:family="text" style:name="1145">
      <style:paragraph-properties/>
    </style:style>
    <style:style style:parent-style-name="1001" style:display-name="T59" style:family="text" style:name="1146">
      <style:paragraph-properties/>
    </style:style>
    <style:style style:parent-style-name="1001" style:display-name="T60" style:family="text" style:name="1147">
      <style:paragraph-properties/>
    </style:style>
    <style:style style:parent-style-name="1001" style:display-name="T61" style:family="text" style:name="1148">
      <style:paragraph-properties/>
    </style:style>
    <style:style style:parent-style-name="1001" style:display-name="T62" style:family="text" style:name="1149">
      <style:paragraph-properties/>
    </style:style>
    <style:style style:parent-style-name="1001" style:display-name="T63" style:family="text" style:name="1150">
      <style:paragraph-properties/>
    </style:style>
    <style:style style:parent-style-name="1001" style:display-name="T1" style:family="text" style:name="1151">
      <style:paragraph-properties/>
    </style:style>
    <style:style style:parent-style-name="1001" style:display-name="T2" style:family="text" style:name="1152">
      <style:paragraph-properties/>
    </style:style>
    <style:style style:parent-style-name="1001" style:display-name="T3" style:family="text" style:name="1153">
      <style:paragraph-properties/>
    </style:style>
    <style:style style:parent-style-name="1001" style:display-name="T4" style:family="text" style:name="1154">
      <style:paragraph-properties/>
    </style:style>
    <style:style style:parent-style-name="1001" style:display-name="T5" style:family="text" style:name="1155">
      <style:paragraph-properties/>
    </style:style>
    <style:style style:parent-style-name="1001" style:display-name="T6" style:family="text" style:name="1156">
      <style:paragraph-properties/>
    </style:style>
    <style:style style:parent-style-name="1001" style:display-name="T7" style:family="text" style:name="1157">
      <style:paragraph-properties/>
    </style:style>
    <style:style style:parent-style-name="1001" style:display-name="T8" style:family="text" style:name="1158">
      <style:paragraph-properties/>
    </style:style>
    <style:style style:parent-style-name="1001" style:display-name="T9" style:family="text" style:name="1159">
      <style:paragraph-properties/>
    </style:style>
    <style:style style:parent-style-name="1001" style:display-name="T10" style:family="text" style:name="1160">
      <style:paragraph-properties/>
    </style:style>
    <style:style style:parent-style-name="1001" style:display-name="T11" style:family="text" style:name="1161">
      <style:paragraph-properties/>
    </style:style>
    <style:style style:parent-style-name="1001" style:display-name="T12" style:family="text" style:name="1162">
      <style:paragraph-properties/>
    </style:style>
    <style:style style:parent-style-name="1001" style:display-name="T13" style:family="text" style:name="1163">
      <style:paragraph-properties/>
    </style:style>
    <style:style style:parent-style-name="1001" style:display-name="T14" style:family="text" style:name="1164">
      <style:paragraph-properties/>
    </style:style>
    <style:style style:parent-style-name="1001" style:display-name="T15" style:family="text" style:name="1165">
      <style:paragraph-properties/>
    </style:style>
    <style:style style:parent-style-name="1001" style:display-name="T16" style:family="text" style:name="1166">
      <style:paragraph-properties/>
    </style:style>
    <style:style style:parent-style-name="1001" style:display-name="T17" style:family="text" style:name="1167">
      <style:paragraph-properties/>
    </style:style>
    <style:style style:parent-style-name="1001" style:display-name="T18" style:family="text" style:name="1168">
      <style:paragraph-properties/>
    </style:style>
    <style:style style:parent-style-name="1001" style:display-name="T19" style:family="text" style:name="1169">
      <style:paragraph-properties/>
    </style:style>
    <style:style style:parent-style-name="1001" style:display-name="T20" style:family="text" style:name="1170">
      <style:paragraph-properties/>
    </style:style>
    <style:style style:parent-style-name="1001" style:display-name="T21" style:family="text" style:name="1171">
      <style:paragraph-properties/>
    </style:style>
    <style:style style:parent-style-name="1001" style:display-name="T22" style:family="text" style:name="1172">
      <style:paragraph-properties/>
    </style:style>
    <style:style style:parent-style-name="1001" style:display-name="T23" style:family="text" style:name="1173">
      <style:paragraph-properties/>
    </style:style>
    <style:style style:parent-style-name="1001" style:display-name="T24" style:family="text" style:name="1174">
      <style:paragraph-properties/>
    </style:style>
    <style:style style:parent-style-name="1001" style:display-name="T25" style:family="text" style:name="1175">
      <style:paragraph-properties/>
    </style:style>
    <style:style style:parent-style-name="1001" style:display-name="T26" style:family="text" style:name="1176">
      <style:paragraph-properties/>
    </style:style>
    <style:style style:parent-style-name="1001" style:display-name="T27" style:family="text" style:name="1177">
      <style:paragraph-properties/>
    </style:style>
    <style:style style:parent-style-name="1001" style:display-name="T28" style:family="text" style:name="1178">
      <style:paragraph-properties/>
    </style:style>
    <style:style style:parent-style-name="1001" style:display-name="T29" style:family="text" style:name="1179">
      <style:paragraph-properties/>
    </style:style>
    <style:style style:parent-style-name="1001" style:display-name="T30" style:family="text" style:name="1180">
      <style:paragraph-properties/>
    </style:style>
    <style:style style:parent-style-name="1001" style:display-name="T31" style:family="text" style:name="1181">
      <style:paragraph-properties/>
    </style:style>
    <style:style style:parent-style-name="1001" style:display-name="T32" style:family="text" style:name="1182">
      <style:paragraph-properties/>
    </style:style>
    <style:style style:parent-style-name="1001" style:display-name="T33" style:family="text" style:name="1183">
      <style:paragraph-properties/>
    </style:style>
    <style:style style:parent-style-name="1001" style:display-name="T34" style:family="text" style:name="1184">
      <style:paragraph-properties/>
    </style:style>
    <style:style style:parent-style-name="1001" style:display-name="T35" style:family="text" style:name="1185">
      <style:paragraph-properties/>
    </style:style>
    <style:style style:parent-style-name="1001" style:display-name="T36" style:family="text" style:name="1186">
      <style:paragraph-properties/>
    </style:style>
    <style:style style:parent-style-name="1001" style:display-name="T37" style:family="text" style:name="1187">
      <style:paragraph-properties/>
    </style:style>
    <style:style style:parent-style-name="1001" style:display-name="T38" style:family="text" style:name="1188">
      <style:paragraph-properties/>
    </style:style>
    <style:style style:parent-style-name="1001" style:display-name="T39" style:family="text" style:name="1189">
      <style:paragraph-properties/>
    </style:style>
    <style:style style:parent-style-name="1001" style:display-name="T40" style:family="text" style:name="1190">
      <style:paragraph-properties/>
    </style:style>
    <style:style style:parent-style-name="1001" style:display-name="T41" style:family="text" style:name="1191">
      <style:paragraph-properties/>
    </style:style>
    <style:style style:parent-style-name="1001" style:display-name="T42" style:family="text" style:name="1192">
      <style:paragraph-properties/>
    </style:style>
    <style:style style:parent-style-name="1001" style:display-name="T43" style:family="text" style:name="1193">
      <style:paragraph-properties/>
    </style:style>
    <style:style style:parent-style-name="1001" style:display-name="T44" style:family="text" style:name="1194">
      <style:paragraph-properties/>
    </style:style>
    <style:style style:parent-style-name="1001" style:display-name="T45" style:family="text" style:name="1195">
      <style:paragraph-properties/>
    </style:style>
    <style:style style:parent-style-name="1001" style:display-name="T46" style:family="text" style:name="1196">
      <style:paragraph-properties/>
    </style:style>
    <style:style style:parent-style-name="1001" style:display-name="T47" style:family="text" style:name="1197">
      <style:paragraph-properties/>
    </style:style>
    <style:style style:parent-style-name="1001" style:display-name="T48" style:family="text" style:name="1198">
      <style:paragraph-properties/>
    </style:style>
    <style:style style:parent-style-name="1001" style:display-name="T49" style:family="text" style:name="1199">
      <style:paragraph-properties/>
    </style:style>
    <style:style style:parent-style-name="1001" style:display-name="T50" style:family="text" style:name="1200">
      <style:paragraph-properties/>
    </style:style>
    <style:style style:parent-style-name="1001" style:display-name="T51" style:family="text" style:name="1201">
      <style:paragraph-properties/>
    </style:style>
    <style:style style:parent-style-name="1001" style:display-name="T52" style:family="text" style:name="1202">
      <style:paragraph-properties/>
    </style:style>
    <style:style style:parent-style-name="1001" style:display-name="T53" style:family="text" style:name="1203">
      <style:paragraph-properties/>
    </style:style>
    <style:style style:parent-style-name="1001" style:display-name="T54" style:family="text" style:name="1204">
      <style:paragraph-properties/>
    </style:style>
    <style:style style:parent-style-name="1001" style:display-name="T55" style:family="text" style:name="1205">
      <style:paragraph-properties/>
    </style:style>
    <style:style style:parent-style-name="1001" style:display-name="T56" style:family="text" style:name="1206">
      <style:paragraph-properties/>
    </style:style>
    <style:style style:parent-style-name="1001" style:display-name="T57" style:family="text" style:name="1207">
      <style:paragraph-properties/>
    </style:style>
    <style:style style:parent-style-name="1001" style:display-name="T58" style:family="text" style:name="1208">
      <style:paragraph-properties/>
    </style:style>
    <style:style style:parent-style-name="1001" style:display-name="T59" style:family="text" style:name="1209">
      <style:paragraph-properties/>
    </style:style>
    <style:style style:parent-style-name="1001" style:display-name="T60" style:family="text" style:name="1210">
      <style:paragraph-properties/>
    </style:style>
    <style:style style:parent-style-name="1001" style:display-name="T61" style:family="text" style:name="1211">
      <style:paragraph-properties/>
    </style:style>
    <style:style style:parent-style-name="1001" style:display-name="T62" style:family="text" style:name="1212">
      <style:paragraph-properties/>
    </style:style>
    <style:style style:parent-style-name="1001" style:display-name="T63" style:family="text" style:name="1213">
      <style:paragraph-properties/>
    </style:style>
    <style:style style:parent-style-name="1001" style:display-name="T64" style:family="text" style:name="1214">
      <style:paragraph-properties/>
    </style:style>
    <style:style style:parent-style-name="1001" style:display-name="T65" style:family="text" style:name="1215">
      <style:paragraph-properties/>
    </style:style>
    <style:style style:parent-style-name="1001" style:display-name="T66" style:family="text" style:name="1216">
      <style:paragraph-properties/>
    </style:style>
    <style:style style:parent-style-name="1001" style:display-name="T67" style:family="text" style:name="1217">
      <style:paragraph-properties/>
    </style:style>
    <style:style style:parent-style-name="1001" style:display-name="T68" style:family="text" style:name="1218">
      <style:paragraph-properties/>
    </style:style>
    <style:style style:parent-style-name="1001" style:display-name="T69" style:family="text" style:name="1219">
      <style:paragraph-properties/>
    </style:style>
    <style:style style:parent-style-name="1001" style:display-name="T70" style:family="text" style:name="1220">
      <style:paragraph-properties/>
    </style:style>
    <style:style style:parent-style-name="1001" style:display-name="T71" style:family="text" style:name="1221">
      <style:paragraph-properties/>
    </style:style>
    <style:style style:parent-style-name="1001" style:display-name="T72" style:family="text" style:name="1222">
      <style:paragraph-properties/>
    </style:style>
    <style:style style:parent-style-name="1001" style:display-name="T73" style:family="text" style:name="1223">
      <style:paragraph-properties/>
    </style:style>
    <style:style style:parent-style-name="1001" style:display-name="T74" style:family="text" style:name="1224">
      <style:paragraph-properties/>
    </style:style>
    <style:style style:parent-style-name="1001" style:display-name="T75" style:family="text" style:name="1225">
      <style:paragraph-properties/>
    </style:style>
    <style:style style:parent-style-name="1001" style:display-name="T76" style:family="text" style:name="1226">
      <style:paragraph-properties/>
    </style:style>
    <style:style style:parent-style-name="1001" style:display-name="T77" style:family="text" style:name="1227">
      <style:paragraph-properties/>
    </style:style>
    <style:style style:parent-style-name="1001" style:display-name="T78" style:family="text" style:name="1228">
      <style:paragraph-properties/>
    </style:style>
    <style:style style:parent-style-name="1001" style:display-name="T79" style:family="text" style:name="1229">
      <style:paragraph-properties/>
    </style:style>
    <style:style style:parent-style-name="1001" style:display-name="T80" style:family="text" style:name="1230">
      <style:paragraph-properties/>
    </style:style>
    <style:style style:parent-style-name="1001" style:display-name="T81" style:family="text" style:name="1231">
      <style:paragraph-properties/>
    </style:style>
    <style:style style:parent-style-name="1001" style:display-name="T82" style:family="text" style:name="1232">
      <style:paragraph-properties/>
    </style:style>
    <style:style style:parent-style-name="1001" style:display-name="T83" style:family="text" style:name="1233">
      <style:paragraph-properties/>
    </style:style>
    <style:style style:parent-style-name="1001" style:display-name="T84" style:family="text" style:name="1234">
      <style:paragraph-properties/>
    </style:style>
    <style:style style:parent-style-name="1001" style:display-name="T85" style:family="text" style:name="1235">
      <style:paragraph-properties/>
    </style:style>
    <style:style style:parent-style-name="1001" style:display-name="T86" style:family="text" style:name="1236">
      <style:paragraph-properties/>
    </style:style>
    <style:style style:parent-style-name="1001" style:display-name="T87" style:family="text" style:name="1237">
      <style:paragraph-properties/>
    </style:style>
    <style:style style:parent-style-name="1001" style:display-name="T88" style:family="text" style:name="1238">
      <style:paragraph-properties/>
    </style:style>
    <style:style style:parent-style-name="1001" style:display-name="T89" style:family="text" style:name="1239">
      <style:paragraph-properties/>
    </style:style>
    <style:style style:parent-style-name="1001" style:display-name="T90" style:family="text" style:name="1240">
      <style:paragraph-properties/>
    </style:style>
    <style:style style:parent-style-name="1001" style:display-name="T91" style:family="text" style:name="1241">
      <style:paragraph-properties/>
    </style:style>
    <style:style style:parent-style-name="1001" style:display-name="T92" style:family="text" style:name="1242">
      <style:paragraph-properties/>
    </style:style>
    <style:style style:parent-style-name="1001" style:display-name="T93" style:family="text" style:name="1243">
      <style:paragraph-properties/>
    </style:style>
    <style:style style:parent-style-name="1001" style:display-name="T94" style:family="text" style:name="1244">
      <style:paragraph-properties/>
    </style:style>
    <style:style style:parent-style-name="1001" style:display-name="T95" style:family="text" style:name="1245">
      <style:paragraph-properties/>
    </style:style>
    <style:style style:parent-style-name="1001" style:display-name="T96" style:family="text" style:name="1246">
      <style:paragraph-properties/>
    </style:style>
    <style:style style:parent-style-name="1001" style:display-name="T97" style:family="text" style:name="1247">
      <style:paragraph-properties/>
    </style:style>
    <style:style style:parent-style-name="1001" style:display-name="T98" style:family="text" style:name="1248">
      <style:paragraph-properties/>
    </style:style>
    <style:style style:parent-style-name="1001" style:display-name="T99" style:family="text" style:name="1249">
      <style:paragraph-properties/>
    </style:style>
    <style:style style:parent-style-name="1001" style:display-name="T100" style:family="text" style:name="1250">
      <style:paragraph-properties/>
    </style:style>
    <style:style style:parent-style-name="1001" style:display-name="T101" style:family="text" style:name="1251">
      <style:paragraph-properties/>
    </style:style>
    <style:style style:parent-style-name="1001" style:display-name="T102" style:family="text" style:name="1252">
      <style:paragraph-properties/>
    </style:style>
    <style:style style:parent-style-name="1001" style:display-name="T103" style:family="text" style:name="1253">
      <style:paragraph-properties/>
    </style:style>
    <style:style style:parent-style-name="1001" style:display-name="T104" style:family="text" style:name="1254">
      <style:paragraph-properties/>
    </style:style>
    <style:style style:parent-style-name="1001" style:display-name="T105" style:family="text" style:name="1255">
      <style:paragraph-properties/>
    </style:style>
    <style:style style:parent-style-name="1001" style:display-name="T106" style:family="text" style:name="1256">
      <style:paragraph-properties/>
    </style:style>
    <style:style style:parent-style-name="1001" style:display-name="T107" style:family="text" style:name="1257">
      <style:paragraph-properties/>
    </style:style>
    <style:style style:parent-style-name="1001" style:display-name="T108" style:family="text" style:name="1258">
      <style:paragraph-properties/>
    </style:style>
    <style:style style:parent-style-name="1001" style:display-name="T109" style:family="text" style:name="1259">
      <style:paragraph-properties/>
    </style:style>
    <style:style style:parent-style-name="1001" style:display-name="T110" style:family="text" style:name="1260">
      <style:paragraph-properties/>
    </style:style>
    <style:style style:parent-style-name="1001" style:display-name="T111" style:family="text" style:name="1261">
      <style:paragraph-properties/>
    </style:style>
    <style:style style:parent-style-name="1001" style:display-name="T112" style:family="text" style:name="1262">
      <style:paragraph-properties/>
    </style:style>
    <style:style style:parent-style-name="1001" style:display-name="T113" style:family="text" style:name="1263">
      <style:paragraph-properties/>
    </style:style>
    <style:style style:parent-style-name="1001" style:display-name="T114" style:family="text" style:name="1264">
      <style:paragraph-properties/>
    </style:style>
    <style:style style:parent-style-name="1001" style:display-name="T115" style:family="text" style:name="1265">
      <style:paragraph-properties/>
    </style:style>
    <style:style style:parent-style-name="1001" style:display-name="T116" style:family="text" style:name="1266">
      <style:paragraph-properties/>
    </style:style>
    <style:style style:parent-style-name="1001" style:display-name="T117" style:family="text" style:name="1267">
      <style:paragraph-properties/>
    </style:style>
    <style:style style:parent-style-name="1001" style:display-name="T1" style:family="text" style:name="1268">
      <style:paragraph-properties/>
    </style:style>
    <style:style style:parent-style-name="1001" style:display-name="T2" style:family="text" style:name="1269">
      <style:paragraph-properties/>
    </style:style>
    <style:style style:parent-style-name="1001" style:display-name="T3" style:family="text" style:name="1270">
      <style:paragraph-properties/>
    </style:style>
    <style:style style:parent-style-name="1001" style:display-name="T4" style:family="text" style:name="1271">
      <style:paragraph-properties/>
    </style:style>
    <style:style style:parent-style-name="1001" style:display-name="T5" style:family="text" style:name="1272">
      <style:paragraph-properties/>
    </style:style>
    <style:style style:parent-style-name="1001" style:display-name="T6" style:family="text" style:name="1273">
      <style:paragraph-properties/>
    </style:style>
    <style:style style:parent-style-name="1001" style:display-name="T7" style:family="text" style:name="1274">
      <style:paragraph-properties/>
    </style:style>
    <style:style style:parent-style-name="1001" style:display-name="T8" style:family="text" style:name="1275">
      <style:paragraph-properties/>
    </style:style>
    <style:style style:parent-style-name="1001" style:display-name="T9" style:family="text" style:name="1276">
      <style:paragraph-properties/>
    </style:style>
    <style:style style:parent-style-name="1001" style:display-name="T10" style:family="text" style:name="1277">
      <style:paragraph-properties/>
    </style:style>
    <style:style style:parent-style-name="1001" style:display-name="T11" style:family="text" style:name="1278">
      <style:paragraph-properties/>
    </style:style>
    <style:style style:parent-style-name="1001" style:display-name="T12" style:family="text" style:name="1279">
      <style:paragraph-properties/>
    </style:style>
    <style:style style:parent-style-name="1001" style:display-name="T13" style:family="text" style:name="1280">
      <style:paragraph-properties/>
    </style:style>
    <style:style style:parent-style-name="1001" style:display-name="T14" style:family="text" style:name="1281">
      <style:paragraph-properties/>
    </style:style>
    <style:style style:parent-style-name="1001" style:display-name="T15" style:family="text" style:name="1282">
      <style:paragraph-properties/>
    </style:style>
    <style:style style:parent-style-name="1001" style:display-name="T16" style:family="text" style:name="1283">
      <style:paragraph-properties/>
    </style:style>
    <style:style style:parent-style-name="1001" style:display-name="T17" style:family="text" style:name="1284">
      <style:paragraph-properties/>
    </style:style>
    <style:style style:parent-style-name="1001" style:display-name="T18" style:family="text" style:name="1285">
      <style:paragraph-properties/>
    </style:style>
    <style:style style:parent-style-name="1001" style:display-name="T19" style:family="text" style:name="1286">
      <style:paragraph-properties/>
    </style:style>
    <style:style style:parent-style-name="1001" style:display-name="T20" style:family="text" style:name="1287">
      <style:paragraph-properties/>
    </style:style>
    <style:style style:parent-style-name="1001" style:display-name="T21" style:family="text" style:name="1288">
      <style:paragraph-properties/>
    </style:style>
    <style:style style:parent-style-name="1001" style:display-name="T22" style:family="text" style:name="1289">
      <style:paragraph-properties/>
    </style:style>
    <style:style style:parent-style-name="1001" style:display-name="T23" style:family="text" style:name="1290">
      <style:paragraph-properties/>
    </style:style>
    <style:style style:parent-style-name="1001" style:display-name="T24" style:family="text" style:name="1291">
      <style:paragraph-properties/>
    </style:style>
    <style:style style:parent-style-name="1001" style:display-name="T25" style:family="text" style:name="1292">
      <style:paragraph-properties/>
    </style:style>
    <style:style style:parent-style-name="1001" style:display-name="T26" style:family="text" style:name="1293">
      <style:paragraph-properties/>
    </style:style>
    <style:style style:parent-style-name="1001" style:display-name="T27" style:family="text" style:name="1294">
      <style:paragraph-properties/>
    </style:style>
    <style:style style:parent-style-name="1001" style:display-name="T28" style:family="text" style:name="1295">
      <style:paragraph-properties/>
    </style:style>
    <style:style style:parent-style-name="1001" style:display-name="T29" style:family="text" style:name="1296">
      <style:paragraph-properties/>
    </style:style>
    <style:style style:parent-style-name="1001" style:display-name="T30" style:family="text" style:name="1297">
      <style:paragraph-properties/>
    </style:style>
    <style:style style:parent-style-name="1001" style:display-name="T31" style:family="text" style:name="1298">
      <style:paragraph-properties/>
    </style:style>
    <style:style style:parent-style-name="1001" style:display-name="T32" style:family="text" style:name="1299">
      <style:paragraph-properties/>
    </style:style>
    <style:style style:parent-style-name="1001" style:display-name="T33" style:family="text" style:name="1300">
      <style:paragraph-properties/>
    </style:style>
    <style:style style:parent-style-name="1001" style:display-name="T34" style:family="text" style:name="1301">
      <style:paragraph-properties/>
    </style:style>
    <style:style style:parent-style-name="1001" style:display-name="T35" style:family="text" style:name="1302">
      <style:paragraph-properties/>
    </style:style>
    <style:style style:parent-style-name="1001" style:display-name="T36" style:family="text" style:name="1303">
      <style:paragraph-properties/>
    </style:style>
    <style:style style:parent-style-name="1001" style:display-name="T37" style:family="text" style:name="1304">
      <style:paragraph-properties/>
    </style:style>
    <style:style style:parent-style-name="1001" style:display-name="T38" style:family="text" style:name="1305">
      <style:paragraph-properties/>
    </style:style>
    <style:style style:parent-style-name="1001" style:display-name="T39" style:family="text" style:name="1306">
      <style:paragraph-properties/>
    </style:style>
    <style:style style:parent-style-name="1001" style:display-name="T40" style:family="text" style:name="1307">
      <style:paragraph-properties/>
    </style:style>
    <style:style style:parent-style-name="1001" style:display-name="T41" style:family="text" style:name="1308">
      <style:paragraph-properties/>
    </style:style>
    <style:style style:parent-style-name="1001" style:display-name="T42" style:family="text" style:name="1309">
      <style:paragraph-properties/>
    </style:style>
    <style:style style:parent-style-name="1001" style:display-name="T43" style:family="text" style:name="1310">
      <style:paragraph-properties/>
    </style:style>
    <style:style style:parent-style-name="1001" style:display-name="T44" style:family="text" style:name="1311">
      <style:paragraph-properties/>
    </style:style>
    <style:style style:parent-style-name="1001" style:display-name="T45" style:family="text" style:name="1312">
      <style:paragraph-properties/>
    </style:style>
    <style:style style:parent-style-name="1001" style:display-name="T46" style:family="text" style:name="1313">
      <style:paragraph-properties/>
    </style:style>
    <style:style style:parent-style-name="1001" style:display-name="T47" style:family="text" style:name="1314">
      <style:paragraph-properties/>
    </style:style>
    <style:style style:parent-style-name="1001" style:display-name="T48" style:family="text" style:name="1315">
      <style:paragraph-properties/>
    </style:style>
    <style:style style:parent-style-name="1001" style:display-name="T49" style:family="text" style:name="1316">
      <style:paragraph-properties/>
    </style:style>
    <style:style style:parent-style-name="1001" style:display-name="T50" style:family="text" style:name="1317">
      <style:paragraph-properties/>
    </style:style>
    <style:style style:parent-style-name="1001" style:display-name="T51" style:family="text" style:name="1318">
      <style:paragraph-properties/>
    </style:style>
    <style:style style:parent-style-name="1001" style:display-name="T52" style:family="text" style:name="1319">
      <style:paragraph-properties/>
    </style:style>
    <style:style style:parent-style-name="1001" style:display-name="T53" style:family="text" style:name="1320">
      <style:paragraph-properties/>
    </style:style>
    <style:style style:parent-style-name="1001" style:display-name="T54" style:family="text" style:name="1321">
      <style:paragraph-properties/>
    </style:style>
    <style:style style:parent-style-name="1001" style:display-name="T55" style:family="text" style:name="1322">
      <style:paragraph-properties/>
    </style:style>
    <style:style style:parent-style-name="1001" style:display-name="T56" style:family="text" style:name="1323">
      <style:paragraph-properties/>
    </style:style>
    <style:style style:parent-style-name="1001" style:display-name="T57" style:family="text" style:name="1324">
      <style:paragraph-properties/>
    </style:style>
    <style:style style:parent-style-name="1001" style:display-name="T58" style:family="text" style:name="1325">
      <style:paragraph-properties/>
    </style:style>
    <style:style style:parent-style-name="1001" style:display-name="T59" style:family="text" style:name="1326">
      <style:paragraph-properties/>
    </style:style>
    <style:style style:parent-style-name="1001" style:display-name="T60" style:family="text" style:name="1327">
      <style:paragraph-properties/>
    </style:style>
    <style:style style:parent-style-name="1001" style:display-name="T61" style:family="text" style:name="1328">
      <style:paragraph-properties/>
    </style:style>
    <style:style style:parent-style-name="1001" style:display-name="T62" style:family="text" style:name="1329">
      <style:paragraph-properties/>
    </style:style>
    <style:style style:parent-style-name="1001" style:display-name="T63" style:family="text" style:name="1330">
      <style:paragraph-properties/>
    </style:style>
    <style:style style:parent-style-name="1001" style:display-name="T64" style:family="text" style:name="1331">
      <style:paragraph-properties/>
    </style:style>
    <style:style style:parent-style-name="1001" style:display-name="T65" style:family="text" style:name="1332">
      <style:paragraph-properties/>
    </style:style>
    <style:style style:parent-style-name="1001" style:display-name="T66" style:family="text" style:name="1333">
      <style:paragraph-properties/>
    </style:style>
    <style:style style:parent-style-name="1001" style:display-name="T67" style:family="text" style:name="1334">
      <style:paragraph-properties/>
    </style:style>
    <style:style style:parent-style-name="1001" style:display-name="T68" style:family="text" style:name="1335">
      <style:paragraph-properties/>
    </style:style>
    <style:style style:parent-style-name="1001" style:display-name="T69" style:family="text" style:name="1336">
      <style:paragraph-properties/>
    </style:style>
    <style:style style:parent-style-name="1001" style:display-name="T70" style:family="text" style:name="1337">
      <style:paragraph-properties/>
    </style:style>
    <style:style style:parent-style-name="1001" style:display-name="T71" style:family="text" style:name="1338">
      <style:paragraph-properties/>
    </style:style>
    <style:style style:parent-style-name="1001" style:display-name="T72" style:family="text" style:name="1339">
      <style:paragraph-properties/>
    </style:style>
    <style:style style:parent-style-name="1001" style:display-name="T73" style:family="text" style:name="1340">
      <style:paragraph-properties/>
    </style:style>
    <style:style style:parent-style-name="1001" style:display-name="T74" style:family="text" style:name="1341">
      <style:paragraph-properties/>
    </style:style>
    <style:style style:parent-style-name="1001" style:display-name="T75" style:family="text" style:name="1342">
      <style:paragraph-properties/>
    </style:style>
    <style:style style:parent-style-name="1001" style:display-name="T76" style:family="text" style:name="1343">
      <style:paragraph-properties/>
    </style:style>
    <style:style style:parent-style-name="1001" style:display-name="T77" style:family="text" style:name="1344">
      <style:paragraph-properties/>
    </style:style>
    <style:style style:parent-style-name="1001" style:display-name="T78" style:family="text" style:name="1345">
      <style:paragraph-properties/>
    </style:style>
    <style:style style:parent-style-name="1001" style:display-name="T79" style:family="text" style:name="1346">
      <style:paragraph-properties/>
    </style:style>
    <style:style style:parent-style-name="1001" style:display-name="T80" style:family="text" style:name="1347">
      <style:paragraph-properties/>
    </style:style>
    <style:style style:parent-style-name="1001" style:display-name="T81" style:family="text" style:name="1348">
      <style:paragraph-properties/>
    </style:style>
    <style:style style:parent-style-name="1001" style:display-name="T82" style:family="text" style:name="1349">
      <style:paragraph-properties/>
    </style:style>
    <style:style style:parent-style-name="1001" style:display-name="T83" style:family="text" style:name="1350">
      <style:paragraph-properties/>
    </style:style>
    <style:style style:parent-style-name="1001" style:display-name="T84" style:family="text" style:name="1351">
      <style:paragraph-properties/>
    </style:style>
    <style:style style:parent-style-name="1001" style:display-name="T85" style:family="text" style:name="1352">
      <style:paragraph-properties/>
    </style:style>
    <style:style style:parent-style-name="1001" style:display-name="T86" style:family="text" style:name="1353">
      <style:paragraph-properties/>
    </style:style>
    <style:style style:parent-style-name="1001" style:display-name="T87" style:family="text" style:name="1354">
      <style:paragraph-properties/>
    </style:style>
    <style:style style:parent-style-name="1001" style:display-name="T88" style:family="text" style:name="1355">
      <style:paragraph-properties/>
    </style:style>
    <style:style style:parent-style-name="1001" style:display-name="T89" style:family="text" style:name="1356">
      <style:paragraph-properties/>
    </style:style>
    <style:style style:parent-style-name="1001" style:display-name="T90" style:family="text" style:name="1357">
      <style:paragraph-properties/>
    </style:style>
    <style:style style:parent-style-name="1001" style:display-name="T91" style:family="text" style:name="1358">
      <style:paragraph-properties/>
    </style:style>
    <style:style style:parent-style-name="1001" style:display-name="T92" style:family="text" style:name="1359">
      <style:paragraph-properties/>
    </style:style>
    <style:style style:parent-style-name="1001" style:display-name="T93" style:family="text" style:name="1360">
      <style:paragraph-properties/>
    </style:style>
    <style:style style:parent-style-name="1001" style:display-name="T94" style:family="text" style:name="1361">
      <style:paragraph-properties/>
    </style:style>
    <style:style style:parent-style-name="1001" style:display-name="T95" style:family="text" style:name="1362">
      <style:paragraph-properties/>
    </style:style>
    <style:style style:parent-style-name="1001" style:display-name="T96" style:family="text" style:name="1363">
      <style:paragraph-properties/>
    </style:style>
    <style:style style:parent-style-name="1001" style:display-name="T97" style:family="text" style:name="1364">
      <style:paragraph-properties/>
    </style:style>
    <style:style style:parent-style-name="1001" style:display-name="T98" style:family="text" style:name="1365">
      <style:paragraph-properties/>
    </style:style>
    <style:style style:parent-style-name="1001" style:display-name="T99" style:family="text" style:name="1366">
      <style:paragraph-properties/>
    </style:style>
    <style:style style:parent-style-name="1001" style:display-name="T100" style:family="text" style:name="1367">
      <style:paragraph-properties/>
    </style:style>
    <style:style style:parent-style-name="1001" style:display-name="T101" style:family="text" style:name="1368">
      <style:paragraph-properties/>
    </style:style>
    <style:style style:parent-style-name="1001" style:display-name="T102" style:family="text" style:name="1369">
      <style:paragraph-properties/>
    </style:style>
    <style:style style:parent-style-name="1001" style:display-name="T103" style:family="text" style:name="1370">
      <style:paragraph-properties/>
    </style:style>
    <style:style style:parent-style-name="1001" style:display-name="T104" style:family="text" style:name="1371">
      <style:paragraph-properties/>
    </style:style>
    <style:style style:parent-style-name="1001" style:display-name="T105" style:family="text" style:name="1372">
      <style:paragraph-properties/>
    </style:style>
    <style:style style:parent-style-name="1001" style:display-name="T106" style:family="text" style:name="1373">
      <style:paragraph-properties/>
    </style:style>
    <style:style style:parent-style-name="1001" style:display-name="T107" style:family="text" style:name="1374">
      <style:paragraph-properties/>
    </style:style>
    <style:style style:parent-style-name="1001" style:display-name="T108" style:family="text" style:name="1375">
      <style:paragraph-properties/>
    </style:style>
    <style:style style:parent-style-name="1001" style:display-name="T109" style:family="text" style:name="1376">
      <style:paragraph-properties/>
    </style:style>
    <style:style style:parent-style-name="1001" style:display-name="T110" style:family="text" style:name="1377">
      <style:paragraph-properties/>
    </style:style>
    <style:style style:parent-style-name="1001" style:display-name="T111" style:family="text" style:name="1378">
      <style:paragraph-properties/>
    </style:style>
    <style:style style:parent-style-name="1001" style:display-name="T112" style:family="text" style:name="1379">
      <style:paragraph-properties/>
    </style:style>
    <style:style style:parent-style-name="1001" style:display-name="T113" style:family="text" style:name="1380">
      <style:paragraph-properties/>
    </style:style>
    <style:style style:parent-style-name="1001" style:display-name="T114" style:family="text" style:name="1381">
      <style:paragraph-properties/>
    </style:style>
    <style:style style:parent-style-name="1001" style:display-name="T115" style:family="text" style:name="1382">
      <style:paragraph-properties/>
    </style:style>
    <style:style style:parent-style-name="1001" style:display-name="T116" style:family="text" style:name="1383">
      <style:paragraph-properties/>
    </style:style>
    <style:style style:parent-style-name="1001" style:display-name="T117" style:family="text" style:name="1384">
      <style:paragraph-properties/>
    </style:style>
    <style:style style:parent-style-name="1001" style:display-name="T118" style:family="text" style:name="1385">
      <style:paragraph-properties/>
    </style:style>
    <style:style style:parent-style-name="1001" style:display-name="T119" style:family="text" style:name="1386">
      <style:paragraph-properties/>
    </style:style>
    <style:style style:parent-style-name="1001" style:display-name="T120" style:family="text" style:name="1387">
      <style:paragraph-properties/>
    </style:style>
    <style:style style:parent-style-name="1001" style:display-name="T121" style:family="text" style:name="1388">
      <style:paragraph-properties/>
    </style:style>
    <style:style style:parent-style-name="1001" style:display-name="T122" style:family="text" style:name="1389">
      <style:paragraph-properties/>
    </style:style>
    <style:style style:parent-style-name="1001" style:display-name="T123" style:family="text" style:name="1390">
      <style:paragraph-properties/>
    </style:style>
    <style:style style:parent-style-name="1001" style:display-name="T124" style:family="text" style:name="1391">
      <style:paragraph-properties/>
    </style:style>
    <style:style style:parent-style-name="1001" style:display-name="T125" style:family="text" style:name="1392">
      <style:paragraph-properties/>
    </style:style>
    <style:style style:parent-style-name="1001" style:display-name="T126" style:family="text" style:name="1393">
      <style:paragraph-properties/>
    </style:style>
    <style:style style:parent-style-name="1001" style:display-name="T127" style:family="text" style:name="1394">
      <style:paragraph-properties/>
    </style:style>
    <style:style style:parent-style-name="1001" style:display-name="T128" style:family="text" style:name="1395">
      <style:paragraph-properties/>
    </style:style>
    <style:style style:parent-style-name="1001" style:display-name="T129" style:family="text" style:name="1396">
      <style:paragraph-properties/>
    </style:style>
    <style:style style:parent-style-name="1001" style:display-name="T130" style:family="text" style:name="1397">
      <style:paragraph-properties/>
    </style:style>
    <style:style style:parent-style-name="1001" style:display-name="T131" style:family="text" style:name="1398">
      <style:paragraph-properties/>
    </style:style>
    <style:style style:parent-style-name="1001" style:display-name="T132" style:family="text" style:name="1399">
      <style:paragraph-properties/>
    </style:style>
    <style:style style:parent-style-name="1001" style:display-name="T133" style:family="text" style:name="1400">
      <style:paragraph-properties/>
    </style:style>
    <style:style style:parent-style-name="1001" style:display-name="T134" style:family="text" style:name="1401">
      <style:paragraph-properties/>
    </style:style>
    <style:style style:parent-style-name="1001" style:display-name="T135" style:family="text" style:name="1402">
      <style:paragraph-properties/>
    </style:style>
    <style:style style:parent-style-name="1001" style:display-name="T136" style:family="text" style:name="1403">
      <style:paragraph-properties/>
    </style:style>
    <style:style style:parent-style-name="1001" style:display-name="T137" style:family="text" style:name="1404">
      <style:paragraph-properties/>
    </style:style>
    <style:style style:parent-style-name="1001" style:display-name="T138" style:family="text" style:name="1405">
      <style:paragraph-properties/>
    </style:style>
    <style:style style:parent-style-name="1001" style:display-name="T139" style:family="text" style:name="1406">
      <style:paragraph-properties/>
    </style:style>
    <style:style style:parent-style-name="1001" style:display-name="T140" style:family="text" style:name="1407">
      <style:paragraph-properties/>
    </style:style>
    <style:style style:parent-style-name="1001" style:display-name="T141" style:family="text" style:name="1408">
      <style:paragraph-properties/>
    </style:style>
    <style:style style:parent-style-name="1001" style:display-name="T142" style:family="text" style:name="1409">
      <style:paragraph-properties/>
    </style:style>
    <style:style style:parent-style-name="1001" style:display-name="T143" style:family="text" style:name="1410">
      <style:paragraph-properties/>
    </style:style>
    <style:style style:parent-style-name="1001" style:display-name="T144" style:family="text" style:name="1411">
      <style:paragraph-properties/>
    </style:style>
    <style:style style:parent-style-name="1001" style:display-name="T1" style:family="text" style:name="1412">
      <style:paragraph-properties/>
    </style:style>
    <style:style style:parent-style-name="1001" style:display-name="T2" style:family="text" style:name="1413">
      <style:paragraph-properties/>
    </style:style>
    <style:style style:parent-style-name="1001" style:display-name="T3" style:family="text" style:name="1414">
      <style:paragraph-properties/>
    </style:style>
    <style:style style:parent-style-name="1001" style:display-name="T4" style:family="text" style:name="1415">
      <style:paragraph-properties/>
    </style:style>
    <style:style style:parent-style-name="1001" style:display-name="T5" style:family="text" style:name="1416">
      <style:paragraph-properties/>
    </style:style>
    <style:style style:parent-style-name="1001" style:display-name="T6" style:family="text" style:name="1417">
      <style:paragraph-properties/>
    </style:style>
    <style:style style:parent-style-name="1001" style:display-name="T7" style:family="text" style:name="1418">
      <style:paragraph-properties/>
    </style:style>
    <style:style style:parent-style-name="1001" style:display-name="T8" style:family="text" style:name="1419">
      <style:paragraph-properties/>
    </style:style>
    <style:style style:parent-style-name="1001" style:display-name="T9" style:family="text" style:name="1420">
      <style:paragraph-properties/>
    </style:style>
    <style:style style:parent-style-name="1001" style:display-name="T10" style:family="text" style:name="1421">
      <style:paragraph-properties/>
    </style:style>
    <style:style style:parent-style-name="1001" style:display-name="T11" style:family="text" style:name="1422">
      <style:paragraph-properties/>
    </style:style>
    <style:style style:parent-style-name="1001" style:display-name="T12" style:family="text" style:name="1423">
      <style:paragraph-properties/>
    </style:style>
    <style:style style:parent-style-name="1001" style:display-name="T13" style:family="text" style:name="1424">
      <style:paragraph-properties/>
    </style:style>
    <style:style style:parent-style-name="1001" style:display-name="T14" style:family="text" style:name="1425">
      <style:paragraph-properties/>
    </style:style>
    <style:style style:parent-style-name="1001" style:display-name="T15" style:family="text" style:name="1426">
      <style:paragraph-properties/>
    </style:style>
    <style:style style:parent-style-name="1001" style:display-name="T16" style:family="text" style:name="1427">
      <style:paragraph-properties/>
    </style:style>
    <style:style style:parent-style-name="1001" style:display-name="T17" style:family="text" style:name="1428">
      <style:paragraph-properties/>
    </style:style>
    <style:style style:parent-style-name="1001" style:display-name="T18" style:family="text" style:name="1429">
      <style:paragraph-properties/>
    </style:style>
    <style:style style:parent-style-name="1001" style:display-name="T19" style:family="text" style:name="1430">
      <style:paragraph-properties/>
    </style:style>
    <style:style style:parent-style-name="1001" style:display-name="T20" style:family="text" style:name="1431">
      <style:paragraph-properties/>
    </style:style>
    <style:style style:parent-style-name="1001" style:display-name="T21" style:family="text" style:name="1432">
      <style:paragraph-properties/>
    </style:style>
    <style:style style:parent-style-name="1001" style:display-name="T22" style:family="text" style:name="1433">
      <style:paragraph-properties/>
    </style:style>
    <style:style style:parent-style-name="1001" style:display-name="T23" style:family="text" style:name="1434">
      <style:paragraph-properties/>
    </style:style>
    <style:style style:parent-style-name="1001" style:display-name="T24" style:family="text" style:name="1435">
      <style:paragraph-properties/>
    </style:style>
    <style:style style:parent-style-name="1001" style:display-name="T25" style:family="text" style:name="1436">
      <style:paragraph-properties/>
    </style:style>
    <style:style style:parent-style-name="1001" style:display-name="T26" style:family="text" style:name="1437">
      <style:paragraph-properties/>
    </style:style>
    <style:style style:parent-style-name="1001" style:display-name="T27" style:family="text" style:name="1438">
      <style:paragraph-properties/>
    </style:style>
    <style:style style:parent-style-name="1001" style:display-name="T28" style:family="text" style:name="1439">
      <style:paragraph-properties/>
    </style:style>
    <style:style style:parent-style-name="1001" style:display-name="T29" style:family="text" style:name="1440">
      <style:paragraph-properties/>
    </style:style>
    <style:style style:parent-style-name="1001" style:display-name="T30" style:family="text" style:name="1441">
      <style:paragraph-properties/>
    </style:style>
    <style:style style:parent-style-name="1001" style:display-name="T31" style:family="text" style:name="1442">
      <style:paragraph-properties/>
    </style:style>
    <style:style style:parent-style-name="1001" style:display-name="T32" style:family="text" style:name="1443">
      <style:paragraph-properties/>
    </style:style>
    <style:style style:parent-style-name="1001" style:display-name="T33" style:family="text" style:name="1444">
      <style:paragraph-properties/>
    </style:style>
    <style:style style:parent-style-name="1001" style:display-name="T34" style:family="text" style:name="1445">
      <style:paragraph-properties/>
    </style:style>
    <style:style style:parent-style-name="1001" style:display-name="T35" style:family="text" style:name="1446">
      <style:paragraph-properties/>
    </style:style>
    <style:style style:parent-style-name="1001" style:display-name="T36" style:family="text" style:name="1447">
      <style:paragraph-properties/>
    </style:style>
    <style:style style:parent-style-name="1001" style:display-name="T37" style:family="text" style:name="1448">
      <style:paragraph-properties/>
    </style:style>
    <style:style style:parent-style-name="1001" style:display-name="T38" style:family="text" style:name="1449">
      <style:paragraph-properties/>
    </style:style>
    <style:style style:parent-style-name="1001" style:display-name="T39" style:family="text" style:name="1450">
      <style:paragraph-properties/>
    </style:style>
    <style:style style:parent-style-name="1001" style:display-name="T40" style:family="text" style:name="1451">
      <style:paragraph-properties/>
    </style:style>
    <style:style style:parent-style-name="1001" style:display-name="T41" style:family="text" style:name="1452">
      <style:paragraph-properties/>
    </style:style>
    <style:style style:parent-style-name="1001" style:display-name="T42" style:family="text" style:name="1453">
      <style:paragraph-properties/>
    </style:style>
    <style:style style:parent-style-name="1001" style:display-name="T43" style:family="text" style:name="1454">
      <style:paragraph-properties/>
    </style:style>
    <style:style style:parent-style-name="1001" style:display-name="T44" style:family="text" style:name="1455">
      <style:paragraph-properties/>
    </style:style>
    <style:style style:parent-style-name="1001" style:display-name="T45" style:family="text" style:name="1456">
      <style:paragraph-properties/>
    </style:style>
    <style:style style:parent-style-name="1001" style:display-name="T46" style:family="text" style:name="1457">
      <style:paragraph-properties/>
    </style:style>
    <style:style style:parent-style-name="1001" style:display-name="T47" style:family="text" style:name="1458">
      <style:paragraph-properties/>
    </style:style>
    <style:style style:parent-style-name="1001" style:display-name="T48" style:family="text" style:name="1459">
      <style:paragraph-properties/>
    </style:style>
    <style:style style:parent-style-name="1001" style:display-name="T49" style:family="text" style:name="1460">
      <style:paragraph-properties/>
    </style:style>
    <style:style style:parent-style-name="1001" style:display-name="T50" style:family="text" style:name="1461">
      <style:paragraph-properties/>
    </style:style>
    <style:style style:parent-style-name="1001" style:display-name="T51" style:family="text" style:name="1462">
      <style:paragraph-properties/>
    </style:style>
    <style:style style:parent-style-name="1001" style:display-name="T52" style:family="text" style:name="1463">
      <style:paragraph-properties/>
    </style:style>
    <style:style style:parent-style-name="1001" style:display-name="T53" style:family="text" style:name="1464">
      <style:paragraph-properties/>
    </style:style>
    <style:style style:parent-style-name="1001" style:display-name="T54" style:family="text" style:name="1465">
      <style:paragraph-properties/>
    </style:style>
    <style:style style:parent-style-name="1001" style:display-name="T55" style:family="text" style:name="1466">
      <style:paragraph-properties/>
    </style:style>
    <style:style style:parent-style-name="1001" style:display-name="T56" style:family="text" style:name="1467">
      <style:paragraph-properties/>
    </style:style>
    <style:style style:parent-style-name="1001" style:display-name="T57" style:family="text" style:name="1468">
      <style:paragraph-properties/>
    </style:style>
    <style:style style:parent-style-name="1001" style:display-name="T58" style:family="text" style:name="1469">
      <style:paragraph-properties/>
    </style:style>
    <style:style style:parent-style-name="1001" style:display-name="T59" style:family="text" style:name="1470">
      <style:paragraph-properties/>
    </style:style>
    <style:style style:parent-style-name="1001" style:display-name="T60" style:family="text" style:name="1471">
      <style:paragraph-properties/>
    </style:style>
    <style:style style:parent-style-name="1001" style:display-name="T61" style:family="text" style:name="1472">
      <style:paragraph-properties/>
    </style:style>
    <style:style style:parent-style-name="1001" style:display-name="T62" style:family="text" style:name="1473">
      <style:paragraph-properties/>
    </style:style>
    <style:style style:parent-style-name="1001" style:display-name="T63" style:family="text" style:name="1474">
      <style:paragraph-properties/>
    </style:style>
    <style:style style:parent-style-name="1001" style:display-name="T64" style:family="text" style:name="1475">
      <style:paragraph-properties/>
    </style:style>
    <style:style style:parent-style-name="1001" style:display-name="T65" style:family="text" style:name="1476">
      <style:paragraph-properties/>
    </style:style>
    <style:style style:parent-style-name="1001" style:display-name="T66" style:family="text" style:name="1477">
      <style:paragraph-properties/>
    </style:style>
    <style:style style:parent-style-name="1001" style:display-name="T67" style:family="text" style:name="1478">
      <style:paragraph-properties/>
    </style:style>
    <style:style style:parent-style-name="1001" style:display-name="T68" style:family="text" style:name="1479">
      <style:paragraph-properties/>
    </style:style>
    <style:style style:parent-style-name="1001" style:display-name="T69" style:family="text" style:name="1480">
      <style:paragraph-properties/>
    </style:style>
    <style:style style:parent-style-name="1001" style:display-name="T70" style:family="text" style:name="1481">
      <style:paragraph-properties/>
    </style:style>
    <style:style style:parent-style-name="1001" style:display-name="T71" style:family="text" style:name="1482">
      <style:paragraph-properties/>
    </style:style>
    <style:style style:parent-style-name="1001" style:display-name="T72" style:family="text" style:name="1483">
      <style:paragraph-properties/>
    </style:style>
    <style:style style:parent-style-name="1001" style:display-name="T73" style:family="text" style:name="1484">
      <style:paragraph-properties/>
    </style:style>
    <style:style style:parent-style-name="1001" style:display-name="T74" style:family="text" style:name="1485">
      <style:paragraph-properties/>
    </style:style>
    <style:style style:parent-style-name="1001" style:display-name="T75" style:family="text" style:name="1486">
      <style:paragraph-properties/>
    </style:style>
    <style:style style:parent-style-name="1001" style:display-name="T76" style:family="text" style:name="1487">
      <style:paragraph-properties/>
    </style:style>
    <style:style style:parent-style-name="1001" style:display-name="T77" style:family="text" style:name="1488">
      <style:paragraph-properties/>
    </style:style>
    <style:style style:parent-style-name="1001" style:display-name="T78" style:family="text" style:name="1489">
      <style:paragraph-properties/>
    </style:style>
    <style:style style:parent-style-name="1001" style:display-name="T79" style:family="text" style:name="1490">
      <style:paragraph-properties/>
    </style:style>
    <style:style style:parent-style-name="1001" style:display-name="T80" style:family="text" style:name="1491">
      <style:paragraph-properties/>
    </style:style>
    <style:style style:parent-style-name="1001" style:display-name="T81" style:family="text" style:name="1492">
      <style:paragraph-properties/>
    </style:style>
    <style:style style:parent-style-name="1001" style:display-name="T82" style:family="text" style:name="1493">
      <style:paragraph-properties/>
    </style:style>
    <style:style style:parent-style-name="1001" style:display-name="T83" style:family="text" style:name="1494">
      <style:paragraph-properties/>
    </style:style>
    <style:style style:parent-style-name="1001" style:display-name="T84" style:family="text" style:name="1495">
      <style:paragraph-properties/>
    </style:style>
    <style:style style:parent-style-name="1001" style:display-name="T85" style:family="text" style:name="1496">
      <style:paragraph-properties/>
    </style:style>
    <style:style style:parent-style-name="1001" style:display-name="T86" style:family="text" style:name="1497">
      <style:paragraph-properties/>
    </style:style>
    <style:style style:parent-style-name="1001" style:display-name="T87" style:family="text" style:name="1498">
      <style:paragraph-properties/>
    </style:style>
    <style:style style:parent-style-name="1001" style:display-name="T88" style:family="text" style:name="1499">
      <style:paragraph-properties/>
    </style:style>
    <style:style style:parent-style-name="1001" style:display-name="T89" style:family="text" style:name="1500">
      <style:paragraph-properties/>
    </style:style>
    <style:style style:parent-style-name="1001" style:display-name="T90" style:family="text" style:name="1501">
      <style:paragraph-properties/>
    </style:style>
    <style:style style:parent-style-name="1001" style:display-name="T91" style:family="text" style:name="1502">
      <style:paragraph-properties/>
    </style:style>
    <style:style style:parent-style-name="1001" style:display-name="T92" style:family="text" style:name="1503">
      <style:paragraph-properties/>
    </style:style>
    <style:style style:parent-style-name="1001" style:display-name="T93" style:family="text" style:name="1504">
      <style:paragraph-properties/>
    </style:style>
    <style:style style:parent-style-name="1001" style:display-name="T94" style:family="text" style:name="1505">
      <style:paragraph-properties/>
    </style:style>
    <style:style style:parent-style-name="1001" style:display-name="T95" style:family="text" style:name="1506">
      <style:paragraph-properties/>
    </style:style>
    <style:style style:parent-style-name="1001" style:display-name="T96" style:family="text" style:name="1507">
      <style:paragraph-properties/>
    </style:style>
    <style:style style:parent-style-name="1001" style:display-name="T97" style:family="text" style:name="1508">
      <style:paragraph-properties/>
    </style:style>
    <style:style style:parent-style-name="1001" style:display-name="T98" style:family="text" style:name="1509">
      <style:paragraph-properties/>
    </style:style>
    <style:style style:parent-style-name="1001" style:display-name="T99" style:family="text" style:name="1510">
      <style:paragraph-properties/>
    </style:style>
    <style:style style:parent-style-name="1001" style:display-name="T100" style:family="text" style:name="1511">
      <style:paragraph-properties/>
    </style:style>
    <style:style style:parent-style-name="1001" style:display-name="T101" style:family="text" style:name="1512">
      <style:paragraph-properties/>
    </style:style>
    <style:style style:parent-style-name="1001" style:display-name="T102" style:family="text" style:name="1513">
      <style:paragraph-properties/>
    </style:style>
    <style:style style:parent-style-name="1001" style:display-name="T103" style:family="text" style:name="1514">
      <style:paragraph-properties/>
    </style:style>
    <style:style style:parent-style-name="1001" style:display-name="T104" style:family="text" style:name="1515">
      <style:paragraph-properties/>
    </style:style>
    <style:style style:parent-style-name="1001" style:display-name="T105" style:family="text" style:name="1516">
      <style:paragraph-properties/>
    </style:style>
    <style:style style:parent-style-name="1001" style:display-name="T106" style:family="text" style:name="1517">
      <style:paragraph-properties/>
    </style:style>
    <style:style style:parent-style-name="1001" style:display-name="T107" style:family="text" style:name="1518">
      <style:paragraph-properties/>
    </style:style>
    <style:style style:parent-style-name="1001" style:display-name="T108" style:family="text" style:name="1519">
      <style:paragraph-properties/>
    </style:style>
    <style:style style:parent-style-name="1001" style:display-name="T109" style:family="text" style:name="1520">
      <style:paragraph-properties/>
    </style:style>
    <style:style style:parent-style-name="1001" style:display-name="T110" style:family="text" style:name="1521">
      <style:paragraph-properties/>
    </style:style>
    <style:style style:parent-style-name="1001" style:display-name="T111" style:family="text" style:name="1522">
      <style:paragraph-properties/>
    </style:style>
    <style:style style:parent-style-name="1001" style:display-name="T112" style:family="text" style:name="1523">
      <style:paragraph-properties/>
    </style:style>
    <style:style style:parent-style-name="1001" style:display-name="T113" style:family="text" style:name="1524">
      <style:paragraph-properties/>
    </style:style>
    <style:style style:parent-style-name="1001" style:display-name="T114" style:family="text" style:name="1525">
      <style:paragraph-properties/>
    </style:style>
    <style:style style:parent-style-name="1001" style:display-name="T115" style:family="text" style:name="1526">
      <style:paragraph-properties/>
    </style:style>
    <style:style style:parent-style-name="1001" style:display-name="T116" style:family="text" style:name="1527">
      <style:paragraph-properties/>
    </style:style>
    <style:style style:parent-style-name="1001" style:display-name="T117" style:family="text" style:name="1528">
      <style:paragraph-properties/>
    </style:style>
    <style:style style:parent-style-name="1001" style:display-name="T118" style:family="text" style:name="1529">
      <style:paragraph-properties/>
    </style:style>
    <style:style style:parent-style-name="1001" style:display-name="T119" style:family="text" style:name="1530">
      <style:paragraph-properties/>
    </style:style>
    <style:style style:parent-style-name="1001" style:display-name="T120" style:family="text" style:name="1531">
      <style:paragraph-properties/>
    </style:style>
    <style:style style:parent-style-name="1001" style:display-name="T121" style:family="text" style:name="1532">
      <style:paragraph-properties/>
    </style:style>
    <style:style style:parent-style-name="1001" style:display-name="T122" style:family="text" style:name="1533">
      <style:paragraph-properties/>
    </style:style>
    <style:style style:parent-style-name="1001" style:display-name="T123" style:family="text" style:name="1534">
      <style:paragraph-properties/>
    </style:style>
    <style:style style:parent-style-name="1001" style:display-name="T124" style:family="text" style:name="1535">
      <style:paragraph-properties/>
    </style:style>
    <style:style style:parent-style-name="1001" style:display-name="T125" style:family="text" style:name="1536">
      <style:paragraph-properties/>
    </style:style>
    <style:style style:parent-style-name="1001" style:display-name="T126" style:family="text" style:name="1537">
      <style:paragraph-properties/>
    </style:style>
    <style:style style:parent-style-name="1001" style:display-name="T127" style:family="text" style:name="1538">
      <style:paragraph-properties/>
    </style:style>
    <style:style style:parent-style-name="1001" style:display-name="T128" style:family="text" style:name="1539">
      <style:paragraph-properties/>
    </style:style>
    <style:style style:parent-style-name="1001" style:display-name="T129" style:family="text" style:name="1540">
      <style:paragraph-properties/>
    </style:style>
    <style:style style:parent-style-name="1001" style:display-name="T130" style:family="text" style:name="1541">
      <style:paragraph-properties/>
    </style:style>
    <style:style style:parent-style-name="1001" style:display-name="T131" style:family="text" style:name="1542">
      <style:paragraph-properties/>
    </style:style>
    <style:style style:parent-style-name="1001" style:display-name="T132" style:family="text" style:name="1543">
      <style:paragraph-properties/>
    </style:style>
    <style:style style:parent-style-name="1001" style:display-name="T133" style:family="text" style:name="1544">
      <style:paragraph-properties/>
    </style:style>
    <style:style style:parent-style-name="1001" style:display-name="T134" style:family="text" style:name="1545">
      <style:paragraph-properties/>
    </style:style>
    <style:style style:parent-style-name="1001" style:display-name="T135" style:family="text" style:name="1546">
      <style:paragraph-properties/>
    </style:style>
    <style:style style:parent-style-name="1001" style:display-name="T136" style:family="text" style:name="1547">
      <style:paragraph-properties/>
    </style:style>
    <style:style style:parent-style-name="1001" style:display-name="T137" style:family="text" style:name="1548">
      <style:paragraph-properties/>
    </style:style>
    <style:style style:parent-style-name="1001" style:display-name="T138" style:family="text" style:name="1549">
      <style:paragraph-properties/>
    </style:style>
    <style:style style:parent-style-name="1001" style:display-name="T139" style:family="text" style:name="1550">
      <style:paragraph-properties/>
    </style:style>
    <style:style style:parent-style-name="1001" style:display-name="T140" style:family="text" style:name="1551">
      <style:paragraph-properties/>
    </style:style>
    <style:style style:parent-style-name="1001" style:display-name="T141" style:family="text" style:name="1552">
      <style:paragraph-properties/>
    </style:style>
    <style:style style:parent-style-name="1001" style:display-name="T142" style:family="text" style:name="1553">
      <style:paragraph-properties/>
    </style:style>
    <style:style style:parent-style-name="1001" style:display-name="T143" style:family="text" style:name="1554">
      <style:paragraph-properties/>
    </style:style>
    <style:style style:parent-style-name="1001" style:display-name="T144" style:family="text" style:name="1555">
      <style:paragraph-properties/>
    </style:style>
    <style:style style:parent-style-name="1001" style:display-name="T145" style:family="text" style:name="1556">
      <style:paragraph-properties/>
    </style:style>
    <style:style style:parent-style-name="1001" style:display-name="T146" style:family="text" style:name="1557">
      <style:paragraph-properties/>
      <style:text-properties fo:font-family="Courier New" style:font-family-complex="Courier New"/>
    </style:style>
    <style:style style:parent-style-name="1001" style:display-name="T147" style:family="text" style:name="1558">
      <style:paragraph-properties/>
      <style:text-properties fo:font-family="Wingdings" style:font-family-complex="Wingdings"/>
    </style:style>
    <style:style style:parent-style-name="1001" style:display-name="T148" style:family="text" style:name="1559">
      <style:paragraph-properties/>
      <style:text-properties fo:font-family="Symbol" style:font-family-complex="Symbol"/>
    </style:style>
    <style:style style:parent-style-name="1001" style:display-name="T149" style:family="text" style:name="1560">
      <style:paragraph-properties/>
      <style:text-properties fo:font-family="Courier New" style:font-family-complex="Courier New"/>
    </style:style>
    <style:style style:parent-style-name="1001" style:display-name="T150" style:family="text" style:name="1561">
      <style:paragraph-properties/>
      <style:text-properties fo:font-family="Wingdings" style:font-family-complex="Wingdings"/>
    </style:style>
    <style:style style:parent-style-name="1001" style:display-name="T151" style:family="text" style:name="1562">
      <style:paragraph-properties/>
      <style:text-properties fo:font-family="Symbol" style:font-family-complex="Symbol"/>
    </style:style>
    <style:style style:parent-style-name="1001" style:display-name="T152" style:family="text" style:name="1563">
      <style:paragraph-properties/>
      <style:text-properties fo:font-family="Courier New" style:font-family-complex="Courier New"/>
    </style:style>
    <style:style style:parent-style-name="1001" style:display-name="T153" style:family="text" style:name="1564">
      <style:paragraph-properties/>
      <style:text-properties fo:font-family="Wingdings" style:font-family-complex="Wingdings"/>
    </style:style>
    <style:style style:parent-style-name="1001" style:display-name="T154" style:family="text" style:name="1565">
      <style:paragraph-properties/>
      <style:text-properties fo:font-family="Symbol" style:font-family-complex="Symbol"/>
    </style:style>
    <style:style style:parent-style-name="1001" style:display-name="T155" style:family="text" style:name="1566">
      <style:paragraph-properties/>
      <style:text-properties fo:font-family="Courier New" style:font-family-complex="Courier New"/>
    </style:style>
    <style:style style:parent-style-name="1001" style:display-name="T156" style:family="text" style:name="1567">
      <style:paragraph-properties/>
      <style:text-properties fo:font-family="Wingdings" style:font-family-complex="Wingdings"/>
    </style:style>
    <style:style style:parent-style-name="1001" style:display-name="T157" style:family="text" style:name="1568">
      <style:paragraph-properties/>
      <style:text-properties fo:font-family="Symbol" style:font-family-complex="Symbol"/>
    </style:style>
    <style:style style:parent-style-name="1001" style:display-name="T158" style:family="text" style:name="1569">
      <style:paragraph-properties/>
      <style:text-properties fo:font-family="Courier New" style:font-family-complex="Courier New"/>
    </style:style>
    <style:style style:parent-style-name="1001" style:display-name="T159" style:family="text" style:name="1570">
      <style:paragraph-properties/>
      <style:text-properties fo:font-family="Wingdings" style:font-family-complex="Wingdings"/>
    </style:style>
    <style:style style:parent-style-name="1001" style:display-name="T160" style:family="text" style:name="1571">
      <style:paragraph-properties/>
      <style:text-properties fo:font-family="Symbol" style:font-family-complex="Symbol"/>
    </style:style>
    <style:style style:parent-style-name="1001" style:display-name="T161" style:family="text" style:name="1572">
      <style:paragraph-properties/>
      <style:text-properties fo:font-family="Courier New" style:font-family-complex="Courier New"/>
    </style:style>
    <style:style style:parent-style-name="1001" style:display-name="T162" style:family="text" style:name="1573">
      <style:paragraph-properties/>
      <style:text-properties fo:font-family="Wingdings" style:font-family-complex="Wingdings"/>
    </style:style>
    <style:style style:parent-style-name="1001" style:display-name="T163" style:family="text" style:name="1574">
      <style:paragraph-properties/>
      <style:text-properties fo:font-family="Symbol" style:font-family-complex="Symbol" fo:font-weight="bold"/>
    </style:style>
    <style:style style:parent-style-name="1001" style:display-name="T164" style:family="text" style:name="1575">
      <style:paragraph-properties/>
      <style:text-properties fo:font-family="Symbol" style:font-family-complex="Symbol"/>
    </style:style>
    <style:style style:parent-style-name="1001" style:display-name="T165" style:family="text" style:name="1576">
      <style:paragraph-properties/>
      <style:text-properties fo:font-family="Wingdings" style:font-family-complex="Wingdings"/>
    </style:style>
    <style:style style:parent-style-name="1001" style:display-name="T166" style:family="text" style:name="1577">
      <style:paragraph-properties/>
      <style:text-properties fo:font-family="Symbol" style:font-family-complex="Symbol"/>
    </style:style>
    <style:style style:parent-style-name="1001" style:display-name="T167" style:family="text" style:name="1578">
      <style:paragraph-properties/>
      <style:text-properties fo:font-family="Courier New" style:font-family-complex="Courier New"/>
    </style:style>
    <style:style style:parent-style-name="1001" style:display-name="T168" style:family="text" style:name="1579">
      <style:paragraph-properties/>
      <style:text-properties fo:font-family="Wingdings" style:font-family-complex="Wingdings"/>
    </style:style>
    <style:style style:parent-style-name="1001" style:display-name="T169" style:family="text" style:name="1580">
      <style:paragraph-properties/>
      <style:text-properties fo:font-family="Symbol" style:font-family-complex="Symbol"/>
    </style:style>
    <style:style style:parent-style-name="1001" style:display-name="T170" style:family="text" style:name="1581">
      <style:paragraph-properties/>
      <style:text-properties fo:font-family="Courier New" style:font-family-complex="Courier New"/>
    </style:style>
    <style:style style:parent-style-name="1001" style:display-name="T171" style:family="text" style:name="1582">
      <style:paragraph-properties/>
      <style:text-properties fo:font-family="Wingdings" style:font-family-complex="Wingdings"/>
    </style:style>
    <style:style style:parent-style-name="1001" style:display-name="T172" style:family="text" style:name="1583">
      <style:paragraph-properties/>
      <style:text-properties fo:font-family="Symbol" style:font-family-complex="Symbol"/>
    </style:style>
    <style:style style:parent-style-name="1001" style:display-name="T173" style:family="text" style:name="1584">
      <style:paragraph-properties/>
      <style:text-properties fo:font-family="Courier New" style:font-family-complex="Courier New"/>
    </style:style>
    <style:style style:parent-style-name="1001" style:display-name="T174" style:family="text" style:name="1585">
      <style:paragraph-properties/>
      <style:text-properties fo:font-family="Wingdings" style:font-family-complex="Wingdings"/>
    </style:style>
    <style:style style:parent-style-name="1001" style:display-name="T175" style:family="text" style:name="1586">
      <style:paragraph-properties/>
      <style:text-properties fo:font-family="Symbol" style:font-family-complex="Symbol"/>
    </style:style>
    <style:style style:parent-style-name="1001" style:display-name="T176" style:family="text" style:name="1587">
      <style:paragraph-properties/>
      <style:text-properties fo:font-family="Courier New" style:font-family-complex="Courier New"/>
    </style:style>
    <style:style style:parent-style-name="1001" style:display-name="T177" style:family="text" style:name="1588">
      <style:paragraph-properties/>
      <style:text-properties fo:font-family="Wingdings" style:font-family-complex="Wingdings"/>
    </style:style>
    <style:style style:parent-style-name="1001" style:display-name="T178" style:family="text" style:name="1589">
      <style:paragraph-properties/>
      <style:text-properties fo:font-family="Symbol" style:font-family-complex="Symbol"/>
    </style:style>
    <style:style style:parent-style-name="1001" style:display-name="T179" style:family="text" style:name="1590">
      <style:paragraph-properties/>
      <style:text-properties fo:font-family="Courier New" style:font-family-complex="Courier New"/>
    </style:style>
    <style:style style:parent-style-name="1001" style:display-name="T180" style:family="text" style:name="1591">
      <style:paragraph-properties/>
      <style:text-properties fo:font-family="Wingdings" style:font-family-complex="Wingdings"/>
    </style:style>
    <style:style style:parent-style-name="1001" style:display-name="T181" style:family="text" style:name="1592">
      <style:paragraph-properties/>
      <style:text-properties fo:font-family="Symbol" style:font-family-complex="Symbol"/>
    </style:style>
    <style:style style:parent-style-name="1001" style:display-name="T182" style:family="text" style:name="1593">
      <style:paragraph-properties/>
    </style:style>
    <style:style style:parent-style-name="1001" style:display-name="T183" style:family="text" style:name="1594">
      <style:paragraph-properties/>
      <style:text-properties fo:font-family="Wingdings" style:font-family-complex="Wingdings"/>
    </style:style>
    <style:style style:parent-style-name="1001" style:display-name="T184" style:family="text" style:name="1595">
      <style:paragraph-properties/>
      <style:text-properties fo:font-family="Symbol" style:font-family-complex="Symbol"/>
    </style:style>
    <style:style style:parent-style-name="1001" style:display-name="T185" style:family="text" style:name="1596">
      <style:paragraph-properties/>
      <style:text-properties fo:font-family="Courier New" style:font-family-complex="Courier New"/>
    </style:style>
    <style:style style:parent-style-name="1001" style:display-name="T186" style:family="text" style:name="1597">
      <style:paragraph-properties/>
      <style:text-properties fo:font-family="Wingdings" style:font-family-complex="Wingdings"/>
    </style:style>
    <style:style style:parent-style-name="1001" style:display-name="T187" style:family="text" style:name="1598">
      <style:paragraph-properties/>
      <style:text-properties fo:font-family="Symbol" style:font-family-complex="Symbol"/>
    </style:style>
    <style:style style:parent-style-name="1001" style:display-name="T188" style:family="text" style:name="1599">
      <style:paragraph-properties/>
      <style:text-properties fo:font-family="Courier New" style:font-family-complex="Courier New"/>
    </style:style>
    <style:style style:parent-style-name="1001" style:display-name="T189" style:family="text" style:name="1600">
      <style:paragraph-properties/>
      <style:text-properties fo:font-family="Wingdings" style:font-family-complex="Wingdings"/>
    </style:style>
    <style:style style:parent-style-name="1001" style:display-name="T190" style:family="text" style:name="1601">
      <style:paragraph-properties/>
      <style:text-properties fo:font-family="Symbol" style:font-family-complex="Symbol"/>
    </style:style>
    <style:style style:parent-style-name="1001" style:display-name="T191" style:family="text" style:name="1602">
      <style:paragraph-properties/>
    </style:style>
    <style:style style:parent-style-name="1001" style:display-name="T192" style:family="text" style:name="1603">
      <style:paragraph-properties/>
      <style:text-properties fo:font-family="Wingdings" style:font-family-complex="Wingdings"/>
    </style:style>
    <style:style style:parent-style-name="1001" style:display-name="T193" style:family="text" style:name="1604">
      <style:paragraph-properties/>
      <style:text-properties fo:font-family="Symbol" style:font-family-complex="Symbol"/>
    </style:style>
    <style:style style:parent-style-name="1001" style:display-name="T194" style:family="text" style:name="1605">
      <style:paragraph-properties/>
      <style:text-properties fo:font-family="Courier New" style:font-family-complex="Courier New"/>
    </style:style>
    <style:style style:parent-style-name="1001" style:display-name="T195" style:family="text" style:name="1606">
      <style:paragraph-properties/>
      <style:text-properties fo:font-family="Wingdings" style:font-family-complex="Wingdings"/>
    </style:style>
    <style:style style:parent-style-name="1001" style:display-name="T196" style:family="text" style:name="1607">
      <style:paragraph-properties/>
      <style:text-properties fo:font-family="Symbol" style:font-family-complex="Symbol"/>
    </style:style>
    <style:style style:parent-style-name="1001" style:display-name="T197" style:family="text" style:name="1608">
      <style:paragraph-properties/>
      <style:text-properties fo:font-family="Courier New" style:font-family-complex="Courier New"/>
    </style:style>
    <style:style style:parent-style-name="1001" style:display-name="T198" style:family="text" style:name="1609">
      <style:paragraph-properties/>
      <style:text-properties fo:font-family="Wingdings" style:font-family-complex="Wingdings"/>
    </style:style>
    <style:style style:parent-style-name="1001" style:display-name="T1" style:family="text" style:name="1610">
      <style:paragraph-properties/>
    </style:style>
    <style:style style:parent-style-name="1001" style:display-name="T2" style:family="text" style:name="1611">
      <style:paragraph-properties/>
    </style:style>
    <style:style style:parent-style-name="1001" style:display-name="T3" style:family="text" style:name="1612">
      <style:paragraph-properties/>
    </style:style>
    <style:style style:parent-style-name="1001" style:display-name="T4" style:family="text" style:name="1613">
      <style:paragraph-properties/>
    </style:style>
    <style:style style:parent-style-name="1001" style:display-name="T5" style:family="text" style:name="1614">
      <style:paragraph-properties/>
    </style:style>
    <style:style style:parent-style-name="1001" style:display-name="T6" style:family="text" style:name="1615">
      <style:paragraph-properties/>
    </style:style>
    <style:style style:parent-style-name="1001" style:display-name="T7" style:family="text" style:name="1616">
      <style:paragraph-properties/>
    </style:style>
    <style:style style:parent-style-name="1001" style:display-name="T8" style:family="text" style:name="1617">
      <style:paragraph-properties/>
    </style:style>
    <style:style style:parent-style-name="1001" style:display-name="T9" style:family="text" style:name="1618">
      <style:paragraph-properties/>
    </style:style>
    <style:style style:parent-style-name="1001" style:display-name="T10" style:family="text" style:name="1619">
      <style:paragraph-properties/>
    </style:style>
    <style:style style:parent-style-name="1001" style:display-name="T11" style:family="text" style:name="1620">
      <style:paragraph-properties/>
    </style:style>
    <style:style style:parent-style-name="1001" style:display-name="T12" style:family="text" style:name="1621">
      <style:paragraph-properties/>
    </style:style>
    <style:style style:parent-style-name="1001" style:display-name="T13" style:family="text" style:name="1622">
      <style:paragraph-properties/>
    </style:style>
    <style:style style:parent-style-name="1001" style:display-name="T14" style:family="text" style:name="1623">
      <style:paragraph-properties/>
    </style:style>
    <style:style style:parent-style-name="1001" style:display-name="T15" style:family="text" style:name="1624">
      <style:paragraph-properties/>
    </style:style>
    <style:style style:parent-style-name="1001" style:display-name="T16" style:family="text" style:name="1625">
      <style:paragraph-properties/>
    </style:style>
    <style:style style:parent-style-name="1001" style:display-name="T17" style:family="text" style:name="1626">
      <style:paragraph-properties/>
    </style:style>
    <style:style style:parent-style-name="1001" style:display-name="T18" style:family="text" style:name="1627">
      <style:paragraph-properties/>
    </style:style>
    <style:style style:parent-style-name="1001" style:display-name="T19" style:family="text" style:name="1628">
      <style:paragraph-properties/>
    </style:style>
    <style:style style:parent-style-name="1001" style:display-name="T20" style:family="text" style:name="1629">
      <style:paragraph-properties/>
    </style:style>
    <style:style style:parent-style-name="1001" style:display-name="T21" style:family="text" style:name="1630">
      <style:paragraph-properties/>
    </style:style>
    <style:style style:parent-style-name="1001" style:display-name="T22" style:family="text" style:name="1631">
      <style:paragraph-properties/>
    </style:style>
    <style:style style:parent-style-name="1001" style:display-name="T23" style:family="text" style:name="1632">
      <style:paragraph-properties/>
    </style:style>
    <style:style style:parent-style-name="1001" style:display-name="T24" style:family="text" style:name="1633">
      <style:paragraph-properties/>
    </style:style>
    <style:style style:parent-style-name="1001" style:display-name="T25" style:family="text" style:name="1634">
      <style:paragraph-properties/>
    </style:style>
    <style:style style:parent-style-name="1001" style:display-name="T26" style:family="text" style:name="1635">
      <style:paragraph-properties/>
    </style:style>
    <style:style style:parent-style-name="1001" style:display-name="T27" style:family="text" style:name="1636">
      <style:paragraph-properties/>
    </style:style>
    <style:style style:parent-style-name="1001" style:display-name="T28" style:family="text" style:name="1637">
      <style:paragraph-properties/>
    </style:style>
    <style:style style:parent-style-name="1001" style:display-name="T29" style:family="text" style:name="1638">
      <style:paragraph-properties/>
    </style:style>
    <style:style style:parent-style-name="1001" style:display-name="T30" style:family="text" style:name="1639">
      <style:paragraph-properties/>
    </style:style>
    <style:style style:parent-style-name="1001" style:display-name="T31" style:family="text" style:name="1640">
      <style:paragraph-properties/>
    </style:style>
    <style:style style:parent-style-name="1001" style:display-name="T32" style:family="text" style:name="1641">
      <style:paragraph-properties/>
    </style:style>
    <style:style style:parent-style-name="1001" style:display-name="T33" style:family="text" style:name="1642">
      <style:paragraph-properties/>
    </style:style>
    <style:style style:parent-style-name="1001" style:display-name="T34" style:family="text" style:name="1643">
      <style:paragraph-properties/>
    </style:style>
    <style:style style:parent-style-name="1001" style:display-name="T35" style:family="text" style:name="1644">
      <style:paragraph-properties/>
    </style:style>
    <style:style style:parent-style-name="1001" style:display-name="T36" style:family="text" style:name="1645">
      <style:paragraph-properties/>
    </style:style>
    <style:style style:parent-style-name="1001" style:display-name="T37" style:family="text" style:name="1646">
      <style:paragraph-properties/>
    </style:style>
    <style:style style:parent-style-name="1001" style:display-name="T38" style:family="text" style:name="1647">
      <style:paragraph-properties/>
    </style:style>
    <style:style style:parent-style-name="1001" style:display-name="T39" style:family="text" style:name="1648">
      <style:paragraph-properties/>
    </style:style>
    <style:style style:parent-style-name="1001" style:display-name="T40" style:family="text" style:name="1649">
      <style:paragraph-properties/>
    </style:style>
    <style:style style:parent-style-name="1001" style:display-name="T41" style:family="text" style:name="1650">
      <style:paragraph-properties/>
    </style:style>
    <style:style style:parent-style-name="1001" style:display-name="T42" style:family="text" style:name="1651">
      <style:paragraph-properties/>
    </style:style>
    <style:style style:parent-style-name="1001" style:display-name="T43" style:family="text" style:name="1652">
      <style:paragraph-properties/>
    </style:style>
    <style:style style:parent-style-name="1001" style:display-name="T44" style:family="text" style:name="1653">
      <style:paragraph-properties/>
    </style:style>
    <style:style style:parent-style-name="1001" style:display-name="T45" style:family="text" style:name="1654">
      <style:paragraph-properties/>
    </style:style>
    <style:style style:parent-style-name="1001" style:display-name="T46" style:family="text" style:name="1655">
      <style:paragraph-properties/>
    </style:style>
    <style:style style:parent-style-name="1001" style:display-name="T47" style:family="text" style:name="1656">
      <style:paragraph-properties/>
    </style:style>
    <style:style style:parent-style-name="1001" style:display-name="T48" style:family="text" style:name="1657">
      <style:paragraph-properties/>
    </style:style>
    <style:style style:parent-style-name="1001" style:display-name="T49" style:family="text" style:name="1658">
      <style:paragraph-properties/>
    </style:style>
    <style:style style:parent-style-name="1001" style:display-name="T50" style:family="text" style:name="1659">
      <style:paragraph-properties/>
    </style:style>
    <style:style style:parent-style-name="1001" style:display-name="T51" style:family="text" style:name="1660">
      <style:paragraph-properties/>
    </style:style>
    <style:style style:parent-style-name="1001" style:display-name="T52" style:family="text" style:name="1661">
      <style:paragraph-properties/>
    </style:style>
    <style:style style:parent-style-name="1001" style:display-name="T53" style:family="text" style:name="1662">
      <style:paragraph-properties/>
    </style:style>
    <style:style style:parent-style-name="1001" style:display-name="T54" style:family="text" style:name="1663">
      <style:paragraph-properties/>
    </style:style>
    <style:style style:parent-style-name="1001" style:display-name="T55" style:family="text" style:name="1664">
      <style:paragraph-properties/>
    </style:style>
    <style:style style:parent-style-name="1001" style:display-name="T56" style:family="text" style:name="1665">
      <style:paragraph-properties/>
    </style:style>
    <style:style style:parent-style-name="1001" style:display-name="T57" style:family="text" style:name="1666">
      <style:paragraph-properties/>
    </style:style>
    <style:style style:parent-style-name="1001" style:display-name="T58" style:family="text" style:name="1667">
      <style:paragraph-properties/>
    </style:style>
    <style:style style:parent-style-name="1001" style:display-name="T59" style:family="text" style:name="1668">
      <style:paragraph-properties/>
    </style:style>
    <style:style style:parent-style-name="1001" style:display-name="T60" style:family="text" style:name="1669">
      <style:paragraph-properties/>
    </style:style>
    <style:style style:parent-style-name="1001" style:display-name="T61" style:family="text" style:name="1670">
      <style:paragraph-properties/>
    </style:style>
    <style:style style:parent-style-name="1001" style:display-name="T62" style:family="text" style:name="1671">
      <style:paragraph-properties/>
    </style:style>
    <style:style style:parent-style-name="1001" style:display-name="T63" style:family="text" style:name="1672">
      <style:paragraph-properties/>
    </style:style>
    <style:style style:parent-style-name="1001" style:display-name="T64" style:family="text" style:name="1673">
      <style:paragraph-properties/>
    </style:style>
    <style:style style:parent-style-name="1001" style:display-name="T65" style:family="text" style:name="1674">
      <style:paragraph-properties/>
    </style:style>
    <style:style style:parent-style-name="1001" style:display-name="T66" style:family="text" style:name="1675">
      <style:paragraph-properties/>
    </style:style>
    <style:style style:parent-style-name="1001" style:display-name="T67" style:family="text" style:name="1676">
      <style:paragraph-properties/>
    </style:style>
    <style:style style:parent-style-name="1001" style:display-name="T68" style:family="text" style:name="1677">
      <style:paragraph-properties/>
    </style:style>
    <style:style style:parent-style-name="1001" style:display-name="T69" style:family="text" style:name="1678">
      <style:paragraph-properties/>
    </style:style>
    <style:style style:parent-style-name="1001" style:display-name="T70" style:family="text" style:name="1679">
      <style:paragraph-properties/>
    </style:style>
    <style:style style:parent-style-name="1001" style:display-name="T71" style:family="text" style:name="1680">
      <style:paragraph-properties/>
    </style:style>
    <style:style style:parent-style-name="1001" style:display-name="T72" style:family="text" style:name="1681">
      <style:paragraph-properties/>
    </style:style>
    <style:style style:parent-style-name="1001" style:display-name="T73" style:family="text" style:name="1682">
      <style:paragraph-properties/>
    </style:style>
    <style:style style:parent-style-name="1001" style:display-name="T74" style:family="text" style:name="1683">
      <style:paragraph-properties/>
    </style:style>
    <style:style style:parent-style-name="1001" style:display-name="T75" style:family="text" style:name="1684">
      <style:paragraph-properties/>
    </style:style>
    <style:style style:parent-style-name="1001" style:display-name="T76" style:family="text" style:name="1685">
      <style:paragraph-properties/>
    </style:style>
    <style:style style:parent-style-name="1001" style:display-name="T77" style:family="text" style:name="1686">
      <style:paragraph-properties/>
    </style:style>
    <style:style style:parent-style-name="1001" style:display-name="T78" style:family="text" style:name="1687">
      <style:paragraph-properties/>
    </style:style>
    <style:style style:parent-style-name="1001" style:display-name="T79" style:family="text" style:name="1688">
      <style:paragraph-properties/>
    </style:style>
    <style:style style:parent-style-name="1001" style:display-name="T80" style:family="text" style:name="1689">
      <style:paragraph-properties/>
    </style:style>
    <style:style style:parent-style-name="1001" style:display-name="T81" style:family="text" style:name="1690">
      <style:paragraph-properties/>
    </style:style>
    <style:style style:parent-style-name="1001" style:display-name="T82" style:family="text" style:name="1691">
      <style:paragraph-properties/>
    </style:style>
    <style:style style:parent-style-name="1001" style:display-name="T83" style:family="text" style:name="1692">
      <style:paragraph-properties/>
    </style:style>
    <style:style style:parent-style-name="1001" style:display-name="T84" style:family="text" style:name="1693">
      <style:paragraph-properties/>
    </style:style>
    <style:style style:parent-style-name="1001" style:display-name="T85" style:family="text" style:name="1694">
      <style:paragraph-properties/>
    </style:style>
    <style:style style:parent-style-name="1001" style:display-name="T86" style:family="text" style:name="1695">
      <style:paragraph-properties/>
    </style:style>
    <style:style style:parent-style-name="1001" style:display-name="T87" style:family="text" style:name="1696">
      <style:paragraph-properties/>
    </style:style>
    <style:style style:parent-style-name="1001" style:display-name="T88" style:family="text" style:name="1697">
      <style:paragraph-properties/>
    </style:style>
    <style:style style:parent-style-name="1001" style:display-name="T89" style:family="text" style:name="1698">
      <style:paragraph-properties/>
    </style:style>
    <style:style style:parent-style-name="1001" style:display-name="T90" style:family="text" style:name="1699">
      <style:paragraph-properties/>
    </style:style>
    <style:style style:parent-style-name="1001" style:display-name="T91" style:family="text" style:name="1700">
      <style:paragraph-properties/>
    </style:style>
    <style:style style:parent-style-name="1001" style:display-name="T92" style:family="text" style:name="1701">
      <style:paragraph-properties/>
    </style:style>
    <style:style style:parent-style-name="1001" style:display-name="T93" style:family="text" style:name="1702">
      <style:paragraph-properties/>
    </style:style>
    <style:style style:parent-style-name="1001" style:display-name="T94" style:family="text" style:name="1703">
      <style:paragraph-properties/>
    </style:style>
    <style:style style:parent-style-name="1001" style:display-name="T95" style:family="text" style:name="1704">
      <style:paragraph-properties/>
    </style:style>
    <style:style style:parent-style-name="1001" style:display-name="T96" style:family="text" style:name="1705">
      <style:paragraph-properties/>
    </style:style>
    <style:style style:parent-style-name="1001" style:display-name="T97" style:family="text" style:name="1706">
      <style:paragraph-properties/>
    </style:style>
    <style:style style:parent-style-name="1001" style:display-name="T98" style:family="text" style:name="1707">
      <style:paragraph-properties/>
    </style:style>
    <style:style style:parent-style-name="1001" style:display-name="T99" style:family="text" style:name="1708">
      <style:paragraph-properties/>
    </style:style>
    <style:style style:parent-style-name="1001" style:display-name="T100" style:family="text" style:name="1709">
      <style:paragraph-properties/>
    </style:style>
    <style:style style:parent-style-name="1001" style:display-name="T101" style:family="text" style:name="1710">
      <style:paragraph-properties/>
    </style:style>
    <style:style style:parent-style-name="1001" style:display-name="T102" style:family="text" style:name="1711">
      <style:paragraph-properties/>
    </style:style>
    <style:style style:parent-style-name="1001" style:display-name="T103" style:family="text" style:name="1712">
      <style:paragraph-properties/>
    </style:style>
    <style:style style:parent-style-name="1001" style:display-name="T104" style:family="text" style:name="1713">
      <style:paragraph-properties/>
    </style:style>
    <style:style style:parent-style-name="1001" style:display-name="T105" style:family="text" style:name="1714">
      <style:paragraph-properties/>
    </style:style>
    <style:style style:parent-style-name="1001" style:display-name="T106" style:family="text" style:name="1715">
      <style:paragraph-properties/>
    </style:style>
    <style:style style:parent-style-name="1001" style:display-name="T107" style:family="text" style:name="1716">
      <style:paragraph-properties/>
    </style:style>
    <style:style style:parent-style-name="1001" style:display-name="T108" style:family="text" style:name="1717">
      <style:paragraph-properties/>
    </style:style>
    <style:style style:parent-style-name="1001" style:display-name="T109" style:family="text" style:name="1718">
      <style:paragraph-properties/>
    </style:style>
    <style:style style:parent-style-name="1001" style:display-name="T110" style:family="text" style:name="1719">
      <style:paragraph-properties/>
    </style:style>
    <style:style style:parent-style-name="1001" style:display-name="T111" style:family="text" style:name="1720">
      <style:paragraph-properties/>
    </style:style>
    <style:style style:parent-style-name="1001" style:display-name="T112" style:family="text" style:name="1721">
      <style:paragraph-properties/>
    </style:style>
    <style:style style:parent-style-name="1001" style:display-name="T113" style:family="text" style:name="1722">
      <style:paragraph-properties/>
    </style:style>
    <style:style style:parent-style-name="1001" style:display-name="T114" style:family="text" style:name="1723">
      <style:paragraph-properties/>
    </style:style>
    <style:style style:parent-style-name="1001" style:display-name="T115" style:family="text" style:name="1724">
      <style:paragraph-properties/>
    </style:style>
    <style:style style:parent-style-name="1001" style:display-name="T116" style:family="text" style:name="1725">
      <style:paragraph-properties/>
    </style:style>
    <style:style style:parent-style-name="1001" style:display-name="T117" style:family="text" style:name="1726">
      <style:paragraph-properties/>
    </style:style>
    <style:style style:parent-style-name="1001" style:display-name="T118" style:family="text" style:name="1727">
      <style:paragraph-properties/>
    </style:style>
    <style:style style:parent-style-name="1001" style:display-name="T119" style:family="text" style:name="1728">
      <style:paragraph-properties/>
    </style:style>
    <style:style style:parent-style-name="1001" style:display-name="T120" style:family="text" style:name="1729">
      <style:paragraph-properties/>
    </style:style>
    <style:style style:parent-style-name="1001" style:display-name="T121" style:family="text" style:name="1730">
      <style:paragraph-properties/>
    </style:style>
    <style:style style:parent-style-name="1001" style:display-name="T122" style:family="text" style:name="1731">
      <style:paragraph-properties/>
    </style:style>
    <style:style style:parent-style-name="1001" style:display-name="T123" style:family="text" style:name="1732">
      <style:paragraph-properties/>
    </style:style>
    <style:style style:parent-style-name="1001" style:display-name="T124" style:family="text" style:name="1733">
      <style:paragraph-properties/>
    </style:style>
    <style:style style:parent-style-name="1001" style:display-name="T125" style:family="text" style:name="1734">
      <style:paragraph-properties/>
    </style:style>
    <style:style style:parent-style-name="1001" style:display-name="T126" style:family="text" style:name="1735">
      <style:paragraph-properties/>
    </style:style>
    <style:style style:parent-style-name="1001" style:display-name="T127" style:family="text" style:name="1736">
      <style:paragraph-properties/>
    </style:style>
    <style:style style:parent-style-name="1001" style:display-name="T128" style:family="text" style:name="1737">
      <style:paragraph-properties/>
    </style:style>
    <style:style style:parent-style-name="1001" style:display-name="T129" style:family="text" style:name="1738">
      <style:paragraph-properties/>
    </style:style>
    <style:style style:parent-style-name="1001" style:display-name="T130" style:family="text" style:name="1739">
      <style:paragraph-properties/>
    </style:style>
    <style:style style:parent-style-name="1001" style:display-name="T131" style:family="text" style:name="1740">
      <style:paragraph-properties/>
    </style:style>
    <style:style style:parent-style-name="1001" style:display-name="T132" style:family="text" style:name="1741">
      <style:paragraph-properties/>
    </style:style>
    <style:style style:parent-style-name="1001" style:display-name="T133" style:family="text" style:name="1742">
      <style:paragraph-properties/>
    </style:style>
    <style:style style:parent-style-name="1001" style:display-name="T134" style:family="text" style:name="1743">
      <style:paragraph-properties/>
    </style:style>
    <style:style style:parent-style-name="1001" style:display-name="T135" style:family="text" style:name="1744">
      <style:paragraph-properties/>
    </style:style>
    <style:style style:parent-style-name="1001" style:display-name="T136" style:family="text" style:name="1745">
      <style:paragraph-properties/>
    </style:style>
    <style:style style:parent-style-name="1001" style:display-name="T137" style:family="text" style:name="1746">
      <style:paragraph-properties/>
    </style:style>
    <style:style style:parent-style-name="1001" style:display-name="T138" style:family="text" style:name="1747">
      <style:paragraph-properties/>
    </style:style>
    <style:style style:parent-style-name="1001" style:display-name="T139" style:family="text" style:name="1748">
      <style:paragraph-properties/>
    </style:style>
    <style:style style:parent-style-name="1001" style:display-name="T140" style:family="text" style:name="1749">
      <style:paragraph-properties/>
    </style:style>
    <style:style style:parent-style-name="1001" style:display-name="T141" style:family="text" style:name="1750">
      <style:paragraph-properties/>
    </style:style>
    <style:style style:parent-style-name="1001" style:display-name="T142" style:family="text" style:name="1751">
      <style:paragraph-properties/>
    </style:style>
    <style:style style:parent-style-name="1001" style:display-name="T143" style:family="text" style:name="1752">
      <style:paragraph-properties/>
    </style:style>
    <style:style style:parent-style-name="1001" style:display-name="T144" style:family="text" style:name="1753">
      <style:paragraph-properties/>
    </style:style>
    <style:style style:parent-style-name="1001" style:display-name="T145" style:family="text" style:name="1754">
      <style:paragraph-properties/>
    </style:style>
    <style:style style:parent-style-name="1001" style:display-name="T146" style:family="text" style:name="1755">
      <style:paragraph-properties/>
      <style:text-properties fo:font-family="Courier New" style:font-family-complex="Courier New"/>
    </style:style>
    <style:style style:parent-style-name="1001" style:display-name="T147" style:family="text" style:name="1756">
      <style:paragraph-properties/>
      <style:text-properties fo:font-family="Wingdings" style:font-family-complex="Wingdings"/>
    </style:style>
    <style:style style:parent-style-name="1001" style:display-name="T148" style:family="text" style:name="1757">
      <style:paragraph-properties/>
      <style:text-properties fo:font-family="Symbol" style:font-family-complex="Symbol"/>
    </style:style>
    <style:style style:parent-style-name="1001" style:display-name="T149" style:family="text" style:name="1758">
      <style:paragraph-properties/>
      <style:text-properties fo:font-family="Courier New" style:font-family-complex="Courier New"/>
    </style:style>
    <style:style style:parent-style-name="1001" style:display-name="T150" style:family="text" style:name="1759">
      <style:paragraph-properties/>
      <style:text-properties fo:font-family="Wingdings" style:font-family-complex="Wingdings"/>
    </style:style>
    <style:style style:parent-style-name="1001" style:display-name="T151" style:family="text" style:name="1760">
      <style:paragraph-properties/>
      <style:text-properties fo:font-family="Symbol" style:font-family-complex="Symbol"/>
    </style:style>
    <style:style style:parent-style-name="1001" style:display-name="T152" style:family="text" style:name="1761">
      <style:paragraph-properties/>
      <style:text-properties fo:font-family="Courier New" style:font-family-complex="Courier New"/>
    </style:style>
    <style:style style:parent-style-name="1001" style:display-name="T153" style:family="text" style:name="1762">
      <style:paragraph-properties/>
      <style:text-properties fo:font-family="Wingdings" style:font-family-complex="Wingdings"/>
    </style:style>
    <style:style style:parent-style-name="1001" style:display-name="T154" style:family="text" style:name="1763">
      <style:paragraph-properties/>
      <style:text-properties fo:font-family="Symbol" style:font-family-complex="Symbol"/>
    </style:style>
    <style:style style:parent-style-name="1001" style:display-name="T155" style:family="text" style:name="1764">
      <style:paragraph-properties/>
      <style:text-properties fo:font-family="Courier New" style:font-family-complex="Courier New"/>
    </style:style>
    <style:style style:parent-style-name="1001" style:display-name="T156" style:family="text" style:name="1765">
      <style:paragraph-properties/>
      <style:text-properties fo:font-family="Wingdings" style:font-family-complex="Wingdings"/>
    </style:style>
    <style:style style:parent-style-name="1001" style:display-name="T157" style:family="text" style:name="1766">
      <style:paragraph-properties/>
      <style:text-properties fo:font-family="Symbol" style:font-family-complex="Symbol"/>
    </style:style>
    <style:style style:parent-style-name="1001" style:display-name="T158" style:family="text" style:name="1767">
      <style:paragraph-properties/>
      <style:text-properties fo:font-family="Courier New" style:font-family-complex="Courier New"/>
    </style:style>
    <style:style style:parent-style-name="1001" style:display-name="T159" style:family="text" style:name="1768">
      <style:paragraph-properties/>
      <style:text-properties fo:font-family="Wingdings" style:font-family-complex="Wingdings"/>
    </style:style>
    <style:style style:parent-style-name="1001" style:display-name="T160" style:family="text" style:name="1769">
      <style:paragraph-properties/>
      <style:text-properties fo:font-family="Symbol" style:font-family-complex="Symbol"/>
    </style:style>
    <style:style style:parent-style-name="1001" style:display-name="T161" style:family="text" style:name="1770">
      <style:paragraph-properties/>
      <style:text-properties fo:font-family="Courier New" style:font-family-complex="Courier New"/>
    </style:style>
    <style:style style:parent-style-name="1001" style:display-name="T162" style:family="text" style:name="1771">
      <style:paragraph-properties/>
      <style:text-properties fo:font-family="Wingdings" style:font-family-complex="Wingdings"/>
    </style:style>
    <style:style style:parent-style-name="1001" style:display-name="T163" style:family="text" style:name="1772">
      <style:paragraph-properties/>
      <style:text-properties fo:font-family="Symbol" style:font-family-complex="Symbol" fo:font-weight="bold"/>
    </style:style>
    <style:style style:parent-style-name="1001" style:display-name="T164" style:family="text" style:name="1773">
      <style:paragraph-properties/>
      <style:text-properties fo:font-family="Symbol" style:font-family-complex="Symbol"/>
    </style:style>
    <style:style style:parent-style-name="1001" style:display-name="T165" style:family="text" style:name="1774">
      <style:paragraph-properties/>
      <style:text-properties fo:font-family="Wingdings" style:font-family-complex="Wingdings"/>
    </style:style>
    <style:style style:parent-style-name="1001" style:display-name="T166" style:family="text" style:name="1775">
      <style:paragraph-properties/>
      <style:text-properties fo:font-family="Symbol" style:font-family-complex="Symbol"/>
    </style:style>
    <style:style style:parent-style-name="1001" style:display-name="T167" style:family="text" style:name="1776">
      <style:paragraph-properties/>
      <style:text-properties fo:font-family="Courier New" style:font-family-complex="Courier New"/>
    </style:style>
    <style:style style:parent-style-name="1001" style:display-name="T168" style:family="text" style:name="1777">
      <style:paragraph-properties/>
      <style:text-properties fo:font-family="Wingdings" style:font-family-complex="Wingdings"/>
    </style:style>
    <style:style style:parent-style-name="1001" style:display-name="T169" style:family="text" style:name="1778">
      <style:paragraph-properties/>
      <style:text-properties fo:font-family="Symbol" style:font-family-complex="Symbol"/>
    </style:style>
    <style:style style:parent-style-name="1001" style:display-name="T170" style:family="text" style:name="1779">
      <style:paragraph-properties/>
      <style:text-properties fo:font-family="Courier New" style:font-family-complex="Courier New"/>
    </style:style>
    <style:style style:parent-style-name="1001" style:display-name="T171" style:family="text" style:name="1780">
      <style:paragraph-properties/>
      <style:text-properties fo:font-family="Wingdings" style:font-family-complex="Wingdings"/>
    </style:style>
    <style:style style:parent-style-name="1001" style:display-name="T172" style:family="text" style:name="1781">
      <style:paragraph-properties/>
      <style:text-properties fo:font-family="Symbol" style:font-family-complex="Symbol"/>
    </style:style>
    <style:style style:parent-style-name="1001" style:display-name="T173" style:family="text" style:name="1782">
      <style:paragraph-properties/>
      <style:text-properties fo:font-family="Courier New" style:font-family-complex="Courier New"/>
    </style:style>
    <style:style style:parent-style-name="1001" style:display-name="T174" style:family="text" style:name="1783">
      <style:paragraph-properties/>
      <style:text-properties fo:font-family="Wingdings" style:font-family-complex="Wingdings"/>
    </style:style>
    <style:style style:parent-style-name="1001" style:display-name="T175" style:family="text" style:name="1784">
      <style:paragraph-properties/>
      <style:text-properties fo:font-family="Symbol" style:font-family-complex="Symbol"/>
    </style:style>
    <style:style style:parent-style-name="1001" style:display-name="T176" style:family="text" style:name="1785">
      <style:paragraph-properties/>
      <style:text-properties fo:font-family="Courier New" style:font-family-complex="Courier New"/>
    </style:style>
    <style:style style:parent-style-name="1001" style:display-name="T177" style:family="text" style:name="1786">
      <style:paragraph-properties/>
      <style:text-properties fo:font-family="Wingdings" style:font-family-complex="Wingdings"/>
    </style:style>
    <style:style style:parent-style-name="1001" style:display-name="T178" style:family="text" style:name="1787">
      <style:paragraph-properties/>
      <style:text-properties fo:font-family="Symbol" style:font-family-complex="Symbol"/>
    </style:style>
    <style:style style:parent-style-name="1001" style:display-name="T179" style:family="text" style:name="1788">
      <style:paragraph-properties/>
      <style:text-properties fo:font-family="Courier New" style:font-family-complex="Courier New"/>
    </style:style>
    <style:style style:parent-style-name="1001" style:display-name="T180" style:family="text" style:name="1789">
      <style:paragraph-properties/>
      <style:text-properties fo:font-family="Wingdings" style:font-family-complex="Wingdings"/>
    </style:style>
    <style:style style:parent-style-name="1001" style:display-name="T181" style:family="text" style:name="1790">
      <style:paragraph-properties/>
      <style:text-properties fo:font-family="Symbol" style:font-family-complex="Symbol"/>
    </style:style>
    <style:style style:parent-style-name="1001" style:display-name="T182" style:family="text" style:name="1791">
      <style:paragraph-properties/>
    </style:style>
    <style:style style:parent-style-name="1001" style:display-name="T183" style:family="text" style:name="1792">
      <style:paragraph-properties/>
      <style:text-properties fo:font-family="Wingdings" style:font-family-complex="Wingdings"/>
    </style:style>
    <style:style style:parent-style-name="1001" style:display-name="T184" style:family="text" style:name="1793">
      <style:paragraph-properties/>
      <style:text-properties fo:font-family="Symbol" style:font-family-complex="Symbol"/>
    </style:style>
    <style:style style:parent-style-name="1001" style:display-name="T185" style:family="text" style:name="1794">
      <style:paragraph-properties/>
      <style:text-properties fo:font-family="Courier New" style:font-family-complex="Courier New"/>
    </style:style>
    <style:style style:parent-style-name="1001" style:display-name="T186" style:family="text" style:name="1795">
      <style:paragraph-properties/>
      <style:text-properties fo:font-family="Wingdings" style:font-family-complex="Wingdings"/>
    </style:style>
    <style:style style:parent-style-name="1001" style:display-name="T187" style:family="text" style:name="1796">
      <style:paragraph-properties/>
      <style:text-properties fo:font-family="Symbol" style:font-family-complex="Symbol"/>
    </style:style>
    <style:style style:parent-style-name="1001" style:display-name="T188" style:family="text" style:name="1797">
      <style:paragraph-properties/>
      <style:text-properties fo:font-family="Courier New" style:font-family-complex="Courier New"/>
    </style:style>
    <style:style style:parent-style-name="1001" style:display-name="T189" style:family="text" style:name="1798">
      <style:paragraph-properties/>
      <style:text-properties fo:font-family="Wingdings" style:font-family-complex="Wingdings"/>
    </style:style>
    <style:style style:parent-style-name="1001" style:display-name="T190" style:family="text" style:name="1799">
      <style:paragraph-properties/>
      <style:text-properties fo:font-family="Symbol" style:font-family-complex="Symbol"/>
    </style:style>
    <style:style style:parent-style-name="1001" style:display-name="T191" style:family="text" style:name="1800">
      <style:paragraph-properties/>
    </style:style>
    <style:style style:parent-style-name="1001" style:display-name="T192" style:family="text" style:name="1801">
      <style:paragraph-properties/>
      <style:text-properties fo:font-family="Wingdings" style:font-family-complex="Wingdings"/>
    </style:style>
    <style:style style:parent-style-name="1001" style:display-name="T193" style:family="text" style:name="1802">
      <style:paragraph-properties/>
      <style:text-properties fo:font-family="Symbol" style:font-family-complex="Symbol"/>
    </style:style>
    <style:style style:parent-style-name="1001" style:display-name="T194" style:family="text" style:name="1803">
      <style:paragraph-properties/>
      <style:text-properties fo:font-family="Courier New" style:font-family-complex="Courier New"/>
    </style:style>
    <style:style style:parent-style-name="1001" style:display-name="T195" style:family="text" style:name="1804">
      <style:paragraph-properties/>
      <style:text-properties fo:font-family="Wingdings" style:font-family-complex="Wingdings"/>
    </style:style>
    <style:style style:parent-style-name="1001" style:display-name="T196" style:family="text" style:name="1805">
      <style:paragraph-properties/>
      <style:text-properties fo:font-family="Symbol" style:font-family-complex="Symbol"/>
    </style:style>
    <style:style style:parent-style-name="1001" style:display-name="T197" style:family="text" style:name="1806">
      <style:paragraph-properties/>
      <style:text-properties fo:font-family="Courier New" style:font-family-complex="Courier New"/>
    </style:style>
    <style:style style:parent-style-name="1001" style:display-name="T198" style:family="text" style:name="1807">
      <style:paragraph-properties/>
      <style:text-properties fo:font-family="Wingdings" style:font-family-complex="Wingdings"/>
    </style:style>
    <style:style style:parent-style-name="1001" style:display-name="T1" style:family="text" style:name="1808">
      <style:paragraph-properties/>
    </style:style>
    <style:style style:parent-style-name="1001" style:display-name="T2" style:family="text" style:name="1809">
      <style:paragraph-properties/>
    </style:style>
    <style:style style:parent-style-name="1001" style:display-name="T3" style:family="text" style:name="1810">
      <style:paragraph-properties/>
    </style:style>
    <style:style style:parent-style-name="1001" style:display-name="T4" style:family="text" style:name="1811">
      <style:paragraph-properties/>
    </style:style>
    <style:style style:parent-style-name="1001" style:display-name="T5" style:family="text" style:name="1812">
      <style:paragraph-properties/>
    </style:style>
    <style:style style:parent-style-name="1001" style:display-name="T6" style:family="text" style:name="1813">
      <style:paragraph-properties/>
    </style:style>
    <style:style style:parent-style-name="1001" style:display-name="T7" style:family="text" style:name="1814">
      <style:paragraph-properties/>
    </style:style>
    <style:style style:parent-style-name="1001" style:display-name="T8" style:family="text" style:name="1815">
      <style:paragraph-properties/>
    </style:style>
    <style:style style:parent-style-name="1001" style:display-name="T9" style:family="text" style:name="1816">
      <style:paragraph-properties/>
    </style:style>
    <style:style style:parent-style-name="1001" style:display-name="T10" style:family="text" style:name="1817">
      <style:paragraph-properties/>
    </style:style>
    <style:style style:parent-style-name="1001" style:display-name="T11" style:family="text" style:name="1818">
      <style:paragraph-properties/>
    </style:style>
    <style:style style:parent-style-name="1001" style:display-name="T12" style:family="text" style:name="1819">
      <style:paragraph-properties/>
    </style:style>
    <style:style style:parent-style-name="1001" style:display-name="T13" style:family="text" style:name="1820">
      <style:paragraph-properties/>
    </style:style>
    <style:style style:parent-style-name="1001" style:display-name="T14" style:family="text" style:name="1821">
      <style:paragraph-properties/>
    </style:style>
    <style:style style:parent-style-name="1001" style:display-name="T15" style:family="text" style:name="1822">
      <style:paragraph-properties/>
    </style:style>
    <style:style style:parent-style-name="1001" style:display-name="T16" style:family="text" style:name="1823">
      <style:paragraph-properties/>
    </style:style>
    <style:style style:parent-style-name="1001" style:display-name="T17" style:family="text" style:name="1824">
      <style:paragraph-properties/>
    </style:style>
    <style:style style:parent-style-name="1001" style:display-name="T18" style:family="text" style:name="1825">
      <style:paragraph-properties/>
    </style:style>
    <style:style style:parent-style-name="1001" style:display-name="T19" style:family="text" style:name="1826">
      <style:paragraph-properties/>
    </style:style>
    <style:style style:parent-style-name="1001" style:display-name="T20" style:family="text" style:name="1827">
      <style:paragraph-properties/>
    </style:style>
    <style:style style:parent-style-name="1001" style:display-name="T21" style:family="text" style:name="1828">
      <style:paragraph-properties/>
    </style:style>
    <style:style style:parent-style-name="1001" style:display-name="T22" style:family="text" style:name="1829">
      <style:paragraph-properties/>
    </style:style>
    <style:style style:parent-style-name="1001" style:display-name="T23" style:family="text" style:name="1830">
      <style:paragraph-properties/>
    </style:style>
    <style:style style:parent-style-name="1001" style:display-name="T24" style:family="text" style:name="1831">
      <style:paragraph-properties/>
    </style:style>
    <style:style style:parent-style-name="1001" style:display-name="T25" style:family="text" style:name="1832">
      <style:paragraph-properties/>
    </style:style>
    <style:style style:parent-style-name="1001" style:display-name="T26" style:family="text" style:name="1833">
      <style:paragraph-properties/>
    </style:style>
    <style:style style:parent-style-name="1001" style:display-name="T27" style:family="text" style:name="1834">
      <style:paragraph-properties/>
    </style:style>
    <style:style style:parent-style-name="1001" style:display-name="T28" style:family="text" style:name="1835">
      <style:paragraph-properties/>
    </style:style>
    <style:style style:parent-style-name="1001" style:display-name="T29" style:family="text" style:name="1836">
      <style:paragraph-properties/>
    </style:style>
    <style:style style:parent-style-name="1001" style:display-name="T30" style:family="text" style:name="1837">
      <style:paragraph-properties/>
    </style:style>
    <style:style style:parent-style-name="1001" style:display-name="T31" style:family="text" style:name="1838">
      <style:paragraph-properties/>
    </style:style>
    <style:style style:parent-style-name="1001" style:display-name="T32" style:family="text" style:name="1839">
      <style:paragraph-properties/>
    </style:style>
    <style:style style:parent-style-name="1001" style:display-name="T33" style:family="text" style:name="1840">
      <style:paragraph-properties/>
    </style:style>
    <style:style style:parent-style-name="1001" style:display-name="T34" style:family="text" style:name="1841">
      <style:paragraph-properties/>
    </style:style>
    <style:style style:parent-style-name="1001" style:display-name="T35" style:family="text" style:name="1842">
      <style:paragraph-properties/>
    </style:style>
    <style:style style:parent-style-name="1001" style:display-name="T36" style:family="text" style:name="1843">
      <style:paragraph-properties/>
    </style:style>
    <style:style style:parent-style-name="1001" style:display-name="T37" style:family="text" style:name="1844">
      <style:paragraph-properties/>
    </style:style>
    <style:style style:parent-style-name="1001" style:display-name="T38" style:family="text" style:name="1845">
      <style:paragraph-properties/>
    </style:style>
    <style:style style:parent-style-name="1001" style:display-name="T39" style:family="text" style:name="1846">
      <style:paragraph-properties/>
    </style:style>
    <style:style style:parent-style-name="1001" style:display-name="T40" style:family="text" style:name="1847">
      <style:paragraph-properties/>
    </style:style>
    <style:style style:parent-style-name="1001" style:display-name="T41" style:family="text" style:name="1848">
      <style:paragraph-properties/>
    </style:style>
    <style:style style:parent-style-name="1001" style:display-name="T42" style:family="text" style:name="1849">
      <style:paragraph-properties/>
    </style:style>
    <style:style style:parent-style-name="1001" style:display-name="T43" style:family="text" style:name="1850">
      <style:paragraph-properties/>
    </style:style>
    <style:style style:parent-style-name="1001" style:display-name="T44" style:family="text" style:name="1851">
      <style:paragraph-properties/>
    </style:style>
    <style:style style:parent-style-name="1001" style:display-name="T45" style:family="text" style:name="1852">
      <style:paragraph-properties/>
    </style:style>
    <style:style style:parent-style-name="1001" style:display-name="T46" style:family="text" style:name="1853">
      <style:paragraph-properties/>
    </style:style>
    <style:style style:parent-style-name="1001" style:display-name="T47" style:family="text" style:name="1854">
      <style:paragraph-properties/>
    </style:style>
    <style:style style:parent-style-name="1001" style:display-name="T48" style:family="text" style:name="1855">
      <style:paragraph-properties/>
    </style:style>
    <style:style style:parent-style-name="1001" style:display-name="T49" style:family="text" style:name="1856">
      <style:paragraph-properties/>
    </style:style>
    <style:style style:parent-style-name="1001" style:display-name="T50" style:family="text" style:name="1857">
      <style:paragraph-properties/>
    </style:style>
    <style:style style:parent-style-name="1001" style:display-name="T51" style:family="text" style:name="1858">
      <style:paragraph-properties/>
    </style:style>
    <style:style style:parent-style-name="1001" style:display-name="T52" style:family="text" style:name="1859">
      <style:paragraph-properties/>
    </style:style>
    <style:style style:parent-style-name="1001" style:display-name="T53" style:family="text" style:name="1860">
      <style:paragraph-properties/>
    </style:style>
    <style:style style:parent-style-name="1001" style:display-name="T54" style:family="text" style:name="1861">
      <style:paragraph-properties/>
    </style:style>
    <style:style style:parent-style-name="1001" style:display-name="T55" style:family="text" style:name="1862">
      <style:paragraph-properties/>
    </style:style>
    <style:style style:parent-style-name="1001" style:display-name="T56" style:family="text" style:name="1863">
      <style:paragraph-properties/>
    </style:style>
    <style:style style:parent-style-name="1001" style:display-name="T57" style:family="text" style:name="1864">
      <style:paragraph-properties/>
    </style:style>
    <style:style style:parent-style-name="1001" style:display-name="T58" style:family="text" style:name="1865">
      <style:paragraph-properties/>
    </style:style>
    <style:style style:parent-style-name="1001" style:display-name="T59" style:family="text" style:name="1866">
      <style:paragraph-properties/>
    </style:style>
    <style:style style:parent-style-name="1001" style:display-name="T60" style:family="text" style:name="1867">
      <style:paragraph-properties/>
    </style:style>
    <style:style style:parent-style-name="1001" style:display-name="T61" style:family="text" style:name="1868">
      <style:paragraph-properties/>
    </style:style>
    <style:style style:parent-style-name="1001" style:display-name="T62" style:family="text" style:name="1869">
      <style:paragraph-properties/>
    </style:style>
    <style:style style:parent-style-name="1001" style:display-name="T63" style:family="text" style:name="1870">
      <style:paragraph-properties/>
    </style:style>
    <style:style style:parent-style-name="1001" style:display-name="T64" style:family="text" style:name="1871">
      <style:paragraph-properties/>
    </style:style>
    <style:style style:parent-style-name="1001" style:display-name="T65" style:family="text" style:name="1872">
      <style:paragraph-properties/>
    </style:style>
    <style:style style:parent-style-name="1001" style:display-name="T66" style:family="text" style:name="1873">
      <style:paragraph-properties/>
    </style:style>
    <style:style style:parent-style-name="1001" style:display-name="T67" style:family="text" style:name="1874">
      <style:paragraph-properties/>
    </style:style>
    <style:style style:parent-style-name="1001" style:display-name="T68" style:family="text" style:name="1875">
      <style:paragraph-properties/>
    </style:style>
    <style:style style:parent-style-name="1001" style:display-name="T69" style:family="text" style:name="1876">
      <style:paragraph-properties/>
    </style:style>
    <style:style style:parent-style-name="1001" style:display-name="T70" style:family="text" style:name="1877">
      <style:paragraph-properties/>
    </style:style>
    <style:style style:parent-style-name="1001" style:display-name="T71" style:family="text" style:name="1878">
      <style:paragraph-properties/>
    </style:style>
    <style:style style:parent-style-name="1001" style:display-name="T72" style:family="text" style:name="1879">
      <style:paragraph-properties/>
    </style:style>
    <style:style style:parent-style-name="1001" style:display-name="T73" style:family="text" style:name="1880">
      <style:paragraph-properties/>
    </style:style>
    <style:style style:parent-style-name="1001" style:display-name="T74" style:family="text" style:name="1881">
      <style:paragraph-properties/>
    </style:style>
    <style:style style:parent-style-name="1001" style:display-name="T75" style:family="text" style:name="1882">
      <style:paragraph-properties/>
    </style:style>
    <style:style style:parent-style-name="1001" style:display-name="T76" style:family="text" style:name="1883">
      <style:paragraph-properties/>
    </style:style>
    <style:style style:parent-style-name="1001" style:display-name="T77" style:family="text" style:name="1884">
      <style:paragraph-properties/>
    </style:style>
    <style:style style:parent-style-name="1001" style:display-name="T78" style:family="text" style:name="1885">
      <style:paragraph-properties/>
    </style:style>
    <style:style style:parent-style-name="1001" style:display-name="T79" style:family="text" style:name="1886">
      <style:paragraph-properties/>
    </style:style>
    <style:style style:parent-style-name="1001" style:display-name="T80" style:family="text" style:name="1887">
      <style:paragraph-properties/>
    </style:style>
    <style:style style:parent-style-name="1001" style:display-name="T81" style:family="text" style:name="1888">
      <style:paragraph-properties/>
    </style:style>
    <style:style style:parent-style-name="1001" style:display-name="T82" style:family="text" style:name="1889">
      <style:paragraph-properties/>
    </style:style>
    <style:style style:parent-style-name="1001" style:display-name="T83" style:family="text" style:name="1890">
      <style:paragraph-properties/>
    </style:style>
    <style:style style:parent-style-name="1001" style:display-name="T84" style:family="text" style:name="1891">
      <style:paragraph-properties/>
    </style:style>
    <style:style style:parent-style-name="1001" style:display-name="T85" style:family="text" style:name="1892">
      <style:paragraph-properties/>
    </style:style>
    <style:style style:parent-style-name="1001" style:display-name="T86" style:family="text" style:name="1893">
      <style:paragraph-properties/>
    </style:style>
    <style:style style:parent-style-name="1001" style:display-name="T87" style:family="text" style:name="1894">
      <style:paragraph-properties/>
    </style:style>
    <style:style style:parent-style-name="1001" style:display-name="T88" style:family="text" style:name="1895">
      <style:paragraph-properties/>
    </style:style>
    <style:style style:parent-style-name="1001" style:display-name="T89" style:family="text" style:name="1896">
      <style:paragraph-properties/>
    </style:style>
    <style:style style:parent-style-name="1001" style:display-name="T90" style:family="text" style:name="1897">
      <style:paragraph-properties/>
    </style:style>
    <style:style style:parent-style-name="1001" style:display-name="T91" style:family="text" style:name="1898">
      <style:paragraph-properties/>
    </style:style>
    <style:style style:parent-style-name="1001" style:display-name="T92" style:family="text" style:name="1899">
      <style:paragraph-properties/>
    </style:style>
    <style:style style:parent-style-name="1001" style:display-name="T93" style:family="text" style:name="1900">
      <style:paragraph-properties/>
    </style:style>
    <style:style style:parent-style-name="1001" style:display-name="T94" style:family="text" style:name="1901">
      <style:paragraph-properties/>
    </style:style>
    <style:style style:parent-style-name="1001" style:display-name="T95" style:family="text" style:name="1902">
      <style:paragraph-properties/>
    </style:style>
    <style:style style:parent-style-name="1001" style:display-name="T96" style:family="text" style:name="1903">
      <style:paragraph-properties/>
    </style:style>
    <style:style style:parent-style-name="1001" style:display-name="T97" style:family="text" style:name="1904">
      <style:paragraph-properties/>
    </style:style>
    <style:style style:parent-style-name="1001" style:display-name="T98" style:family="text" style:name="1905">
      <style:paragraph-properties/>
    </style:style>
    <style:style style:parent-style-name="1001" style:display-name="T99" style:family="text" style:name="1906">
      <style:paragraph-properties/>
    </style:style>
    <style:style style:parent-style-name="1001" style:display-name="T100" style:family="text" style:name="1907">
      <style:paragraph-properties/>
    </style:style>
    <style:style style:parent-style-name="1001" style:display-name="T101" style:family="text" style:name="1908">
      <style:paragraph-properties/>
    </style:style>
    <style:style style:parent-style-name="1001" style:display-name="T102" style:family="text" style:name="1909">
      <style:paragraph-properties/>
    </style:style>
    <style:style style:parent-style-name="1001" style:display-name="T103" style:family="text" style:name="1910">
      <style:paragraph-properties/>
    </style:style>
    <style:style style:parent-style-name="1001" style:display-name="T104" style:family="text" style:name="1911">
      <style:paragraph-properties/>
    </style:style>
    <style:style style:parent-style-name="1001" style:display-name="T105" style:family="text" style:name="1912">
      <style:paragraph-properties/>
    </style:style>
    <style:style style:parent-style-name="1001" style:display-name="T106" style:family="text" style:name="1913">
      <style:paragraph-properties/>
    </style:style>
    <style:style style:parent-style-name="1001" style:display-name="T107" style:family="text" style:name="1914">
      <style:paragraph-properties/>
    </style:style>
    <style:style style:parent-style-name="1001" style:display-name="T108" style:family="text" style:name="1915">
      <style:paragraph-properties/>
    </style:style>
    <style:style style:parent-style-name="1001" style:display-name="T109" style:family="text" style:name="1916">
      <style:paragraph-properties/>
    </style:style>
    <style:style style:parent-style-name="1001" style:display-name="T110" style:family="text" style:name="1917">
      <style:paragraph-properties/>
    </style:style>
    <style:style style:parent-style-name="1001" style:display-name="T111" style:family="text" style:name="1918">
      <style:paragraph-properties/>
    </style:style>
    <style:style style:parent-style-name="1001" style:display-name="T112" style:family="text" style:name="1919">
      <style:paragraph-properties/>
    </style:style>
    <style:style style:parent-style-name="1001" style:display-name="T113" style:family="text" style:name="1920">
      <style:paragraph-properties/>
    </style:style>
    <style:style style:parent-style-name="1001" style:display-name="T114" style:family="text" style:name="1921">
      <style:paragraph-properties/>
    </style:style>
    <style:style style:parent-style-name="1001" style:display-name="T115" style:family="text" style:name="1922">
      <style:paragraph-properties/>
    </style:style>
    <style:style style:parent-style-name="1001" style:display-name="T116" style:family="text" style:name="1923">
      <style:paragraph-properties/>
    </style:style>
    <style:style style:parent-style-name="1001" style:display-name="T117" style:family="text" style:name="1924">
      <style:paragraph-properties/>
    </style:style>
    <style:style style:parent-style-name="1001" style:display-name="T118" style:family="text" style:name="1925">
      <style:paragraph-properties/>
    </style:style>
    <style:style style:parent-style-name="1001" style:display-name="T119" style:family="text" style:name="1926">
      <style:paragraph-properties/>
    </style:style>
    <style:style style:parent-style-name="1001" style:display-name="T120" style:family="text" style:name="1927">
      <style:paragraph-properties/>
    </style:style>
    <style:style style:parent-style-name="1001" style:display-name="T121" style:family="text" style:name="1928">
      <style:paragraph-properties/>
    </style:style>
    <style:style style:parent-style-name="1001" style:display-name="T122" style:family="text" style:name="1929">
      <style:paragraph-properties/>
    </style:style>
    <style:style style:parent-style-name="1001" style:display-name="T123" style:family="text" style:name="1930">
      <style:paragraph-properties/>
    </style:style>
    <style:style style:parent-style-name="1001" style:display-name="T124" style:family="text" style:name="1931">
      <style:paragraph-properties/>
    </style:style>
    <style:style style:parent-style-name="1001" style:display-name="T125" style:family="text" style:name="1932">
      <style:paragraph-properties/>
    </style:style>
    <style:style style:parent-style-name="1001" style:display-name="T126" style:family="text" style:name="1933">
      <style:paragraph-properties/>
    </style:style>
    <style:style style:parent-style-name="1001" style:display-name="T127" style:family="text" style:name="1934">
      <style:paragraph-properties/>
    </style:style>
    <style:style style:parent-style-name="1001" style:display-name="T128" style:family="text" style:name="1935">
      <style:paragraph-properties/>
    </style:style>
    <style:style style:parent-style-name="1001" style:display-name="T129" style:family="text" style:name="1936">
      <style:paragraph-properties/>
    </style:style>
    <style:style style:parent-style-name="1001" style:display-name="T130" style:family="text" style:name="1937">
      <style:paragraph-properties/>
    </style:style>
    <style:style style:parent-style-name="1001" style:display-name="T131" style:family="text" style:name="1938">
      <style:paragraph-properties/>
    </style:style>
    <style:style style:parent-style-name="1001" style:display-name="T132" style:family="text" style:name="1939">
      <style:paragraph-properties/>
    </style:style>
    <style:style style:parent-style-name="1001" style:display-name="T133" style:family="text" style:name="1940">
      <style:paragraph-properties/>
    </style:style>
    <style:style style:parent-style-name="1001" style:display-name="T134" style:family="text" style:name="1941">
      <style:paragraph-properties/>
    </style:style>
    <style:style style:parent-style-name="1001" style:display-name="T135" style:family="text" style:name="1942">
      <style:paragraph-properties/>
    </style:style>
    <style:style style:parent-style-name="1001" style:display-name="T136" style:family="text" style:name="1943">
      <style:paragraph-properties/>
    </style:style>
    <style:style style:parent-style-name="1001" style:display-name="T137" style:family="text" style:name="1944">
      <style:paragraph-properties/>
    </style:style>
    <style:style style:parent-style-name="1001" style:display-name="T138" style:family="text" style:name="1945">
      <style:paragraph-properties/>
    </style:style>
    <style:style style:parent-style-name="1001" style:display-name="T139" style:family="text" style:name="1946">
      <style:paragraph-properties/>
    </style:style>
    <style:style style:parent-style-name="1001" style:display-name="T140" style:family="text" style:name="1947">
      <style:paragraph-properties/>
    </style:style>
    <style:style style:parent-style-name="1001" style:display-name="T141" style:family="text" style:name="1948">
      <style:paragraph-properties/>
    </style:style>
    <style:style style:parent-style-name="1001" style:display-name="T142" style:family="text" style:name="1949">
      <style:paragraph-properties/>
    </style:style>
    <style:style style:parent-style-name="1001" style:display-name="T143" style:family="text" style:name="1950">
      <style:paragraph-properties/>
    </style:style>
    <style:style style:parent-style-name="1001" style:display-name="T144" style:family="text" style:name="1951">
      <style:paragraph-properties/>
    </style:style>
    <style:style style:parent-style-name="1001" style:display-name="T145" style:family="text" style:name="1952">
      <style:paragraph-properties/>
    </style:style>
    <style:style style:parent-style-name="1001" style:display-name="T146" style:family="text" style:name="1953">
      <style:paragraph-properties/>
      <style:text-properties fo:font-family="Courier New" style:font-family-complex="Courier New"/>
    </style:style>
    <style:style style:parent-style-name="1001" style:display-name="T147" style:family="text" style:name="1954">
      <style:paragraph-properties/>
      <style:text-properties fo:font-family="Wingdings" style:font-family-complex="Wingdings"/>
    </style:style>
    <style:style style:parent-style-name="1001" style:display-name="T148" style:family="text" style:name="1955">
      <style:paragraph-properties/>
      <style:text-properties fo:font-family="Symbol" style:font-family-complex="Symbol"/>
    </style:style>
    <style:style style:parent-style-name="1001" style:display-name="T149" style:family="text" style:name="1956">
      <style:paragraph-properties/>
      <style:text-properties fo:font-family="Courier New" style:font-family-complex="Courier New"/>
    </style:style>
    <style:style style:parent-style-name="1001" style:display-name="T150" style:family="text" style:name="1957">
      <style:paragraph-properties/>
      <style:text-properties fo:font-family="Wingdings" style:font-family-complex="Wingdings"/>
    </style:style>
    <style:style style:parent-style-name="1001" style:display-name="T151" style:family="text" style:name="1958">
      <style:paragraph-properties/>
      <style:text-properties fo:font-family="Symbol" style:font-family-complex="Symbol"/>
    </style:style>
    <style:style style:parent-style-name="1001" style:display-name="T152" style:family="text" style:name="1959">
      <style:paragraph-properties/>
      <style:text-properties fo:font-family="Courier New" style:font-family-complex="Courier New"/>
    </style:style>
    <style:style style:parent-style-name="1001" style:display-name="T153" style:family="text" style:name="1960">
      <style:paragraph-properties/>
      <style:text-properties fo:font-family="Wingdings" style:font-family-complex="Wingdings"/>
    </style:style>
    <style:style style:parent-style-name="1001" style:display-name="T154" style:family="text" style:name="1961">
      <style:paragraph-properties/>
      <style:text-properties fo:font-family="Symbol" style:font-family-complex="Symbol"/>
    </style:style>
    <style:style style:parent-style-name="1001" style:display-name="T155" style:family="text" style:name="1962">
      <style:paragraph-properties/>
      <style:text-properties fo:font-family="Courier New" style:font-family-complex="Courier New"/>
    </style:style>
    <style:style style:parent-style-name="1001" style:display-name="T156" style:family="text" style:name="1963">
      <style:paragraph-properties/>
      <style:text-properties fo:font-family="Wingdings" style:font-family-complex="Wingdings"/>
    </style:style>
    <style:style style:parent-style-name="1001" style:display-name="T157" style:family="text" style:name="1964">
      <style:paragraph-properties/>
      <style:text-properties fo:font-family="Symbol" style:font-family-complex="Symbol"/>
    </style:style>
    <style:style style:parent-style-name="1001" style:display-name="T158" style:family="text" style:name="1965">
      <style:paragraph-properties/>
      <style:text-properties fo:font-family="Courier New" style:font-family-complex="Courier New"/>
    </style:style>
    <style:style style:parent-style-name="1001" style:display-name="T159" style:family="text" style:name="1966">
      <style:paragraph-properties/>
      <style:text-properties fo:font-family="Wingdings" style:font-family-complex="Wingdings"/>
    </style:style>
    <style:style style:parent-style-name="1001" style:display-name="T160" style:family="text" style:name="1967">
      <style:paragraph-properties/>
      <style:text-properties fo:font-family="Symbol" style:font-family-complex="Symbol"/>
    </style:style>
    <style:style style:parent-style-name="1001" style:display-name="T161" style:family="text" style:name="1968">
      <style:paragraph-properties/>
      <style:text-properties fo:font-family="Courier New" style:font-family-complex="Courier New"/>
    </style:style>
    <style:style style:parent-style-name="1001" style:display-name="T162" style:family="text" style:name="1969">
      <style:paragraph-properties/>
      <style:text-properties fo:font-family="Wingdings" style:font-family-complex="Wingdings"/>
    </style:style>
    <style:style style:parent-style-name="1001" style:display-name="T163" style:family="text" style:name="1970">
      <style:paragraph-properties/>
      <style:text-properties fo:font-family="Symbol" style:font-family-complex="Symbol" fo:font-weight="bold"/>
    </style:style>
    <style:style style:parent-style-name="1001" style:display-name="T164" style:family="text" style:name="1971">
      <style:paragraph-properties/>
      <style:text-properties fo:font-family="Symbol" style:font-family-complex="Symbol"/>
    </style:style>
    <style:style style:parent-style-name="1001" style:display-name="T165" style:family="text" style:name="1972">
      <style:paragraph-properties/>
      <style:text-properties fo:font-family="Wingdings" style:font-family-complex="Wingdings"/>
    </style:style>
    <style:style style:parent-style-name="1001" style:display-name="T166" style:family="text" style:name="1973">
      <style:paragraph-properties/>
      <style:text-properties fo:font-family="Symbol" style:font-family-complex="Symbol"/>
    </style:style>
    <style:style style:parent-style-name="1001" style:display-name="T167" style:family="text" style:name="1974">
      <style:paragraph-properties/>
      <style:text-properties fo:font-family="Courier New" style:font-family-complex="Courier New"/>
    </style:style>
    <style:style style:parent-style-name="1001" style:display-name="T168" style:family="text" style:name="1975">
      <style:paragraph-properties/>
      <style:text-properties fo:font-family="Wingdings" style:font-family-complex="Wingdings"/>
    </style:style>
    <style:style style:parent-style-name="1001" style:display-name="T169" style:family="text" style:name="1976">
      <style:paragraph-properties/>
      <style:text-properties fo:font-family="Symbol" style:font-family-complex="Symbol"/>
    </style:style>
    <style:style style:parent-style-name="1001" style:display-name="T170" style:family="text" style:name="1977">
      <style:paragraph-properties/>
      <style:text-properties fo:font-family="Courier New" style:font-family-complex="Courier New"/>
    </style:style>
    <style:style style:parent-style-name="1001" style:display-name="T171" style:family="text" style:name="1978">
      <style:paragraph-properties/>
      <style:text-properties fo:font-family="Wingdings" style:font-family-complex="Wingdings"/>
    </style:style>
    <style:style style:parent-style-name="1001" style:display-name="T172" style:family="text" style:name="1979">
      <style:paragraph-properties/>
      <style:text-properties fo:font-family="Symbol" style:font-family-complex="Symbol"/>
    </style:style>
    <style:style style:parent-style-name="1001" style:display-name="T173" style:family="text" style:name="1980">
      <style:paragraph-properties/>
      <style:text-properties fo:font-family="Courier New" style:font-family-complex="Courier New"/>
    </style:style>
    <style:style style:parent-style-name="1001" style:display-name="T174" style:family="text" style:name="1981">
      <style:paragraph-properties/>
      <style:text-properties fo:font-family="Wingdings" style:font-family-complex="Wingdings"/>
    </style:style>
    <style:style style:parent-style-name="1001" style:display-name="T175" style:family="text" style:name="1982">
      <style:paragraph-properties/>
      <style:text-properties fo:font-family="Symbol" style:font-family-complex="Symbol"/>
    </style:style>
    <style:style style:parent-style-name="1001" style:display-name="T176" style:family="text" style:name="1983">
      <style:paragraph-properties/>
      <style:text-properties fo:font-family="Courier New" style:font-family-complex="Courier New"/>
    </style:style>
    <style:style style:parent-style-name="1001" style:display-name="T177" style:family="text" style:name="1984">
      <style:paragraph-properties/>
      <style:text-properties fo:font-family="Wingdings" style:font-family-complex="Wingdings"/>
    </style:style>
    <style:style style:parent-style-name="1001" style:display-name="T178" style:family="text" style:name="1985">
      <style:paragraph-properties/>
      <style:text-properties fo:font-family="Symbol" style:font-family-complex="Symbol"/>
    </style:style>
    <style:style style:parent-style-name="1001" style:display-name="T179" style:family="text" style:name="1986">
      <style:paragraph-properties/>
      <style:text-properties fo:font-family="Courier New" style:font-family-complex="Courier New"/>
    </style:style>
    <style:style style:parent-style-name="1001" style:display-name="T180" style:family="text" style:name="1987">
      <style:paragraph-properties/>
      <style:text-properties fo:font-family="Wingdings" style:font-family-complex="Wingdings"/>
    </style:style>
    <style:style style:parent-style-name="1001" style:display-name="T181" style:family="text" style:name="1988">
      <style:paragraph-properties/>
      <style:text-properties fo:font-family="Symbol" style:font-family-complex="Symbol"/>
    </style:style>
    <style:style style:parent-style-name="1001" style:display-name="T182" style:family="text" style:name="1989">
      <style:paragraph-properties/>
    </style:style>
    <style:style style:parent-style-name="1001" style:display-name="T183" style:family="text" style:name="1990">
      <style:paragraph-properties/>
      <style:text-properties fo:font-family="Wingdings" style:font-family-complex="Wingdings"/>
    </style:style>
    <style:style style:parent-style-name="1001" style:display-name="T184" style:family="text" style:name="1991">
      <style:paragraph-properties/>
      <style:text-properties fo:font-family="Symbol" style:font-family-complex="Symbol"/>
    </style:style>
    <style:style style:parent-style-name="1001" style:display-name="T185" style:family="text" style:name="1992">
      <style:paragraph-properties/>
      <style:text-properties fo:font-family="Courier New" style:font-family-complex="Courier New"/>
    </style:style>
    <style:style style:parent-style-name="1001" style:display-name="T186" style:family="text" style:name="1993">
      <style:paragraph-properties/>
      <style:text-properties fo:font-family="Wingdings" style:font-family-complex="Wingdings"/>
    </style:style>
    <style:style style:parent-style-name="1001" style:display-name="T187" style:family="text" style:name="1994">
      <style:paragraph-properties/>
      <style:text-properties fo:font-family="Symbol" style:font-family-complex="Symbol"/>
    </style:style>
    <style:style style:parent-style-name="1001" style:display-name="T188" style:family="text" style:name="1995">
      <style:paragraph-properties/>
      <style:text-properties fo:font-family="Courier New" style:font-family-complex="Courier New"/>
    </style:style>
    <style:style style:parent-style-name="1001" style:display-name="T189" style:family="text" style:name="1996">
      <style:paragraph-properties/>
      <style:text-properties fo:font-family="Wingdings" style:font-family-complex="Wingdings"/>
    </style:style>
    <style:style style:parent-style-name="1001" style:display-name="T190" style:family="text" style:name="1997">
      <style:paragraph-properties/>
      <style:text-properties fo:font-family="Symbol" style:font-family-complex="Symbol"/>
    </style:style>
    <style:style style:parent-style-name="1001" style:display-name="T191" style:family="text" style:name="1998">
      <style:paragraph-properties/>
    </style:style>
    <style:style style:parent-style-name="1001" style:display-name="T192" style:family="text" style:name="1999">
      <style:paragraph-properties/>
      <style:text-properties fo:font-family="Wingdings" style:font-family-complex="Wingdings"/>
    </style:style>
    <style:style style:parent-style-name="1001" style:display-name="T193" style:family="text" style:name="2000">
      <style:paragraph-properties/>
      <style:text-properties fo:font-family="Symbol" style:font-family-complex="Symbol"/>
    </style:style>
    <style:style style:parent-style-name="1001" style:display-name="T194" style:family="text" style:name="2001">
      <style:paragraph-properties/>
      <style:text-properties fo:font-family="Courier New" style:font-family-complex="Courier New"/>
    </style:style>
    <style:style style:parent-style-name="1001" style:display-name="T195" style:family="text" style:name="2002">
      <style:paragraph-properties/>
      <style:text-properties fo:font-family="Wingdings" style:font-family-complex="Wingdings"/>
    </style:style>
    <style:style style:parent-style-name="1001" style:display-name="T196" style:family="text" style:name="2003">
      <style:paragraph-properties/>
      <style:text-properties fo:font-family="Symbol" style:font-family-complex="Symbol"/>
    </style:style>
    <style:style style:parent-style-name="1001" style:display-name="T197" style:family="text" style:name="2004">
      <style:paragraph-properties/>
      <style:text-properties fo:font-family="Courier New" style:font-family-complex="Courier New"/>
    </style:style>
    <style:style style:parent-style-name="1001" style:display-name="T198" style:family="text" style:name="2005">
      <style:paragraph-properties/>
      <style:text-properties fo:font-family="Wingdings" style:font-family-complex="Wingdings"/>
    </style:style>
    <style:style style:parent-style-name="1001" style:display-name="T1" style:family="text" style:name="2006">
      <style:paragraph-properties/>
    </style:style>
    <style:style style:parent-style-name="1001" style:display-name="T2" style:family="text" style:name="2007">
      <style:paragraph-properties/>
    </style:style>
    <style:style style:parent-style-name="1001" style:display-name="T3" style:family="text" style:name="2008">
      <style:paragraph-properties/>
    </style:style>
    <style:style style:parent-style-name="1001" style:display-name="T4" style:family="text" style:name="2009">
      <style:paragraph-properties/>
    </style:style>
    <style:style style:parent-style-name="1001" style:display-name="T5" style:family="text" style:name="2010">
      <style:paragraph-properties/>
    </style:style>
    <style:style style:parent-style-name="1001" style:display-name="T6" style:family="text" style:name="2011">
      <style:paragraph-properties/>
    </style:style>
    <style:style style:parent-style-name="1001" style:display-name="T7" style:family="text" style:name="2012">
      <style:paragraph-properties/>
    </style:style>
    <style:style style:parent-style-name="1001" style:display-name="T8" style:family="text" style:name="2013">
      <style:paragraph-properties/>
    </style:style>
    <style:style style:parent-style-name="1001" style:display-name="T9" style:family="text" style:name="2014">
      <style:paragraph-properties/>
    </style:style>
    <style:style style:parent-style-name="1001" style:display-name="T10" style:family="text" style:name="2015">
      <style:paragraph-properties/>
    </style:style>
    <style:style style:parent-style-name="1001" style:display-name="T11" style:family="text" style:name="2016">
      <style:paragraph-properties/>
    </style:style>
    <style:style style:parent-style-name="1001" style:display-name="T12" style:family="text" style:name="2017">
      <style:paragraph-properties/>
    </style:style>
    <style:style style:parent-style-name="1001" style:display-name="T13" style:family="text" style:name="2018">
      <style:paragraph-properties/>
    </style:style>
    <style:style style:parent-style-name="1001" style:display-name="T14" style:family="text" style:name="2019">
      <style:paragraph-properties/>
    </style:style>
    <style:style style:parent-style-name="1001" style:display-name="T15" style:family="text" style:name="2020">
      <style:paragraph-properties/>
    </style:style>
    <style:style style:parent-style-name="1001" style:display-name="T16" style:family="text" style:name="2021">
      <style:paragraph-properties/>
    </style:style>
    <style:style style:parent-style-name="1001" style:display-name="T17" style:family="text" style:name="2022">
      <style:paragraph-properties/>
    </style:style>
    <style:style style:parent-style-name="1001" style:display-name="T18" style:family="text" style:name="2023">
      <style:paragraph-properties/>
    </style:style>
    <style:style style:parent-style-name="1001" style:display-name="T19" style:family="text" style:name="2024">
      <style:paragraph-properties/>
    </style:style>
    <style:style style:parent-style-name="1001" style:display-name="T20" style:family="text" style:name="2025">
      <style:paragraph-properties/>
    </style:style>
    <style:style style:parent-style-name="1001" style:display-name="T21" style:family="text" style:name="2026">
      <style:paragraph-properties/>
    </style:style>
    <style:style style:parent-style-name="1001" style:display-name="T22" style:family="text" style:name="2027">
      <style:paragraph-properties/>
    </style:style>
    <style:style style:parent-style-name="1001" style:display-name="T23" style:family="text" style:name="2028">
      <style:paragraph-properties/>
    </style:style>
    <style:style style:parent-style-name="1001" style:display-name="T24" style:family="text" style:name="2029">
      <style:paragraph-properties/>
    </style:style>
    <style:style style:parent-style-name="1001" style:display-name="T25" style:family="text" style:name="2030">
      <style:paragraph-properties/>
    </style:style>
    <style:style style:parent-style-name="1001" style:display-name="T26" style:family="text" style:name="2031">
      <style:paragraph-properties/>
    </style:style>
    <style:style style:parent-style-name="1001" style:display-name="T27" style:family="text" style:name="2032">
      <style:paragraph-properties/>
    </style:style>
    <style:style style:parent-style-name="1001" style:display-name="T28" style:family="text" style:name="2033">
      <style:paragraph-properties/>
    </style:style>
    <style:style style:parent-style-name="1001" style:display-name="T29" style:family="text" style:name="2034">
      <style:paragraph-properties/>
    </style:style>
    <style:style style:parent-style-name="1001" style:display-name="T30" style:family="text" style:name="2035">
      <style:paragraph-properties/>
    </style:style>
    <style:style style:parent-style-name="1001" style:display-name="T31" style:family="text" style:name="2036">
      <style:paragraph-properties/>
    </style:style>
    <style:style style:parent-style-name="1001" style:display-name="T32" style:family="text" style:name="2037">
      <style:paragraph-properties/>
    </style:style>
    <style:style style:parent-style-name="1001" style:display-name="T33" style:family="text" style:name="2038">
      <style:paragraph-properties/>
    </style:style>
    <style:style style:parent-style-name="1001" style:display-name="T34" style:family="text" style:name="2039">
      <style:paragraph-properties/>
    </style:style>
    <style:style style:parent-style-name="1001" style:display-name="T35" style:family="text" style:name="2040">
      <style:paragraph-properties/>
    </style:style>
    <style:style style:parent-style-name="1001" style:display-name="T36" style:family="text" style:name="2041">
      <style:paragraph-properties/>
    </style:style>
    <style:style style:parent-style-name="1001" style:display-name="T37" style:family="text" style:name="2042">
      <style:paragraph-properties/>
    </style:style>
    <style:style style:parent-style-name="1001" style:display-name="T38" style:family="text" style:name="2043">
      <style:paragraph-properties/>
    </style:style>
    <style:style style:parent-style-name="1001" style:display-name="T39" style:family="text" style:name="2044">
      <style:paragraph-properties/>
    </style:style>
    <style:style style:parent-style-name="1001" style:display-name="T40" style:family="text" style:name="2045">
      <style:paragraph-properties/>
    </style:style>
    <style:style style:parent-style-name="1001" style:display-name="T41" style:family="text" style:name="2046">
      <style:paragraph-properties/>
    </style:style>
    <style:style style:parent-style-name="1001" style:display-name="T42" style:family="text" style:name="2047">
      <style:paragraph-properties/>
    </style:style>
    <style:style style:parent-style-name="1001" style:display-name="T43" style:family="text" style:name="2048">
      <style:paragraph-properties/>
    </style:style>
    <style:style style:parent-style-name="1001" style:display-name="T44" style:family="text" style:name="2049">
      <style:paragraph-properties/>
    </style:style>
    <style:style style:parent-style-name="1001" style:display-name="T45" style:family="text" style:name="2050">
      <style:paragraph-properties/>
    </style:style>
    <style:style style:parent-style-name="1001" style:display-name="T46" style:family="text" style:name="2051">
      <style:paragraph-properties/>
    </style:style>
    <style:style style:parent-style-name="1001" style:display-name="T47" style:family="text" style:name="2052">
      <style:paragraph-properties/>
    </style:style>
    <style:style style:parent-style-name="1001" style:display-name="T48" style:family="text" style:name="2053">
      <style:paragraph-properties/>
    </style:style>
    <style:style style:parent-style-name="1001" style:display-name="T49" style:family="text" style:name="2054">
      <style:paragraph-properties/>
    </style:style>
    <style:style style:parent-style-name="1001" style:display-name="T50" style:family="text" style:name="2055">
      <style:paragraph-properties/>
    </style:style>
    <style:style style:parent-style-name="1001" style:display-name="T51" style:family="text" style:name="2056">
      <style:paragraph-properties/>
    </style:style>
    <style:style style:parent-style-name="1001" style:display-name="T52" style:family="text" style:name="2057">
      <style:paragraph-properties/>
    </style:style>
    <style:style style:parent-style-name="1001" style:display-name="T53" style:family="text" style:name="2058">
      <style:paragraph-properties/>
    </style:style>
    <style:style style:parent-style-name="1001" style:display-name="T54" style:family="text" style:name="2059">
      <style:paragraph-properties/>
    </style:style>
    <style:style style:parent-style-name="1001" style:display-name="T55" style:family="text" style:name="2060">
      <style:paragraph-properties/>
    </style:style>
    <style:style style:parent-style-name="1001" style:display-name="T56" style:family="text" style:name="2061">
      <style:paragraph-properties/>
    </style:style>
    <style:style style:parent-style-name="1001" style:display-name="T57" style:family="text" style:name="2062">
      <style:paragraph-properties/>
    </style:style>
    <style:style style:parent-style-name="1001" style:display-name="T58" style:family="text" style:name="2063">
      <style:paragraph-properties/>
    </style:style>
    <style:style style:parent-style-name="1001" style:display-name="T59" style:family="text" style:name="2064">
      <style:paragraph-properties/>
    </style:style>
    <style:style style:parent-style-name="1001" style:display-name="T60" style:family="text" style:name="2065">
      <style:paragraph-properties/>
    </style:style>
    <style:style style:parent-style-name="1001" style:display-name="T61" style:family="text" style:name="2066">
      <style:paragraph-properties/>
    </style:style>
    <style:style style:parent-style-name="1001" style:display-name="T62" style:family="text" style:name="2067">
      <style:paragraph-properties/>
    </style:style>
    <style:style style:parent-style-name="1001" style:display-name="T63" style:family="text" style:name="2068">
      <style:paragraph-properties/>
    </style:style>
    <style:style style:parent-style-name="1001" style:display-name="T64" style:family="text" style:name="2069">
      <style:paragraph-properties/>
    </style:style>
    <style:style style:parent-style-name="1001" style:display-name="T65" style:family="text" style:name="2070">
      <style:paragraph-properties/>
    </style:style>
    <style:style style:parent-style-name="1001" style:display-name="T66" style:family="text" style:name="2071">
      <style:paragraph-properties/>
    </style:style>
    <style:style style:parent-style-name="1001" style:display-name="T67" style:family="text" style:name="2072">
      <style:paragraph-properties/>
    </style:style>
    <style:style style:parent-style-name="1001" style:display-name="T68" style:family="text" style:name="2073">
      <style:paragraph-properties/>
    </style:style>
    <style:style style:parent-style-name="1001" style:display-name="T69" style:family="text" style:name="2074">
      <style:paragraph-properties/>
    </style:style>
    <style:style style:parent-style-name="1001" style:display-name="T70" style:family="text" style:name="2075">
      <style:paragraph-properties/>
    </style:style>
    <style:style style:parent-style-name="1001" style:display-name="T71" style:family="text" style:name="2076">
      <style:paragraph-properties/>
    </style:style>
    <style:style style:parent-style-name="1001" style:display-name="T72" style:family="text" style:name="2077">
      <style:paragraph-properties/>
    </style:style>
    <style:style style:parent-style-name="1001" style:display-name="T73" style:family="text" style:name="2078">
      <style:paragraph-properties/>
    </style:style>
    <style:style style:parent-style-name="1001" style:display-name="T74" style:family="text" style:name="2079">
      <style:paragraph-properties/>
    </style:style>
    <style:style style:parent-style-name="1001" style:display-name="T75" style:family="text" style:name="2080">
      <style:paragraph-properties/>
    </style:style>
    <style:style style:parent-style-name="1001" style:display-name="T76" style:family="text" style:name="2081">
      <style:paragraph-properties/>
    </style:style>
    <style:style style:parent-style-name="1001" style:display-name="T77" style:family="text" style:name="2082">
      <style:paragraph-properties/>
    </style:style>
    <style:style style:parent-style-name="1001" style:display-name="T78" style:family="text" style:name="2083">
      <style:paragraph-properties/>
    </style:style>
    <style:style style:parent-style-name="1001" style:display-name="T79" style:family="text" style:name="2084">
      <style:paragraph-properties/>
    </style:style>
    <style:style style:parent-style-name="1001" style:display-name="T80" style:family="text" style:name="2085">
      <style:paragraph-properties/>
    </style:style>
    <style:style style:parent-style-name="1001" style:display-name="T81" style:family="text" style:name="2086">
      <style:paragraph-properties/>
    </style:style>
    <style:style style:parent-style-name="1001" style:display-name="T82" style:family="text" style:name="2087">
      <style:paragraph-properties/>
    </style:style>
    <style:style style:parent-style-name="1001" style:display-name="T83" style:family="text" style:name="2088">
      <style:paragraph-properties/>
    </style:style>
    <style:style style:parent-style-name="1001" style:display-name="T84" style:family="text" style:name="2089">
      <style:paragraph-properties/>
    </style:style>
    <style:style style:parent-style-name="1001" style:display-name="T85" style:family="text" style:name="2090">
      <style:paragraph-properties/>
    </style:style>
    <style:style style:parent-style-name="1001" style:display-name="T86" style:family="text" style:name="2091">
      <style:paragraph-properties/>
    </style:style>
    <style:style style:parent-style-name="1001" style:display-name="T87" style:family="text" style:name="2092">
      <style:paragraph-properties/>
    </style:style>
    <style:style style:parent-style-name="1001" style:display-name="T88" style:family="text" style:name="2093">
      <style:paragraph-properties/>
    </style:style>
    <style:style style:parent-style-name="1001" style:display-name="T89" style:family="text" style:name="2094">
      <style:paragraph-properties/>
    </style:style>
    <style:style style:parent-style-name="1001" style:display-name="T90" style:family="text" style:name="2095">
      <style:paragraph-properties/>
    </style:style>
    <style:style style:parent-style-name="1001" style:display-name="T91" style:family="text" style:name="2096">
      <style:paragraph-properties/>
    </style:style>
    <style:style style:parent-style-name="1001" style:display-name="T92" style:family="text" style:name="2097">
      <style:paragraph-properties/>
    </style:style>
    <style:style style:parent-style-name="1001" style:display-name="T93" style:family="text" style:name="2098">
      <style:paragraph-properties/>
    </style:style>
    <style:style style:parent-style-name="1001" style:display-name="T94" style:family="text" style:name="2099">
      <style:paragraph-properties/>
    </style:style>
    <style:style style:parent-style-name="1001" style:display-name="T95" style:family="text" style:name="2100">
      <style:paragraph-properties/>
    </style:style>
    <style:style style:parent-style-name="1001" style:display-name="T96" style:family="text" style:name="2101">
      <style:paragraph-properties/>
    </style:style>
    <style:style style:parent-style-name="1001" style:display-name="T97" style:family="text" style:name="2102">
      <style:paragraph-properties/>
    </style:style>
    <style:style style:parent-style-name="1001" style:display-name="T98" style:family="text" style:name="2103">
      <style:paragraph-properties/>
    </style:style>
    <style:style style:parent-style-name="1001" style:display-name="T99" style:family="text" style:name="2104">
      <style:paragraph-properties/>
    </style:style>
    <style:style style:parent-style-name="1001" style:display-name="T100" style:family="text" style:name="2105">
      <style:paragraph-properties/>
    </style:style>
    <style:style style:parent-style-name="1001" style:display-name="T101" style:family="text" style:name="2106">
      <style:paragraph-properties/>
    </style:style>
    <style:style style:parent-style-name="1001" style:display-name="T102" style:family="text" style:name="2107">
      <style:paragraph-properties/>
    </style:style>
    <style:style style:parent-style-name="1001" style:display-name="T103" style:family="text" style:name="2108">
      <style:paragraph-properties/>
    </style:style>
    <style:style style:parent-style-name="1001" style:display-name="T104" style:family="text" style:name="2109">
      <style:paragraph-properties/>
    </style:style>
    <style:style style:parent-style-name="1001" style:display-name="T105" style:family="text" style:name="2110">
      <style:paragraph-properties/>
    </style:style>
    <style:style style:parent-style-name="1001" style:display-name="T106" style:family="text" style:name="2111">
      <style:paragraph-properties/>
    </style:style>
    <style:style style:parent-style-name="1001" style:display-name="T107" style:family="text" style:name="2112">
      <style:paragraph-properties/>
    </style:style>
    <style:style style:parent-style-name="1001" style:display-name="T108" style:family="text" style:name="2113">
      <style:paragraph-properties/>
    </style:style>
    <style:style style:parent-style-name="1001" style:display-name="T109" style:family="text" style:name="2114">
      <style:paragraph-properties/>
    </style:style>
    <style:style style:parent-style-name="1001" style:display-name="T110" style:family="text" style:name="2115">
      <style:paragraph-properties/>
    </style:style>
    <style:style style:parent-style-name="1001" style:display-name="T111" style:family="text" style:name="2116">
      <style:paragraph-properties/>
    </style:style>
    <style:style style:parent-style-name="1001" style:display-name="T112" style:family="text" style:name="2117">
      <style:paragraph-properties/>
    </style:style>
    <style:style style:parent-style-name="1001" style:display-name="T113" style:family="text" style:name="2118">
      <style:paragraph-properties/>
    </style:style>
    <style:style style:parent-style-name="1001" style:display-name="T114" style:family="text" style:name="2119">
      <style:paragraph-properties/>
    </style:style>
    <style:style style:parent-style-name="1001" style:display-name="T115" style:family="text" style:name="2120">
      <style:paragraph-properties/>
    </style:style>
    <style:style style:parent-style-name="1001" style:display-name="T116" style:family="text" style:name="2121">
      <style:paragraph-properties/>
    </style:style>
    <style:style style:parent-style-name="1001" style:display-name="T117" style:family="text" style:name="2122">
      <style:paragraph-properties/>
    </style:style>
    <style:style style:parent-style-name="1001" style:display-name="T118" style:family="text" style:name="2123">
      <style:paragraph-properties/>
    </style:style>
    <style:style style:parent-style-name="1001" style:display-name="T119" style:family="text" style:name="2124">
      <style:paragraph-properties/>
    </style:style>
    <style:style style:parent-style-name="1001" style:display-name="T120" style:family="text" style:name="2125">
      <style:paragraph-properties/>
    </style:style>
    <style:style style:parent-style-name="1001" style:display-name="T121" style:family="text" style:name="2126">
      <style:paragraph-properties/>
    </style:style>
    <style:style style:parent-style-name="1001" style:display-name="T122" style:family="text" style:name="2127">
      <style:paragraph-properties/>
    </style:style>
    <style:style style:parent-style-name="1001" style:display-name="T123" style:family="text" style:name="2128">
      <style:paragraph-properties/>
    </style:style>
    <style:style style:parent-style-name="1001" style:display-name="T124" style:family="text" style:name="2129">
      <style:paragraph-properties/>
    </style:style>
    <style:style style:parent-style-name="1001" style:display-name="T125" style:family="text" style:name="2130">
      <style:paragraph-properties/>
    </style:style>
    <style:style style:parent-style-name="1001" style:display-name="T126" style:family="text" style:name="2131">
      <style:paragraph-properties/>
    </style:style>
    <style:style style:parent-style-name="1001" style:display-name="T127" style:family="text" style:name="2132">
      <style:paragraph-properties/>
    </style:style>
    <style:style style:parent-style-name="1001" style:display-name="T128" style:family="text" style:name="2133">
      <style:paragraph-properties/>
    </style:style>
    <style:style style:parent-style-name="1001" style:display-name="T129" style:family="text" style:name="2134">
      <style:paragraph-properties/>
    </style:style>
    <style:style style:parent-style-name="1001" style:display-name="T130" style:family="text" style:name="2135">
      <style:paragraph-properties/>
    </style:style>
    <style:style style:parent-style-name="1001" style:display-name="T131" style:family="text" style:name="2136">
      <style:paragraph-properties/>
    </style:style>
    <style:style style:parent-style-name="1001" style:display-name="T132" style:family="text" style:name="2137">
      <style:paragraph-properties/>
    </style:style>
    <style:style style:parent-style-name="1001" style:display-name="T133" style:family="text" style:name="2138">
      <style:paragraph-properties/>
    </style:style>
    <style:style style:parent-style-name="1001" style:display-name="T134" style:family="text" style:name="2139">
      <style:paragraph-properties/>
    </style:style>
    <style:style style:parent-style-name="1001" style:display-name="T135" style:family="text" style:name="2140">
      <style:paragraph-properties/>
    </style:style>
    <style:style style:parent-style-name="1001" style:display-name="T136" style:family="text" style:name="2141">
      <style:paragraph-properties/>
    </style:style>
    <style:style style:parent-style-name="1001" style:display-name="T137" style:family="text" style:name="2142">
      <style:paragraph-properties/>
    </style:style>
    <style:style style:parent-style-name="1001" style:display-name="T138" style:family="text" style:name="2143">
      <style:paragraph-properties/>
    </style:style>
    <style:style style:parent-style-name="1001" style:display-name="T139" style:family="text" style:name="2144">
      <style:paragraph-properties/>
    </style:style>
    <style:style style:parent-style-name="1001" style:display-name="T140" style:family="text" style:name="2145">
      <style:paragraph-properties/>
    </style:style>
    <style:style style:parent-style-name="1001" style:display-name="T141" style:family="text" style:name="2146">
      <style:paragraph-properties/>
    </style:style>
    <style:style style:parent-style-name="1001" style:display-name="T142" style:family="text" style:name="2147">
      <style:paragraph-properties/>
    </style:style>
    <style:style style:parent-style-name="1001" style:display-name="T143" style:family="text" style:name="2148">
      <style:paragraph-properties/>
    </style:style>
    <style:style style:parent-style-name="1001" style:display-name="T144" style:family="text" style:name="2149">
      <style:paragraph-properties/>
    </style:style>
    <style:style style:parent-style-name="1001" style:display-name="T145" style:family="text" style:name="2150">
      <style:paragraph-properties/>
    </style:style>
    <style:style style:parent-style-name="1001" style:display-name="T146" style:family="text" style:name="2151">
      <style:paragraph-properties/>
      <style:text-properties fo:font-family="Courier New" style:font-family-complex="Courier New"/>
    </style:style>
    <style:style style:parent-style-name="1001" style:display-name="T147" style:family="text" style:name="2152">
      <style:paragraph-properties/>
      <style:text-properties fo:font-family="Wingdings" style:font-family-complex="Wingdings"/>
    </style:style>
    <style:style style:parent-style-name="1001" style:display-name="T148" style:family="text" style:name="2153">
      <style:paragraph-properties/>
      <style:text-properties fo:font-family="Symbol" style:font-family-complex="Symbol"/>
    </style:style>
    <style:style style:parent-style-name="1001" style:display-name="T149" style:family="text" style:name="2154">
      <style:paragraph-properties/>
      <style:text-properties fo:font-family="Courier New" style:font-family-complex="Courier New"/>
    </style:style>
    <style:style style:parent-style-name="1001" style:display-name="T150" style:family="text" style:name="2155">
      <style:paragraph-properties/>
      <style:text-properties fo:font-family="Wingdings" style:font-family-complex="Wingdings"/>
    </style:style>
    <style:style style:parent-style-name="1001" style:display-name="T151" style:family="text" style:name="2156">
      <style:paragraph-properties/>
      <style:text-properties fo:font-family="Symbol" style:font-family-complex="Symbol"/>
    </style:style>
    <style:style style:parent-style-name="1001" style:display-name="T152" style:family="text" style:name="2157">
      <style:paragraph-properties/>
      <style:text-properties fo:font-family="Courier New" style:font-family-complex="Courier New"/>
    </style:style>
    <style:style style:parent-style-name="1001" style:display-name="T153" style:family="text" style:name="2158">
      <style:paragraph-properties/>
      <style:text-properties fo:font-family="Wingdings" style:font-family-complex="Wingdings"/>
    </style:style>
    <style:style style:parent-style-name="1001" style:display-name="T154" style:family="text" style:name="2159">
      <style:paragraph-properties/>
      <style:text-properties fo:font-family="Symbol" style:font-family-complex="Symbol"/>
    </style:style>
    <style:style style:parent-style-name="1001" style:display-name="T155" style:family="text" style:name="2160">
      <style:paragraph-properties/>
      <style:text-properties fo:font-family="Courier New" style:font-family-complex="Courier New"/>
    </style:style>
    <style:style style:parent-style-name="1001" style:display-name="T156" style:family="text" style:name="2161">
      <style:paragraph-properties/>
      <style:text-properties fo:font-family="Wingdings" style:font-family-complex="Wingdings"/>
    </style:style>
    <style:style style:parent-style-name="1001" style:display-name="T157" style:family="text" style:name="2162">
      <style:paragraph-properties/>
      <style:text-properties fo:font-family="Symbol" style:font-family-complex="Symbol"/>
    </style:style>
    <style:style style:parent-style-name="1001" style:display-name="T158" style:family="text" style:name="2163">
      <style:paragraph-properties/>
      <style:text-properties fo:font-family="Courier New" style:font-family-complex="Courier New"/>
    </style:style>
    <style:style style:parent-style-name="1001" style:display-name="T159" style:family="text" style:name="2164">
      <style:paragraph-properties/>
      <style:text-properties fo:font-family="Wingdings" style:font-family-complex="Wingdings"/>
    </style:style>
    <style:style style:parent-style-name="1001" style:display-name="T160" style:family="text" style:name="2165">
      <style:paragraph-properties/>
      <style:text-properties fo:font-family="Symbol" style:font-family-complex="Symbol"/>
    </style:style>
    <style:style style:parent-style-name="1001" style:display-name="T161" style:family="text" style:name="2166">
      <style:paragraph-properties/>
      <style:text-properties fo:font-family="Courier New" style:font-family-complex="Courier New"/>
    </style:style>
    <style:style style:parent-style-name="1001" style:display-name="T162" style:family="text" style:name="2167">
      <style:paragraph-properties/>
      <style:text-properties fo:font-family="Wingdings" style:font-family-complex="Wingdings"/>
    </style:style>
    <style:style style:parent-style-name="1001" style:display-name="T163" style:family="text" style:name="2168">
      <style:paragraph-properties/>
      <style:text-properties fo:font-family="Symbol" style:font-family-complex="Symbol" fo:font-weight="bold"/>
    </style:style>
    <style:style style:parent-style-name="1001" style:display-name="T164" style:family="text" style:name="2169">
      <style:paragraph-properties/>
      <style:text-properties fo:font-family="Symbol" style:font-family-complex="Symbol"/>
    </style:style>
    <style:style style:parent-style-name="1001" style:display-name="T165" style:family="text" style:name="2170">
      <style:paragraph-properties/>
      <style:text-properties fo:font-family="Wingdings" style:font-family-complex="Wingdings"/>
    </style:style>
    <style:style style:parent-style-name="1001" style:display-name="T166" style:family="text" style:name="2171">
      <style:paragraph-properties/>
      <style:text-properties fo:font-family="Symbol" style:font-family-complex="Symbol"/>
    </style:style>
    <style:style style:parent-style-name="1001" style:display-name="T167" style:family="text" style:name="2172">
      <style:paragraph-properties/>
      <style:text-properties fo:font-family="Courier New" style:font-family-complex="Courier New"/>
    </style:style>
    <style:style style:parent-style-name="1001" style:display-name="T168" style:family="text" style:name="2173">
      <style:paragraph-properties/>
      <style:text-properties fo:font-family="Wingdings" style:font-family-complex="Wingdings"/>
    </style:style>
    <style:style style:parent-style-name="1001" style:display-name="T169" style:family="text" style:name="2174">
      <style:paragraph-properties/>
      <style:text-properties fo:font-family="Symbol" style:font-family-complex="Symbol"/>
    </style:style>
    <style:style style:parent-style-name="1001" style:display-name="T170" style:family="text" style:name="2175">
      <style:paragraph-properties/>
      <style:text-properties fo:font-family="Courier New" style:font-family-complex="Courier New"/>
    </style:style>
    <style:style style:parent-style-name="1001" style:display-name="T171" style:family="text" style:name="2176">
      <style:paragraph-properties/>
      <style:text-properties fo:font-family="Wingdings" style:font-family-complex="Wingdings"/>
    </style:style>
    <style:style style:parent-style-name="1001" style:display-name="T172" style:family="text" style:name="2177">
      <style:paragraph-properties/>
      <style:text-properties fo:font-family="Symbol" style:font-family-complex="Symbol"/>
    </style:style>
    <style:style style:parent-style-name="1001" style:display-name="T173" style:family="text" style:name="2178">
      <style:paragraph-properties/>
      <style:text-properties fo:font-family="Courier New" style:font-family-complex="Courier New"/>
    </style:style>
    <style:style style:parent-style-name="1001" style:display-name="T174" style:family="text" style:name="2179">
      <style:paragraph-properties/>
      <style:text-properties fo:font-family="Wingdings" style:font-family-complex="Wingdings"/>
    </style:style>
    <style:style style:parent-style-name="1001" style:display-name="T175" style:family="text" style:name="2180">
      <style:paragraph-properties/>
      <style:text-properties fo:font-family="Symbol" style:font-family-complex="Symbol"/>
    </style:style>
    <style:style style:parent-style-name="1001" style:display-name="T176" style:family="text" style:name="2181">
      <style:paragraph-properties/>
      <style:text-properties fo:font-family="Courier New" style:font-family-complex="Courier New"/>
    </style:style>
    <style:style style:parent-style-name="1001" style:display-name="T177" style:family="text" style:name="2182">
      <style:paragraph-properties/>
      <style:text-properties fo:font-family="Wingdings" style:font-family-complex="Wingdings"/>
    </style:style>
    <style:style style:parent-style-name="1001" style:display-name="T178" style:family="text" style:name="2183">
      <style:paragraph-properties/>
      <style:text-properties fo:font-family="Symbol" style:font-family-complex="Symbol"/>
    </style:style>
    <style:style style:parent-style-name="1001" style:display-name="T179" style:family="text" style:name="2184">
      <style:paragraph-properties/>
      <style:text-properties fo:font-family="Courier New" style:font-family-complex="Courier New"/>
    </style:style>
    <style:style style:parent-style-name="1001" style:display-name="T180" style:family="text" style:name="2185">
      <style:paragraph-properties/>
      <style:text-properties fo:font-family="Wingdings" style:font-family-complex="Wingdings"/>
    </style:style>
    <style:style style:parent-style-name="1001" style:display-name="T181" style:family="text" style:name="2186">
      <style:paragraph-properties/>
      <style:text-properties fo:font-family="Symbol" style:font-family-complex="Symbol"/>
    </style:style>
    <style:style style:parent-style-name="1001" style:display-name="T182" style:family="text" style:name="2187">
      <style:paragraph-properties/>
    </style:style>
    <style:style style:parent-style-name="1001" style:display-name="T183" style:family="text" style:name="2188">
      <style:paragraph-properties/>
      <style:text-properties fo:font-family="Wingdings" style:font-family-complex="Wingdings"/>
    </style:style>
    <style:style style:parent-style-name="1001" style:display-name="T184" style:family="text" style:name="2189">
      <style:paragraph-properties/>
      <style:text-properties fo:font-family="Symbol" style:font-family-complex="Symbol"/>
    </style:style>
    <style:style style:parent-style-name="1001" style:display-name="T185" style:family="text" style:name="2190">
      <style:paragraph-properties/>
      <style:text-properties fo:font-family="Courier New" style:font-family-complex="Courier New"/>
    </style:style>
    <style:style style:parent-style-name="1001" style:display-name="T186" style:family="text" style:name="2191">
      <style:paragraph-properties/>
      <style:text-properties fo:font-family="Wingdings" style:font-family-complex="Wingdings"/>
    </style:style>
    <style:style style:parent-style-name="1001" style:display-name="T187" style:family="text" style:name="2192">
      <style:paragraph-properties/>
      <style:text-properties fo:font-family="Symbol" style:font-family-complex="Symbol"/>
    </style:style>
    <style:style style:parent-style-name="1001" style:display-name="T188" style:family="text" style:name="2193">
      <style:paragraph-properties/>
      <style:text-properties fo:font-family="Courier New" style:font-family-complex="Courier New"/>
    </style:style>
    <style:style style:parent-style-name="1001" style:display-name="T189" style:family="text" style:name="2194">
      <style:paragraph-properties/>
      <style:text-properties fo:font-family="Wingdings" style:font-family-complex="Wingdings"/>
    </style:style>
    <style:style style:parent-style-name="1001" style:display-name="T190" style:family="text" style:name="2195">
      <style:paragraph-properties/>
      <style:text-properties fo:font-family="Symbol" style:font-family-complex="Symbol"/>
    </style:style>
    <style:style style:parent-style-name="1001" style:display-name="T191" style:family="text" style:name="2196">
      <style:paragraph-properties/>
    </style:style>
    <style:style style:parent-style-name="1001" style:display-name="T192" style:family="text" style:name="2197">
      <style:paragraph-properties/>
      <style:text-properties fo:font-family="Wingdings" style:font-family-complex="Wingdings"/>
    </style:style>
    <style:style style:parent-style-name="1001" style:display-name="T193" style:family="text" style:name="2198">
      <style:paragraph-properties/>
      <style:text-properties fo:font-family="Symbol" style:font-family-complex="Symbol"/>
    </style:style>
    <style:style style:parent-style-name="1001" style:display-name="T194" style:family="text" style:name="2199">
      <style:paragraph-properties/>
      <style:text-properties fo:font-family="Courier New" style:font-family-complex="Courier New"/>
    </style:style>
    <style:style style:parent-style-name="1001" style:display-name="T195" style:family="text" style:name="2200">
      <style:paragraph-properties/>
      <style:text-properties fo:font-family="Wingdings" style:font-family-complex="Wingdings"/>
    </style:style>
    <style:style style:parent-style-name="1001" style:display-name="T196" style:family="text" style:name="2201">
      <style:paragraph-properties/>
      <style:text-properties fo:font-family="Symbol" style:font-family-complex="Symbol"/>
    </style:style>
    <style:style style:parent-style-name="1001" style:display-name="T197" style:family="text" style:name="2202">
      <style:paragraph-properties/>
      <style:text-properties fo:font-family="Courier New" style:font-family-complex="Courier New"/>
    </style:style>
    <style:style style:parent-style-name="1001" style:display-name="T198" style:family="text" style:name="2203">
      <style:paragraph-properties/>
      <style:text-properties fo:font-family="Wingdings" style:font-family-complex="Wingdings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/>
    </style:style>
    <style:style style:family="text" style:name="T23">
      <style:text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style:style style:family="text" style:name="T37">
      <style:text-properties/>
    </style:style>
    <style:style style:family="text" style:name="T38">
      <style:text-properties/>
    </style:style>
    <style:style style:family="text" style:name="T39">
      <style:text-properties/>
    </style:style>
    <style:style style:family="text" style:name="T40">
      <style:text-properties/>
    </style:style>
    <style:style style:family="text" style:name="T41">
      <style:text-properties/>
    </style:style>
    <style:style style:family="text" style:name="T42">
      <style:text-properties/>
    </style:style>
    <style:style style:family="text" style:name="T43">
      <style:text-properties/>
    </style:style>
    <style:style style:family="text" style:name="T44">
      <style:text-properties/>
    </style:style>
    <style:style style:family="text" style:name="T45">
      <style:text-properties/>
    </style:style>
    <style:style style:family="text" style:name="T46">
      <style:text-properties/>
    </style:style>
    <style:style style:family="text" style:name="T47">
      <style:text-properties/>
    </style:style>
    <style:style style:family="text" style:name="T48">
      <style:text-properties/>
    </style:style>
    <style:style style:family="text" style:name="T49">
      <style:text-properties/>
    </style:style>
    <style:style style:family="text" style:name="T50">
      <style:text-properties/>
    </style:style>
    <style:style style:family="text" style:name="T51">
      <style:text-properties/>
    </style:style>
    <style:style style:family="text" style:name="T52">
      <style:text-properties/>
    </style:style>
    <style:style style:family="text" style:name="T53">
      <style:text-properties/>
    </style:style>
    <style:style style:family="text" style:name="T54">
      <style:text-properties/>
    </style:style>
    <style:style style:family="text" style:name="T55">
      <style:text-properties/>
    </style:style>
    <style:style style:family="text" style:name="T56">
      <style:text-properties/>
    </style:style>
    <style:style style:family="text" style:name="T57">
      <style:text-properties/>
    </style:style>
    <style:style style:family="text" style:name="T58">
      <style:text-properties/>
    </style:style>
    <style:style style:family="text" style:name="T59">
      <style:text-properties/>
    </style:style>
    <style:style style:family="text" style:name="T60">
      <style:text-properties/>
    </style:style>
    <style:style style:family="text" style:name="T61">
      <style:text-properties/>
    </style:style>
    <style:style style:family="text" style:name="T62">
      <style:text-properties/>
    </style:style>
    <style:style style:family="text" style:name="T63">
      <style:text-properties/>
    </style:style>
    <style:style style:family="text" style:name="T64">
      <style:text-properties/>
    </style:style>
    <style:style style:family="text" style:name="T65">
      <style:text-properties/>
    </style:style>
    <style:style style:family="text" style:name="T66">
      <style:text-properties/>
    </style:style>
    <style:style style:family="text" style:name="T67">
      <style:text-properties/>
    </style:style>
    <style:style style:family="text" style:name="T68">
      <style:text-properties/>
    </style:style>
    <style:style style:family="text" style:name="T69">
      <style:text-properties/>
    </style:style>
    <style:style style:family="text" style:name="T70">
      <style:text-properties/>
    </style:style>
    <style:style style:family="text" style:name="T71">
      <style:text-properties/>
    </style:style>
    <style:style style:family="text" style:name="T72">
      <style:text-properties/>
    </style:style>
    <style:style style:family="text" style:name="T73">
      <style:text-properties/>
    </style:style>
    <style:style style:family="text" style:name="T74">
      <style:text-properties/>
    </style:style>
    <style:style style:family="text" style:name="T75">
      <style:text-properties/>
    </style:style>
    <style:style style:family="text" style:name="T76">
      <style:text-properties/>
    </style:style>
    <style:style style:family="text" style:name="T77">
      <style:text-properties/>
    </style:style>
    <style:style style:family="text" style:name="T78">
      <style:text-properties/>
    </style:style>
    <style:style style:family="text" style:name="T79">
      <style:text-properties/>
    </style:style>
    <style:style style:family="text" style:name="T80">
      <style:text-properties/>
    </style:style>
    <style:style style:family="text" style:name="T81">
      <style:text-properties/>
    </style:style>
    <style:style style:family="text" style:name="T82">
      <style:text-properties/>
    </style:style>
    <style:style style:family="text" style:name="T83">
      <style:text-properties/>
    </style:style>
    <style:style style:family="text" style:name="T84">
      <style:text-properties/>
    </style:style>
    <style:style style:family="text" style:name="T85">
      <style:text-properties/>
    </style:style>
    <style:style style:family="text" style:name="T86">
      <style:text-properties/>
    </style:style>
    <style:style style:family="text" style:name="T87">
      <style:text-properties/>
    </style:style>
    <style:style style:family="text" style:name="T88">
      <style:text-properties/>
    </style:style>
    <style:style style:family="text" style:name="T89">
      <style:text-properties/>
    </style:style>
    <style:style style:family="text" style:name="T90">
      <style:text-properties/>
    </style:style>
    <style:style style:family="text" style:name="T91">
      <style:text-properties/>
    </style:style>
    <style:style style:family="text" style:name="T92">
      <style:text-properties/>
    </style:style>
    <style:style style:family="text" style:name="T93">
      <style:text-properties/>
    </style:style>
    <style:style style:family="text" style:name="T94">
      <style:text-properties/>
    </style:style>
    <style:style style:family="text" style:name="T95">
      <style:text-properties/>
    </style:style>
    <style:style style:family="text" style:name="T96">
      <style:text-properties/>
    </style:style>
    <style:style style:family="text" style:name="T97">
      <style:text-properties/>
    </style:style>
    <style:style style:family="text" style:name="T98">
      <style:text-properties/>
    </style:style>
    <style:style style:family="text" style:name="T99">
      <style:text-properties/>
    </style:style>
    <style:style style:family="text" style:name="T100">
      <style:text-properties/>
    </style:style>
    <style:style style:family="text" style:name="T101">
      <style:text-properties/>
    </style:style>
    <style:style style:family="text" style:name="T102">
      <style:text-properties/>
    </style:style>
    <style:style style:family="text" style:name="T103">
      <style:text-properties/>
    </style:style>
    <style:style style:family="text" style:name="T104">
      <style:text-properties/>
    </style:style>
    <style:style style:family="text" style:name="T105">
      <style:text-properties/>
    </style:style>
    <style:style style:family="text" style:name="T106">
      <style:text-properties/>
    </style:style>
    <style:style style:family="text" style:name="T107">
      <style:text-properties/>
    </style:style>
    <style:style style:family="text" style:name="T108">
      <style:text-properties/>
    </style:style>
    <style:style style:family="text" style:name="T109">
      <style:text-properties/>
    </style:style>
    <style:style style:family="text" style:name="T110">
      <style:text-properties/>
    </style:style>
    <style:style style:family="text" style:name="T111">
      <style:text-properties/>
    </style:style>
    <style:style style:family="text" style:name="T112">
      <style:text-properties/>
    </style:style>
    <style:style style:family="text" style:name="T113">
      <style:text-properties/>
    </style:style>
    <style:style style:family="text" style:name="T114">
      <style:text-properties/>
    </style:style>
    <style:style style:family="text" style:name="T115">
      <style:text-properties/>
    </style:style>
    <style:style style:family="text" style:name="T116">
      <style:text-properties/>
    </style:style>
    <style:style style:family="text" style:name="T117">
      <style:text-properties/>
    </style:style>
    <style:style style:family="text" style:name="T118">
      <style:text-properties/>
    </style:style>
    <style:style style:family="text" style:name="T119">
      <style:text-properties/>
    </style:style>
    <style:style style:family="text" style:name="T120">
      <style:text-properties/>
    </style:style>
    <style:style style:family="text" style:name="T121">
      <style:text-properties/>
    </style:style>
    <style:style style:family="text" style:name="T122">
      <style:text-properties/>
    </style:style>
    <style:style style:family="text" style:name="T123">
      <style:text-properties/>
    </style:style>
    <style:style style:family="text" style:name="T124">
      <style:text-properties/>
    </style:style>
    <style:style style:family="text" style:name="T125">
      <style:text-properties/>
    </style:style>
    <style:style style:family="text" style:name="T126">
      <style:text-properties/>
    </style:style>
    <style:style style:family="text" style:name="T127">
      <style:text-properties/>
    </style:style>
    <style:style style:family="text" style:name="T128">
      <style:text-properties/>
    </style:style>
    <style:style style:family="text" style:name="T129">
      <style:text-properties/>
    </style:style>
    <style:style style:family="text" style:name="T130">
      <style:text-properties/>
    </style:style>
    <style:style style:family="text" style:name="T131">
      <style:text-properties/>
    </style:style>
    <style:style style:family="text" style:name="T132">
      <style:text-properties/>
    </style:style>
    <style:style style:family="text" style:name="T133">
      <style:text-properties/>
    </style:style>
    <style:style style:family="text" style:name="T134">
      <style:text-properties/>
    </style:style>
    <style:style style:family="text" style:name="T135">
      <style:text-properties/>
    </style:style>
    <style:style style:family="text" style:name="T136">
      <style:text-properties/>
    </style:style>
    <style:style style:family="text" style:name="T137">
      <style:text-properties/>
    </style:style>
    <style:style style:family="text" style:name="T138">
      <style:text-properties/>
    </style:style>
    <style:style style:family="text" style:name="T139">
      <style:text-properties/>
    </style:style>
    <style:style style:family="text" style:name="T140">
      <style:text-properties/>
    </style:style>
    <style:style style:family="text" style:name="T141">
      <style:text-properties/>
    </style:style>
    <style:style style:family="text" style:name="T142">
      <style:text-properties/>
    </style:style>
    <style:style style:family="text" style:name="T143">
      <style:text-properties/>
    </style:style>
    <style:style style:family="text" style:name="T144">
      <style:text-properties/>
    </style:style>
    <style:style style:family="text" style:name="T145">
      <style:text-properties/>
    </style:style>
    <style:style style:family="text" style:name="T146">
      <style:text-properties fo:font-family="Courier New" style:font-family-complex="Courier New"/>
    </style:style>
    <style:style style:family="text" style:name="T147">
      <style:text-properties fo:font-family="Wingdings" style:font-family-complex="Wingdings"/>
    </style:style>
    <style:style style:family="text" style:name="T148">
      <style:text-properties fo:font-family="Symbol" style:font-family-complex="Symbol"/>
    </style:style>
    <style:style style:family="text" style:name="T149">
      <style:text-properties fo:font-family="Courier New" style:font-family-complex="Courier New"/>
    </style:style>
    <style:style style:family="text" style:name="T150">
      <style:text-properties fo:font-family="Wingdings" style:font-family-complex="Wingdings"/>
    </style:style>
    <style:style style:family="text" style:name="T151">
      <style:text-properties fo:font-family="Symbol" style:font-family-complex="Symbol"/>
    </style:style>
    <style:style style:family="text" style:name="T152">
      <style:text-properties fo:font-family="Courier New" style:font-family-complex="Courier New"/>
    </style:style>
    <style:style style:family="text" style:name="T153">
      <style:text-properties fo:font-family="Wingdings" style:font-family-complex="Wingdings"/>
    </style:style>
    <style:style style:family="text" style:name="T154">
      <style:text-properties fo:font-family="Symbol" style:font-family-complex="Symbol"/>
    </style:style>
    <style:style style:family="text" style:name="T155">
      <style:text-properties fo:font-family="Courier New" style:font-family-complex="Courier New"/>
    </style:style>
    <style:style style:family="text" style:name="T156">
      <style:text-properties fo:font-family="Wingdings" style:font-family-complex="Wingdings"/>
    </style:style>
    <style:style style:family="text" style:name="T157">
      <style:text-properties fo:font-family="Symbol" style:font-family-complex="Symbol"/>
    </style:style>
    <style:style style:family="text" style:name="T158">
      <style:text-properties fo:font-family="Courier New" style:font-family-complex="Courier New"/>
    </style:style>
    <style:style style:family="text" style:name="T159">
      <style:text-properties fo:font-family="Wingdings" style:font-family-complex="Wingdings"/>
    </style:style>
    <style:style style:family="text" style:name="T160">
      <style:text-properties fo:font-family="Symbol" style:font-family-complex="Symbol"/>
    </style:style>
    <style:style style:family="text" style:name="T161">
      <style:text-properties fo:font-family="Courier New" style:font-family-complex="Courier New"/>
    </style:style>
    <style:style style:family="text" style:name="T162">
      <style:text-properties fo:font-family="Wingdings" style:font-family-complex="Wingdings"/>
    </style:style>
    <style:style style:family="text" style:name="T163">
      <style:text-properties fo:font-family="Symbol" style:font-family-complex="Symbol" fo:font-weight="bold"/>
    </style:style>
    <style:style style:family="text" style:name="T164">
      <style:text-properties fo:font-family="Symbol" style:font-family-complex="Symbol"/>
    </style:style>
    <style:style style:family="text" style:name="T165">
      <style:text-properties fo:font-family="Wingdings" style:font-family-complex="Wingdings"/>
    </style:style>
    <style:style style:family="text" style:name="T166">
      <style:text-properties fo:font-family="Symbol" style:font-family-complex="Symbol"/>
    </style:style>
    <style:style style:family="text" style:name="T167">
      <style:text-properties fo:font-family="Courier New" style:font-family-complex="Courier New"/>
    </style:style>
    <style:style style:family="text" style:name="T168">
      <style:text-properties fo:font-family="Wingdings" style:font-family-complex="Wingdings"/>
    </style:style>
    <style:style style:family="text" style:name="T169">
      <style:text-properties fo:font-family="Symbol" style:font-family-complex="Symbol"/>
    </style:style>
    <style:style style:family="text" style:name="T170">
      <style:text-properties fo:font-family="Courier New" style:font-family-complex="Courier New"/>
    </style:style>
    <style:style style:family="text" style:name="T171">
      <style:text-properties fo:font-family="Wingdings" style:font-family-complex="Wingdings"/>
    </style:style>
    <style:style style:family="text" style:name="T172">
      <style:text-properties fo:font-family="Symbol" style:font-family-complex="Symbol"/>
    </style:style>
    <style:style style:family="text" style:name="T173">
      <style:text-properties fo:font-family="Courier New" style:font-family-complex="Courier New"/>
    </style:style>
    <style:style style:family="text" style:name="T174">
      <style:text-properties fo:font-family="Wingdings" style:font-family-complex="Wingdings"/>
    </style:style>
    <style:style style:family="text" style:name="T175">
      <style:text-properties fo:font-family="Symbol" style:font-family-complex="Symbol"/>
    </style:style>
    <style:style style:family="text" style:name="T176">
      <style:text-properties fo:font-family="Courier New" style:font-family-complex="Courier New"/>
    </style:style>
    <style:style style:family="text" style:name="T177">
      <style:text-properties fo:font-family="Wingdings" style:font-family-complex="Wingdings"/>
    </style:style>
    <style:style style:family="text" style:name="T178">
      <style:text-properties fo:font-family="Symbol" style:font-family-complex="Symbol"/>
    </style:style>
    <style:style style:family="text" style:name="T179">
      <style:text-properties fo:font-family="Courier New" style:font-family-complex="Courier New"/>
    </style:style>
    <style:style style:family="text" style:name="T180">
      <style:text-properties fo:font-family="Wingdings" style:font-family-complex="Wingdings"/>
    </style:style>
    <style:style style:family="text" style:name="T181">
      <style:text-properties fo:font-family="Symbol" style:font-family-complex="Symbol"/>
    </style:style>
    <style:style style:family="text" style:name="T182">
      <style:text-properties/>
    </style:style>
    <style:style style:family="text" style:name="T183">
      <style:text-properties fo:font-family="Wingdings" style:font-family-complex="Wingdings"/>
    </style:style>
    <style:style style:family="text" style:name="T184">
      <style:text-properties fo:font-family="Symbol" style:font-family-complex="Symbol"/>
    </style:style>
    <style:style style:family="text" style:name="T185">
      <style:text-properties fo:font-family="Courier New" style:font-family-complex="Courier New"/>
    </style:style>
    <style:style style:family="text" style:name="T186">
      <style:text-properties fo:font-family="Wingdings" style:font-family-complex="Wingdings"/>
    </style:style>
    <style:style style:family="text" style:name="T187">
      <style:text-properties fo:font-family="Symbol" style:font-family-complex="Symbol"/>
    </style:style>
    <style:style style:family="text" style:name="T188">
      <style:text-properties fo:font-family="Courier New" style:font-family-complex="Courier New"/>
    </style:style>
    <style:style style:family="text" style:name="T189">
      <style:text-properties fo:font-family="Wingdings" style:font-family-complex="Wingdings"/>
    </style:style>
    <style:style style:family="text" style:name="T190">
      <style:text-properties fo:font-family="Symbol" style:font-family-complex="Symbol"/>
    </style:style>
    <style:style style:family="text" style:name="T191">
      <style:text-properties/>
    </style:style>
    <style:style style:family="text" style:name="T192">
      <style:text-properties fo:font-family="Wingdings" style:font-family-complex="Wingdings"/>
    </style:style>
    <style:style style:family="text" style:name="T193">
      <style:text-properties fo:font-family="Symbol" style:font-family-complex="Symbol"/>
    </style:style>
    <style:style style:family="text" style:name="T194">
      <style:text-properties fo:font-family="Courier New" style:font-family-complex="Courier New"/>
    </style:style>
    <style:style style:family="text" style:name="T195">
      <style:text-properties fo:font-family="Wingdings" style:font-family-complex="Wingdings"/>
    </style:style>
    <style:style style:family="text" style:name="T196">
      <style:text-properties fo:font-family="Symbol" style:font-family-complex="Symbol"/>
    </style:style>
    <style:style style:family="text" style:name="T197">
      <style:text-properties fo:font-family="Courier New" style:font-family-complex="Courier New"/>
    </style:style>
    <style:style style:family="text" style:name="T198">
      <style:text-properties fo:font-family="Wingdings" style:font-family-complex="Wingdings"/>
    </style:style>
    <text:list-style style:name="WWNum1">
      <text:list-level-style-bullet text:level="1" text:style-name="T1" text:bullet-char="•  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 text:bullet-char="•  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 text:bullet-char="•  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 text:bullet-char="•  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 text:bullet-char="•  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 text:bullet-char="•  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 text:bullet-char="•  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 text:bullet-char="•  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 text:bullet-char="•  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2">
      <text:list-level-style-number text:level="1" text:style-name="T10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1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2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3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4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5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6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7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8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3">
      <text:list-level-style-number text:level="1" text:style-name="T19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20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21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22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23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24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25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26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27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4">
      <text:list-level-style-number text:level="1" text:style-name="T28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29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30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31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32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33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34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35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36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5">
      <text:list-level-style-number text:level="1" text:style-name="T37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38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39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40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41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42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43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44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45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6">
      <text:list-level-style-number text:level="1" text:style-name="T46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47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48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49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50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51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52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53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54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7">
      <text:list-level-style-number text:level="1" text:style-name="T55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56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57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58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59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60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61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62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63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8">
      <text:list-level-style-number text:level="1" text:style-name="T64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65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66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67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68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69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70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71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72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9">
      <text:list-level-style-number text:level="1" text:style-name="T73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74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75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76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77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78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79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80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81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0">
      <text:list-level-style-number text:level="1" text:style-name="T82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83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84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85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86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87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88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89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90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1">
      <text:list-level-style-number text:level="1" text:style-name="T9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9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9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9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9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9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9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9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9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2">
      <text:list-level-style-number text:level="1" text:style-name="T100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01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02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03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04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05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06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07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08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13">
      <text:list-level-style-number text:level="1" text:style-name="T109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10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111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112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113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114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115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116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117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4">
      <text:list-level-style-number text:level="1" text:style-name="T118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19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20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21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22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23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24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25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26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15">
      <text:list-level-style-number text:level="1" text:style-name="T127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28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129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130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131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132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133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134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135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6">
      <text:list-level-style-number text:level="1" text:style-name="T136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37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38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39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40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41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42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43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44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17">
      <text:list-level-style-number text:level="1" text:style-name="T145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bullet text:level="2" text:style-name="T1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1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1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1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1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1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1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18">
      <text:list-level-style-bullet text:level="1" text:style-name="T1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1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1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1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1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1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1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19">
      <text:list-level-style-bullet text:level="1" text:style-name="T1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 fo:font-weight="bold"/>
      </text:list-level-style-bullet>
      <text:list-level-style-bullet text:level="2" text:style-name="T164" text:bullet-char="·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Symbol" style:font-family-complex="Symbol"/>
      </text:list-level-style-bullet>
      <text:list-level-style-bullet text:level="3" text:style-name="T16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6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6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16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6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7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17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20">
      <text:list-level-style-bullet text:level="1" text:style-name="T1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1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1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1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1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1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1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21">
      <text:list-level-style-bullet text:level="1" text:style-name="T1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number text:level="2" text:style-name="T182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bullet text:level="3" text:style-name="T18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8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8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18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8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8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18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22">
      <text:list-level-style-bullet text:level="1" text:style-name="T1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number text:level="2" text:style-name="T191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bullet text:level="3" text:style-name="T19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9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9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19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9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9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19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</office:styles>
  <office:automatic-styles>
    <style:page-layout style:name="Mpm1">
      <style:page-layout-properties fo:page-width="21.59cm" fo:page-height="27.94cm" style:print-orientation="portrait" fo:margin-top="2cm" fo:margin-bottom="2cm" fo:margin-left="2cm" fo:margin-right="2cm"/>
      <style:footer-style>
        <style:header-footer-properties fo:min-height="2cm"/>
      </style:footer-style>
    </style:page-layout>
    <style:page-layout style:name="Mpm2">
      <style:page-layout-properties fo:page-width="21.59cm" fo:page-height="27.94cm" style:print-orientation="portrait" fo:margin-top="2cm" fo:margin-bottom="2cm" fo:margin-left="2cm" fo:margin-right="2cm"/>
      <style:footer-style>
        <style:header-footer-properties fo:min-height="2cm"/>
      </style:footer-style>
    </style:page-layout>
    <style:page-layout style:name="Mpm3">
      <style:page-layout-properties fo:page-width="21.59cm" fo:page-height="27.94cm" style:print-orientation="portrait" fo:margin-top="2cm" fo:margin-bottom="2cm" fo:margin-left="2cm" fo:margin-right="2cm"/>
      <style:footer-style>
        <style:header-footer-properties fo:min-height="2cm"/>
      </style:footer-style>
    </style:page-layout>
    <style:page-layout style:name="Mpm4">
      <style:page-layout-properties fo:page-width="21.59cm" fo:page-height="27.94cm" style:print-orientation="portrait" fo:margin-top="2cm" fo:margin-bottom="2cm" fo:margin-left="2cm" fo:margin-right="2cm"/>
      <style:footer-style>
        <style:header-footer-properties fo:min-height="2cm"/>
      </style:footer-style>
    </style:page-layout>
    <style:page-layout style:name="Mpm5">
      <style:page-layout-properties fo:page-width="21.59cm" fo:page-height="27.94cm" style:print-orientation="portrait" fo:margin-top="2cm" fo:margin-bottom="2cm" fo:margin-left="2cm" fo:margin-right="2cm"/>
      <style:footer-style>
        <style:header-footer-properties fo:min-height="2cm"/>
      </style:footer-style>
    </style:page-layout>
    <style:page-layout style:name="Mpm6">
      <style:page-layout-properties fo:page-width="21.59cm" fo:page-height="27.94cm" style:print-orientation="portrait" fo:margin-top="2cm" fo:margin-bottom="2cm" fo:margin-left="2cm" fo:margin-right="2cm"/>
      <style:footer-style>
        <style:header-footer-properties fo:min-height="2cm"/>
      </style:footer-style>
    </style:page-layout>
    <style:page-layout style:name="Mpm7">
      <style:page-layout-properties fo:page-width="21.59cm" fo:page-height="27.94cm" style:print-orientation="portrait" fo:margin-top="2cm" fo:margin-bottom="2cm" fo:margin-left="2cm" fo:margin-right="2cm"/>
      <style:footer-style>
        <style:header-footer-properties fo:min-height="2cm"/>
      </style:footer-style>
    </style:page-layout>
    <style:page-layout style:name="Mpm8">
      <style:page-layout-properties fo:page-width="21.59cm" fo:page-height="27.94cm" style:print-orientation="portrait" fo:margin-top="2cm" fo:margin-bottom="2cm" fo:margin-left="2cm" fo:margin-right="2cm"/>
      <style:footer-style>
        <style:header-footer-properties fo:min-height="2cm"/>
      </style:footer-style>
    </style:page-layout>
    <style:style style:parent-style-name="1080" style:family="paragraph" style:name="P53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365">
      <style:text-properties fo:font-size="8pt" style:font-size-complex="8pt" fo:language="it" fo:country="IT" fo:font-weight="bold"/>
    </style:style>
    <style:style style:parent-style-name="Graphics" style:family="graphic" style:name="gr3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366">
      <style:text-properties fo:font-size="8pt" style:font-size-complex="8pt" fo:language="it" fo:country="IT" fo:font-weight="bold"/>
    </style:style>
    <style:style style:family="text" style:name="T1367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368">
      <style:text-properties fo:font-size="8pt" style:font-size-complex="8pt" fo:language="it" fo:country="IT" fo:font-weight="bold"/>
    </style:style>
    <style:style style:family="text" style:name="T1369">
      <style:text-properties fo:font-size="8pt" style:font-size-complex="8pt" fo:language="it" fo:country="IT" fo:font-weight="normal"/>
    </style:style>
    <style:style style:family="text" style:name="T1370">
      <style:text-properties fo:font-size="8pt" style:font-size-complex="8pt" fo:language="it" fo:country="IT" fo:font-weight="normal"/>
    </style:style>
    <style:style style:family="text" style:name="T1371">
      <style:text-properties fo:font-size="8pt" style:font-size-complex="8pt" fo:language="it" fo:country="IT" fo:font-weight="bold"/>
    </style:style>
    <style:style style:parent-style-name="1080" style:family="paragraph" style:name="P55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372">
      <style:text-properties fo:font-size="8pt" style:font-size-complex="8pt" fo:language="it" fo:country="IT" fo:font-weight="bold"/>
    </style:style>
    <style:style style:parent-style-name="Graphics" style:family="graphic" style:name="gr4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373">
      <style:text-properties fo:font-size="8pt" style:font-size-complex="8pt" fo:language="it" fo:country="IT" fo:font-weight="bold"/>
    </style:style>
    <style:style style:family="text" style:name="T1374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375">
      <style:text-properties fo:font-size="8pt" style:font-size-complex="8pt" fo:language="it" fo:country="IT" fo:font-weight="bold"/>
    </style:style>
    <style:style style:family="text" style:name="T1376">
      <style:text-properties fo:font-size="8pt" style:font-size-complex="8pt" fo:language="it" fo:country="IT" fo:font-weight="normal"/>
    </style:style>
    <style:style style:family="text" style:name="T1377">
      <style:text-properties fo:font-size="8pt" style:font-size-complex="8pt" fo:language="it" fo:country="IT" fo:font-weight="normal"/>
    </style:style>
    <style:style style:family="text" style:name="T1378">
      <style:text-properties fo:font-size="8pt" style:font-size-complex="8pt" fo:language="it" fo:country="IT" fo:font-weight="bold"/>
    </style:style>
    <style:style style:parent-style-name="1080" style:family="paragraph" style:name="P90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541">
      <style:text-properties fo:font-size="8pt" style:font-size-complex="8pt" fo:language="it" fo:country="IT" fo:font-weight="bold"/>
    </style:style>
    <style:style style:parent-style-name="Graphics" style:family="graphic" style:name="gr6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542">
      <style:text-properties fo:font-size="8pt" style:font-size-complex="8pt" fo:language="it" fo:country="IT" fo:font-weight="bold"/>
    </style:style>
    <style:style style:family="text" style:name="T1543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544">
      <style:text-properties fo:font-size="8pt" style:font-size-complex="8pt" fo:language="it" fo:country="IT" fo:font-weight="bold"/>
    </style:style>
    <style:style style:family="text" style:name="T1545">
      <style:text-properties fo:font-size="8pt" style:font-size-complex="8pt" fo:language="it" fo:country="IT" fo:font-weight="normal"/>
    </style:style>
    <style:style style:family="text" style:name="T1546">
      <style:text-properties fo:font-size="8pt" style:font-size-complex="8pt" fo:language="it" fo:country="IT" fo:font-weight="normal"/>
    </style:style>
    <style:style style:family="text" style:name="T1547">
      <style:text-properties fo:font-size="8pt" style:font-size-complex="8pt" fo:language="it" fo:country="IT" fo:font-weight="bold"/>
    </style:style>
    <style:style style:parent-style-name="1080" style:family="paragraph" style:name="P91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548">
      <style:text-properties fo:font-size="8pt" style:font-size-complex="8pt" fo:language="it" fo:country="IT" fo:font-weight="bold"/>
    </style:style>
    <style:style style:parent-style-name="Graphics" style:family="graphic" style:name="gr7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549">
      <style:text-properties fo:font-size="8pt" style:font-size-complex="8pt" fo:language="it" fo:country="IT" fo:font-weight="bold"/>
    </style:style>
    <style:style style:family="text" style:name="T1550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551">
      <style:text-properties fo:font-size="8pt" style:font-size-complex="8pt" fo:language="it" fo:country="IT" fo:font-weight="bold"/>
    </style:style>
    <style:style style:family="text" style:name="T1552">
      <style:text-properties fo:font-size="8pt" style:font-size-complex="8pt" fo:language="it" fo:country="IT" fo:font-weight="normal"/>
    </style:style>
    <style:style style:family="text" style:name="T1553">
      <style:text-properties fo:font-size="8pt" style:font-size-complex="8pt" fo:language="it" fo:country="IT" fo:font-weight="normal"/>
    </style:style>
    <style:style style:family="text" style:name="T1554">
      <style:text-properties fo:font-size="8pt" style:font-size-complex="8pt" fo:language="it" fo:country="IT" fo:font-weight="bold"/>
    </style:style>
    <style:style style:parent-style-name="1080" style:family="paragraph" style:name="P95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566">
      <style:text-properties fo:font-size="8pt" style:font-size-complex="8pt" fo:language="it" fo:country="IT" fo:font-weight="bold"/>
    </style:style>
    <style:style style:parent-style-name="Graphics" style:family="graphic" style:name="gr8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567">
      <style:text-properties fo:font-size="8pt" style:font-size-complex="8pt" fo:language="it" fo:country="IT" fo:font-weight="bold"/>
    </style:style>
    <style:style style:family="text" style:name="T1568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569">
      <style:text-properties fo:font-size="8pt" style:font-size-complex="8pt" fo:language="it" fo:country="IT" fo:font-weight="bold"/>
    </style:style>
    <style:style style:family="text" style:name="T1570">
      <style:text-properties fo:font-size="8pt" style:font-size-complex="8pt" fo:language="it" fo:country="IT" fo:font-weight="normal"/>
    </style:style>
    <style:style style:family="text" style:name="T1571">
      <style:text-properties fo:font-size="8pt" style:font-size-complex="8pt" fo:language="it" fo:country="IT" fo:font-weight="normal"/>
    </style:style>
    <style:style style:family="text" style:name="T1572">
      <style:text-properties fo:font-size="8pt" style:font-size-complex="8pt" fo:language="it" fo:country="IT" fo:font-weight="bold"/>
    </style:style>
    <style:style style:parent-style-name="1080" style:family="paragraph" style:name="P96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573">
      <style:text-properties fo:font-size="8pt" style:font-size-complex="8pt" fo:language="it" fo:country="IT" fo:font-weight="bold"/>
    </style:style>
    <style:style style:parent-style-name="Graphics" style:family="graphic" style:name="gr9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574">
      <style:text-properties fo:font-size="8pt" style:font-size-complex="8pt" fo:language="it" fo:country="IT" fo:font-weight="bold"/>
    </style:style>
    <style:style style:family="text" style:name="T1575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576">
      <style:text-properties fo:font-size="8pt" style:font-size-complex="8pt" fo:language="it" fo:country="IT" fo:font-weight="bold"/>
    </style:style>
    <style:style style:family="text" style:name="T1577">
      <style:text-properties fo:font-size="8pt" style:font-size-complex="8pt" fo:language="it" fo:country="IT" fo:font-weight="normal"/>
    </style:style>
    <style:style style:family="text" style:name="T1578">
      <style:text-properties fo:font-size="8pt" style:font-size-complex="8pt" fo:language="it" fo:country="IT" fo:font-weight="normal"/>
    </style:style>
    <style:style style:family="text" style:name="T1579">
      <style:text-properties fo:font-size="8pt" style:font-size-complex="8pt" fo:language="it" fo:country="IT" fo:font-weight="bold"/>
    </style:style>
    <style:style style:parent-style-name="1080" style:family="paragraph" style:name="P97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580">
      <style:text-properties fo:font-size="8pt" style:font-size-complex="8pt" fo:language="it" fo:country="IT" fo:font-weight="bold"/>
    </style:style>
    <style:style style:parent-style-name="Graphics" style:family="graphic" style:name="gr10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581">
      <style:text-properties fo:font-size="8pt" style:font-size-complex="8pt" fo:language="it" fo:country="IT" fo:font-weight="bold"/>
    </style:style>
    <style:style style:family="text" style:name="T1582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583">
      <style:text-properties fo:font-size="8pt" style:font-size-complex="8pt" fo:language="it" fo:country="IT" fo:font-weight="bold"/>
    </style:style>
    <style:style style:family="text" style:name="T1584">
      <style:text-properties fo:font-size="8pt" style:font-size-complex="8pt" fo:language="it" fo:country="IT" fo:font-weight="normal"/>
    </style:style>
    <style:style style:family="text" style:name="T1585">
      <style:text-properties fo:font-size="8pt" style:font-size-complex="8pt" fo:language="it" fo:country="IT" fo:font-weight="normal"/>
    </style:style>
    <style:style style:family="text" style:name="T1586">
      <style:text-properties fo:font-size="8pt" style:font-size-complex="8pt" fo:language="it" fo:country="IT" fo:font-weight="bold"/>
    </style:style>
    <style:style style:parent-style-name="1080" style:family="paragraph" style:name="P216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961">
      <style:text-properties fo:font-size="8pt" style:font-size-complex="8pt" fo:language="it" fo:country="IT" fo:font-weight="bold"/>
    </style:style>
    <style:style style:parent-style-name="Graphics" style:family="graphic" style:name="gr16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962">
      <style:text-properties fo:font-size="8pt" style:font-size-complex="8pt" fo:language="it" fo:country="IT" fo:font-weight="bold"/>
    </style:style>
    <style:style style:family="text" style:name="T1963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964">
      <style:text-properties fo:font-size="8pt" style:font-size-complex="8pt" fo:language="it" fo:country="IT" fo:font-weight="bold"/>
    </style:style>
    <style:style style:family="text" style:name="T1965">
      <style:text-properties fo:font-size="8pt" style:font-size-complex="8pt" fo:language="it" fo:country="IT" fo:font-weight="normal"/>
    </style:style>
    <style:style style:family="text" style:name="T1966">
      <style:text-properties fo:font-size="8pt" style:font-size-complex="8pt" fo:language="it" fo:country="IT" fo:font-weight="normal"/>
    </style:style>
    <style:style style:family="text" style:name="T1967">
      <style:text-properties fo:font-size="8pt" style:font-size-complex="8pt" fo:language="it" fo:country="IT" fo:font-weight="bold"/>
    </style:style>
    <style:style style:parent-style-name="1080" style:family="paragraph" style:name="P217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968">
      <style:text-properties fo:font-size="8pt" style:font-size-complex="8pt" fo:language="it" fo:country="IT" fo:font-weight="bold"/>
    </style:style>
    <style:style style:parent-style-name="Graphics" style:family="graphic" style:name="gr17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969">
      <style:text-properties fo:font-size="8pt" style:font-size-complex="8pt" fo:language="it" fo:country="IT" fo:font-weight="bold"/>
    </style:style>
    <style:style style:family="text" style:name="T1970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971">
      <style:text-properties fo:font-size="8pt" style:font-size-complex="8pt" fo:language="it" fo:country="IT" fo:font-weight="bold"/>
    </style:style>
    <style:style style:family="text" style:name="T1972">
      <style:text-properties fo:font-size="8pt" style:font-size-complex="8pt" fo:language="it" fo:country="IT" fo:font-weight="normal"/>
    </style:style>
    <style:style style:family="text" style:name="T1973">
      <style:text-properties fo:font-size="8pt" style:font-size-complex="8pt" fo:language="it" fo:country="IT" fo:font-weight="normal"/>
    </style:style>
    <style:style style:family="text" style:name="T1974">
      <style:text-properties fo:font-size="8pt" style:font-size-complex="8pt" fo:language="it" fo:country="IT" fo:font-weight="bold"/>
    </style:style>
    <style:style style:parent-style-name="1080" style:family="paragraph" style:name="P218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975">
      <style:text-properties fo:font-size="8pt" style:font-size-complex="8pt" fo:language="it" fo:country="IT" fo:font-weight="bold"/>
    </style:style>
    <style:style style:parent-style-name="Graphics" style:family="graphic" style:name="gr18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976">
      <style:text-properties fo:font-size="8pt" style:font-size-complex="8pt" fo:language="it" fo:country="IT" fo:font-weight="bold"/>
    </style:style>
    <style:style style:family="text" style:name="T1977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978">
      <style:text-properties fo:font-size="8pt" style:font-size-complex="8pt" fo:language="it" fo:country="IT" fo:font-weight="bold"/>
    </style:style>
    <style:style style:family="text" style:name="T1979">
      <style:text-properties fo:font-size="8pt" style:font-size-complex="8pt" fo:language="it" fo:country="IT" fo:font-weight="normal"/>
    </style:style>
    <style:style style:family="text" style:name="T1980">
      <style:text-properties fo:font-size="8pt" style:font-size-complex="8pt" fo:language="it" fo:country="IT" fo:font-weight="normal"/>
    </style:style>
    <style:style style:family="text" style:name="T1981">
      <style:text-properties fo:font-size="8pt" style:font-size-complex="8pt" fo:language="it" fo:country="IT" fo:font-weight="bold"/>
    </style:style>
    <style:style style:parent-style-name="1080" style:family="paragraph" style:name="P219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982">
      <style:text-properties fo:font-size="8pt" style:font-size-complex="8pt" fo:language="it" fo:country="IT" fo:font-weight="bold"/>
    </style:style>
    <style:style style:parent-style-name="Graphics" style:family="graphic" style:name="gr19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983">
      <style:text-properties fo:font-size="8pt" style:font-size-complex="8pt" fo:language="it" fo:country="IT" fo:font-weight="bold"/>
    </style:style>
    <style:style style:family="text" style:name="T1984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985">
      <style:text-properties fo:font-size="8pt" style:font-size-complex="8pt" fo:language="it" fo:country="IT" fo:font-weight="bold"/>
    </style:style>
    <style:style style:family="text" style:name="T1986">
      <style:text-properties fo:font-size="8pt" style:font-size-complex="8pt" fo:language="it" fo:country="IT" fo:font-weight="normal"/>
    </style:style>
    <style:style style:family="text" style:name="T1987">
      <style:text-properties fo:font-size="8pt" style:font-size-complex="8pt" fo:language="it" fo:country="IT" fo:font-weight="normal"/>
    </style:style>
    <style:style style:family="text" style:name="T1988">
      <style:text-properties fo:font-size="8pt" style:font-size-complex="8pt" fo:language="it" fo:country="IT" fo:font-weight="bold"/>
    </style:style>
    <style:style style:parent-style-name="1080" style:family="paragraph" style:name="P248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2099">
      <style:text-properties fo:font-size="8pt" style:font-size-complex="8pt" fo:language="it" fo:country="IT" fo:font-weight="bold"/>
    </style:style>
    <style:style style:parent-style-name="Graphics" style:family="graphic" style:name="gr24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100">
      <style:text-properties fo:font-size="8pt" style:font-size-complex="8pt" fo:language="it" fo:country="IT" fo:font-weight="bold"/>
    </style:style>
    <style:style style:family="text" style:name="T2101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2102">
      <style:text-properties fo:font-size="8pt" style:font-size-complex="8pt" fo:language="it" fo:country="IT" fo:font-weight="bold"/>
    </style:style>
    <style:style style:family="text" style:name="T2103">
      <style:text-properties fo:font-size="8pt" style:font-size-complex="8pt" fo:language="it" fo:country="IT" fo:font-weight="normal"/>
    </style:style>
    <style:style style:family="text" style:name="T2104">
      <style:text-properties fo:font-size="8pt" style:font-size-complex="8pt" fo:language="it" fo:country="IT" fo:font-weight="normal"/>
    </style:style>
    <style:style style:family="text" style:name="T2105">
      <style:text-properties fo:font-size="8pt" style:font-size-complex="8pt" fo:language="it" fo:country="IT" fo:font-weight="bold"/>
    </style:style>
    <style:style style:parent-style-name="1080" style:family="paragraph" style:name="P249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2106">
      <style:text-properties fo:font-size="8pt" style:font-size-complex="8pt" fo:language="it" fo:country="IT" fo:font-weight="bold"/>
    </style:style>
    <style:style style:parent-style-name="Graphics" style:family="graphic" style:name="gr25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107">
      <style:text-properties fo:font-size="8pt" style:font-size-complex="8pt" fo:language="it" fo:country="IT" fo:font-weight="bold"/>
    </style:style>
    <style:style style:family="text" style:name="T2108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2109">
      <style:text-properties fo:font-size="8pt" style:font-size-complex="8pt" fo:language="it" fo:country="IT" fo:font-weight="bold"/>
    </style:style>
    <style:style style:family="text" style:name="T2110">
      <style:text-properties fo:font-size="8pt" style:font-size-complex="8pt" fo:language="it" fo:country="IT" fo:font-weight="normal"/>
    </style:style>
    <style:style style:family="text" style:name="T2111">
      <style:text-properties fo:font-size="8pt" style:font-size-complex="8pt" fo:language="it" fo:country="IT" fo:font-weight="normal"/>
    </style:style>
    <style:style style:family="text" style:name="T2112">
      <style:text-properties fo:font-size="8pt" style:font-size-complex="8pt" fo:language="it" fo:country="IT" fo:font-weight="bold"/>
    </style:style>
    <style:style style:parent-style-name="1080" style:family="paragraph" style:name="P250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2113">
      <style:text-properties fo:font-size="8pt" style:font-size-complex="8pt" fo:language="it" fo:country="IT" fo:font-weight="bold"/>
    </style:style>
    <style:style style:parent-style-name="Graphics" style:family="graphic" style:name="gr26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114">
      <style:text-properties fo:font-size="8pt" style:font-size-complex="8pt" fo:language="it" fo:country="IT" fo:font-weight="bold"/>
    </style:style>
    <style:style style:family="text" style:name="T2115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2116">
      <style:text-properties fo:font-size="8pt" style:font-size-complex="8pt" fo:language="it" fo:country="IT" fo:font-weight="bold"/>
    </style:style>
    <style:style style:family="text" style:name="T2117">
      <style:text-properties fo:font-size="8pt" style:font-size-complex="8pt" fo:language="it" fo:country="IT" fo:font-weight="normal"/>
    </style:style>
    <style:style style:family="text" style:name="T2118">
      <style:text-properties fo:font-size="8pt" style:font-size-complex="8pt" fo:language="it" fo:country="IT" fo:font-weight="normal"/>
    </style:style>
    <style:style style:family="text" style:name="T2119">
      <style:text-properties fo:font-size="8pt" style:font-size-complex="8pt" fo:language="it" fo:country="IT" fo:font-weight="bold"/>
    </style:style>
    <style:style style:parent-style-name="1080" style:family="paragraph" style:name="P251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2120">
      <style:text-properties fo:font-size="8pt" style:font-size-complex="8pt" fo:language="it" fo:country="IT" fo:font-weight="bold"/>
    </style:style>
    <style:style style:parent-style-name="Graphics" style:family="graphic" style:name="gr27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121">
      <style:text-properties fo:font-size="8pt" style:font-size-complex="8pt" fo:language="it" fo:country="IT" fo:font-weight="bold"/>
    </style:style>
    <style:style style:family="text" style:name="T2122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2123">
      <style:text-properties fo:font-size="8pt" style:font-size-complex="8pt" fo:language="it" fo:country="IT" fo:font-weight="bold"/>
    </style:style>
    <style:style style:family="text" style:name="T2124">
      <style:text-properties fo:font-size="8pt" style:font-size-complex="8pt" fo:language="it" fo:country="IT" fo:font-weight="normal"/>
    </style:style>
    <style:style style:family="text" style:name="T2125">
      <style:text-properties fo:font-size="8pt" style:font-size-complex="8pt" fo:language="it" fo:country="IT" fo:font-weight="normal"/>
    </style:style>
    <style:style style:family="text" style:name="T2126">
      <style:text-properties fo:font-size="8pt" style:font-size-complex="8pt" fo:language="it" fo:country="IT" fo:font-weight="bold"/>
    </style:style>
    <style:style style:parent-style-name="1080" style:family="paragraph" style:name="P252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2127">
      <style:text-properties fo:font-size="8pt" style:font-size-complex="8pt" fo:language="it" fo:country="IT" fo:font-weight="bold"/>
    </style:style>
    <style:style style:parent-style-name="Graphics" style:family="graphic" style:name="gr28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128">
      <style:text-properties fo:font-size="8pt" style:font-size-complex="8pt" fo:language="it" fo:country="IT" fo:font-weight="bold"/>
    </style:style>
    <style:style style:family="text" style:name="T2129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2130">
      <style:text-properties fo:font-size="8pt" style:font-size-complex="8pt" fo:language="it" fo:country="IT" fo:font-weight="bold"/>
    </style:style>
    <style:style style:family="text" style:name="T2131">
      <style:text-properties fo:font-size="8pt" style:font-size-complex="8pt" fo:language="it" fo:country="IT" fo:font-weight="normal"/>
    </style:style>
    <style:style style:family="text" style:name="T2132">
      <style:text-properties fo:font-size="8pt" style:font-size-complex="8pt" fo:language="it" fo:country="IT" fo:font-weight="normal"/>
    </style:style>
    <style:style style:family="text" style:name="T2133">
      <style:text-properties fo:font-size="8pt" style:font-size-complex="8pt" fo:language="it" fo:country="IT" fo:font-weight="bold"/>
    </style:style>
    <style:style style:parent-style-name="1080" style:family="paragraph" style:name="P304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2334">
      <style:text-properties fo:font-size="8pt" style:font-size-complex="8pt" fo:language="it" fo:country="IT" fo:font-weight="bold"/>
    </style:style>
    <style:style style:parent-style-name="Graphics" style:family="graphic" style:name="gr34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335">
      <style:text-properties fo:font-size="8pt" style:font-size-complex="8pt" fo:language="it" fo:country="IT" fo:font-weight="bold"/>
    </style:style>
    <style:style style:family="text" style:name="T2336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2337">
      <style:text-properties fo:font-size="8pt" style:font-size-complex="8pt" fo:language="it" fo:country="IT" fo:font-weight="bold"/>
    </style:style>
    <style:style style:family="text" style:name="T2338">
      <style:text-properties fo:font-size="8pt" style:font-size-complex="8pt" fo:language="it" fo:country="IT" fo:font-weight="normal"/>
    </style:style>
    <style:style style:family="text" style:name="T2339">
      <style:text-properties fo:font-size="8pt" style:font-size-complex="8pt" fo:language="it" fo:country="IT" fo:font-weight="normal"/>
    </style:style>
    <style:style style:family="text" style:name="T2340">
      <style:text-properties fo:font-size="8pt" style:font-size-complex="8pt" fo:language="it" fo:country="IT" fo:font-weight="bold"/>
    </style:style>
    <style:style style:parent-style-name="1080" style:family="paragraph" style:name="P305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2341">
      <style:text-properties fo:font-size="8pt" style:font-size-complex="8pt" fo:language="it" fo:country="IT" fo:font-weight="bold"/>
    </style:style>
    <style:style style:parent-style-name="Graphics" style:family="graphic" style:name="gr35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342">
      <style:text-properties fo:font-size="8pt" style:font-size-complex="8pt" fo:language="it" fo:country="IT" fo:font-weight="bold"/>
    </style:style>
    <style:style style:family="text" style:name="T2343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2344">
      <style:text-properties fo:font-size="8pt" style:font-size-complex="8pt" fo:language="it" fo:country="IT" fo:font-weight="bold"/>
    </style:style>
    <style:style style:family="text" style:name="T2345">
      <style:text-properties fo:font-size="8pt" style:font-size-complex="8pt" fo:language="it" fo:country="IT" fo:font-weight="normal"/>
    </style:style>
    <style:style style:family="text" style:name="T2346">
      <style:text-properties fo:font-size="8pt" style:font-size-complex="8pt" fo:language="it" fo:country="IT" fo:font-weight="normal"/>
    </style:style>
    <style:style style:family="text" style:name="T2347">
      <style:text-properties fo:font-size="8pt" style:font-size-complex="8pt" fo:language="it" fo:country="IT" fo:font-weight="bold"/>
    </style:style>
    <style:style style:parent-style-name="1080" style:family="paragraph" style:name="P306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2348">
      <style:text-properties fo:font-size="8pt" style:font-size-complex="8pt" fo:language="it" fo:country="IT" fo:font-weight="bold"/>
    </style:style>
    <style:style style:parent-style-name="Graphics" style:family="graphic" style:name="gr36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349">
      <style:text-properties fo:font-size="8pt" style:font-size-complex="8pt" fo:language="it" fo:country="IT" fo:font-weight="bold"/>
    </style:style>
    <style:style style:family="text" style:name="T2350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2351">
      <style:text-properties fo:font-size="8pt" style:font-size-complex="8pt" fo:language="it" fo:country="IT" fo:font-weight="bold"/>
    </style:style>
    <style:style style:family="text" style:name="T2352">
      <style:text-properties fo:font-size="8pt" style:font-size-complex="8pt" fo:language="it" fo:country="IT" fo:font-weight="normal"/>
    </style:style>
    <style:style style:family="text" style:name="T2353">
      <style:text-properties fo:font-size="8pt" style:font-size-complex="8pt" fo:language="it" fo:country="IT" fo:font-weight="normal"/>
    </style:style>
    <style:style style:family="text" style:name="T2354">
      <style:text-properties fo:font-size="8pt" style:font-size-complex="8pt" fo:language="it" fo:country="IT" fo:font-weight="bold"/>
    </style:style>
    <style:style style:parent-style-name="1080" style:family="paragraph" style:name="P307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2355">
      <style:text-properties fo:font-size="8pt" style:font-size-complex="8pt" fo:language="it" fo:country="IT" fo:font-weight="bold"/>
    </style:style>
    <style:style style:parent-style-name="Graphics" style:family="graphic" style:name="gr37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356">
      <style:text-properties fo:font-size="8pt" style:font-size-complex="8pt" fo:language="it" fo:country="IT" fo:font-weight="bold"/>
    </style:style>
    <style:style style:family="text" style:name="T2357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2358">
      <style:text-properties fo:font-size="8pt" style:font-size-complex="8pt" fo:language="it" fo:country="IT" fo:font-weight="bold"/>
    </style:style>
    <style:style style:family="text" style:name="T2359">
      <style:text-properties fo:font-size="8pt" style:font-size-complex="8pt" fo:language="it" fo:country="IT" fo:font-weight="normal"/>
    </style:style>
    <style:style style:family="text" style:name="T2360">
      <style:text-properties fo:font-size="8pt" style:font-size-complex="8pt" fo:language="it" fo:country="IT" fo:font-weight="normal"/>
    </style:style>
    <style:style style:family="text" style:name="T2361">
      <style:text-properties fo:font-size="8pt" style:font-size-complex="8pt" fo:language="it" fo:country="IT" fo:font-weight="bold"/>
    </style:style>
    <style:style style:parent-style-name="1080" style:family="paragraph" style:name="P308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2362">
      <style:text-properties fo:font-size="8pt" style:font-size-complex="8pt" fo:language="it" fo:country="IT" fo:font-weight="bold"/>
    </style:style>
    <style:style style:parent-style-name="Graphics" style:family="graphic" style:name="gr38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363">
      <style:text-properties fo:font-size="8pt" style:font-size-complex="8pt" fo:language="it" fo:country="IT" fo:font-weight="bold"/>
    </style:style>
    <style:style style:family="text" style:name="T2364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2365">
      <style:text-properties fo:font-size="8pt" style:font-size-complex="8pt" fo:language="it" fo:country="IT" fo:font-weight="bold"/>
    </style:style>
    <style:style style:family="text" style:name="T2366">
      <style:text-properties fo:font-size="8pt" style:font-size-complex="8pt" fo:language="it" fo:country="IT" fo:font-weight="normal"/>
    </style:style>
    <style:style style:family="text" style:name="T2367">
      <style:text-properties fo:font-size="8pt" style:font-size-complex="8pt" fo:language="it" fo:country="IT" fo:font-weight="normal"/>
    </style:style>
    <style:style style:family="text" style:name="T2368">
      <style:text-properties fo:font-size="8pt" style:font-size-complex="8pt" fo:language="it" fo:country="IT" fo:font-weight="bold"/>
    </style:style>
    <style:style style:parent-style-name="1080" style:family="paragraph" style:name="P309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2369">
      <style:text-properties fo:font-size="8pt" style:font-size-complex="8pt" fo:language="it" fo:country="IT" fo:font-weight="bold"/>
    </style:style>
    <style:style style:parent-style-name="Graphics" style:family="graphic" style:name="gr39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370">
      <style:text-properties fo:font-size="8pt" style:font-size-complex="8pt" fo:language="it" fo:country="IT" fo:font-weight="bold"/>
    </style:style>
    <style:style style:family="text" style:name="T2371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2372">
      <style:text-properties fo:font-size="8pt" style:font-size-complex="8pt" fo:language="it" fo:country="IT" fo:font-weight="bold"/>
    </style:style>
    <style:style style:family="text" style:name="T2373">
      <style:text-properties fo:font-size="8pt" style:font-size-complex="8pt" fo:language="it" fo:country="IT" fo:font-weight="normal"/>
    </style:style>
    <style:style style:family="text" style:name="T2374">
      <style:text-properties fo:font-size="8pt" style:font-size-complex="8pt" fo:language="it" fo:country="IT" fo:font-weight="normal"/>
    </style:style>
    <style:style style:family="text" style:name="T2375">
      <style:text-properties fo:font-size="8pt" style:font-size-complex="8pt" fo:language="it" fo:country="IT" fo:font-weight="bold"/>
    </style:style>
    <style:style style:parent-style-name="1080" style:family="paragraph" style:name="P336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2486">
      <style:text-properties fo:font-size="8pt" style:font-size-complex="8pt" fo:language="it" fo:country="IT" fo:font-weight="bold"/>
    </style:style>
    <style:style style:parent-style-name="Graphics" style:family="graphic" style:name="gr44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487">
      <style:text-properties fo:font-size="8pt" style:font-size-complex="8pt" fo:language="it" fo:country="IT" fo:font-weight="bold"/>
    </style:style>
    <style:style style:family="text" style:name="T2488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2489">
      <style:text-properties fo:font-size="8pt" style:font-size-complex="8pt" fo:language="it" fo:country="IT" fo:font-weight="bold"/>
    </style:style>
    <style:style style:family="text" style:name="T2490">
      <style:text-properties fo:font-size="8pt" style:font-size-complex="8pt" fo:language="it" fo:country="IT" fo:font-weight="normal"/>
    </style:style>
    <style:style style:family="text" style:name="T2491">
      <style:text-properties fo:font-size="8pt" style:font-size-complex="8pt" fo:language="it" fo:country="IT" fo:font-weight="normal"/>
    </style:style>
    <style:style style:family="text" style:name="T2492">
      <style:text-properties fo:font-size="8pt" style:font-size-complex="8pt" fo:language="it" fo:country="IT" fo:font-weight="bold"/>
    </style:style>
    <style:style style:parent-style-name="1080" style:family="paragraph" style:name="P337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2493">
      <style:text-properties fo:font-size="8pt" style:font-size-complex="8pt" fo:language="it" fo:country="IT" fo:font-weight="bold"/>
    </style:style>
    <style:style style:parent-style-name="Graphics" style:family="graphic" style:name="gr45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494">
      <style:text-properties fo:font-size="8pt" style:font-size-complex="8pt" fo:language="it" fo:country="IT" fo:font-weight="bold"/>
    </style:style>
    <style:style style:family="text" style:name="T2495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2496">
      <style:text-properties fo:font-size="8pt" style:font-size-complex="8pt" fo:language="it" fo:country="IT" fo:font-weight="bold"/>
    </style:style>
    <style:style style:family="text" style:name="T2497">
      <style:text-properties fo:font-size="8pt" style:font-size-complex="8pt" fo:language="it" fo:country="IT" fo:font-weight="normal"/>
    </style:style>
    <style:style style:family="text" style:name="T2498">
      <style:text-properties fo:font-size="8pt" style:font-size-complex="8pt" fo:language="it" fo:country="IT" fo:font-weight="normal"/>
    </style:style>
    <style:style style:family="text" style:name="T2499">
      <style:text-properties fo:font-size="8pt" style:font-size-complex="8pt" fo:language="it" fo:country="IT" fo:font-weight="bold"/>
    </style:style>
    <style:style style:parent-style-name="1080" style:family="paragraph" style:name="P338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2500">
      <style:text-properties fo:font-size="8pt" style:font-size-complex="8pt" fo:language="it" fo:country="IT" fo:font-weight="bold"/>
    </style:style>
    <style:style style:parent-style-name="Graphics" style:family="graphic" style:name="gr46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501">
      <style:text-properties fo:font-size="8pt" style:font-size-complex="8pt" fo:language="it" fo:country="IT" fo:font-weight="bold"/>
    </style:style>
    <style:style style:family="text" style:name="T2502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2503">
      <style:text-properties fo:font-size="8pt" style:font-size-complex="8pt" fo:language="it" fo:country="IT" fo:font-weight="bold"/>
    </style:style>
    <style:style style:family="text" style:name="T2504">
      <style:text-properties fo:font-size="8pt" style:font-size-complex="8pt" fo:language="it" fo:country="IT" fo:font-weight="normal"/>
    </style:style>
    <style:style style:family="text" style:name="T2505">
      <style:text-properties fo:font-size="8pt" style:font-size-complex="8pt" fo:language="it" fo:country="IT" fo:font-weight="normal"/>
    </style:style>
    <style:style style:family="text" style:name="T2506">
      <style:text-properties fo:font-size="8pt" style:font-size-complex="8pt" fo:language="it" fo:country="IT" fo:font-weight="bold"/>
    </style:style>
    <style:style style:parent-style-name="1080" style:family="paragraph" style:name="P339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2507">
      <style:text-properties fo:font-size="8pt" style:font-size-complex="8pt" fo:language="it" fo:country="IT" fo:font-weight="bold"/>
    </style:style>
    <style:style style:parent-style-name="Graphics" style:family="graphic" style:name="gr47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508">
      <style:text-properties fo:font-size="8pt" style:font-size-complex="8pt" fo:language="it" fo:country="IT" fo:font-weight="bold"/>
    </style:style>
    <style:style style:family="text" style:name="T2509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2510">
      <style:text-properties fo:font-size="8pt" style:font-size-complex="8pt" fo:language="it" fo:country="IT" fo:font-weight="bold"/>
    </style:style>
    <style:style style:family="text" style:name="T2511">
      <style:text-properties fo:font-size="8pt" style:font-size-complex="8pt" fo:language="it" fo:country="IT" fo:font-weight="normal"/>
    </style:style>
    <style:style style:family="text" style:name="T2512">
      <style:text-properties fo:font-size="8pt" style:font-size-complex="8pt" fo:language="it" fo:country="IT" fo:font-weight="normal"/>
    </style:style>
    <style:style style:family="text" style:name="T2513">
      <style:text-properties fo:font-size="8pt" style:font-size-complex="8pt" fo:language="it" fo:country="IT" fo:font-weight="bold"/>
    </style:style>
    <style:style style:parent-style-name="1080" style:family="paragraph" style:name="P340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2514">
      <style:text-properties fo:font-size="8pt" style:font-size-complex="8pt" fo:language="it" fo:country="IT" fo:font-weight="bold"/>
    </style:style>
    <style:style style:parent-style-name="Graphics" style:family="graphic" style:name="gr48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515">
      <style:text-properties fo:font-size="8pt" style:font-size-complex="8pt" fo:language="it" fo:country="IT" fo:font-weight="bold"/>
    </style:style>
    <style:style style:family="text" style:name="T2516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2517">
      <style:text-properties fo:font-size="8pt" style:font-size-complex="8pt" fo:language="it" fo:country="IT" fo:font-weight="bold"/>
    </style:style>
    <style:style style:family="text" style:name="T2518">
      <style:text-properties fo:font-size="8pt" style:font-size-complex="8pt" fo:language="it" fo:country="IT" fo:font-weight="normal"/>
    </style:style>
    <style:style style:family="text" style:name="T2519">
      <style:text-properties fo:font-size="8pt" style:font-size-complex="8pt" fo:language="it" fo:country="IT" fo:font-weight="normal"/>
    </style:style>
    <style:style style:family="text" style:name="T2520">
      <style:text-properties fo:font-size="8pt" style:font-size-complex="8pt" fo:language="it" fo:country="IT" fo:font-weight="bold"/>
    </style:style>
    <style:style style:parent-style-name="1080" style:family="paragraph" style:name="P341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2521">
      <style:text-properties fo:font-size="8pt" style:font-size-complex="8pt" fo:language="it" fo:country="IT" fo:font-weight="bold"/>
    </style:style>
    <style:style style:parent-style-name="Graphics" style:family="graphic" style:name="gr49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522">
      <style:text-properties fo:font-size="8pt" style:font-size-complex="8pt" fo:language="it" fo:country="IT" fo:font-weight="bold"/>
    </style:style>
    <style:style style:family="text" style:name="T2523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2524">
      <style:text-properties fo:font-size="8pt" style:font-size-complex="8pt" fo:language="it" fo:country="IT" fo:font-weight="bold"/>
    </style:style>
    <style:style style:family="text" style:name="T2525">
      <style:text-properties fo:font-size="8pt" style:font-size-complex="8pt" fo:language="it" fo:country="IT" fo:font-weight="normal"/>
    </style:style>
    <style:style style:family="text" style:name="T2526">
      <style:text-properties fo:font-size="8pt" style:font-size-complex="8pt" fo:language="it" fo:country="IT" fo:font-weight="normal"/>
    </style:style>
    <style:style style:family="text" style:name="T2527">
      <style:text-properties fo:font-size="8pt" style:font-size-complex="8pt" fo:language="it" fo:country="IT" fo:font-weight="bold"/>
    </style:style>
    <style:style style:parent-style-name="1080" style:family="paragraph" style:name="P342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2528">
      <style:text-properties fo:font-size="8pt" style:font-size-complex="8pt" fo:language="it" fo:country="IT" fo:font-weight="bold"/>
    </style:style>
    <style:style style:parent-style-name="Graphics" style:family="graphic" style:name="gr50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529">
      <style:text-properties fo:font-size="8pt" style:font-size-complex="8pt" fo:language="it" fo:country="IT" fo:font-weight="bold"/>
    </style:style>
    <style:style style:family="text" style:name="T2530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2531">
      <style:text-properties fo:font-size="8pt" style:font-size-complex="8pt" fo:language="it" fo:country="IT" fo:font-weight="bold"/>
    </style:style>
    <style:style style:family="text" style:name="T2532">
      <style:text-properties fo:font-size="8pt" style:font-size-complex="8pt" fo:language="it" fo:country="IT" fo:font-weight="normal"/>
    </style:style>
    <style:style style:family="text" style:name="T2533">
      <style:text-properties fo:font-size="8pt" style:font-size-complex="8pt" fo:language="it" fo:country="IT" fo:font-weight="normal"/>
    </style:style>
    <style:style style:family="text" style:name="T2534">
      <style:text-properties fo:font-size="8pt" style:font-size-complex="8pt" fo:language="it" fo:country="IT" fo:font-weight="bold"/>
    </style:style>
  </office:automatic-styles>
  <office:master-styles>
    <style:master-page style:name="Standard" style:page-layout-name="Mpm1">
      <style:footer>
        <text:p text:style-name="P53"><text:span text:style-name="T1365"/><text:span/><draw:frame draw:name="Copia Immagine13 1" draw:style-name="gr3" text:anchor-type="as-char" svg:width="0.619cm" svg:height="0.619cm" svg:x="0cm" svg:y="0cm"><draw:image xlink:href="Pictures/image1.png" xlink:type="simple" xlink:show="embed" xlink:actuate="onLoad"/></draw:frame><text:span text:style-name="T1366"><text:tab/>GIACENZE CRYPTO : </text:span><text:span text:style-name="T1367">Esportazione files CSV</text:span><text:span text:style-name="T1368"><text:s/></text:span><text:span text:style-name="T1369">(Aggiornato alla versione 1.</text:span><text:span text:style-name="T1370">49)</text:span><text:span text:style-name="T1371"><text:tab/></text:span><text:bookmark-start text:name="Copia Copia PageNumWizard_FOOTER_Stile di pagina predefinito1 4 1"/><text:span/><text:span/><text:span/><text:page-number text:select-page="current"><text:span/></text:page-number><text:span> / </text:span><text:span/><text:span/><text:span/><text:page-count><text:span/></text:page-count><text:bookmark-end text:name="Copia Copia PageNumWizard_FOOTER_Stile di pagina predefinito1 4 1"/><text:span/><text:span/></text:p>
      </style:footer>
    </style:master-page>
    <style:master-page style:name="MasterPage2" style:page-layout-name="Mpm2">
      <style:footer>
        <text:p text:style-name="P55"><text:span text:style-name="T1372"/><text:span/><draw:frame draw:name="Copia Immagine13 1" draw:style-name="gr4" text:anchor-type="as-char" svg:width="0.619cm" svg:height="0.619cm" svg:x="0cm" svg:y="0cm"><draw:image xlink:href="Pictures/image1.png" xlink:type="simple" xlink:show="embed" xlink:actuate="onLoad"/></draw:frame><text:span text:style-name="T1373"><text:tab/>GIACENZE CRYPTO : </text:span><text:span text:style-name="T1374">Esportazione files CSV</text:span><text:span text:style-name="T1375"><text:s/></text:span><text:span text:style-name="T1376">(Aggiornato alla versione 1.</text:span><text:span text:style-name="T1377">49)</text:span><text:span text:style-name="T1378"><text:tab/></text:span><text:bookmark-start text:name="Copia Copia PageNumWizard_FOOTER_Stile di pagina predefinito1 4 1"/><text:span/><text:span/><text:span/><text:page-number text:select-page="current"><text:span/></text:page-number><text:span> / </text:span><text:span/><text:span/><text:span/><text:page-count><text:span/></text:page-count><text:bookmark-end text:name="Copia Copia PageNumWizard_FOOTER_Stile di pagina predefinito1 4 1"/><text:span/><text:span/></text:p>
      </style:footer>
    </style:master-page>
    <style:master-page style:name="MasterPage3" style:page-layout-name="Mpm3">
      <style:footer>
        <text:p text:style-name="P91"><text:span text:style-name="T1548"/><text:span/><draw:frame draw:name="Copia Immagine13 1" draw:style-name="gr7" text:anchor-type="as-char" svg:width="0.619cm" svg:height="0.619cm" svg:x="0cm" svg:y="0cm"><draw:image xlink:href="Pictures/image1.png" xlink:type="simple" xlink:show="embed" xlink:actuate="onLoad"/></draw:frame><text:span text:style-name="T1549"><text:tab/>GIACENZE CRYPTO : </text:span><text:span text:style-name="T1550">Esportazione files CSV</text:span><text:span text:style-name="T1551"><text:s/></text:span><text:span text:style-name="T1552">(Aggiornato alla versione 1.</text:span><text:span text:style-name="T1553">49)</text:span><text:span text:style-name="T1554"><text:tab/></text:span><text:bookmark-start text:name="Copia Copia PageNumWizard_FOOTER_Stile di pagina predefinito1 4 1"/><text:span/><text:span/><text:span/><text:page-number text:select-page="current"><text:span/></text:page-number><text:span> / </text:span><text:span/><text:span/><text:span/><text:page-count><text:span/></text:page-count><text:bookmark-end text:name="Copia Copia PageNumWizard_FOOTER_Stile di pagina predefinito1 4 1"/><text:span/><text:span/></text:p>
      </style:footer>
    </style:master-page>
    <style:master-page style:name="MasterPage4" style:page-layout-name="Mpm4">
      <style:footer>
        <text:p text:style-name="P97"><text:span text:style-name="T1580"/><text:span/><draw:frame draw:name="Copia Immagine13 1" draw:style-name="gr10" text:anchor-type="as-char" svg:width="0.619cm" svg:height="0.619cm" svg:x="0cm" svg:y="0cm"><draw:image xlink:href="Pictures/image1.png" xlink:type="simple" xlink:show="embed" xlink:actuate="onLoad"/></draw:frame><text:span text:style-name="T1581"><text:tab/>GIACENZE CRYPTO : </text:span><text:span text:style-name="T1582">Esportazione files CSV</text:span><text:span text:style-name="T1583"><text:s/></text:span><text:span text:style-name="T1584">(Aggiornato alla versione 1.</text:span><text:span text:style-name="T1585">49)</text:span><text:span text:style-name="T1586"><text:tab/></text:span><text:bookmark-start text:name="Copia Copia PageNumWizard_FOOTER_Stile di pagina predefinito1 4 1"/><text:span/><text:span/><text:span/><text:page-number text:select-page="current"><text:span/></text:page-number><text:span> / </text:span><text:span/><text:span/><text:span/><text:page-count><text:span/></text:page-count><text:bookmark-end text:name="Copia Copia PageNumWizard_FOOTER_Stile di pagina predefinito1 4 1"/><text:span/><text:span/></text:p>
      </style:footer>
    </style:master-page>
    <style:master-page style:name="MasterPage5" style:page-layout-name="Mpm5">
      <style:footer>
        <text:p text:style-name="P219"><text:span text:style-name="T1982"/><text:span/><draw:frame draw:name="Copia Immagine13 1" draw:style-name="gr19" text:anchor-type="as-char" svg:width="0.619cm" svg:height="0.619cm" svg:x="0cm" svg:y="0cm"><draw:image xlink:href="Pictures/image1.png" xlink:type="simple" xlink:show="embed" xlink:actuate="onLoad"/></draw:frame><text:span text:style-name="T1983"><text:tab/>GIACENZE CRYPTO : </text:span><text:span text:style-name="T1984">Esportazione files CSV</text:span><text:span text:style-name="T1985"><text:s/></text:span><text:span text:style-name="T1986">(Aggiornato alla versione 1.</text:span><text:span text:style-name="T1987">49)</text:span><text:span text:style-name="T1988"><text:tab/></text:span><text:bookmark-start text:name="Copia Copia PageNumWizard_FOOTER_Stile di pagina predefinito1 4 1"/><text:span/><text:span/><text:span/><text:page-number text:select-page="current"><text:span/></text:page-number><text:span> / </text:span><text:span/><text:span/><text:span/><text:page-count><text:span/></text:page-count><text:bookmark-end text:name="Copia Copia PageNumWizard_FOOTER_Stile di pagina predefinito1 4 1"/><text:span/><text:span/></text:p>
      </style:footer>
    </style:master-page>
    <style:master-page style:name="MasterPage6" style:page-layout-name="Mpm6">
      <style:footer>
        <text:p text:style-name="P252"><text:span text:style-name="T2127"/><text:span/><draw:frame draw:name="Copia Immagine13 1" draw:style-name="gr28" text:anchor-type="as-char" svg:width="0.619cm" svg:height="0.619cm" svg:x="0cm" svg:y="0cm"><draw:image xlink:href="Pictures/image1.png" xlink:type="simple" xlink:show="embed" xlink:actuate="onLoad"/></draw:frame><text:span text:style-name="T2128"><text:tab/>GIACENZE CRYPTO : </text:span><text:span text:style-name="T2129">Esportazione files CSV</text:span><text:span text:style-name="T2130"><text:s/></text:span><text:span text:style-name="T2131">(Aggiornato alla versione 1.</text:span><text:span text:style-name="T2132">49)</text:span><text:span text:style-name="T2133"><text:tab/></text:span><text:bookmark-start text:name="Copia Copia PageNumWizard_FOOTER_Stile di pagina predefinito1 4 1"/><text:span/><text:span/><text:span/><text:page-number text:select-page="current"><text:span/></text:page-number><text:span> / </text:span><text:span/><text:span/><text:span/><text:page-count><text:span/></text:page-count><text:bookmark-end text:name="Copia Copia PageNumWizard_FOOTER_Stile di pagina predefinito1 4 1"/><text:span/><text:span/></text:p>
      </style:footer>
    </style:master-page>
    <style:master-page style:name="MasterPage7" style:page-layout-name="Mpm7">
      <style:footer>
        <text:p text:style-name="P309"><text:span text:style-name="T2369"/><text:span/><draw:frame draw:name="Copia Immagine13 1" draw:style-name="gr39" text:anchor-type="as-char" svg:width="0.619cm" svg:height="0.619cm" svg:x="0cm" svg:y="0cm"><draw:image xlink:href="Pictures/image1.png" xlink:type="simple" xlink:show="embed" xlink:actuate="onLoad"/></draw:frame><text:span text:style-name="T2370"><text:tab/>GIACENZE CRYPTO : </text:span><text:span text:style-name="T2371">Esportazione files CSV</text:span><text:span text:style-name="T2372"><text:s/></text:span><text:span text:style-name="T2373">(Aggiornato alla versione 1.</text:span><text:span text:style-name="T2374">49)</text:span><text:span text:style-name="T2375"><text:tab/></text:span><text:bookmark-start text:name="Copia Copia PageNumWizard_FOOTER_Stile di pagina predefinito1 4 1"/><text:span/><text:span/><text:span/><text:page-number text:select-page="current"><text:span/></text:page-number><text:span> / </text:span><text:span/><text:span/><text:span/><text:page-count><text:span/></text:page-count><text:bookmark-end text:name="Copia Copia PageNumWizard_FOOTER_Stile di pagina predefinito1 4 1"/><text:span/><text:span/></text:p>
      </style:footer>
    </style:master-page>
    <style:master-page style:name="MasterPage8" style:page-layout-name="Mpm8">
      <style:footer>
        <text:p text:style-name="P342"><text:span text:style-name="T2528"/><text:span/><draw:frame draw:name="Copia Immagine13 1" draw:style-name="gr50" text:anchor-type="as-char" svg:width="0.619cm" svg:height="0.619cm" svg:x="0cm" svg:y="0cm"><draw:image xlink:href="Pictures/image1.png" xlink:type="simple" xlink:show="embed" xlink:actuate="onLoad"/></draw:frame><text:span text:style-name="T2529"><text:tab/>GIACENZE CRYPTO : </text:span><text:span text:style-name="T2530">Esportazione files CSV</text:span><text:span text:style-name="T2531"><text:s/></text:span><text:span text:style-name="T2532">(Aggiornato alla versione 1.</text:span><text:span text:style-name="T2533">49)</text:span><text:span text:style-name="T2534"><text:tab/></text:span><text:bookmark-start text:name="Copia Copia PageNumWizard_FOOTER_Stile di pagina predefinito1 4 1"/><text:span/><text:span/><text:span/><text:page-number text:select-page="current"><text:span/></text:page-number><text:span> / </text:span><text:span/><text:span/><text:span/><text:page-count><text:span/></text:page-count><text:bookmark-end text:name="Copia Copia PageNumWizard_FOOTER_Stile di pagina predefinito1 4 1"/><text:span/><text:span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3.1.8</meta:generator>
    <meta:creation-date>2024-07-12T21:04:48Z</meta:creation-date>
  </office:meta>
</office:document-meta>
</file>