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jpg" manifest:media-type=""/>
  <manifest:file-entry manifest:full-path="Pictures/image4.jpg" manifest:media-type=""/>
  <manifest:file-entry manifest:full-path="Pictures/image5.jpg" manifest:media-type=""/>
  <manifest:file-entry manifest:full-path="Pictures/image6.jpg" manifest:media-type=""/>
  <manifest:file-entry manifest:full-path="Pictures/image7.jp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Pictures/image23.png" manifest:media-type=""/>
  <manifest:file-entry manifest:full-path="Pictures/image2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1068" style:master-page-name="MasterPage2" style:family="paragraph" style:name="P54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72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parent-style-name="Graphics" style:family="graphic" style:name="gr4">
      <style:graphic-properties draw:image-opacity="100%"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573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15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56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76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15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57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79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1580">
      <style:text-properties fo:color="#000000" fo:font-family="Eras Bold ITC" style:font-family-complex="Eras Bold ITC" fo:font-size="20pt" style:font-size-complex="20pt" fo:language="it" style:language-complex="hi" fo:country="IT" style:country-complex="IN" fo:font-weight="bold"/>
    </style:style>
    <style:style style:family="text" style:name="T1581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1582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15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58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85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15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59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88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15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60">
      <style:paragraph-properties fo:text-align="left" fo:margin-left="0cm" fo:margin-right="0cm" fo:text-indent="1.237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91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15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61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94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159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9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7" style:family="paragraph" style:name="P62">
      <style:paragraph-properties/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1597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1598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1599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parent-style-name="1055" style:family="paragraph" style:name="P63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055" style:family="paragraph" style:name="P64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600">
      <style:text-properties fo:font-family="Liberation Sans" style:font-family-complex="Liberation Sans"/>
    </style:style>
    <style:style style:family="text" style:name="T1601">
      <style:text-properties fo:font-family="Liberation Sans" style:font-family-complex="Liberation Sans"/>
    </style:style>
    <style:style style:family="text" style:name="T1602">
      <style:text-properties fo:font-family="Liberation Sans" style:font-family-complex="Liberation Sans"/>
    </style:style>
    <style:style style:parent-style-name="1055" style:family="paragraph" style:name="P65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603">
      <style:text-properties fo:font-family="Liberation Sans" style:font-family-complex="Liberation Sans"/>
    </style:style>
    <style:style style:family="text" style:name="T1604">
      <style:text-properties fo:font-family="Liberation Sans" style:font-family-complex="Liberation Sans"/>
    </style:style>
    <style:style style:family="text" style:name="T1605">
      <style:text-properties fo:font-family="Liberation Sans" style:font-family-complex="Liberation Sans"/>
    </style:style>
    <style:style style:parent-style-name="1055" style:family="paragraph" style:name="P66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606">
      <style:text-properties fo:font-family="Liberation Sans" style:font-family-complex="Liberation Sans"/>
    </style:style>
    <style:style style:family="text" style:name="T1607">
      <style:text-properties fo:font-family="Liberation Sans" style:font-family-complex="Liberation Sans"/>
    </style:style>
    <style:style style:family="text" style:name="T1608">
      <style:text-properties fo:font-family="Liberation Sans" style:font-family-complex="Liberation Sans"/>
    </style:style>
    <style:style style:parent-style-name="1055" style:family="paragraph" style:name="P67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609">
      <style:text-properties fo:font-family="Liberation Sans" style:font-family-complex="Liberation Sans"/>
    </style:style>
    <style:style style:family="text" style:name="T1610">
      <style:text-properties fo:font-family="Liberation Sans" style:font-family-complex="Liberation Sans"/>
    </style:style>
    <style:style style:family="text" style:name="T1611">
      <style:text-properties fo:font-family="Liberation Sans" style:font-family-complex="Liberation Sans"/>
    </style:style>
    <style:style style:family="paragraph" style:name="P68">
      <style:paragraph-properties/>
      <style:text-properties/>
    </style:style>
    <style:style style:family="paragraph" style:name="P69">
      <style:paragraph-properties/>
      <style:text-properties/>
    </style:style>
    <style:style style:family="paragraph" style:name="P70">
      <style:paragraph-properties/>
      <style:text-properties/>
    </style:style>
    <style:style style:family="paragraph" style:name="P71">
      <style:paragraph-properties/>
      <style:text-properties/>
    </style:style>
    <style:style style:parent-style-name="1055" style:family="paragraph" style:name="P72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612">
      <style:text-properties fo:font-family="Liberation Sans" style:font-family-complex="Liberation Sans"/>
    </style:style>
    <style:style style:family="text" style:name="T1613">
      <style:text-properties fo:font-family="Liberation Sans" style:font-family-complex="Liberation Sans"/>
    </style:style>
    <style:style style:family="text" style:name="T1614">
      <style:text-properties fo:font-family="Liberation Sans" style:font-family-complex="Liberation Sans"/>
    </style:style>
    <style:style style:family="text" style:name="T1615">
      <style:text-properties fo:font-family="Liberation Sans" style:font-family-complex="Liberation Sans"/>
    </style:style>
    <style:style style:family="text" style:name="T1616">
      <style:text-properties fo:font-family="Liberation Sans" style:font-family-complex="Liberation Sans"/>
    </style:style>
    <style:style style:parent-style-name="1045" style:family="text" style:name="T1617">
      <style:text-properties fo:font-family="Liberation Sans" style:font-family-complex="Liberation Sans"/>
    </style:style>
    <style:style style:parent-style-name="1045" style:family="text" style:name="T1618">
      <style:text-properties fo:font-family="Liberation Sans" style:font-family-complex="Liberation Sans" fo:language="it" style:language-complex="hi" fo:country="IT" style:country-complex="IN"/>
    </style:style>
    <style:style style:parent-style-name="1045" style:family="text" style:name="T1619">
      <style:text-properties fo:font-family="Liberation Sans" style:font-family-complex="Liberation Sans" fo:language="it" style:language-complex="hi" fo:country="IT" style:country-complex="IN"/>
    </style:style>
    <style:style style:family="text" style:name="T1620">
      <style:text-properties fo:font-family="Liberation Sans" style:font-family-complex="Liberation Sans"/>
    </style:style>
    <style:style style:family="text" style:name="T1621">
      <style:text-properties fo:font-family="Liberation Sans" style:font-family-complex="Liberation Sans"/>
    </style:style>
    <style:style style:family="text" style:name="T1622">
      <style:text-properties fo:font-family="Liberation Sans" style:font-family-complex="Liberation Sans"/>
    </style:style>
    <style:style style:family="text" style:name="T1623">
      <style:text-properties fo:font-family="Liberation Sans" style:font-family-complex="Liberation Sans"/>
    </style:style>
    <style:style style:parent-style-name="1055" style:family="paragraph" style:name="P73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624">
      <style:text-properties fo:font-family="Liberation Sans" style:font-family-complex="Liberation Sans"/>
    </style:style>
    <style:style style:family="text" style:name="T1625">
      <style:text-properties fo:font-family="Liberation Sans" style:font-family-complex="Liberation Sans"/>
    </style:style>
    <style:style style:family="text" style:name="T1626">
      <style:text-properties fo:font-family="Liberation Sans" style:font-family-complex="Liberation Sans"/>
    </style:style>
    <style:style style:family="text" style:name="T1627">
      <style:text-properties fo:font-family="Liberation Sans" style:font-family-complex="Liberation Sans"/>
    </style:style>
    <style:style style:family="text" style:name="T1628">
      <style:text-properties fo:font-family="Liberation Sans" style:font-family-complex="Liberation Sans"/>
    </style:style>
    <style:style style:parent-style-name="1045" style:family="text" style:name="T1629">
      <style:text-properties fo:font-family="Liberation Sans" style:font-family-complex="Liberation Sans"/>
    </style:style>
    <style:style style:parent-style-name="1045" style:family="text" style:name="T1630">
      <style:text-properties fo:font-family="Liberation Sans" style:font-family-complex="Liberation Sans" fo:language="it" style:language-complex="hi" fo:country="IT" style:country-complex="IN"/>
    </style:style>
    <style:style style:parent-style-name="1045" style:family="text" style:name="T1631">
      <style:text-properties fo:font-family="Liberation Sans" style:font-family-complex="Liberation Sans" fo:language="it" style:language-complex="hi" fo:country="IT" style:country-complex="IN"/>
    </style:style>
    <style:style style:family="text" style:name="T1632">
      <style:text-properties fo:font-family="Liberation Sans" style:font-family-complex="Liberation Sans"/>
    </style:style>
    <style:style style:family="text" style:name="T1633">
      <style:text-properties fo:font-family="Liberation Sans" style:font-family-complex="Liberation Sans"/>
    </style:style>
    <style:style style:family="text" style:name="T1634">
      <style:text-properties fo:font-family="Liberation Sans" style:font-family-complex="Liberation Sans"/>
    </style:style>
    <style:style style:family="text" style:name="T1635">
      <style:text-properties fo:font-family="Liberation Sans" style:font-family-complex="Liberation Sans"/>
    </style:style>
    <style:style style:parent-style-name="1055" style:family="paragraph" style:name="P74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636">
      <style:text-properties fo:font-family="Liberation Sans" style:font-family-complex="Liberation Sans"/>
    </style:style>
    <style:style style:family="text" style:name="T1637">
      <style:text-properties fo:font-family="Liberation Sans" style:font-family-complex="Liberation Sans"/>
    </style:style>
    <style:style style:family="text" style:name="T1638">
      <style:text-properties fo:font-family="Liberation Sans" style:font-family-complex="Liberation Sans"/>
    </style:style>
    <style:style style:family="text" style:name="T1639">
      <style:text-properties fo:font-family="Liberation Sans" style:font-family-complex="Liberation Sans"/>
    </style:style>
    <style:style style:family="text" style:name="T1640">
      <style:text-properties fo:font-family="Liberation Sans" style:font-family-complex="Liberation Sans"/>
    </style:style>
    <style:style style:parent-style-name="1045" style:family="text" style:name="T1641">
      <style:text-properties fo:font-family="Liberation Sans" style:font-family-complex="Liberation Sans"/>
    </style:style>
    <style:style style:parent-style-name="1045" style:family="text" style:name="T1642">
      <style:text-properties fo:font-family="Liberation Sans" style:font-family-complex="Liberation Sans" fo:language="it" style:language-complex="hi" fo:country="IT" style:country-complex="IN"/>
    </style:style>
    <style:style style:parent-style-name="1045" style:family="text" style:name="T1643">
      <style:text-properties fo:font-family="Liberation Sans" style:font-family-complex="Liberation Sans" fo:language="it" style:language-complex="hi" fo:country="IT" style:country-complex="IN"/>
    </style:style>
    <style:style style:family="text" style:name="T1644">
      <style:text-properties fo:font-family="Liberation Sans" style:font-family-complex="Liberation Sans"/>
    </style:style>
    <style:style style:family="text" style:name="T1645">
      <style:text-properties fo:font-family="Liberation Sans" style:font-family-complex="Liberation Sans"/>
    </style:style>
    <style:style style:family="text" style:name="T1646">
      <style:text-properties fo:font-family="Liberation Sans" style:font-family-complex="Liberation Sans"/>
    </style:style>
    <style:style style:family="text" style:name="T1647">
      <style:text-properties fo:font-family="Liberation Sans" style:font-family-complex="Liberation Sans"/>
    </style:style>
    <style:style style:parent-style-name="1057" style:family="paragraph" style:name="P75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family="text" style:name="T1648">
      <style:text-properties fo:font-family="Arial" style:font-family-complex="Arial" fo:font-weight="bold"/>
    </style:style>
    <style:style style:family="text" style:name="T1649">
      <style:text-properties fo:font-family="Arial" style:font-family-complex="Arial" fo:font-weight="bold"/>
    </style:style>
    <style:style style:family="text" style:name="T1650">
      <style:text-properties fo:font-family="Arial" style:font-family-complex="Arial" fo:font-weight="bold"/>
    </style:style>
    <style:style style:family="text" style:name="T1651">
      <style:text-properties fo:font-family="Arial" style:font-family-complex="Arial" fo:font-weight="bold"/>
    </style:style>
    <style:style style:family="text" style:name="T1652">
      <style:text-properties fo:font-family="Arial" style:font-family-complex="Arial" fo:font-weight="bold"/>
    </style:style>
    <style:style style:parent-style-name="1045" style:family="text" style:name="T1653">
      <style:text-properties fo:font-family="Arial" style:font-family-complex="Arial" fo:font-weight="bold"/>
    </style:style>
    <style:style style:parent-style-name="1045" style:family="text" style:name="T1654">
      <style:text-properties fo:font-family="Arial" style:font-family-complex="Arial" fo:font-weight="bold"/>
    </style:style>
    <style:style style:parent-style-name="1045" style:family="text" style:name="T1655">
      <style:text-properties fo:font-family="Arial" style:font-family-complex="Arial" fo:font-weight="bold"/>
    </style:style>
    <style:style style:family="text" style:name="T1656">
      <style:text-properties fo:font-family="Arial" style:font-family-complex="Arial" fo:font-weight="bold"/>
    </style:style>
    <style:style style:family="text" style:name="T1657">
      <style:text-properties fo:font-family="Arial" style:font-family-complex="Arial" fo:font-weight="bold"/>
    </style:style>
    <style:style style:family="text" style:name="T1658">
      <style:text-properties fo:font-family="Arial" style:font-family-complex="Arial" fo:font-weight="bold"/>
    </style:style>
    <style:style style:family="text" style:name="T1659">
      <style:text-properties fo:font-family="Arial" style:font-family-complex="Arial" fo:font-weight="bold"/>
    </style:style>
    <style:style style:parent-style-name="1057" style:family="paragraph" style:name="P76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family="text" style:name="T1660">
      <style:text-properties fo:font-family="Arial" style:font-family-complex="Arial" fo:font-weight="bold"/>
    </style:style>
    <style:style style:family="text" style:name="T1661">
      <style:text-properties fo:font-family="Arial" style:font-family-complex="Arial" fo:font-weight="bold"/>
    </style:style>
    <style:style style:family="text" style:name="T1662">
      <style:text-properties fo:font-family="Arial" style:font-family-complex="Arial" fo:font-weight="bold"/>
    </style:style>
    <style:style style:family="text" style:name="T1663">
      <style:text-properties fo:font-family="Arial" style:font-family-complex="Arial" fo:font-weight="bold"/>
    </style:style>
    <style:style style:family="text" style:name="T1664">
      <style:text-properties fo:font-family="Arial" style:font-family-complex="Arial" fo:font-weight="bold"/>
    </style:style>
    <style:style style:parent-style-name="1045" style:family="text" style:name="T1665">
      <style:text-properties fo:font-family="Arial" style:font-family-complex="Arial" fo:font-weight="bold"/>
    </style:style>
    <style:style style:parent-style-name="1045" style:family="text" style:name="T1666">
      <style:text-properties fo:font-family="Arial" style:font-family-complex="Arial" fo:font-weight="bold"/>
    </style:style>
    <style:style style:parent-style-name="1045" style:family="text" style:name="T1667">
      <style:text-properties fo:font-family="Arial" style:font-family-complex="Arial" fo:font-weight="bold"/>
    </style:style>
    <style:style style:family="text" style:name="T1668">
      <style:text-properties fo:font-family="Arial" style:font-family-complex="Arial" fo:font-weight="bold"/>
    </style:style>
    <style:style style:family="text" style:name="T1669">
      <style:text-properties fo:font-family="Arial" style:font-family-complex="Arial" fo:font-weight="bold"/>
    </style:style>
    <style:style style:family="text" style:name="T1670">
      <style:text-properties fo:font-family="Arial" style:font-family-complex="Arial" fo:font-weight="bold"/>
    </style:style>
    <style:style style:family="text" style:name="T1671">
      <style:text-properties fo:font-family="Arial" style:font-family-complex="Arial" fo:font-weight="bold"/>
    </style:style>
    <style:style style:parent-style-name="1055" style:family="paragraph" style:name="P77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672">
      <style:text-properties fo:font-family="Liberation Sans" style:font-family-complex="Liberation Sans"/>
    </style:style>
    <style:style style:family="text" style:name="T1673">
      <style:text-properties fo:font-family="Liberation Sans" style:font-family-complex="Liberation Sans"/>
    </style:style>
    <style:style style:family="text" style:name="T1674">
      <style:text-properties fo:font-family="Liberation Sans" style:font-family-complex="Liberation Sans"/>
    </style:style>
    <style:style style:family="text" style:name="T1675">
      <style:text-properties fo:font-family="Liberation Sans" style:font-family-complex="Liberation Sans"/>
    </style:style>
    <style:style style:family="text" style:name="T1676">
      <style:text-properties fo:font-family="Liberation Sans" style:font-family-complex="Liberation Sans"/>
    </style:style>
    <style:style style:parent-style-name="1045" style:family="text" style:name="T1677">
      <style:text-properties fo:font-family="Liberation Sans" style:font-family-complex="Liberation Sans"/>
    </style:style>
    <style:style style:parent-style-name="1045" style:family="text" style:name="T1678">
      <style:text-properties fo:font-family="Liberation Sans" style:font-family-complex="Liberation Sans" fo:language="it" style:language-complex="hi" fo:country="IT" style:country-complex="IN"/>
    </style:style>
    <style:style style:parent-style-name="1045" style:family="text" style:name="T1679">
      <style:text-properties fo:font-family="Liberation Sans" style:font-family-complex="Liberation Sans" fo:language="it" style:language-complex="hi" fo:country="IT" style:country-complex="IN"/>
    </style:style>
    <style:style style:family="text" style:name="T1680">
      <style:text-properties fo:font-family="Liberation Sans" style:font-family-complex="Liberation Sans"/>
    </style:style>
    <style:style style:family="text" style:name="T1681">
      <style:text-properties fo:font-family="Liberation Sans" style:font-family-complex="Liberation Sans"/>
    </style:style>
    <style:style style:family="text" style:name="T1682">
      <style:text-properties fo:font-family="Liberation Sans" style:font-family-complex="Liberation Sans"/>
    </style:style>
    <style:style style:family="text" style:name="T1683">
      <style:text-properties fo:font-family="Liberation Sans" style:font-family-complex="Liberation Sans"/>
    </style:style>
    <style:style style:parent-style-name="1057" style:family="paragraph" style:name="P78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family="text" style:name="T1684">
      <style:text-properties fo:font-family="Arial" style:font-family-complex="Arial" fo:font-weight="bold"/>
    </style:style>
    <style:style style:family="text" style:name="T1685">
      <style:text-properties fo:font-family="Arial" style:font-family-complex="Arial" fo:font-weight="bold"/>
    </style:style>
    <style:style style:family="text" style:name="T1686">
      <style:text-properties fo:font-family="Arial" style:font-family-complex="Arial" fo:font-weight="bold"/>
    </style:style>
    <style:style style:family="text" style:name="T1687">
      <style:text-properties fo:font-family="Arial" style:font-family-complex="Arial" fo:font-weight="bold"/>
    </style:style>
    <style:style style:family="text" style:name="T1688">
      <style:text-properties fo:font-family="Arial" style:font-family-complex="Arial" fo:font-weight="bold"/>
    </style:style>
    <style:style style:parent-style-name="1045" style:family="text" style:name="T1689">
      <style:text-properties fo:font-family="Arial" style:font-family-complex="Arial" fo:font-weight="bold"/>
    </style:style>
    <style:style style:parent-style-name="1045" style:family="text" style:name="T1690">
      <style:text-properties fo:font-family="Arial" style:font-family-complex="Arial" fo:font-weight="bold"/>
    </style:style>
    <style:style style:parent-style-name="1045" style:family="text" style:name="T1691">
      <style:text-properties fo:font-family="Arial" style:font-family-complex="Arial" fo:font-weight="bold"/>
    </style:style>
    <style:style style:family="text" style:name="T1692">
      <style:text-properties fo:font-family="Arial" style:font-family-complex="Arial" fo:font-weight="bold"/>
    </style:style>
    <style:style style:family="text" style:name="T1693">
      <style:text-properties fo:font-family="Arial" style:font-family-complex="Arial" fo:font-weight="bold"/>
    </style:style>
    <style:style style:family="text" style:name="T1694">
      <style:text-properties fo:font-family="Arial" style:font-family-complex="Arial" fo:font-weight="bold"/>
    </style:style>
    <style:style style:family="text" style:name="T1695">
      <style:text-properties fo:font-family="Arial" style:font-family-complex="Arial" fo:font-weight="bold"/>
    </style:style>
    <style:style style:parent-style-name="1057" style:family="paragraph" style:name="P79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family="text" style:name="T1696">
      <style:text-properties fo:font-family="Arial" style:font-family-complex="Arial" fo:font-weight="bold"/>
    </style:style>
    <style:style style:family="text" style:name="T1697">
      <style:text-properties fo:font-family="Arial" style:font-family-complex="Arial" fo:font-weight="bold"/>
    </style:style>
    <style:style style:family="text" style:name="T1698">
      <style:text-properties fo:font-family="Arial" style:font-family-complex="Arial" fo:font-weight="bold"/>
    </style:style>
    <style:style style:family="text" style:name="T1699">
      <style:text-properties fo:font-family="Arial" style:font-family-complex="Arial" fo:font-weight="bold"/>
    </style:style>
    <style:style style:family="text" style:name="T1700">
      <style:text-properties fo:font-family="Arial" style:font-family-complex="Arial" fo:font-weight="bold"/>
    </style:style>
    <style:style style:parent-style-name="1045" style:family="text" style:name="T1701">
      <style:text-properties fo:font-family="Arial" style:font-family-complex="Arial" fo:font-weight="bold"/>
    </style:style>
    <style:style style:parent-style-name="1045" style:family="text" style:name="T1702">
      <style:text-properties fo:font-family="Arial" style:font-family-complex="Arial" fo:font-weight="bold"/>
    </style:style>
    <style:style style:parent-style-name="1045" style:family="text" style:name="T1703">
      <style:text-properties fo:font-family="Arial" style:font-family-complex="Arial" fo:font-weight="bold"/>
    </style:style>
    <style:style style:family="text" style:name="T1704">
      <style:text-properties fo:font-family="Arial" style:font-family-complex="Arial" fo:font-weight="bold"/>
    </style:style>
    <style:style style:family="text" style:name="T1705">
      <style:text-properties fo:font-family="Arial" style:font-family-complex="Arial" fo:font-weight="bold"/>
    </style:style>
    <style:style style:family="text" style:name="T1706">
      <style:text-properties fo:font-family="Arial" style:font-family-complex="Arial" fo:font-weight="bold"/>
    </style:style>
    <style:style style:family="text" style:name="T1707">
      <style:text-properties fo:font-family="Arial" style:font-family-complex="Arial" fo:font-weight="bold"/>
    </style:style>
    <style:style style:parent-style-name="1055" style:family="paragraph" style:name="P80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708">
      <style:text-properties fo:font-family="Liberation Sans" style:font-family-complex="Liberation Sans"/>
    </style:style>
    <style:style style:family="text" style:name="T1709">
      <style:text-properties fo:font-family="Liberation Sans" style:font-family-complex="Liberation Sans"/>
    </style:style>
    <style:style style:family="text" style:name="T1710">
      <style:text-properties fo:font-family="Liberation Sans" style:font-family-complex="Liberation Sans"/>
    </style:style>
    <style:style style:family="text" style:name="T1711">
      <style:text-properties fo:font-family="Liberation Sans" style:font-family-complex="Liberation Sans"/>
    </style:style>
    <style:style style:family="text" style:name="T1712">
      <style:text-properties fo:font-family="Liberation Sans" style:font-family-complex="Liberation Sans"/>
    </style:style>
    <style:style style:parent-style-name="1045" style:family="text" style:name="T1713">
      <style:text-properties fo:font-family="Liberation Sans" style:font-family-complex="Liberation Sans"/>
    </style:style>
    <style:style style:parent-style-name="1045" style:family="text" style:name="T1714">
      <style:text-properties fo:font-family="Liberation Sans" style:font-family-complex="Liberation Sans" fo:language="it" style:language-complex="hi" fo:country="IT" style:country-complex="IN"/>
    </style:style>
    <style:style style:parent-style-name="1045" style:family="text" style:name="T1715">
      <style:text-properties fo:font-family="Liberation Sans" style:font-family-complex="Liberation Sans" fo:language="it" style:language-complex="hi" fo:country="IT" style:country-complex="IN"/>
    </style:style>
    <style:style style:family="text" style:name="T1716">
      <style:text-properties fo:font-family="Liberation Sans" style:font-family-complex="Liberation Sans"/>
    </style:style>
    <style:style style:family="text" style:name="T1717">
      <style:text-properties fo:font-family="Liberation Sans" style:font-family-complex="Liberation Sans"/>
    </style:style>
    <style:style style:family="text" style:name="T1718">
      <style:text-properties fo:font-family="Liberation Sans" style:font-family-complex="Liberation Sans"/>
    </style:style>
    <style:style style:family="text" style:name="T1719">
      <style:text-properties fo:font-family="Liberation Sans" style:font-family-complex="Liberation Sans"/>
    </style:style>
    <style:style style:parent-style-name="1055" style:family="paragraph" style:name="P81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1720">
      <style:text-properties fo:font-family="Liberation Sans" style:font-family-complex="Liberation Sans"/>
    </style:style>
    <style:style style:family="text" style:name="T1721">
      <style:text-properties fo:font-family="Liberation Sans" style:font-family-complex="Liberation Sans"/>
    </style:style>
    <style:style style:family="text" style:name="T1722">
      <style:text-properties fo:font-family="Liberation Sans" style:font-family-complex="Liberation Sans"/>
    </style:style>
    <style:style style:family="text" style:name="T1723">
      <style:text-properties fo:font-family="Liberation Sans" style:font-family-complex="Liberation Sans"/>
    </style:style>
    <style:style style:family="text" style:name="T1724">
      <style:text-properties fo:font-family="Liberation Sans" style:font-family-complex="Liberation Sans"/>
    </style:style>
    <style:style style:parent-style-name="1045" style:family="text" style:name="T1725">
      <style:text-properties fo:font-family="Liberation Sans" style:font-family-complex="Liberation Sans"/>
    </style:style>
    <style:style style:parent-style-name="1045" style:family="text" style:name="T1726">
      <style:text-properties fo:font-family="Liberation Serif" style:font-family-complex="Liberation Serif" fo:language="it" style:language-complex="it" fo:country="IT" style:country-complex="IT"/>
    </style:style>
    <style:style style:parent-style-name="1045" style:family="text" style:name="T1727">
      <style:text-properties fo:font-family="Liberation Sans" style:font-family-complex="Liberation Sans" fo:language="it" style:language-complex="hi" fo:country="IT" style:country-complex="IN"/>
    </style:style>
    <style:style style:family="text" style:name="T1728">
      <style:text-properties fo:font-family="Liberation Sans" style:font-family-complex="Liberation Sans"/>
    </style:style>
    <style:style style:family="text" style:name="T1729">
      <style:text-properties fo:font-family="Liberation Sans" style:font-family-complex="Liberation Sans"/>
    </style:style>
    <style:style style:family="text" style:name="T1730">
      <style:text-properties fo:font-family="Liberation Sans" style:font-family-complex="Liberation Sans"/>
    </style:style>
    <style:style style:family="text" style:name="T1731">
      <style:text-properties fo:font-family="Liberation Sans" style:font-family-complex="Liberation Sans"/>
    </style:style>
    <style:style style:family="paragraph" style:name="P82">
      <style:paragraph-properties/>
      <style:text-properties/>
    </style:style>
    <style:style style:family="paragraph" style:name="P83">
      <style:paragraph-properties/>
      <style:text-properties/>
    </style:style>
    <style:style style:family="paragraph" style:name="P84">
      <style:paragraph-properties/>
      <style:text-properties/>
    </style:style>
    <style:style style:family="paragraph" style:name="P85">
      <style:paragraph-properties/>
      <style:text-properties/>
    </style:style>
    <style:style style:family="paragraph" style:name="P86">
      <style:paragraph-properties/>
      <style:text-properties/>
    </style:style>
    <style:style style:parent-style-name="1068" style:family="paragraph" style:name="P8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2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17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8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5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17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8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38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17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7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9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4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4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4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9" style:master-page-name="MasterPage3" style:family="paragraph" style:name="P91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751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752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753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754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755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70" style:family="paragraph" style:name="P9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5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5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family="paragraph" style:name="P9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5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6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9" style:master-page-name="MasterPage4" style:family="paragraph" style:name="P95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769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770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771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772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773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774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775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68" style:family="paragraph" style:name="P9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7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7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7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9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7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8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8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9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8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8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8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0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8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7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78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8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0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8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8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0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0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0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79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0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0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0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list-style-name="WWNum7" style:family="paragraph" style:name="P10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09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181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811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1812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parent-style-name="1068" style:family="paragraph" style:name="P10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1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1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1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1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1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1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1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1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1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1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1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1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2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3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1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3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3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3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1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3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3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3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1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3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3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1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1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2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12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49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185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85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list-style-name="WWNum7" style:family="paragraph" style:name="P12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5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85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85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85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parent-style-name="1068" style:family="paragraph" style:name="P12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2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2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2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2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2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2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3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3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3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3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3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3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3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3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8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3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3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4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4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8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9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4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4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4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4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4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4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4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4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5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9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list-style-name="WWNum7" style:family="paragraph" style:name="P15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94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94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94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94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94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8" style:family="paragraph" style:name="P15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5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5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5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5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5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5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5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6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6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6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6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6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6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9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9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6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6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6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6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7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99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0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list-style-name="WWNum7" style:family="paragraph" style:name="P17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0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00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00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00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00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8" style:family="paragraph" style:name="P17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7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7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7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7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7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7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7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0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0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8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8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8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8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8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8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8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8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list-style-name="WWNum7" style:family="paragraph" style:name="P18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05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05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05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05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05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06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06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06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06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06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06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8" style:family="paragraph" style:name="P18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9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9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9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9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9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9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9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9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9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19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20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0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20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20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20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20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20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1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1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20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20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family="paragraph" style:name="P20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2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1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68" style:list-style-name="WWNum7" style:family="paragraph" style:name="P20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2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12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12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12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13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8" style:family="paragraph" style:name="P21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3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3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3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21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3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3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3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21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37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21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3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21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family="text" style:name="T2140">
      <style:text-properties fo:color="#000000" fo:font-family="Liberation Serif" style:font-family-complex="Liberation Serif" fo:font-size="10pt" style:font-size-complex="10pt" fo:language="it" style:language-complex="hi" fo:country="IT" style:country-complex="IN" fo:font-style="italic"/>
    </style:style>
    <style:style style:family="text" style:name="T2141"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family="text" style:name="T2142"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parent-style-name="1079" style:master-page-name="MasterPage5" style:family="paragraph" style:name="P214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150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151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2152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153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154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70" style:family="paragraph" style:name="P21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5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5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5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family="paragraph" style:name="P21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6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6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6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family="paragraph" style:name="P21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1070" style:family="paragraph" style:name="P21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6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7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7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04" style:family="paragraph" style:name="P220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2172">
      <style:text-properties fo:color="#0f4761" fo:font-family="Arial" style:font-family-complex="Arial" fo:font-size="14pt" style:font-size-complex="14pt" fo:font-weight="bold"/>
    </style:style>
    <style:style style:family="text" style:name="T2173">
      <style:text-properties fo:color="#0f4761" fo:font-family="Arial" style:font-family-complex="Arial" fo:font-size="14pt" style:font-size-complex="14pt" fo:font-weight="bold"/>
    </style:style>
    <style:style style:family="text" style:name="T2174">
      <style:text-properties fo:color="#0f4761" fo:font-family="Arial" style:font-family-complex="Arial" fo:font-size="14pt" style:font-size-complex="14pt" fo:font-weight="bold"/>
    </style:style>
    <style:style style:family="text" style:name="T2175">
      <style:text-properties fo:color="#0f4761" fo:font-family="Arial" style:font-family-complex="Arial" fo:font-size="14pt" style:font-size-complex="14pt" fo:font-weight="bold"/>
    </style:style>
    <style:style style:family="text" style:name="T2176">
      <style:text-properties fo:color="#0f4761" fo:font-family="Arial" style:font-family-complex="Arial" fo:font-size="14pt" style:font-size-complex="14pt" fo:font-weight="bold"/>
    </style:style>
    <style:style style:family="paragraph" style:name="P221">
      <style:paragraph-properties/>
      <style:text-properties/>
    </style:style>
    <style:style style:parent-style-name="1070" style:list-style-name="WWNum2" style:family="paragraph" style:name="P22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7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7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8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list-style-name="WWNum2" style:family="paragraph" style:name="P22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8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1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8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8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8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list-style-name="WWNum2" style:family="paragraph" style:name="P22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8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9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9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list-style-name="WWNum2" style:family="paragraph" style:name="P22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9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19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9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family="paragraph" style:name="P22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9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1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9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9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list-style-name="WWNum2" style:family="paragraph" style:name="P22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19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0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0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0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family="paragraph" style:name="P228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0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1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0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0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list-style-name="WWNum2" style:family="paragraph" style:name="P22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0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0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1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1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family="paragraph" style:name="P230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1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1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1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1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list-style-name="WWNum2" style:family="paragraph" style:name="P23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1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1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1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1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family="paragraph" style:name="P23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2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2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2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04" style:family="paragraph" style:name="P233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2223">
      <style:text-properties fo:color="#0f4761" fo:font-family="Arial" style:font-family-complex="Arial" fo:font-size="14pt" style:font-size-complex="14pt" fo:font-weight="bold"/>
    </style:style>
    <style:style style:family="text" style:name="T2224">
      <style:text-properties fo:color="#0f4761" fo:font-family="Arial" style:font-family-complex="Arial" fo:font-size="14pt" style:font-size-complex="14pt" fo:font-weight="bold"/>
    </style:style>
    <style:style style:family="text" style:name="T2225">
      <style:text-properties fo:color="#0f4761" fo:font-family="Arial" style:font-family-complex="Arial" fo:font-size="14pt" style:font-size-complex="14pt" fo:font-weight="bold"/>
    </style:style>
    <style:style style:family="text" style:name="T2226">
      <style:text-properties fo:color="#0f4761" fo:font-family="Arial" style:font-family-complex="Arial" fo:font-size="14pt" style:font-size-complex="14pt" fo:font-weight="bold"/>
    </style:style>
    <style:style style:family="text" style:name="T2227">
      <style:text-properties fo:color="#0f4761" fo:font-family="Arial" style:font-family-complex="Arial" fo:font-size="14pt" style:font-size-complex="14pt" fo:font-weight="bold"/>
    </style:style>
    <style:style style:family="paragraph" style:name="P234">
      <style:paragraph-properties/>
      <style:text-properties/>
    </style:style>
    <style:style style:parent-style-name="1070" style:list-style-name="WWNum6" style:family="paragraph" style:name="P23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2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2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3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3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list-style-name="WWNum6" style:family="paragraph" style:name="P23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3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3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3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3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list-style-name="WWNum6" style:family="paragraph" style:name="P23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70" style:family="paragraph" style:name="P23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4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1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family="paragraph" style:name="P239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4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4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5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family="paragraph" style:name="P24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5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5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5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24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54">
      <style:text-properties fo:color="#000000" fo:font-family="Liberation Serif" style:font-family-complex="Liberation Serif" fo:font-size="10.5pt" style:font-size-complex="10.5pt" fo:language="it" style:language-complex="hi" fo:country="IT" style:country-complex="IN"/>
    </style:style>
    <style:style style:family="text" style:name="T225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5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24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57">
      <style:text-properties fo:color="#000000" fo:font-family="Liberation Serif" style:font-family-complex="Liberation Serif" fo:font-size="10.5pt" style:font-size-complex="10.5pt" fo:language="it" style:language-complex="hi" fo:country="IT" style:country-complex="IN"/>
    </style:style>
    <style:style style:family="text" style:name="T22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5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9" style:master-page-name="MasterPage6" style:family="paragraph" style:name="P243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267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268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2269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270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271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70" style:family="paragraph" style:name="P24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7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7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7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0" style:family="paragraph" style:name="P24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7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7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7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8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28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247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48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8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49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8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2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2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50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2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04" style:family="paragraph" style:name="P251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2297">
      <style:text-properties fo:color="#0f4761" fo:font-family="Arial" style:font-family-complex="Arial" fo:font-size="14pt" style:font-size-complex="14pt" fo:font-weight="bold"/>
    </style:style>
    <style:style style:family="text" style:name="T2298">
      <style:text-properties fo:color="#0f4761" fo:font-family="Arial" style:font-family-complex="Arial" fo:font-size="14pt" style:font-size-complex="14pt" fo:font-weight="bold"/>
    </style:style>
    <style:style style:family="text" style:name="T2299">
      <style:text-properties fo:color="#0f4761" fo:font-family="Arial" style:font-family-complex="Arial" fo:font-size="14pt" style:font-size-complex="14pt" fo:font-weight="bold"/>
    </style:style>
    <style:style style:family="text" style:name="T2300">
      <style:text-properties fo:color="#0f4761" fo:font-family="Arial" style:font-family-complex="Arial" fo:font-size="14pt" style:font-size-complex="14pt" fo:font-weight="bold"/>
    </style:style>
    <style:style style:family="text" style:name="T2301">
      <style:text-properties fo:color="#0f4761" fo:font-family="Arial" style:font-family-complex="Arial" fo:font-size="14pt" style:font-size-complex="14pt" fo:font-weight="bold"/>
    </style:style>
    <style:style style:parent-style-name="1068" style:family="paragraph" style:name="P252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list-style-name="WWNum10" style:family="paragraph" style:name="P253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18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3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list-style-name="WWNum10" style:family="paragraph" style:name="P254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3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55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list-style-name="WWNum10" style:family="paragraph" style:name="P256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3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3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3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list-style-name="WWNum10" style:family="paragraph" style:name="P257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3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58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19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3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59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60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61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62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63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64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65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66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67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68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69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70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71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72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73">
      <style:paragraph-properties fo:line-height="115%" fo:text-align="left" fo:margin-left="1.27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3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list-style-name="WWNum10" style:family="paragraph" style:name="P274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3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3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3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3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paragraph" style:name="P275">
      <style:paragraph-properties/>
      <style:text-properties/>
    </style:style>
    <style:style style:family="text" style:name="T239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2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391">
      <style:text-properties fo:language="it" style:language-complex="hi" fo:country="IT" style:country-complex="IN"/>
    </style:style>
    <style:style style:family="paragraph" style:name="P276">
      <style:paragraph-properties/>
      <style:text-properties/>
    </style:style>
    <style:style style:parent-style-name="1068" style:list-style-name="WWNum10" style:family="paragraph" style:name="P277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3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78">
      <style:paragraph-properties fo:line-height="115%" fo:text-align="left" fo:margin-left="1.27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4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79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2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4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paragraph" style:name="P280">
      <style:paragraph-properties/>
      <style:text-properties/>
    </style:style>
    <style:style style:family="text" style:name="T240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07">
      <style:text-properties fo:language="it" style:language-complex="hi" fo:country="IT" style:country-complex="IN"/>
    </style:style>
    <style:style style:family="paragraph" style:name="P281">
      <style:paragraph-properties/>
      <style:text-properties/>
    </style:style>
    <style:style style:family="text" style:name="T2408">
      <style:text-properties fo:color="#000000" fo:font-family="Liberation Serif" style:font-family-complex="Liberation Serif" fo:font-size="12pt" style:font-size-complex="12pt" fo:language="it" style:language-complex="it" fo:country="IT" style:country-complex="IT" style:text-underline-type="single" style:text-underline-style="solid" style:text-underline-width="auto" style:text-underline-color="font-color" fo:font-weight="bold"/>
    </style:style>
    <style:style style:family="text" style:name="T2409">
      <style:text-properties fo:color="#000000" style:text-underline-type="single" style:text-underline-style="solid" style:text-underline-width="auto" style:text-underline-color="font-color" fo:font-weight="bold"/>
    </style:style>
    <style:style style:parent-style-name="1004" style:family="paragraph" style:name="P282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2410">
      <style:text-properties fo:color="#0f4761" fo:font-family="Arial" style:font-family-complex="Arial" fo:font-size="14pt" style:font-size-complex="14pt" fo:font-weight="bold"/>
    </style:style>
    <style:style style:family="text" style:name="T2411">
      <style:text-properties fo:color="#0f4761" fo:font-family="Arial" style:font-family-complex="Arial" fo:font-size="14pt" style:font-size-complex="14pt" fo:font-weight="bold"/>
    </style:style>
    <style:style style:family="text" style:name="T2412">
      <style:text-properties fo:color="#0f4761" fo:font-family="Arial" style:font-family-complex="Arial" fo:font-size="14pt" style:font-size-complex="14pt" fo:font-weight="bold"/>
    </style:style>
    <style:style style:family="text" style:name="T2413">
      <style:text-properties fo:color="#0f4761" fo:font-family="Arial" style:font-family-complex="Arial" fo:font-size="14pt" style:font-size-complex="14pt" fo:font-weight="bold"/>
    </style:style>
    <style:style style:family="text" style:name="T2414">
      <style:text-properties fo:color="#0f4761" fo:font-family="Arial" style:font-family-complex="Arial" fo:font-size="14pt" style:font-size-complex="14pt" fo:font-weight="bold"/>
    </style:style>
    <style:style style:parent-style-name="1068" style:family="paragraph" style:name="P283">
      <style:paragraph-properties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list-style-name="WWNum13" style:family="paragraph" style:name="P284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4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85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list-style-name="WWNum13" style:family="paragraph" style:name="P286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4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87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list-style-name="WWNum13" style:family="paragraph" style:name="P288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4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89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90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91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92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2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4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93">
      <style:paragraph-properties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paragraph" style:name="P294">
      <style:paragraph-properties/>
      <style:text-properties/>
    </style:style>
    <style:style style:family="text" style:name="T24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79" style:master-page-name="MasterPage7" style:family="paragraph" style:name="P295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464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465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2466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467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468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68" style:family="paragraph" style:name="P29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6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9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7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29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7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30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7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301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8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8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48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8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30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8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46" style:family="text" style:name="T24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47" style:family="text" style:name="T24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48" style:family="text" style:name="T24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49" style:family="text" style:name="T24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50" style:family="text" style:name="T24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51" style:family="text" style:name="T24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45" style:family="text" style:name="T249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45" style:family="text" style:name="T249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45" style:family="text" style:name="T249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45" style:family="text" style:name="T249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4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30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30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0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list-style-name="WWNum14" style:family="paragraph" style:name="P30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0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0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0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8" style:family="paragraph" style:name="P30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2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5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30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list-style-name="WWNum14" style:family="paragraph" style:name="P30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5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list-style-name="WWNum14" style:family="paragraph" style:name="P30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2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2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2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52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2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2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8" style:list-style-name="WWNum14" style:family="paragraph" style:name="P31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2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25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52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3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53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3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3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8" style:list-style-name="WWNum14" style:family="paragraph" style:name="P311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3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3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3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53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3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3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4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8" style:family="paragraph" style:name="P312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313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2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5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31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4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list-style-name="WWNum14" style:family="paragraph" style:name="P31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5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5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55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5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55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5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5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8" style:family="paragraph" style:name="P316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5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317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2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5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318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319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6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6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6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32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6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7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paragraph" style:name="P321">
      <style:paragraph-properties/>
      <style:text-properties/>
    </style:style>
    <style:style style:family="text" style:name="T257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7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79" style:master-page-name="MasterPage8" style:family="paragraph" style:name="P322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582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583">
      <style:text-properties fo:color="#1f497d" fo:font-family="Liberation Serif" style:font-family-complex="Liberation Serif" fo:font-size="20pt" style:font-size-complex="20pt" fo:language="it" style:language-complex="it" fo:country="IT" style:country-complex="IT" fo:font-weight="bold"/>
    </style:style>
    <style:style style:family="text" style:name="T2584">
      <style:text-properties fo:color="#1f497d" fo:font-family="Liberation Serif" style:font-family-complex="Liberation Serif" fo:font-size="20pt" style:font-size-complex="20pt" fo:language="it" style:language-complex="hi" fo:country="IT" style:country-complex="IN" fo:font-weight="bold"/>
    </style:style>
    <style:style style:family="text" style:name="T2585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2586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1068" style:family="paragraph" style:name="P32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8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8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8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32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9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32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9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29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5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family="paragraph" style:name="P32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9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5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list-style-name="WWNum19" style:family="paragraph" style:name="P32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9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0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60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0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60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0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0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8" style:family="paragraph" style:name="P32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0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0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0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33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0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1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1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331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1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1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1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33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1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1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1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33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1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1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2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33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2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2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2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family="paragraph" style:name="P33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2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30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62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62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8" style:list-style-name="WWNum19" style:family="paragraph" style:name="P33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62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2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2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3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8" style:list-style-name="WWNum19" style:family="paragraph" style:name="P33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63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3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3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3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8" style:list-style-name="WWNum19" style:family="paragraph" style:name="P33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63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3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3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63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3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4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4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4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8" style:family="paragraph" style:name="P33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64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6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list-style-name="WWNum19" style:family="paragraph" style:name="P34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64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4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4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4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31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65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5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5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1068" style:list-style-name="WWNum19" style:family="paragraph" style:name="P341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65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65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5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65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5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5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265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parent-style-name="1068" style:family="paragraph" style:name="P34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66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6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6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6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1068" style:list-style-name="WWNum18" style:family="paragraph" style:name="P34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66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32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66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6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266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</office:automatic-styles>
  <office:body>
    <office:text text:use-soft-page-breaks="true">
      <text:p text:style-name="P54"><text:span text:style-name="T1572"/><text:span/><draw:frame draw:name="Image9" draw:style-name="gr4" draw:z-index="3097" text:anchor-type="paragraph" svg:width="3.45cm" svg:height="3.45cm" svg:x="1.267cm" svg:y="0cm"><draw:image xlink:href="Pictures/image2.png" xlink:type="simple" xlink:show="embed" xlink:actuate="onLoad"/></draw:frame><text:span text:style-name="T1573"><text:tab/></text:span><text:span text:style-name="T1574"/><text:span text:style-name="T1575"/></text:p>
      <text:p text:style-name="P56"><text:span text:style-name="T1576"/><text:span text:style-name="T1577"/><text:span text:style-name="T1578"/></text:p>
      <text:p text:style-name="P57"><text:span text:style-name="T1579"/><text:span text:style-name="T1580">Esportazione files CSV</text:span><text:span text:style-name="T1581"><text:s/></text:span><text:span text:style-name="T1582"> dalle varie piattaforme<text:s text:c="2"/></text:span><text:span text:style-name="T1583"/><text:span text:style-name="T1584"/></text:p>
      <text:p text:style-name="P58"><text:span text:style-name="T1585"><text:s text:c="10"/></text:span><text:span text:style-name="T1586"/><text:span text:style-name="T1587"/></text:p>
      <text:p text:style-name="P59"><text:span text:style-name="T1588"/><text:span text:style-name="T1589"/><text:span text:style-name="T1590"/></text:p>
      <text:p text:style-name="P60"><text:span text:style-name="T1591">GIACENZE CRYPTO</text:span><text:span text:style-name="T1592"/><text:span text:style-name="T1593"/></text:p>
      <text:p text:style-name="P61"><text:span text:style-name="T1594"/><text:span text:style-name="T1595"/><text:span text:style-name="T1596"/></text:p>
      <text:p text:style-name="P62"><text:span text:style-name="T1597">Indice</text:span><text:span text:style-name="T1598"/><text:span text:style-name="T1599"/></text:p>
      <text:p text:style-name="P63"><text:span/><text:span/></text:p>
      <text:p text:style-name="P64"><text:span text:style-name="T1600"/><text:span text:style-name="T1601"/><text:span text:style-name="T1602"/></text:p>
      <text:p text:style-name="P65"><text:span text:style-name="T1603"/><text:span text:style-name="T1604"/><text:span text:style-name="T1605"/></text:p>
      <text:p text:style-name="P66"><text:span text:style-name="T1606"/><text:span text:style-name="T1607"/><text:span text:style-name="T1608"/></text:p>
      <text:p text:style-name="P67"><text:span text:style-name="T1609"/><text:span text:style-name="T1610"/><text:span text:style-name="T1611"/></text:p>
      <text:p text:style-name="P68"><text:span/><text:span/></text:p>
      <text:p text:style-name="P69"><text:span/><text:span/></text:p>
      <text:p text:style-name="P70"><text:span/><text:span/></text:p>
      <text:p text:style-name="P71"><text:span/><text:span/><text:span/><text:span/></text:p>
      <text:table-of-content text:name="">
        <text:table-of-content-source/>
        <text:index-body>
          <text:p text:style-name="P72"><text:span text:style-name="T1612"/><text:a xlink:href="#_Toc1" xlink:type="simple"><text:span text:style-name="T1613"/><text:span text:style-name="T1614"/><text:span text:style-name="T1615"/><text:span text:style-name="T1616"/><text:span text:style-name="T1617"/><text:span text:style-name="T1618">Introduzione</text:span><text:span text:style-name="T1619"/><text:span text:style-name="T1620"><text:tab/></text:span><text:span text:style-name="T1621">2</text:span></text:a><text:span text:style-name="T1622"/><text:span text:style-name="T1623"/></text:p>
          <text:p text:style-name="P73"><text:span text:style-name="T1624"/><text:a xlink:href="#_Toc2" xlink:type="simple"><text:span text:style-name="T1625"/><text:span text:style-name="T1626"/><text:span text:style-name="T1627"/><text:span text:style-name="T1628"/><text:span text:style-name="T1629"/><text:span text:style-name="T1630">Crypto.com App</text:span><text:span text:style-name="T1631"/><text:span text:style-name="T1632"><text:tab/></text:span><text:span text:style-name="T1633">3</text:span></text:a><text:span text:style-name="T1634"/><text:span text:style-name="T1635"/></text:p>
          <text:p text:style-name="P74"><text:span text:style-name="T1636"/><text:a xlink:href="#_Toc3" xlink:type="simple"><text:span text:style-name="T1637"/><text:span text:style-name="T1638"/><text:span text:style-name="T1639"/><text:span text:style-name="T1640"/><text:span text:style-name="T1641"/><text:span text:style-name="T1642">Crypto.com Exchange</text:span><text:span text:style-name="T1643"/><text:span text:style-name="T1644"><text:tab/></text:span><text:span text:style-name="T1645">6</text:span></text:a><text:span text:style-name="T1646"/><text:span text:style-name="T1647"/></text:p>
          <text:p text:style-name="P75"><text:span text:style-name="T1648"/><text:a xlink:href="#_Toc4" xlink:type="simple"><text:span text:style-name="T1649"/><text:span text:style-name="T1650"/><text:span text:style-name="T1651"/><text:span text:style-name="T1652"/><text:span text:style-name="T1653"/><text:span text:style-name="T1654">1 - Come esportare il file delle Transazioni:</text:span><text:span text:style-name="T1655"/><text:span text:style-name="T1656"><text:tab/></text:span><text:span text:style-name="T1657">6</text:span></text:a><text:span text:style-name="T1658"/><text:span text:style-name="T1659"/></text:p>
          <text:p text:style-name="P76"><text:span text:style-name="T1660"/><text:a xlink:href="#_Toc5" xlink:type="simple"><text:span text:style-name="T1661"/><text:span text:style-name="T1662"/><text:span text:style-name="T1663"/><text:span text:style-name="T1664"/><text:span text:style-name="T1665"/><text:span text:style-name="T1666">2 - Come esportare i file dei movimenti mensili:</text:span><text:span text:style-name="T1667"/><text:span text:style-name="T1668"><text:tab/></text:span><text:span text:style-name="T1669">7</text:span></text:a><text:span text:style-name="T1670"/><text:span text:style-name="T1671"/></text:p>
          <text:p text:style-name="P77"><text:span text:style-name="T1672"/><text:a xlink:href="#_Toc6" xlink:type="simple"><text:span text:style-name="T1673"/><text:span text:style-name="T1674"/><text:span text:style-name="T1675"/><text:span text:style-name="T1676"/><text:span text:style-name="T1677"/><text:span text:style-name="T1678">Binance</text:span><text:span text:style-name="T1679"/><text:span text:style-name="T1680"><text:tab/></text:span><text:span text:style-name="T1681">9</text:span></text:a><text:span text:style-name="T1682"/><text:span text:style-name="T1683"/></text:p>
          <text:p text:style-name="P78"><text:span text:style-name="T1684"/><text:a xlink:href="#_Toc7" xlink:type="simple"><text:span text:style-name="T1685"/><text:span text:style-name="T1686"/><text:span text:style-name="T1687"/><text:span text:style-name="T1688"/><text:span text:style-name="T1689"/><text:span text:style-name="T1690">1 - Come esportare il file delle Transazioni:</text:span><text:span text:style-name="T1691"/><text:span text:style-name="T1692"><text:tab/></text:span><text:span text:style-name="T1693">9</text:span></text:a><text:span text:style-name="T1694"/><text:span text:style-name="T1695"/></text:p>
          <text:p text:style-name="P79"><text:span text:style-name="T1696"/><text:a xlink:href="#_Toc8" xlink:type="simple"><text:span text:style-name="T1697"/><text:span text:style-name="T1698"/><text:span text:style-name="T1699"/><text:span text:style-name="T1700"/><text:span text:style-name="T1701"/><text:span text:style-name="T1702">2 - Come esportare il Report Finanziario:</text:span><text:span text:style-name="T1703"/><text:span text:style-name="T1704"><text:tab/></text:span><text:span text:style-name="T1705">11</text:span></text:a><text:span text:style-name="T1706"/><text:span text:style-name="T1707"/></text:p>
          <text:p text:style-name="P80"><text:span text:style-name="T1708"/><text:a xlink:href="#_Toc9" xlink:type="simple"><text:span text:style-name="T1709"/><text:span text:style-name="T1710"/><text:span text:style-name="T1711"/><text:span text:style-name="T1712"/><text:span text:style-name="T1713"/><text:span text:style-name="T1714">Cointraking.info</text:span><text:span text:style-name="T1715"/><text:span text:style-name="T1716"><text:tab/></text:span><text:span text:style-name="T1717">12</text:span></text:a><text:span text:style-name="T1718"/><text:span text:style-name="T1719"/></text:p>
          <text:p text:style-name="P81"><text:span text:style-name="T1720"/><text:a xlink:href="#_Toc10" xlink:type="simple"><text:span text:style-name="T1721"/><text:span text:style-name="T1722"/><text:span text:style-name="T1723"/><text:span text:style-name="T1724"/><text:span text:style-name="T1725"/><text:span text:style-name="T1726">Import CSV sul software Giacenze Crypto</text:span><text:span text:style-name="T1727"/><text:span text:style-name="T1728"><text:tab/></text:span><text:span text:style-name="T1729">14</text:span></text:a><text:span text:style-name="T1730"/><text:span text:style-name="T1731"/></text:p>
          <text:p text:style-name="P82"><text:span/><text:span/></text:p>
          <text:p text:style-name="P83"><text:span/><text:span/></text:p>
          <text:p text:style-name="P84"><text:span/><text:span/></text:p>
          <text:p text:style-name="P85"><text:span/><text:span/></text:p>
          <text:p text:style-name="P86"><text:span/><text:span/></text:p>
        </text:index-body>
      </text:table-of-content>
      <text:p text:style-name="P87"><text:span text:style-name="T1732"/><text:span text:style-name="T1733"/><text:span text:style-name="T1734"/></text:p>
      <text:p text:style-name="P88"><text:span text:style-name="T1735"/><text:span text:style-name="T1736"/><text:span text:style-name="T1737"/></text:p>
      <text:p text:style-name="P89"><text:span text:style-name="T1738"/><text:span text:style-name="T1739"/><text:span text:style-name="T1740"/></text:p>
      <text:p text:style-name="P90"><text:span text:style-name="T1741"/><text:span text:style-name="T1742"/><text:span text:style-name="T1743"/></text:p>
      <text:list>
        <text:list-item>
          <text:p text:style-name="P91"><text:span text:style-name="T1751"/><text:bookmark-start text:name="_Toc1"/><text:span text:style-name="T1752">Introduzione</text:span><text:span text:style-name="T1753"/><text:bookmark-end text:name="_Toc1"/><text:span text:style-name="T1754"/><text:span text:style-name="T1755"/></text:p>
        </text:list-item>
      </text:list>
      <text:p text:style-name="P93"><text:span text:style-name="T1756"/><text:span text:style-name="T1757"/><text:span text:style-name="T1758"/></text:p>
      <text:p text:style-name="P94"><text:span text:style-name="T1759">Questa guida server per spiegare passo-passo come estrarre i file CSV dalle varie piattaforme che poi serviranno per essere importati sul programma.</text:span><text:span text:style-name="T1760"/><text:span text:style-name="T1761"/></text:p>
      <text:list>
        <text:list-item>
          <text:p text:style-name="P95"><text:span text:style-name="T1769"/><text:bookmark-start text:name="_Toc2"/><text:span text:style-name="T1770">Crypto.com App</text:span><text:span text:style-name="T1771"/><text:bookmark-start text:name="__RefHeading___Toc3187_1777463037"/><text:span text:style-name="T1772"/><text:bookmark-end text:name="__RefHeading___Toc3187_1777463037"/><text:span text:style-name="T1773"/><text:bookmark-end text:name="_Toc2"/><text:span text:style-name="T1774"/><text:span text:style-name="T1775"/></text:p>
        </text:list-item>
      </text:list>
      <text:p text:style-name="P97"><text:span text:style-name="T1776"/><text:span text:style-name="T1777"/><text:span text:style-name="T1778"/></text:p>
      <text:p text:style-name="P98"><text:span text:style-name="T1779">Per scaricare il file dall’app di Crypto.com seguire i seguenti passaggi :</text:span><text:span text:style-name="T1780"/><text:span text:style-name="T1781"/></text:p>
      <text:p text:style-name="P99"><text:span text:style-name="T1782"/><text:span text:style-name="T1783"/><text:span text:style-name="T1784"/></text:p>
      <text:p text:style-name="P100"><text:span text:style-name="T1785"/><text:span/><draw:frame draw:name="Object" draw:style-name="gr7" draw:z-index="25625" text:anchor-type="paragraph" svg:width="8.288cm" svg:height="16.26cm" svg:x="10.54cm" svg:y="0.341cm"><draw:image xlink:href="Pictures/image3.jpg" xlink:type="simple" xlink:show="embed" xlink:actuate="onLoad"/></draw:frame><text:span text:style-name="T1786"/><text:span text:style-name="T1787"/></text:p>
      <text:p text:style-name="P101"><text:span text:style-name="T1788"/><text:span text:style-name="T1789"/><text:span text:style-name="T1790"/></text:p>
      <text:p text:style-name="P102"><text:span text:style-name="T1791"/><text:span text:style-name="T1792"/><text:span text:style-name="T1793"/></text:p>
      <text:p text:style-name="P103"><text:span text:style-name="T1794"/><text:span text:style-name="T1795"/><text:span text:style-name="T1796"/></text:p>
      <text:p text:style-name="P104"><text:span text:style-name="T1797"/><text:span text:style-name="T1798"/><text:span text:style-name="T1799"/></text:p>
      <text:p text:style-name="P105"><text:span text:style-name="T1800"/><text:span text:style-name="T1801"/><text:span text:style-name="T1802"/></text:p>
      <text:p text:style-name="P106"><text:span text:style-name="T1803"/><text:span text:style-name="T1804"/><text:span text:style-name="T1805"/></text:p>
      <text:p text:style-name="P107"><text:span text:style-name="T1806"/><text:span text:style-name="T1807"/><text:span text:style-name="T1808"/></text:p>
      <text:list text:style-name="WWNum7" text:continue-numbering="true">
        <text:list-item>
          <text:p text:style-name="P108"><text:span text:style-name="T1809">Aprire l’app e andare nella sezione </text:span><text:span text:style-name="T1810">Conti</text:span><text:span text:style-name="T1811"/><text:span text:style-name="T1812"/></text:p>
        </text:list-item>
      </text:list>
      <text:p text:style-name="P109"><text:span text:style-name="T1813"/><text:span text:style-name="T1814"/><text:span text:style-name="T1815"/></text:p>
      <text:p text:style-name="P110"><text:span text:style-name="T1816"/><text:span text:style-name="T1817"/><text:span text:style-name="T1818"/></text:p>
      <text:p text:style-name="P111"><text:span text:style-name="T1819"/><text:span text:style-name="T1820"/><text:span text:style-name="T1821"/></text:p>
      <text:p text:style-name="P112"><text:span text:style-name="T1822"/><text:span text:style-name="T1823"/><text:span text:style-name="T1824"/></text:p>
      <text:p text:style-name="P113"><text:span text:style-name="T1825"/><text:span text:style-name="T1826"/><text:span text:style-name="T1827"/></text:p>
      <text:p text:style-name="P114"><text:span text:style-name="T1828"/><text:span text:style-name="T1829"/><text:span text:style-name="T1830"/></text:p>
      <text:p text:style-name="P115"><text:span text:style-name="T1831"/><text:span text:style-name="T1832"/><text:span text:style-name="T1833"/></text:p>
      <text:p text:style-name="P116"><text:span text:style-name="T1834"/><text:span text:style-name="T1835"/><text:span text:style-name="T1836"/></text:p>
      <text:p text:style-name="P117"><text:span text:style-name="T1837"/><text:span text:style-name="T1838"/><text:span text:style-name="T1839"/></text:p>
      <text:p text:style-name="P118"><text:span text:style-name="T1840"/><text:span text:style-name="T1841"/><text:span text:style-name="T1842"/></text:p>
      <text:p text:style-name="P119"><text:span text:style-name="T1843"/><text:span text:style-name="T1844"/><text:span text:style-name="T1845"/></text:p>
      <text:p text:style-name="P120"><text:span text:style-name="T1846"/><text:span text:style-name="T1847"/><text:span text:style-name="T1848"/></text:p>
      <text:p text:style-name="P121"><text:span text:style-name="T1849"/><text:span text:style-name="T1850"/><text:span text:style-name="T1851"/></text:p>
      <text:list text:style-name="WWNum7" text:continue-numbering="true">
        <text:list-item>
          <text:p text:style-name="P122"><text:span text:style-name="T1852">Premere quindi il tastino in alto a destra rappresentato da un </text:span><text:span text:style-name="T1853">orologio con il dollaro</text:span><text:span text:style-name="T1854"/><text:span text:style-name="T1855"/></text:p>
        </text:list-item>
      </text:list>
      <text:p text:style-name="P123"><text:span text:style-name="T1856"/><text:span text:style-name="T1857"/><text:span text:style-name="T1858"/></text:p>
      <text:p text:style-name="P124"><text:span text:style-name="T1859"/><text:span text:style-name="T1860"/><text:span text:style-name="T1861"/></text:p>
      <text:p text:style-name="P125"><text:span text:style-name="T1862"/><text:span text:style-name="T1863"/><text:span text:style-name="T1864"/></text:p>
      <text:p text:style-name="P126"><text:span text:style-name="T1865"/><text:span text:style-name="T1866"/><text:span text:style-name="T1867"/></text:p>
      <text:p text:style-name="P127"><text:span text:style-name="T1868"/><text:span text:style-name="T1869"/><text:span text:style-name="T1870"/></text:p>
      <text:p text:style-name="P128"><text:span text:style-name="T1871"/><text:span text:style-name="T1872"/><text:span text:style-name="T1873"/></text:p>
      <text:p text:style-name="P129"><text:span text:style-name="T1874"/><text:span text:style-name="T1875"/><text:span text:style-name="T1876"/></text:p>
      <text:p text:style-name="P130"><text:span text:style-name="T1877"/><text:span text:style-name="T1878"/><text:span text:style-name="T1879"/></text:p>
      <text:p text:style-name="P131"><text:span text:style-name="T1880"/><text:span text:style-name="T1881"/><text:span text:style-name="T1882"/></text:p>
      <text:p text:style-name="P132"><text:span text:style-name="T1883"/><text:span text:style-name="T1884"/><text:span text:style-name="T1885"/></text:p>
      <text:p text:style-name="P133"><text:span text:style-name="T1886"/><text:span text:style-name="T1887"/><text:span text:style-name="T1888"/></text:p>
      <text:p text:style-name="P134"><text:span text:style-name="T1889"/><text:span text:style-name="T1890"/><text:span text:style-name="T1891"/></text:p>
      <text:p text:style-name="P135"><text:span text:style-name="T1892"/><text:span text:style-name="T1893"/><text:span text:style-name="T1894"/></text:p>
      <text:p text:style-name="P136"><text:span text:style-name="T1895"/><text:span text:style-name="T1896"/><text:span text:style-name="T1897"/></text:p>
      <text:p text:style-name="P137"><text:span text:style-name="T1898"/><text:span text:style-name="T1899"/><text:span text:style-name="T1900"/></text:p>
      <text:p text:style-name="P138"><text:span text:style-name="T1901"/><text:span text:style-name="T1902"/><text:span text:style-name="T1903"/></text:p>
      <text:p text:style-name="P139"><text:span text:style-name="T1904"/><text:span text:style-name="T1905"/><text:span text:style-name="T1906"/></text:p>
      <text:p text:style-name="P140"><text:span text:style-name="T1907"/><text:span text:style-name="T1908"/><text:span text:style-name="T1909"/></text:p>
      <text:p text:style-name="P141"><text:span text:style-name="T1910"/><text:span/><draw:frame draw:name="Object" draw:style-name="gr8" draw:z-index="29721" text:anchor-type="paragraph" svg:width="5.615cm" svg:height="11.02cm" svg:x="12.32cm" svg:y="-0.3103cm"><draw:image xlink:href="Pictures/image4.jpg" xlink:type="simple" xlink:show="embed" xlink:actuate="onLoad"/></draw:frame><text:span text:style-name="T1911"/><text:span text:style-name="T1912"/></text:p>
      <text:p text:style-name="P142"><text:span text:style-name="T1913"/><text:span text:style-name="T1914"/><text:span text:style-name="T1915"/></text:p>
      <text:p text:style-name="P143"><text:span text:style-name="T1916"/><text:span text:style-name="T1917"/><text:span text:style-name="T1918"/></text:p>
      <text:p text:style-name="P144"><text:span text:style-name="T1919"/><text:span text:style-name="T1920"/><text:span text:style-name="T1921"/></text:p>
      <text:p text:style-name="P145"><text:span text:style-name="T1922"/><text:span text:style-name="T1923"/><text:span text:style-name="T1924"/></text:p>
      <text:p text:style-name="P146"><text:span text:style-name="T1925"/><text:span text:style-name="T1926"/><text:span text:style-name="T1927"/></text:p>
      <text:p text:style-name="P147"><text:span text:style-name="T1928"/><text:span text:style-name="T1929"/><text:span text:style-name="T1930"/></text:p>
      <text:p text:style-name="P148"><text:span text:style-name="T1931"/><text:span text:style-name="T1932"/><text:span text:style-name="T1933"/></text:p>
      <text:p text:style-name="P149"><text:span text:style-name="T1934"/><text:span text:style-name="T1935"/><text:span text:style-name="T1936"/></text:p>
      <text:p text:style-name="P150"><text:span text:style-name="T1937"/><text:span text:style-name="T1938"/><text:span text:style-name="T1939"/></text:p>
      <text:list text:style-name="WWNum7" text:continue-numbering="true">
        <text:list-item>
          <text:p text:style-name="P151"><text:span text:style-name="T1940">Premere su </text:span><text:span text:style-name="T1941">Crypto Wallet</text:span><text:span text:style-name="T1942">, si aprirà la cronologia delle Transazioni.</text:span><text:span text:style-name="T1943"/><text:span text:style-name="T1944"/></text:p>
        </text:list-item>
      </text:list>
      <text:p text:style-name="P152"><text:span text:style-name="T1945"/><text:span text:style-name="T1946"/><text:span text:style-name="T1947"/></text:p>
      <text:p text:style-name="P153"><text:span text:style-name="T1948"/><text:span text:style-name="T1949"/><text:span text:style-name="T1950"/></text:p>
      <text:p text:style-name="P154"><text:span text:style-name="T1951"/><text:span text:style-name="T1952"/><text:span text:style-name="T1953"/></text:p>
      <text:p text:style-name="P155"><text:span text:style-name="T1954"/><text:span text:style-name="T1955"/><text:span text:style-name="T1956"/></text:p>
      <text:p text:style-name="P156"><text:span text:style-name="T1957"/><text:span text:style-name="T1958"/><text:span text:style-name="T1959"/></text:p>
      <text:p text:style-name="P157"><text:span text:style-name="T1960"/><text:span text:style-name="T1961"/><text:span text:style-name="T1962"/></text:p>
      <text:p text:style-name="P158"><text:span text:style-name="T1963"/><text:span text:style-name="T1964"/><text:span text:style-name="T1965"/></text:p>
      <text:p text:style-name="P159"><text:span text:style-name="T1966"/><text:span text:style-name="T1967"/><text:span text:style-name="T1968"/></text:p>
      <text:p text:style-name="P160"><text:span text:style-name="T1969"/><text:span text:style-name="T1970"/><text:span text:style-name="T1971"/></text:p>
      <text:p text:style-name="P161"><text:span text:style-name="T1972"/><text:span text:style-name="T1973"/><text:span text:style-name="T1974"/></text:p>
      <text:p text:style-name="P162"><text:span text:style-name="T1975"/><text:span text:style-name="T1976"/><text:span text:style-name="T1977"/></text:p>
      <text:p text:style-name="P163"><text:span text:style-name="T1978"/><text:span text:style-name="T1979"/><text:span text:style-name="T1980"/></text:p>
      <text:p text:style-name="P164"><text:span text:style-name="T1981"/><text:span text:style-name="T1982"/><text:span text:style-name="T1983"/></text:p>
      <text:p text:style-name="P165"><text:span text:style-name="T1984"/><text:span/><draw:frame draw:name="Object" draw:style-name="gr9" draw:z-index="31769" text:anchor-type="paragraph" svg:width="8.72cm" svg:height="6.612cm" svg:x="9.215cm" svg:y="0.3377cm"><draw:image xlink:href="Pictures/image5.jpg" xlink:type="simple" xlink:show="embed" xlink:actuate="onLoad"/></draw:frame><text:span text:style-name="T1985"/><text:span text:style-name="T1986"/></text:p>
      <text:p text:style-name="P166"><text:span text:style-name="T1987"/><text:span text:style-name="T1988"/><text:span text:style-name="T1989"/></text:p>
      <text:p text:style-name="P167"><text:span text:style-name="T1990"/><text:span text:style-name="T1991"/><text:span text:style-name="T1992"/></text:p>
      <text:p text:style-name="P168"><text:span text:style-name="T1993"/><text:span text:style-name="T1994"/><text:span text:style-name="T1995"/></text:p>
      <text:p text:style-name="P169"><text:span text:style-name="T1996"/><text:span text:style-name="T1997"/><text:span text:style-name="T1998"/></text:p>
      <text:p text:style-name="P170"><text:span text:style-name="T1999"/><text:span text:style-name="T2000"/><text:span text:style-name="T2001"/></text:p>
      <text:list text:style-name="WWNum7" text:continue-numbering="true">
        <text:list-item>
          <text:p text:style-name="P171"><text:span text:style-name="T2002">Premere sull’</text:span><text:span text:style-name="T2003">icona in alto a destra</text:span><text:span text:style-name="T2004"> rappresentata da un quadrato con una freccia</text:span><text:span text:style-name="T2005"/><text:span text:style-name="T2006"/></text:p>
        </text:list-item>
      </text:list>
      <text:p text:style-name="P172"><text:span text:style-name="T2007"/><text:span text:style-name="T2008"/><text:span text:style-name="T2009"/></text:p>
      <text:p text:style-name="P173"><text:span text:style-name="T2010"/><text:span text:style-name="T2011"/><text:span text:style-name="T2012"/></text:p>
      <text:p text:style-name="P174"><text:span text:style-name="T2013"/><text:span text:style-name="T2014"/><text:span text:style-name="T2015"/></text:p>
      <text:p text:style-name="P175"><text:span text:style-name="T2016"/><text:span text:style-name="T2017"/><text:span text:style-name="T2018"/></text:p>
      <text:p text:style-name="P176"><text:span text:style-name="T2019"/><text:span text:style-name="T2020"/><text:span text:style-name="T2021"/></text:p>
      <text:p text:style-name="P177"><text:span text:style-name="T2022"/><text:span text:style-name="T2023"/><text:span text:style-name="T2024"/></text:p>
      <text:p text:style-name="P178"><text:span text:style-name="T2025"/><text:span text:style-name="T2026"/><text:span text:style-name="T2027"/></text:p>
      <text:p text:style-name="P179"><text:span text:style-name="T2028"/><text:span/><draw:frame draw:name="Object" draw:style-name="gr10" draw:z-index="34841" text:anchor-type="paragraph" svg:width="6.245cm" svg:height="12.25cm" svg:x="11.51cm" svg:y="-0.6281cm"><draw:image xlink:href="Pictures/image6.jpg" xlink:type="simple" xlink:show="embed" xlink:actuate="onLoad"/></draw:frame><text:span text:style-name="T2029"/><text:span text:style-name="T2030"/></text:p>
      <text:p text:style-name="P180"><text:span text:style-name="T2031"/><text:span text:style-name="T2032"/><text:span text:style-name="T2033"/></text:p>
      <text:p text:style-name="P181"><text:span text:style-name="T2034"/><text:span text:style-name="T2035"/><text:span text:style-name="T2036"/></text:p>
      <text:p text:style-name="P182"><text:span text:style-name="T2037"/><text:span text:style-name="T2038"/><text:span text:style-name="T2039"/></text:p>
      <text:p text:style-name="P183"><text:span text:style-name="T2040"/><text:span text:style-name="T2041"/><text:span text:style-name="T2042"/></text:p>
      <text:p text:style-name="P184"><text:span text:style-name="T2043"/><text:span text:style-name="T2044"/><text:span text:style-name="T2045"/></text:p>
      <text:p text:style-name="P185"><text:span text:style-name="T2046"/><text:span text:style-name="T2047"/><text:span text:style-name="T2048"/></text:p>
      <text:p text:style-name="P186"><text:span text:style-name="T2049"/><text:span text:style-name="T2050"/><text:span text:style-name="T2051"/></text:p>
      <text:p text:style-name="P187"><text:span text:style-name="T2052"/><text:span text:style-name="T2053"/><text:span text:style-name="T2054"/></text:p>
      <text:list text:style-name="WWNum7" text:continue-numbering="true">
        <text:list-item>
          <text:p text:style-name="P188"><text:span text:style-name="T2055">Assicurarsi che sia selezionato “</text:span><text:span text:style-name="T2056">Crypto Wallet</text:span><text:span text:style-name="T2057">” e scegliere le </text:span><text:span text:style-name="T2058">date</text:span><text:span text:style-name="T2059"> in base alle proprie</text:span><text:span text:style-name="T2060"> esigenze quindi premere sul tasto </text:span><text:span text:style-name="T2061">“</text:span><text:span text:style-name="T2062">Esporta in CSV</text:span><text:span text:style-name="T2063">”</text:span><text:span text:style-name="T2064"/><text:span text:style-name="T2065"/></text:p>
        </text:list-item>
      </text:list>
      <text:p text:style-name="P189"><text:span text:style-name="T2066"/><text:span text:style-name="T2067"/><text:span text:style-name="T2068"/></text:p>
      <text:p text:style-name="P190"><text:span text:style-name="T2069"/><text:span text:style-name="T2070"/><text:span text:style-name="T2071"/></text:p>
      <text:p text:style-name="P191"><text:span text:style-name="T2072"/><text:span text:style-name="T2073"/><text:span text:style-name="T2074"/></text:p>
      <text:p text:style-name="P192"><text:span text:style-name="T2075"/><text:span text:style-name="T2076"/><text:span text:style-name="T2077"/></text:p>
      <text:p text:style-name="P193"><text:span text:style-name="T2078"/><text:span text:style-name="T2079"/><text:span text:style-name="T2080"/></text:p>
      <text:p text:style-name="P194"><text:span text:style-name="T2081"/><text:span text:style-name="T2082"/><text:span text:style-name="T2083"/></text:p>
      <text:p text:style-name="P195"><text:span text:style-name="T2084"/><text:span text:style-name="T2085"/><text:span text:style-name="T2086"/></text:p>
      <text:p text:style-name="P196"><text:span text:style-name="T2087"/><text:span text:style-name="T2088"/><text:span text:style-name="T2089"/></text:p>
      <text:p text:style-name="P197"><text:span text:style-name="T2090"/><text:span text:style-name="T2091"/><text:span text:style-name="T2092"/></text:p>
      <text:p text:style-name="P198"><text:span text:style-name="T2093"/><text:span text:style-name="T2094"/><text:span text:style-name="T2095"/></text:p>
      <text:p text:style-name="P199"><text:span text:style-name="T2096"/><text:span text:style-name="T2097"/><text:span text:style-name="T2098"/></text:p>
      <text:p text:style-name="P200"><text:span text:style-name="T2099"/><text:span text:style-name="T2100"/><text:span text:style-name="T2101"/></text:p>
      <text:p text:style-name="P201"><text:span text:style-name="T2102"/><text:span text:style-name="T2103"/><text:span text:style-name="T2104"/></text:p>
      <text:p text:style-name="P202"><text:span text:style-name="T2105"/><text:span text:style-name="T2106"/><text:span text:style-name="T2107"/></text:p>
      <text:p text:style-name="P203"><text:span text:style-name="T2108"/><text:span text:style-name="T2109"/><text:span text:style-name="T2110"/></text:p>
      <text:p text:style-name="P204"><text:span text:style-name="T2111"/><text:span text:style-name="T2112"/><text:span text:style-name="T2113"/></text:p>
      <text:p text:style-name="P205"><text:span text:style-name="T2114"/><text:span/><draw:frame draw:name="Object" draw:style-name="gr11" draw:z-index="40985" text:anchor-type="paragraph" svg:width="8.055cm" svg:height="5.482cm" svg:x="9.535cm" svg:y="0.3987cm"><draw:image xlink:href="Pictures/image7.jpg" xlink:type="simple" xlink:show="embed" xlink:actuate="onLoad"/></draw:frame><text:span text:style-name="T2115"/><text:span text:style-name="T2116"/></text:p>
      <text:p text:style-name="P206"><text:span text:style-name="T2117"/><text:span text:style-name="T2118"/><text:span text:style-name="T2119"/></text:p>
      <text:p text:style-name="P207"><text:span text:style-name="T2120"/><text:span text:style-name="T2121"/><text:span text:style-name="T2122"/></text:p>
      <text:p text:style-name="P208"><text:span text:style-name="T2123"/><text:span text:style-name="T2124"/><text:span text:style-name="T2125"/></text:p>
      <text:list text:style-name="WWNum7" text:continue-numbering="true">
        <text:list-item>
          <text:p text:style-name="P209"><text:span text:style-name="T2126">Una volta terminata l’esportazione, premere sul pulsante “</text:span><text:span text:style-name="T2127">Scarica</text:span><text:span text:style-name="T2128">”</text:span><text:span text:style-name="T2129"/><text:span text:style-name="T2130"/></text:p>
        </text:list-item>
      </text:list>
      <text:p text:style-name="P210"><text:span text:style-name="T2131"/><text:span text:style-name="T2132"/><text:span text:style-name="T2133"/></text:p>
      <text:p text:style-name="P211"><text:span text:style-name="T2134"/><text:span text:style-name="T2135"/><text:span text:style-name="T2136"/></text:p>
      <text:p text:style-name="P212"><text:span text:style-name="T2137"/><text:span text:style-name="T2138"/><text:span text:style-name="T2139"/></text:p>
      <text:p text:style-name="P213"><text:span text:style-name="T2140"><text:s/></text:span><text:span text:style-name="T2141"/><text:span text:style-name="T2142"/></text:p>
      <text:list>
        <text:list-item>
          <text:p text:style-name="P214"><text:span text:style-name="T2150"/><text:bookmark-start text:name="_Toc3"/><text:span text:style-name="T2151">Crypto.com Exchange</text:span><text:span text:style-name="T2152"/><text:bookmark-end text:name="_Toc3"/><text:span text:style-name="T2153"/><text:span text:style-name="T2154"/></text:p>
        </text:list-item>
      </text:list>
      <text:p text:style-name="P216"><text:span text:style-name="T2155"/><text:span text:style-name="T2156"/><text:span text:style-name="T2157"/></text:p>
      <text:p text:style-name="P217"><text:span text:style-name="T2158">Da Crypto.com Exchange si possono scaricare 2 tipi di file da importare sul programma, il </text:span><text:span text:style-name="T2159">file delle transazioni</text:span><text:span text:style-name="T2160"> e il </text:span><text:span text:style-name="T2161">report mensile</text:span><text:span text:style-name="T2162"> delle transazioni.</text:span><text:span text:style-name="T2163"/><text:span text:style-name="T2164"/></text:p>
      <text:p text:style-name="P218"><text:span text:style-name="T2165">NB. Dal programma si posso importare entrambi ma è importante scegliere e utilizzare una sola tipologia per ogni periodo per evitare di avere dati doppi e incoerenti</text:span><text:span text:style-name="T2166">.</text:span><text:span text:style-name="T2167"/><text:span text:style-name="T2168"/></text:p>
      <text:p text:style-name="P219"><text:span text:style-name="T2169"/><text:span text:style-name="T2170"/><text:span text:style-name="T2171"/></text:p>
      <text:p text:style-name="P220"><text:span text:style-name="T2172"/><text:bookmark-start text:name="_Toc4"/><text:span text:style-name="T2173">1 - Come esportare il file delle Transazioni:</text:span><text:span text:style-name="T2174"/><text:bookmark-end text:name="_Toc4"/><text:span text:style-name="T2175"/><text:span text:style-name="T2176"/></text:p>
      <text:p text:style-name="P221"><text:span/><text:span/></text:p>
      <text:list text:style-name="WWNum2" text:continue-numbering="true">
        <text:list-item>
          <text:p text:style-name="P222"><text:span text:style-name="T2177">Collegarsi all’exchange da pc e andare nella sezione </text:span><text:span text:style-name="T2178">Ordini</text:span><text:span text:style-name="T2179"/><text:span text:style-name="T2180"/></text:p>
        </text:list-item>
        <text:list-item>
          <text:p text:style-name="P223"><text:span text:style-name="T2181">Selezionare la linguetta </text:span><text:span text:style-name="T2182">Transazioni</text:span><text:span text:style-name="T2183"> e selezionare “</text:span><text:span text:style-name="T2184">Tutte le transazioni</text:span><text:span text:style-name="T2185">”</text:span><text:span text:style-name="T2186"/><text:span text:style-name="T2187"/></text:p>
        </text:list-item>
        <text:list-item>
          <text:p text:style-name="P224"><text:span text:style-name="T2188">Impostare le date di cui si necessita l’importazione (max.180gg) nel </text:span><text:span text:style-name="T2189">calendario</text:span><text:span text:style-name="T2190"/><text:span text:style-name="T2191"/></text:p>
        </text:list-item>
        <text:list-item>
          <text:p text:style-name="P225"><text:span text:style-name="T2192">Premere il pulsante </text:span><text:span text:style-name="T2193">Esporta</text:span><text:span text:style-name="T2194"/><text:span text:style-name="T2195"/></text:p>
        </text:list-item>
      </text:list>
      <text:p text:style-name="P226"><text:span text:style-name="T2196"/><text:span/><draw:frame draw:name="Object" draw:style-name="gr13" text:anchor-type="as-char" svg:width="17.59cm" svg:height="4.814cm" svg:x="0cm" svg:y="0cm"><draw:image xlink:href="Pictures/image8.png" xlink:type="simple" xlink:show="embed" xlink:actuate="onLoad"/></draw:frame><text:span text:style-name="T2197"/><text:span text:style-name="T2198"/></text:p>
      <text:list text:style-name="WWNum2" text:continue-numbering="true">
        <text:list-item>
          <text:p text:style-name="P227"><text:span text:style-name="T2199">Premere su </text:span><text:span text:style-name="T2200">Esporta CSV</text:span><text:span text:style-name="T2201"> (l’esportazione potrebbe durare parecchi minuti)</text:span><text:span text:style-name="T2202"/><text:span text:style-name="T2203"/></text:p>
        </text:list-item>
      </text:list>
      <text:p text:style-name="P228"><text:span text:style-name="T2204"/><text:span/><draw:frame draw:name="Object" draw:style-name="gr14" text:anchor-type="as-char" svg:width="7.301cm" svg:height="6.641cm" svg:x="0cm" svg:y="0cm"><draw:image xlink:href="Pictures/image9.png" xlink:type="simple" xlink:show="embed" xlink:actuate="onLoad"/></draw:frame><text:span text:style-name="T2205"/><text:span text:style-name="T2206"/></text:p>
      <text:list text:style-name="WWNum2" text:continue-numbering="true">
        <text:list-item>
          <text:p text:style-name="P229"><text:span text:style-name="T2207">Una volta terminato troverete il file nella sezione </text:span><text:span text:style-name="T2208">Esporta Storico</text:span><text:span text:style-name="T2209"> della stessa maschera</text:span><text:span text:style-name="T2210"/><text:span text:style-name="T2211"/></text:p>
        </text:list-item>
      </text:list>
      <text:p text:style-name="P230"><text:span text:style-name="T2212"/><text:span/><draw:frame draw:name="Object" draw:style-name="gr15" text:anchor-type="as-char" svg:width="7.823cm" svg:height="5.786cm" svg:x="0cm" svg:y="0cm"><draw:image xlink:href="Pictures/image10.png" xlink:type="simple" xlink:show="embed" xlink:actuate="onLoad"/></draw:frame><text:span text:style-name="T2213"/><text:span text:style-name="T2214"/></text:p>
      <text:list text:style-name="WWNum2" text:continue-numbering="true">
        <text:list-item>
          <text:p text:style-name="P231"><text:span text:style-name="T2215">Premere su </text:span><text:span text:style-name="T2216">Scarica </text:span><text:span text:style-name="T2217">per scaricare il file sul pc.</text:span><text:span text:style-name="T2218"/><text:span text:style-name="T2219"/></text:p>
        </text:list-item>
      </text:list>
      <text:p text:style-name="P232"><text:span text:style-name="T2220"/><text:span text:style-name="T2221"/><text:span text:style-name="T2222"/></text:p>
      <text:p text:style-name="P233"><text:span text:style-name="T2223"/><text:bookmark-start text:name="_Toc5"/><text:span text:style-name="T2224">2 - Come esportare i file dei movimenti mensili:</text:span><text:span text:style-name="T2225"/><text:bookmark-end text:name="_Toc5"/><text:span text:style-name="T2226"/><text:span text:style-name="T2227"/></text:p>
      <text:p text:style-name="P234"><text:span/><text:span/></text:p>
      <text:list text:style-name="WWNum6" text:continue-numbering="true">
        <text:list-item>
          <text:p text:style-name="P235"><text:span text:style-name="T2228">Coll</text:span><text:span text:style-name="T2229">egarsi all’exchange da pc e andare nella sezione </text:span><text:span text:style-name="T2230">Ordini</text:span><text:span text:style-name="T2231"/><text:span text:style-name="T2232"/></text:p>
        </text:list-item>
        <text:list-item>
          <text:p text:style-name="P236"><text:span text:style-name="T2233">Premere sulla linguetta </text:span><text:span text:style-name="T2234">Transazioni</text:span><text:span text:style-name="T2235"> e selezionare “</text:span><text:span text:style-name="T2236">Estratti mensili</text:span><text:span text:style-name="T2237">”</text:span><text:span text:style-name="T2238"/><text:span text:style-name="T2239"/></text:p>
        </text:list-item>
        <text:list-item>
          <text:p text:style-name="P237"><text:span text:style-name="T2240">Su ogni rigo premere su </text:span><text:span text:style-name="T2241">CSV </text:span><text:span text:style-name="T2242">per scaricare il file</text:span><text:span text:style-name="T2243"/><text:span text:style-name="T2244"/></text:p>
        </text:list-item>
      </text:list>
      <text:p text:style-name="P238"><text:span text:style-name="T2245"/><text:span/><draw:frame draw:name="Object" draw:style-name="gr16" text:anchor-type="as-char" svg:width="17.59cm" svg:height="8.599cm" svg:x="0cm" svg:y="0cm"><draw:image xlink:href="Pictures/image11.png" xlink:type="simple" xlink:show="embed" xlink:actuate="onLoad"/></draw:frame><text:span text:style-name="T2246"/><text:span text:style-name="T2247"/></text:p>
      <text:p text:style-name="P239"><text:span text:style-name="T2248"/><text:span text:style-name="T2249"/><text:span text:style-name="T2250"/></text:p>
      <text:p text:style-name="P240"><text:span text:style-name="T2251"/><text:span text:style-name="T2252"/><text:span text:style-name="T2253"/></text:p>
      <text:p text:style-name="P241"><text:span text:style-name="T2254"/><text:span text:style-name="T2255"/><text:span text:style-name="T2256"/></text:p>
      <text:p text:style-name="P242"><text:span text:style-name="T2257"/><text:span text:style-name="T2258"/><text:span text:style-name="T2259"/></text:p>
      <text:list>
        <text:list-item>
          <text:p text:style-name="P243"><text:span text:style-name="T2267"/><text:bookmark-start text:name="_Toc6"/><text:span text:style-name="T2268">Binance</text:span><text:span text:style-name="T2269"/><text:bookmark-end text:name="_Toc6"/><text:span text:style-name="T2270"/><text:span text:style-name="T2271"/></text:p>
        </text:list-item>
      </text:list>
      <text:p text:style-name="P245"><text:span text:style-name="T2272"/><text:span text:style-name="T2273"/><text:span text:style-name="T2274"/></text:p>
      <text:p text:style-name="P246"><text:span text:style-name="T2275">Da Binance si possono scaricare 2 tipi di file da importare sul programma, il </text:span><text:span text:style-name="T2276">file delle transazioni</text:span><text:span text:style-name="T2277"> e il </text:span><text:span text:style-name="T2278">Report finanziario</text:span><text:span text:style-name="T2279"> delle transazioni.</text:span><text:span text:style-name="T2280"/><text:span text:style-name="T2281"/></text:p>
      <text:p text:style-name="P247"><text:span text:style-name="T2282">NB. Dalle prove fatte durante il 2025 non so come mai ma il file delle transazioni risulta essere più accurato nei movimenti</text:span><text:span text:style-name="T2283">, vedremo nel 2026 se cambia qualcosa.</text:span><text:span text:style-name="T2284"/><text:span text:style-name="T2285"/></text:p>
      <text:p text:style-name="P248"><text:span text:style-name="T2286"/><text:span text:style-name="T2287"/><text:span text:style-name="T2288"/></text:p>
      <text:p text:style-name="P249"><text:span text:style-name="T2289">NB2. </text:span><text:span text:style-name="T2290">E’ importante scegliere e utilizzare una sola tipologia per ogni periodo per evitare di avere dati doppi e incoerenti</text:span><text:span text:style-name="T2291">.</text:span><text:span text:style-name="T2292"/><text:span text:style-name="T2293"/></text:p>
      <text:p text:style-name="P250"><text:span text:style-name="T2294"/><text:span text:style-name="T2295"/><text:span text:style-name="T2296"/></text:p>
      <text:p text:style-name="P251"><text:span text:style-name="T2297"/><text:bookmark-start text:name="_Toc7"/><text:span text:style-name="T2298">1 - Come esportare il file delle Transazioni:</text:span><text:span text:style-name="T2299"/><text:bookmark-end text:name="_Toc7"/><text:span text:style-name="T2300"/><text:span text:style-name="T2301"/></text:p>
      <text:p text:style-name="P252"><text:span text:style-name="T2302"/><text:span text:style-name="T2303"/><text:span text:style-name="T2304"/></text:p>
      <text:list text:style-name="WWNum10" text:continue-numbering="true">
        <text:list-item>
          <text:p text:style-name="P253"><text:span text:style-name="T2305">Premere sull’icona a forma di </text:span><text:span text:style-name="T2306">Portafoglio</text:span><text:span text:style-name="T2307"> in alto a destra.</text:span><text:span/><draw:frame draw:name="Object" draw:style-name="gr18" draw:z-index="78873" text:anchor-type="paragraph" svg:width="8.645cm" svg:height="12.18cm" svg:x="10.13cm" svg:y="0.08357cm"><draw:image xlink:href="Pictures/image12.png" xlink:type="simple" xlink:show="embed" xlink:actuate="onLoad"/></draw:frame><text:span text:style-name="T2308"/><text:span text:style-name="T2309"/></text:p>
        </text:list-item>
        <text:list-item>
          <text:p text:style-name="P254"><text:span text:style-name="T2310">Premere su “</text:span><text:span text:style-name="T2311">Storico Asset</text:span><text:span text:style-name="T2312">”</text:span><text:span text:style-name="T2313"/><text:span text:style-name="T2314"/></text:p>
        </text:list-item>
      </text:list>
      <text:p text:style-name="P255"><text:span text:style-name="T2315"/><text:span text:style-name="T2316"/><text:span text:style-name="T2317"/></text:p>
      <text:list text:style-name="WWNum10" text:continue-numbering="true">
        <text:list-item>
          <text:p text:style-name="P256"><text:span text:style-name="T2318"/><text:span text:style-name="T2319">Nella schermata che si apre premere sull’</text:span><text:span text:style-name="T2320">icona</text:span><text:span text:style-name="T2321"> in alto a destra contenente un </text:span><text:span text:style-name="T2322">riquadro con frecc</text:span><text:span text:style-name="T2323">i</text:span><text:span text:style-name="T2324">a</text:span><text:span text:style-name="T2325"/><text:span text:style-name="T2326"/></text:p>
        </text:list-item>
        <text:list-item>
          <text:p text:style-name="P257"><text:span text:style-name="T2327">Selezionare l’opzione “</text:span><text:span text:style-name="T2328">Esporta i registri delle transazioni</text:span><text:span text:style-name="T2329">”</text:span><text:span text:style-name="T2330"/><text:span text:style-name="T2331"/></text:p>
        </text:list-item>
      </text:list>
      <text:p text:style-name="P258"><text:span text:style-name="T2332"/><text:span/><draw:frame draw:name="Object" draw:style-name="gr19" draw:z-index="80921" text:anchor-type="paragraph" svg:width="6.787cm" svg:height="5.705cm" svg:x="1.058cm" svg:y="0.2358cm"><draw:image xlink:href="Pictures/image13.png" xlink:type="simple" xlink:show="embed" xlink:actuate="onLoad"/></draw:frame><text:span text:style-name="T2333"/><text:span text:style-name="T2334"/></text:p>
      <text:p text:style-name="P259"><text:span text:style-name="T2335"/><text:span text:style-name="T2336"/><text:span text:style-name="T2337"/></text:p>
      <text:p text:style-name="P260"><text:span text:style-name="T2338"/><text:span text:style-name="T2339"/><text:span text:style-name="T2340"/></text:p>
      <text:p text:style-name="P261"><text:span text:style-name="T2341"/><text:span text:style-name="T2342"/><text:span text:style-name="T2343"/></text:p>
      <text:p text:style-name="P262"><text:span text:style-name="T2344"/><text:span text:style-name="T2345"/><text:span text:style-name="T2346"/></text:p>
      <text:p text:style-name="P263"><text:span text:style-name="T2347"/><text:span text:style-name="T2348"/><text:span text:style-name="T2349"/></text:p>
      <text:p text:style-name="P264"><text:span text:style-name="T2350"/><text:span text:style-name="T2351"/><text:span text:style-name="T2352"/></text:p>
      <text:p text:style-name="P265"><text:span text:style-name="T2353"/><text:span text:style-name="T2354"/><text:span text:style-name="T2355"/></text:p>
      <text:p text:style-name="P266"><text:span text:style-name="T2356"/><text:span text:style-name="T2357"/><text:span text:style-name="T2358"/></text:p>
      <text:p text:style-name="P267"><text:span text:style-name="T2359"/><text:span text:style-name="T2360"/><text:span text:style-name="T2361"/></text:p>
      <text:p text:style-name="P268"><text:span text:style-name="T2362"/><text:span text:style-name="T2363"/><text:span text:style-name="T2364"/></text:p>
      <text:p text:style-name="P269"><text:span text:style-name="T2365"/><text:span text:style-name="T2366"/><text:span text:style-name="T2367"/></text:p>
      <text:p text:style-name="P270"><text:span text:style-name="T2368"/><text:span text:style-name="T2369"/><text:span text:style-name="T2370"/></text:p>
      <text:p text:style-name="P271"><text:span text:style-name="T2371"/><text:span text:style-name="T2372"/><text:span text:style-name="T2373"/></text:p>
      <text:p text:style-name="P272"><text:span text:style-name="T2374"/><text:span text:style-name="T2375"/><text:span text:style-name="T2376"/></text:p>
      <text:p text:style-name="P273"><text:span text:style-name="T2377"/><text:span text:style-name="T2378"/><text:span text:style-name="T2379"/></text:p>
      <text:list text:style-name="WWNum10" text:continue-numbering="true">
        <text:list-item>
          <text:p text:style-name="P274"><text:span text:style-name="T2380">Nella maschera che si apre fare attenzione ai parametri evidenziati in Rosso : - In alto a destra selezionare </text:span><text:span text:style-name="T2381">UTC</text:span><text:span text:style-name="T2382"> (indica il fuso orario da utilizzare)- Scegliere poi il periodo da esportare premendo su </text:span><text:span text:style-name="T2383">Personalizza</text:span><text:span text:style-name="T2384"><text:line-break/>- Come tipo File scegliere </text:span><text:span text:style-name="T2385">CSV</text:span><text:span text:style-name="T2386"> e quindi premere sul pulsante </text:span><text:span text:style-name="T2387">Genera.</text:span><text:span text:style-name="T2388"/><text:span text:style-name="T2389"/></text:p>
        </text:list-item>
      </text:list>
      <text:p text:style-name="P275"><text:span text:style-name="T2390"/><text:span/><draw:frame draw:name="Object" draw:style-name="gr20" text:anchor-type="as-char" svg:width="17.59cm" svg:height="10.39cm" svg:x="0cm" svg:y="0cm"><draw:image xlink:href="Pictures/image14.png" xlink:type="simple" xlink:show="embed" xlink:actuate="onLoad"/></draw:frame><text:span text:style-name="T2391"/><text:span/></text:p>
      <text:p text:style-name="P276"><text:span/><text:span/></text:p>
      <text:list text:style-name="WWNum10" text:continue-numbering="true">
        <text:list-item>
          <text:p text:style-name="P277"><text:span text:style-name="T2392">Una volta premuto su esporta nella parte bassa della finestra comparirà un rigo con stato “</text:span><text:span text:style-name="T2393">Generando</text:span><text:span text:style-name="T2394">”, ora bisognerà aspettare che</text:span><text:span text:style-name="T2395"> il file venga generato e poi sempre dalla stessa maschera si potrà scaricare il file. </text:span><text:span text:style-name="T2396"/><text:span text:style-name="T2397"/></text:p>
        </text:list-item>
      </text:list>
      <text:p text:style-name="P278"><text:span text:style-name="T2398">Non serve aspettare, si può tranquillamente chiudere e tornare nella stessa maschera dopo qualche tempo a controllare se il file è stato generato, comparirà la scritta “</text:span><text:span text:style-name="T2399">Scarica</text:span><text:span text:style-name="T2400">” affianco allo stato.</text:span><text:span text:style-name="T2401"/><text:span text:style-name="T2402"/></text:p>
      <text:p text:style-name="P279"><text:span text:style-name="T2403"/><text:span/><draw:frame draw:name="Object" draw:style-name="gr21" text:anchor-type="as-char" svg:width="17.59cm" svg:height="3.674cm" svg:x="0cm" svg:y="0cm"><draw:image xlink:href="Pictures/image15.png" xlink:type="simple" xlink:show="embed" xlink:actuate="onLoad"/></draw:frame><text:span text:style-name="T2404"/><text:span text:style-name="T2405"/></text:p>
      <text:p text:style-name="P280"><text:span text:style-name="T2406"/><text:span text:style-name="T2407"/><text:span/></text:p>
      <text:p text:style-name="P281"><text:span text:style-name="T2408">NB: Il programma tenta di individuare il Fuso orario dal nome del file, non rinominarlo se possibile</text:span><text:span text:style-name="T2409"/><text:span/></text:p>
      <text:p text:style-name="P282"><text:span text:style-name="T2410"/><text:bookmark-start text:name="_Toc8"/><text:span text:style-name="T2411">2 - Come esportare il Report Finanziario:</text:span><text:span text:style-name="T2412"/><text:bookmark-end text:name="_Toc8"/><text:span text:style-name="T2413"/><text:span text:style-name="T2414"/></text:p>
      <text:p text:style-name="P283"><text:span text:style-name="T2415"/><text:span text:style-name="T2416"/><text:span text:style-name="T2417"/></text:p>
      <text:list text:style-name="WWNum13" text:continue-numbering="true">
        <text:list-item>
          <text:p text:style-name="P284"><text:span text:style-name="T2418">Nel Menù a sinistra premere su “</text:span><text:span text:style-name="T2419">Account</text:span><text:span text:style-name="T2420">”</text:span><text:span text:style-name="T2421"/><text:span text:style-name="T2422"/></text:p>
        </text:list-item>
      </text:list>
      <text:p text:style-name="P285"><text:span text:style-name="T2423"/><text:span text:style-name="T2424"/><text:span text:style-name="T2425"/></text:p>
      <text:list text:style-name="WWNum13" text:continue-numbering="true">
        <text:list-item>
          <text:p text:style-name="P286"><text:span text:style-name="T2426">Premere su “</text:span><text:span text:style-name="T2427">Report finanziari</text:span><text:span text:style-name="T2428">”</text:span><text:span text:style-name="T2429"/><text:span text:style-name="T2430"/></text:p>
        </text:list-item>
      </text:list>
      <text:p text:style-name="P287"><text:span text:style-name="T2431"/><text:span text:style-name="T2432"/><text:span text:style-name="T2433"/></text:p>
      <text:list text:style-name="WWNum13" text:continue-numbering="true">
        <text:list-item>
          <text:p text:style-name="P288"><text:span text:style-name="T2434">Selezionare il periodo desiderato e premere su “</text:span><text:span text:style-name="T2435">Visualizza</text:span><text:span text:style-name="T2436">”, verrà quindi scaricato il file.</text:span><text:span text:style-name="T2437"/><text:span text:style-name="T2438"/></text:p>
        </text:list-item>
      </text:list>
      <text:p text:style-name="P289"><text:span text:style-name="T2439"/><text:span text:style-name="T2440"/><text:span text:style-name="T2441"/></text:p>
      <text:p text:style-name="P290"><text:span text:style-name="T2442">NB. I file in questa sezione vengono generati una volta all’anno.</text:span><text:span text:style-name="T2443"/><text:span text:style-name="T2444"/></text:p>
      <text:p text:style-name="P291"><text:span text:style-name="T2445"/><text:span text:style-name="T2446"/><text:span text:style-name="T2447"/></text:p>
      <text:p text:style-name="P292"><text:span text:style-name="T2448"/><text:span/><draw:frame draw:name="Object" draw:style-name="gr22" text:anchor-type="as-char" svg:width="17.59cm" svg:height="6.681cm" svg:x="0cm" svg:y="0cm"><draw:image xlink:href="Pictures/image16.png" xlink:type="simple" xlink:show="embed" xlink:actuate="onLoad"/></draw:frame><text:span text:style-name="T2449"/><text:span text:style-name="T2450"/></text:p>
      <text:p text:style-name="P293"><text:span text:style-name="T2451"/><text:span text:style-name="T2452"><text:line-break/></text:span><text:span text:style-name="T2453"/><text:span text:style-name="T2454"/></text:p>
      <text:p text:style-name="P294"><text:span text:style-name="T2455"/><text:span text:style-name="T2456"/><text:span/></text:p>
      <text:list>
        <text:list-item>
          <text:p text:style-name="P295"><text:span text:style-name="T2464"/><text:bookmark-start text:name="_Toc9"/><text:span text:style-name="T2465">Cointraking.info</text:span><text:span text:style-name="T2466"/><text:bookmark-end text:name="_Toc9"/><text:span text:style-name="T2467"/><text:span text:style-name="T2468"/></text:p>
        </text:list-item>
      </text:list>
      <text:p text:style-name="P297"><text:span text:style-name="T2469"/><text:span text:style-name="T2470"/><text:span text:style-name="T2471"/></text:p>
      <text:p text:style-name="P298"><text:span text:style-name="T2472">Uno dei modi per poter importare i dati dei vostri exchange/blockchain non supportate da Giacenze Crypto è passare tramite un altra piattaforma di analisi dei dati.</text:span><text:span text:style-name="T2473"/><text:span text:style-name="T2474"/></text:p>
      <text:p text:style-name="P299"><text:span text:style-name="T2475">Bisognerà quindi importare i dati sulla piattaforma, quindi esportarli e caricarli su Giacenze Crypto.</text:span><text:span text:style-name="T2476"/><text:span text:style-name="T2477"/></text:p>
      <text:p text:style-name="P300"><text:span text:style-name="T2478"/><text:span text:style-name="T2479"/><text:span text:style-name="T2480"/></text:p>
      <text:p text:style-name="P301"><text:span text:style-name="T2481">In particolare se usate il software </text:span><text:span text:style-name="T2482">Cointraking </text:span><text:span text:style-name="T2483">per fare questo tipo di operazion</text:span><text:span text:style-name="T2484">e è opportuno ricordare che non permette se non a pagamento un importazione massiva dei vostri dati per cui bisognerà caricare, ad esempio, i dati di un singolo exchange, esportarli, cancellare i dati e ricominciare il giro con gli exchange che vi mancano.</text:span><text:span text:style-name="T2485"/><text:span text:style-name="T2486"/></text:p>
      <text:p text:style-name="P302"><text:span text:style-name="T2487">Il servizio è reperibile al seguente indirizzo </text:span><text:span text:style-name="T2488"/><text:a xlink:href="https://cointracking.info/dashboard.php" xlink:type="simple"><text:span text:style-name="T2489"/><text:span text:style-name="T2490"/><text:span text:style-name="T2491"/><text:span text:style-name="T2492"/><text:span text:style-name="T2493"/><text:span text:style-name="T2494"/><text:span text:style-name="T2495">https://cointracking.info/dashboard.php</text:span><text:span text:style-name="T2496"/><text:span text:style-name="T2497"/><text:span text:style-name="T2498"/></text:a><text:span text:style-name="T2499"/><text:span text:style-name="T2500"/></text:p>
      <text:p text:style-name="P303"><text:span text:style-name="T2501"/><text:span text:style-name="T2502"/><text:span text:style-name="T2503"/></text:p>
      <text:p text:style-name="P304"><text:span text:style-name="T2504">Nei passaggi successivi verrà illustrato come esportare i dati da cointraking : </text:span><text:span text:style-name="T2505"/><text:span text:style-name="T2506"/></text:p>
      <text:list text:style-name="WWNum14" text:continue-numbering="true">
        <text:list-item>
          <text:p text:style-name="P305"><text:span text:style-name="T2507">Importare i dati premendo sull’apposito pulsante e seguendo le indicazioni a video</text:span><text:span text:style-name="T2508"/><text:span text:style-name="T2509"/></text:p>
        </text:list-item>
      </text:list>
      <text:p text:style-name="P306"><text:span text:style-name="T2510"/><text:span/><draw:frame draw:name="Object" draw:style-name="gr24" text:anchor-type="as-char" svg:width="17.59cm" svg:height="4.085cm" svg:x="0cm" svg:y="0cm"><draw:image xlink:href="Pictures/image17.png" xlink:type="simple" xlink:show="embed" xlink:actuate="onLoad"/></draw:frame><text:span text:style-name="T2511"/><text:span text:style-name="T2512"/></text:p>
      <text:p text:style-name="P307"><text:span text:style-name="T2513"/><text:span text:style-name="T2514"/><text:span text:style-name="T2515"/></text:p>
      <text:list text:style-name="WWNum14" text:continue-numbering="true">
        <text:list-item>
          <text:p text:style-name="P308"><text:span text:style-name="T2516"/><text:span text:style-name="T2517">Una volta terminata l’importazione premere su “</text:span><text:span text:style-name="T2518">Transazioni</text:span><text:span text:style-name="T2519">”</text:span><text:span text:style-name="T2520"/><text:span text:style-name="T2521"/></text:p>
        </text:list-item>
        <text:list-item>
          <text:p text:style-name="P309"><text:span text:style-name="T2522"/><text:span text:style-name="T2523">Premere sul pulsante “</text:span><text:span text:style-name="T2524">Export</text:span><text:span text:style-name="T2525">”</text:span><text:span text:style-name="T2526"/><text:span text:style-name="T2527"/></text:p>
        </text:list-item>
        <text:list-item>
          <text:p text:style-name="P310"><text:span text:style-name="T2528"/><text:span/><draw:frame draw:name="Object" draw:style-name="gr25" draw:z-index="64537" text:anchor-type="paragraph" svg:width="16.44cm" svg:height="6.702cm" svg:x="0.8795cm" svg:y="0.5326cm"><draw:image xlink:href="Pictures/image18.png" xlink:type="simple" xlink:show="embed" xlink:actuate="onLoad"/></draw:frame><text:span text:style-name="T2529">Selezionare il formato “</text:span><text:span text:style-name="T2530">CSV</text:span><text:span text:style-name="T2531">”, verrà quindi scaricato il file da importare su Giacenze Crypto.</text:span><text:span text:style-name="T2532"/><text:span text:style-name="T2533"/></text:p>
        </text:list-item>
        <text:list-item>
          <text:p text:style-name="P311"><text:span text:style-name="T2534"/><text:span text:style-name="T2535">Premere ora sul pulsante “</text:span><text:span text:style-name="T2536">Modifica/Elimina di massa</text:span><text:span text:style-name="T2537">”</text:span><text:span text:style-name="T2538"><text:s/></text:span><text:span text:style-name="T2539"/><text:span text:style-name="T2540"/></text:p>
        </text:list-item>
      </text:list>
      <text:p text:style-name="P312"><text:span text:style-name="T2541"/><text:span text:style-name="T2542"/><text:span text:style-name="T2543"/></text:p>
      <text:p text:style-name="P313"><text:span text:style-name="T2544"/><text:span/><draw:frame draw:name="Object" draw:style-name="gr26" text:anchor-type="as-char" svg:width="17.59cm" svg:height="4.085cm" svg:x="0cm" svg:y="0cm"><draw:image xlink:href="Pictures/image19.png" xlink:type="simple" xlink:show="embed" xlink:actuate="onLoad"/></draw:frame><text:span text:style-name="T2545"/><text:span text:style-name="T2546"/></text:p>
      <text:p text:style-name="P314"><text:span text:style-name="T2547"/><text:span text:style-name="T2548"/><text:span text:style-name="T2549"/></text:p>
      <text:list text:style-name="WWNum14" text:continue-numbering="true">
        <text:list-item>
          <text:p text:style-name="P315"><text:span text:style-name="T2550">Nella maschera che compare selezionare la voce “</text:span><text:span text:style-name="T2551">eliminare tutte le transazioni</text:span><text:span text:style-name="T2552">” e poi premere sul tasto rosso “</text:span><text:span text:style-name="T2553">eliminare le voci selezionate</text:span><text:span text:style-name="T2554">”, in questo modo potrete ricaricare altri dati partendo dal punto 1.</text:span><text:span text:style-name="T2555"/><text:span text:style-name="T2556"/></text:p>
        </text:list-item>
      </text:list>
      <text:p text:style-name="P316"><text:span text:style-name="T2557"/><text:span text:style-name="T2558"/><text:span text:style-name="T2559"/></text:p>
      <text:p text:style-name="P317"><text:span text:style-name="T2560"/><text:span/><draw:frame draw:name="Object" draw:style-name="gr27" text:anchor-type="as-char" svg:width="12.8cm" svg:height="10.34cm" svg:x="0cm" svg:y="0cm"><draw:image xlink:href="Pictures/image20.png" xlink:type="simple" xlink:show="embed" xlink:actuate="onLoad"/></draw:frame><text:span text:style-name="T2561"/><text:span text:style-name="T2562"/></text:p>
      <text:p text:style-name="P318"><text:span text:style-name="T2563"/><text:span text:style-name="T2564"/><text:span text:style-name="T2565"/></text:p>
      <text:p text:style-name="P319"><text:span text:style-name="T2566"/><text:span text:style-name="T2567"/><text:span text:style-name="T2568"/></text:p>
      <text:p text:style-name="P320"><text:span text:style-name="T2569"/><text:span text:style-name="T2570"><text:line-break/></text:span><text:span text:style-name="T2571"/><text:span text:style-name="T2572"/></text:p>
      <text:p text:style-name="P321"><text:span text:style-name="T2573"/><text:span text:style-name="T2574"/><text:span/></text:p>
      <text:p text:style-name="P322"><text:span text:style-name="T2582"/><text:bookmark-start text:name="_Toc10"/><text:span text:style-name="T2583">Import CSV sul software Giacenze Crypto</text:span><text:span text:style-name="T2584"/><text:bookmark-end text:name="_Toc10"/><text:span text:style-name="T2585"/><text:span text:style-name="T2586"/></text:p>
      <text:p text:style-name="P324"><text:span text:style-name="T2587"/><text:span text:style-name="T2588"/><text:span text:style-name="T2589"/></text:p>
      <text:p text:style-name="P325"><text:span text:style-name="T2590">Per importare invece i dati sul Software procedere come segue :</text:span><text:span text:style-name="T2591"/><text:span text:style-name="T2592"/></text:p>
      <text:p text:style-name="P326"><text:span text:style-name="T2593"/><text:span/><draw:frame draw:name="Object" draw:style-name="gr29" draw:z-index="67609" text:anchor-type="paragraph" svg:width="6.694cm" svg:height="4.578cm" svg:x="10.89cm" svg:y="0.3683cm"><draw:image xlink:href="Pictures/image21.png" xlink:type="simple" xlink:show="embed" xlink:actuate="onLoad"/></draw:frame><text:span text:style-name="T2594"/><text:span text:style-name="T2595"/></text:p>
      <text:p text:style-name="P327"><text:span text:style-name="T2596"/><text:span text:style-name="T2597"/><text:span text:style-name="T2598"/></text:p>
      <text:list text:style-name="WWNum19" text:continue-numbering="true">
        <text:list-item>
          <text:p text:style-name="P328"><text:span text:style-name="T2599">Premere sul pulsante “</text:span><text:span text:style-name="T2600">Carica CSV” </text:span><text:span text:style-name="T2601">presente nella sezione “</text:span><text:span text:style-name="T2602">Transazioni Crypto</text:span><text:span text:style-name="T2603">”</text:span><text:span text:style-name="T2604"/><text:span text:style-name="T2605"/></text:p>
        </text:list-item>
      </text:list>
      <text:p text:style-name="P329"><text:span text:style-name="T2606"/><text:span text:style-name="T2607"/><text:span text:style-name="T2608"/></text:p>
      <text:p text:style-name="P330"><text:span text:style-name="T2609"/><text:span text:style-name="T2610"/><text:span text:style-name="T2611"/></text:p>
      <text:p text:style-name="P331"><text:span text:style-name="T2612"/><text:span text:style-name="T2613"/><text:span text:style-name="T2614"/></text:p>
      <text:p text:style-name="P332"><text:span text:style-name="T2615"/><text:span text:style-name="T2616"/><text:span text:style-name="T2617"/></text:p>
      <text:p text:style-name="P333"><text:span text:style-name="T2618"/><text:span text:style-name="T2619"/><text:span text:style-name="T2620"/></text:p>
      <text:p text:style-name="P334"><text:span text:style-name="T2621"/><text:span text:style-name="T2622"/><text:span text:style-name="T2623"/></text:p>
      <text:p text:style-name="P335"><text:span text:style-name="T2624"/><text:span/><draw:frame draw:name="Object" draw:style-name="gr30" draw:z-index="70681" text:anchor-type="paragraph" svg:width="8.233cm" svg:height="10.7cm" svg:x="9.649cm" svg:y="0.518cm"><draw:image xlink:href="Pictures/image22.png" xlink:type="simple" xlink:show="embed" xlink:actuate="onLoad"/></draw:frame><text:span text:style-name="T2625"/><text:span text:style-name="T2626"/></text:p>
      <text:list text:style-name="WWNum19" text:continue-numbering="true">
        <text:list-item>
          <text:p text:style-name="P336"><text:span text:style-name="T2627"/><text:span text:style-name="T2628">A questo punto seguire i seguenti punti per procedere all’importazione :</text:span><text:span text:style-name="T2629"/><text:span text:style-name="T2630"/></text:p>
        </text:list-item>
        <text:list-item>
          <text:list>
            <text:list-item>
              <text:p text:style-name="P337"><text:span text:style-name="T2631"/><text:span text:style-name="T2632">Selezionare l’Exchange dal menù a tendina.</text:span><text:span text:style-name="T2633"/><text:span text:style-name="T2634"/></text:p>
            </text:list-item>
            <text:list-item>
              <text:p text:style-name="P338"><text:span text:style-name="T2635"/><text:span text:style-name="T2636">Decidere se usare l’opzione “</text:span><text:span text:style-name="T2637">Sovrascrivere movimenti già presenti</text:span><text:span text:style-name="T2638">”. Questa opzione permette di sovrascrivere movimenti già presenti</text:span><text:span text:style-name="T2639"> con quelli presenti nel file CSV che si andrà a selezionare nel caso si cerci di importare movimenti doppi.Tuttavia nel caso in cui si cerchi di reimportare uno stesso periodo è consigliabile cancellare le movimentazioni del periodo e reimportarle da capo</text:span><text:span text:style-name="T2640"> per evitare problematiche. I file degli exchange infatti talune volte se scaricati in periodi diversi dalla piattaforma, pur facendo riferimento al medesimo periodo operativo potrebbero presentare delle incongruenze (Ore cambiate, valori ritoccati etc...)</text:span><text:span text:style-name="T2641"/><text:span text:style-name="T2642"/></text:p>
            </text:list-item>
          </text:list>
        </text:list-item>
      </text:list>
      <text:p text:style-name="P339"><text:span text:style-name="T2643"/><text:span text:style-name="T2644"/><text:span text:style-name="T2645"/></text:p>
      <text:list text:style-name="WWNum19" text:continue-numbering="true">
        <text:list-item>
          <text:list>
            <text:list-item>
              <text:p text:style-name="P340"><text:span text:style-name="T2646"/><text:span text:style-name="T2647">Nel caso i</text:span><text:span text:style-name="T2648">n cui i</text:span><text:span text:style-name="T2649">nvece si voglia importare un CSV da<text:s text:c="8"/>una piattaforma come ad esempio Cointraking che permette di gestire molteplici Wallet/Exchange bisognerà selezionare anche la tipologia e il Wallet di destinazione prima di procedere con l’import. (Vedi immagine).</text:span><text:span/><draw:frame draw:name="Object" draw:style-name="gr31" draw:z-index="76825" text:anchor-type="paragraph" svg:width="7.027cm" svg:height="9.076cm" svg:x="10.56cm" svg:y="-0.3022cm"><draw:image xlink:href="Pictures/image23.png" xlink:type="simple" xlink:show="embed" xlink:actuate="onLoad"/></draw:frame><text:span text:style-name="T2650"><text:line-break/><text:line-break/><text:line-break/></text:span><text:span text:style-name="T2651"/><text:span text:style-name="T2652"/></text:p>
            </text:list-item>
            <text:list-item>
              <text:p text:style-name="P341"><text:span text:style-name="T2653"/><text:span text:style-name="T2654">Premere quindi su </text:span><text:span text:style-name="T2655">“Selezione file da importare”</text:span><text:span text:style-name="T2656"> per scegliere il file CSV da caricare</text:span><text:span text:style-name="T2657">.</text:span><text:span text:style-name="T2658"/><text:span text:style-name="T2659"/></text:p>
            </text:list-item>
          </text:list>
        </text:list-item>
      </text:list>
      <text:p text:style-name="P342"><text:span text:style-name="T2660"/><text:span text:style-name="T2661"><text:line-break/><text:line-break/><text:line-break/><text:line-break/><text:line-break/></text:span><text:span text:style-name="T2662"><text:line-break/></text:span><text:span text:style-name="T2663"/><text:span text:style-name="T2664"/></text:p>
      <text:list text:style-name="WWNum18" text:continue-numbering="true">
        <text:list-item>
          <text:p text:style-name="P343"><text:span text:style-name="T2665">Terminata l’importazione comparirà un resoconto ti</text:span><text:span/><draw:frame draw:name="Object" draw:style-name="gr32" draw:z-index="77849" text:anchor-type="paragraph" svg:width="7.463cm" svg:height="7.179cm" svg:x="10.13cm" svg:y="-0.08996cm"><draw:image xlink:href="Pictures/image24.png" xlink:type="simple" xlink:show="embed" xlink:actuate="onLoad"/></draw:frame><text:span text:style-name="T2666">po questo nel quale saranno visibili anche eventuali errori e dove sarà possibile copiarli per poi segnalarli via mail o sul canale telegram.</text:span><text:span text:style-name="T2667"/><text:span text:style-name="T2668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987">
      <style:paragraph-properties/>
      <style:text-properties fo:font-size="10pt"/>
    </style:style>
    <style:style style:display-name="DStyle_text" style:family="text" style:name="988">
      <style:paragraph-properties/>
    </style:style>
    <style:style style:parent-style-name="987" style:display-name="DStyle_paragraph" style:family="paragraph" style:name="989">
      <style:paragraph-properties/>
      <style:text-properties fo:font-size="10pt"/>
    </style:style>
    <style:style style:parent-style-name="987" style:display-name="DStyle_text" style:family="text" style:name="990">
      <style:paragraph-properties/>
    </style:style>
    <style:style style:parent-style-name="989" style:display-name="DStyle_paragraph" style:family="paragraph" style:name="991">
      <style:paragraph-properties/>
      <style:text-properties fo:font-size="10pt"/>
    </style:style>
    <style:style style:parent-style-name="987" style:display-name="DStyle_text" style:family="text" style:name="992">
      <style:paragraph-properties/>
    </style:style>
    <style:style style:parent-style-name="991" style:display-name="DStyle_paragraph" style:family="paragraph" style:name="993">
      <style:paragraph-properties/>
      <style:text-properties fo:font-size="10pt"/>
    </style:style>
    <style:style style:parent-style-name="987" style:display-name="DStyle_text" style:family="text" style:name="994">
      <style:paragraph-properties/>
    </style:style>
    <style:style style:parent-style-name="993" style:display-name="DStyle_paragraph" style:family="paragraph" style:name="995">
      <style:paragraph-properties/>
      <style:text-properties fo:font-size="10pt"/>
    </style:style>
    <style:style style:parent-style-name="987" style:display-name="DStyle_text" style:family="text" style:name="996">
      <style:paragraph-properties/>
    </style:style>
    <style:style style:parent-style-name="995" style:display-name="DStyle_paragraph" style:family="paragraph" style:name="997">
      <style:paragraph-properties/>
      <style:text-properties fo:font-size="10pt"/>
    </style:style>
    <style:style style:parent-style-name="987" style:display-name="DStyle_text" style:family="text" style:name="998">
      <style:paragraph-properties/>
    </style:style>
    <style:style style:parent-style-name="997" style:display-name="DStyle_paragraph" style:family="paragraph" style:name="999">
      <style:paragraph-properties/>
      <style:text-properties fo:font-size="10pt"/>
    </style:style>
    <style:style style:parent-style-name="987" style:display-name="DStyle_text" style:family="text" style:name="1000">
      <style:paragraph-properties/>
    </style:style>
    <style:style style:parent-style-name="999" style:display-name="DStyle_paragraph" style:family="paragraph" style:name="1001">
      <style:paragraph-properties/>
      <style:text-properties fo:font-size="10pt"/>
    </style:style>
    <style:style style:parent-style-name="987" style:display-name="DStyle_text" style:family="text" style:name="1002">
      <style:paragraph-properties/>
    </style:style>
    <style:style style:class="default" style:display-name="Normal" style:family="paragraph" style:name="1003">
      <style:paragraph-properties/>
      <style:text-properties/>
    </style:style>
    <style:style style:parent-style-name="1003" style:display-name="Heading 3" style:family="paragraph" style:name="1004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1003" style:display-name="Heading 4" style:family="paragraph" style:name="1005">
      <style:paragraph-properties fo:margin-top="4pt" fo:margin-bottom="2pt"/>
      <style:text-properties fo:color="#0f4761" fo:font-family="Arial" style:font-family-complex="Arial" fo:font-style="italic"/>
    </style:style>
    <style:style style:parent-style-name="1003" style:display-name="Heading 5" style:family="paragraph" style:name="1006">
      <style:paragraph-properties fo:margin-top="4pt" fo:margin-bottom="2pt"/>
      <style:text-properties fo:color="#0f4761" fo:font-family="Arial" style:font-family-complex="Arial"/>
    </style:style>
    <style:style style:parent-style-name="1003" style:display-name="Heading 6" style:family="paragraph" style:name="1007">
      <style:paragraph-properties fo:margin-top="2pt" fo:margin-bottom="0pt"/>
      <style:text-properties fo:color="#595959" fo:font-family="Arial" style:font-family-complex="Arial" fo:font-style="italic"/>
    </style:style>
    <style:style style:parent-style-name="1003" style:display-name="Heading 7" style:family="paragraph" style:name="1008">
      <style:paragraph-properties fo:margin-top="2pt" fo:margin-bottom="0pt"/>
      <style:text-properties fo:color="#595959" fo:font-family="Arial" style:font-family-complex="Arial"/>
    </style:style>
    <style:style style:parent-style-name="1003" style:display-name="Heading 8" style:family="paragraph" style:name="1009">
      <style:paragraph-properties fo:margin-bottom="0pt"/>
      <style:text-properties fo:color="#272727" fo:font-family="Arial" style:font-family-complex="Arial" fo:font-style="italic"/>
    </style:style>
    <style:style style:parent-style-name="1003" style:display-name="Heading 9" style:family="paragraph" style:name="1010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1011">
      <style:paragraph-properties/>
      <style:text-properties/>
    </style:style>
    <style:style style:parent-style-name="1011" style:display-name="Heading 1 Char" style:family="text" style:name="1012">
      <style:paragraph-properties/>
      <style:text-properties fo:color="#0f4761" fo:font-family="Arial" style:font-family-complex="Arial" fo:font-size="20pt" style:font-size-complex="20pt"/>
    </style:style>
    <style:style style:parent-style-name="1011" style:display-name="Heading 2 Char" style:family="text" style:name="1013">
      <style:paragraph-properties/>
      <style:text-properties fo:color="#0f4761" fo:font-family="Arial" style:font-family-complex="Arial" fo:font-size="16pt" style:font-size-complex="16pt"/>
    </style:style>
    <style:style style:parent-style-name="1011" style:display-name="Heading 3 Char" style:family="text" style:name="1014">
      <style:paragraph-properties/>
      <style:text-properties fo:color="#0f4761" fo:font-family="Arial" style:font-family-complex="Arial" fo:font-size="14pt" style:font-size-complex="14pt"/>
    </style:style>
    <style:style style:parent-style-name="1011" style:display-name="Heading 4 Char" style:family="text" style:name="1015">
      <style:paragraph-properties/>
      <style:text-properties fo:color="#0f4761" fo:font-family="Arial" style:font-family-complex="Arial" fo:font-style="italic"/>
    </style:style>
    <style:style style:parent-style-name="1011" style:display-name="Heading 5 Char" style:family="text" style:name="1016">
      <style:paragraph-properties/>
      <style:text-properties fo:color="#0f4761" fo:font-family="Arial" style:font-family-complex="Arial"/>
    </style:style>
    <style:style style:parent-style-name="1011" style:display-name="Heading 6 Char" style:family="text" style:name="1017">
      <style:paragraph-properties/>
      <style:text-properties fo:color="#595959" fo:font-family="Arial" style:font-family-complex="Arial" fo:font-style="italic"/>
    </style:style>
    <style:style style:parent-style-name="1011" style:display-name="Heading 7 Char" style:family="text" style:name="1018">
      <style:paragraph-properties/>
      <style:text-properties fo:color="#595959" fo:font-family="Arial" style:font-family-complex="Arial"/>
    </style:style>
    <style:style style:parent-style-name="1011" style:display-name="Heading 8 Char" style:family="text" style:name="1019">
      <style:paragraph-properties/>
      <style:text-properties fo:color="#272727" fo:font-family="Arial" style:font-family-complex="Arial" fo:font-style="italic"/>
    </style:style>
    <style:style style:parent-style-name="1011" style:display-name="Heading 9 Char" style:family="text" style:name="1020">
      <style:paragraph-properties/>
      <style:text-properties fo:color="#272727" fo:font-family="Arial" style:font-family-complex="Arial" fo:font-style="italic"/>
    </style:style>
    <style:style style:parent-style-name="1003" style:display-name="Title" style:family="paragraph" style:name="1021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1011" style:display-name="Title Char" style:family="text" style:name="1022">
      <style:paragraph-properties/>
      <style:text-properties fo:font-family="Arial" style:font-family-complex="Arial" fo:font-size="28pt" style:font-size-complex="28pt" fo:letter-spacing="-0.5pt"/>
    </style:style>
    <style:style style:parent-style-name="1003" style:display-name="Subtitle" style:family="paragraph" style:name="1023">
      <style:paragraph-properties/>
      <style:text-properties fo:color="#595959" fo:font-size="14pt" style:font-size-complex="14pt" fo:letter-spacing="0.75pt"/>
    </style:style>
    <style:style style:parent-style-name="1011" style:display-name="Subtitle Char" style:family="text" style:name="1024">
      <style:paragraph-properties/>
      <style:text-properties fo:color="#595959" fo:font-size="14pt" style:font-size-complex="14pt" fo:letter-spacing="0.75pt"/>
    </style:style>
    <style:style style:parent-style-name="1003" style:display-name="Quote" style:family="paragraph" style:name="1025">
      <style:paragraph-properties fo:text-align="center" fo:margin-top="8pt"/>
      <style:text-properties fo:color="#404040" fo:font-style="italic"/>
    </style:style>
    <style:style style:parent-style-name="1011" style:display-name="Quote Char" style:family="text" style:name="1026">
      <style:paragraph-properties/>
      <style:text-properties fo:color="#404040" fo:font-style="italic"/>
    </style:style>
    <style:style style:parent-style-name="1003" style:display-name="List Paragraph" style:family="paragraph" style:name="1027">
      <style:paragraph-properties fo:margin-left="1.27cm" fo:margin-right="0cm" fo:text-indent="0cm"/>
    </style:style>
    <style:style style:parent-style-name="1011" style:display-name="Intense Emphasis" style:family="text" style:name="1028">
      <style:paragraph-properties/>
      <style:text-properties fo:color="#0f4761" fo:font-style="italic"/>
    </style:style>
    <style:style style:parent-style-name="1003" style:display-name="Intense Quote" style:family="paragraph" style:name="1029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1011" style:display-name="Intense Quote Char" style:family="text" style:name="1030">
      <style:paragraph-properties/>
      <style:text-properties fo:color="#0f4761" fo:font-style="italic"/>
    </style:style>
    <style:style style:parent-style-name="1011" style:display-name="Intense Reference" style:family="text" style:name="1031">
      <style:paragraph-properties/>
      <style:text-properties fo:font-variant="small-caps" fo:color="#0f4761" fo:letter-spacing="0.25pt" fo:font-weight="bold"/>
    </style:style>
    <style:style style:parent-style-name="1003" style:display-name="No Spacing" style:family="paragraph" style:name="1032">
      <style:paragraph-properties fo:line-height="100%" fo:margin-bottom="0pt"/>
    </style:style>
    <style:style style:parent-style-name="1011" style:display-name="Subtle Emphasis" style:family="text" style:name="1033">
      <style:paragraph-properties/>
      <style:text-properties fo:color="#404040" fo:font-style="italic"/>
    </style:style>
    <style:style style:parent-style-name="1011" style:display-name="Strong" style:family="text" style:name="1034">
      <style:paragraph-properties/>
      <style:text-properties fo:font-weight="bold"/>
    </style:style>
    <style:style style:parent-style-name="1011" style:display-name="Subtle Reference" style:family="text" style:name="1035">
      <style:paragraph-properties/>
      <style:text-properties fo:font-variant="small-caps" fo:color="#5a5a5a"/>
    </style:style>
    <style:style style:parent-style-name="1011" style:display-name="Book Title" style:family="text" style:name="1036">
      <style:paragraph-properties/>
      <style:text-properties fo:letter-spacing="0.25pt" fo:font-style="italic" fo:font-weight="bold"/>
    </style:style>
    <style:style style:parent-style-name="1011" style:display-name="Header Char" style:family="text" style:name="1037">
      <style:paragraph-properties/>
    </style:style>
    <style:style style:parent-style-name="1011" style:display-name="Footer Char" style:family="text" style:name="1038">
      <style:paragraph-properties/>
    </style:style>
    <style:style style:parent-style-name="1003" style:display-name="footnote text" style:family="paragraph" style:name="1039">
      <style:paragraph-properties fo:line-height="100%" fo:margin-bottom="0pt"/>
      <style:text-properties fo:font-size="10pt" style:font-size-complex="10pt"/>
    </style:style>
    <style:style style:parent-style-name="1011" style:display-name="Footnote Text Char" style:family="text" style:name="1040">
      <style:paragraph-properties/>
      <style:text-properties fo:font-size="10pt" style:font-size-complex="10pt"/>
    </style:style>
    <style:style style:parent-style-name="1011" style:display-name="footnote reference" style:family="text" style:name="1041">
      <style:paragraph-properties/>
      <style:text-properties style:text-position="super 58%"/>
    </style:style>
    <style:style style:parent-style-name="1003" style:display-name="endnote text" style:family="paragraph" style:name="1042">
      <style:paragraph-properties fo:line-height="100%" fo:margin-bottom="0pt"/>
      <style:text-properties fo:font-size="10pt" style:font-size-complex="10pt"/>
    </style:style>
    <style:style style:parent-style-name="1011" style:display-name="Endnote Text Char" style:family="text" style:name="1043">
      <style:paragraph-properties/>
      <style:text-properties fo:font-size="10pt" style:font-size-complex="10pt"/>
    </style:style>
    <style:style style:parent-style-name="1011" style:display-name="endnote reference" style:family="text" style:name="1044">
      <style:paragraph-properties/>
      <style:text-properties style:text-position="super 58%"/>
    </style:style>
    <style:style style:parent-style-name="1011" style:display-name="Hyperlink" style:family="text" style:name="1045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003" style:display-name="Internet link" style:family="text" style:name="104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3" style:display-name="Internet link" style:family="text" style:name="104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3" style:display-name="Internet link" style:family="text" style:name="104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3" style:display-name="Internet link" style:family="text" style:name="104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3" style:display-name="Internet link" style:family="text" style:name="105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3" style:display-name="Internet link" style:family="text" style:name="105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3" style:display-name="Internet link" style:family="text" style:name="1052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03" style:display-name="Internet link" style:family="text" style:name="1053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011" style:display-name="FollowedHyperlink" style:family="text" style:name="1054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003" style:display-name="toc 1" style:family="paragraph" style:name="1055">
      <style:paragraph-properties fo:margin-bottom="5pt"/>
      <style:text-properties/>
    </style:style>
    <style:style style:parent-style-name="1003" style:display-name="toc 2" style:family="paragraph" style:name="1056">
      <style:paragraph-properties fo:margin-left="0.3881cm" fo:margin-right="0cm" fo:text-indent="0cm" fo:margin-bottom="5pt"/>
    </style:style>
    <style:style style:parent-style-name="1003" style:display-name="toc 3" style:family="paragraph" style:name="1057">
      <style:paragraph-properties fo:margin-left="0.7762cm" fo:margin-right="0cm" fo:text-indent="0cm" fo:margin-bottom="5pt"/>
      <style:text-properties/>
    </style:style>
    <style:style style:parent-style-name="1003" style:display-name="toc 4" style:family="paragraph" style:name="1058">
      <style:paragraph-properties fo:margin-left="1.164cm" fo:margin-right="0cm" fo:text-indent="0cm" fo:margin-bottom="5pt"/>
    </style:style>
    <style:style style:parent-style-name="1003" style:display-name="toc 5" style:family="paragraph" style:name="1059">
      <style:paragraph-properties fo:margin-left="1.552cm" fo:margin-right="0cm" fo:text-indent="0cm" fo:margin-bottom="5pt"/>
    </style:style>
    <style:style style:parent-style-name="1003" style:display-name="toc 6" style:family="paragraph" style:name="1060">
      <style:paragraph-properties fo:margin-left="1.94cm" fo:margin-right="0cm" fo:text-indent="0cm" fo:margin-bottom="5pt"/>
    </style:style>
    <style:style style:parent-style-name="1003" style:display-name="toc 7" style:family="paragraph" style:name="1061">
      <style:paragraph-properties fo:margin-left="2.328cm" fo:margin-right="0cm" fo:text-indent="0cm" fo:margin-bottom="5pt"/>
    </style:style>
    <style:style style:parent-style-name="1003" style:display-name="toc 8" style:family="paragraph" style:name="1062">
      <style:paragraph-properties fo:margin-left="2.717cm" fo:margin-right="0cm" fo:text-indent="0cm" fo:margin-bottom="5pt"/>
    </style:style>
    <style:style style:parent-style-name="1003" style:display-name="toc 9" style:family="paragraph" style:name="1063">
      <style:paragraph-properties fo:margin-left="3.105cm" fo:margin-right="0cm" fo:text-indent="0cm" fo:margin-bottom="5pt"/>
    </style:style>
    <style:style style:parent-style-name="1011" style:display-name="Placeholder Text" style:family="text" style:name="1064">
      <style:paragraph-properties/>
      <style:text-properties fo:color="#666666"/>
    </style:style>
    <style:style style:parent-style-name="1003" style:display-name="TOC Heading" style:family="paragraph" style:name="1065">
      <style:paragraph-properties/>
    </style:style>
    <style:style style:parent-style-name="1003" style:display-name="table of figures" style:family="paragraph" style:name="1066">
      <style:paragraph-properties fo:margin-bottom="0pt"/>
    </style:style>
    <style:style style:parent-style-name="1003" style:display-name="DStyle_paragraph" style:family="paragraph" style:name="106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1067" style:display-name="Standard" style:family="paragraph" style:name="1068">
      <style:paragraph-properties/>
      <style:text-properties/>
    </style:style>
    <style:style style:parent-style-name="1068" style:display-name="Heading" style:family="paragraph" style:name="1069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1068" style:display-name="Text body" style:family="paragraph" style:name="1070">
      <style:paragraph-properties fo:line-height="115%" fo:margin-top="0pt" fo:margin-bottom="7pt"/>
      <style:text-properties/>
    </style:style>
    <style:style style:parent-style-name="1070" style:display-name="List" style:family="paragraph" style:name="1071">
      <style:paragraph-properties/>
    </style:style>
    <style:style style:parent-style-name="1068" style:display-name="Caption" style:family="paragraph" style:name="1072">
      <style:paragraph-properties fo:margin-top="6pt" fo:margin-bottom="6pt"/>
      <style:text-properties fo:font-size="12pt" style:font-size-complex="12pt" fo:font-style="italic"/>
    </style:style>
    <style:style style:parent-style-name="1068" style:display-name="Index" style:family="paragraph" style:name="1073">
      <style:paragraph-properties/>
    </style:style>
    <style:style style:parent-style-name="1068" style:display-name="Table Contents" style:family="paragraph" style:name="1074">
      <style:paragraph-properties/>
    </style:style>
    <style:style style:parent-style-name="1074" style:display-name="Table Heading" style:family="paragraph" style:name="1075">
      <style:paragraph-properties fo:text-align="center"/>
      <style:text-properties fo:font-weight="bold"/>
    </style:style>
    <style:style style:parent-style-name="1069" style:display-name="Index Heading" style:family="paragraph" style:name="1076">
      <style:paragraph-properties fo:margin-left="0cm" fo:margin-right="0cm" fo:text-indent="0cm"/>
      <style:text-properties fo:font-size="16pt" style:font-size-complex="16pt" fo:font-weight="bold"/>
    </style:style>
    <style:style style:parent-style-name="1076" style:display-name="Contents Heading" style:family="paragraph" style:name="1077">
      <style:paragraph-properties fo:margin-left="0cm" fo:margin-right="0cm" fo:text-indent="0cm"/>
      <style:text-properties fo:font-size="16pt" style:font-size-complex="16pt" fo:font-weight="bold"/>
    </style:style>
    <style:style style:parent-style-name="1073" style:display-name="Contents 1" style:family="paragraph" style:name="1078">
      <style:paragraph-properties fo:margin-left="0cm" fo:margin-right="0cm" fo:text-indent="0cm">
        <style:tab-stops>
          <style:tab-stop style:position="17.59cm" style:type="right" style:leader-type="dotted" style:leader-style="dotted"/>
        </style:tab-stops>
      </style:paragraph-properties>
      <style:text-properties fo:language="it" fo:country="IT" fo:font-weight="bold"/>
    </style:style>
    <style:style style:parent-style-name="1069" style:display-name="Heading 1" style:family="paragraph" style:name="1079">
      <style:paragraph-properties fo:margin-top="12pt" fo:margin-bottom="6pt"/>
      <style:text-properties fo:font-size="18pt" style:font-size-complex="18pt" fo:font-weight="bold"/>
    </style:style>
    <style:style style:parent-style-name="1069" style:display-name="Heading 2" style:family="paragraph" style:name="1080">
      <style:paragraph-properties fo:margin-top="10pt" fo:margin-bottom="6pt"/>
      <style:text-properties fo:font-size="16pt" style:font-size-complex="16pt" fo:font-weight="bold"/>
    </style:style>
    <style:style style:parent-style-name="1073" style:display-name="Contents 2" style:family="paragraph" style:name="1081">
      <style:paragraph-properties fo:margin-left="0.4992cm" fo:margin-right="0cm" fo:text-indent="0cm">
        <style:tab-stops>
          <style:tab-stop style:position="21.59cm" style:type="right" style:leader-type="dotted" style:leader-style="dotted"/>
        </style:tab-stops>
      </style:paragraph-properties>
    </style:style>
    <style:style style:parent-style-name="1068" style:display-name="Header and Footer" style:family="paragraph" style:name="1082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1082" style:display-name="Footer" style:family="paragraph" style:name="1083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1082" style:display-name="Header" style:family="paragraph" style:name="1084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1003" style:display-name="Emphasis" style:family="text" style:name="1085">
      <style:paragraph-properties/>
      <style:text-properties fo:font-style="italic"/>
    </style:style>
    <style:style style:parent-style-name="1003" style:display-name="Strong Emphasis" style:family="text" style:name="1086">
      <style:paragraph-properties/>
      <style:text-properties fo:font-weight="bold"/>
    </style:style>
    <style:style style:parent-style-name="1003" style:display-name="Internet link" style:family="text" style:name="1087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1003" style:display-name="Index Link" style:family="text" style:name="1088">
      <style:paragraph-properties/>
    </style:style>
    <style:style style:parent-style-name="1003" style:display-name="Bullet Symbols" style:family="text" style:name="1089">
      <style:paragraph-properties/>
      <style:text-properties fo:font-family="OpenSymbol" style:font-family-complex="OpenSymbol"/>
    </style:style>
    <style:style style:parent-style-name="1003" style:display-name="Numbering Symbols" style:family="text" style:name="1090">
      <style:paragraph-properties/>
    </style:style>
    <style:style style:parent-style-name="1003" style:display-name="T1" style:family="text" style:name="1091">
      <style:paragraph-properties/>
    </style:style>
    <style:style style:parent-style-name="1003" style:display-name="T2" style:family="text" style:name="1092">
      <style:paragraph-properties/>
    </style:style>
    <style:style style:parent-style-name="1003" style:display-name="T3" style:family="text" style:name="1093">
      <style:paragraph-properties/>
    </style:style>
    <style:style style:parent-style-name="1003" style:display-name="T4" style:family="text" style:name="1094">
      <style:paragraph-properties/>
    </style:style>
    <style:style style:parent-style-name="1003" style:display-name="T5" style:family="text" style:name="1095">
      <style:paragraph-properties/>
    </style:style>
    <style:style style:parent-style-name="1003" style:display-name="T6" style:family="text" style:name="1096">
      <style:paragraph-properties/>
    </style:style>
    <style:style style:parent-style-name="1003" style:display-name="T7" style:family="text" style:name="1097">
      <style:paragraph-properties/>
    </style:style>
    <style:style style:parent-style-name="1003" style:display-name="T8" style:family="text" style:name="1098">
      <style:paragraph-properties/>
    </style:style>
    <style:style style:parent-style-name="1003" style:display-name="T9" style:family="text" style:name="1099">
      <style:paragraph-properties/>
    </style:style>
    <style:style style:parent-style-name="1003" style:display-name="T10" style:family="text" style:name="1100">
      <style:paragraph-properties/>
    </style:style>
    <style:style style:parent-style-name="1003" style:display-name="T11" style:family="text" style:name="1101">
      <style:paragraph-properties/>
    </style:style>
    <style:style style:parent-style-name="1003" style:display-name="T12" style:family="text" style:name="1102">
      <style:paragraph-properties/>
    </style:style>
    <style:style style:parent-style-name="1003" style:display-name="T13" style:family="text" style:name="1103">
      <style:paragraph-properties/>
    </style:style>
    <style:style style:parent-style-name="1003" style:display-name="T14" style:family="text" style:name="1104">
      <style:paragraph-properties/>
    </style:style>
    <style:style style:parent-style-name="1003" style:display-name="T15" style:family="text" style:name="1105">
      <style:paragraph-properties/>
    </style:style>
    <style:style style:parent-style-name="1003" style:display-name="T16" style:family="text" style:name="1106">
      <style:paragraph-properties/>
    </style:style>
    <style:style style:parent-style-name="1003" style:display-name="T17" style:family="text" style:name="1107">
      <style:paragraph-properties/>
    </style:style>
    <style:style style:parent-style-name="1003" style:display-name="T18" style:family="text" style:name="1108">
      <style:paragraph-properties/>
    </style:style>
    <style:style style:parent-style-name="1003" style:display-name="T19" style:family="text" style:name="1109">
      <style:paragraph-properties/>
    </style:style>
    <style:style style:parent-style-name="1003" style:display-name="T20" style:family="text" style:name="1110">
      <style:paragraph-properties/>
    </style:style>
    <style:style style:parent-style-name="1003" style:display-name="T21" style:family="text" style:name="1111">
      <style:paragraph-properties/>
    </style:style>
    <style:style style:parent-style-name="1003" style:display-name="T22" style:family="text" style:name="1112">
      <style:paragraph-properties/>
    </style:style>
    <style:style style:parent-style-name="1003" style:display-name="T23" style:family="text" style:name="1113">
      <style:paragraph-properties/>
    </style:style>
    <style:style style:parent-style-name="1003" style:display-name="T24" style:family="text" style:name="1114">
      <style:paragraph-properties/>
    </style:style>
    <style:style style:parent-style-name="1003" style:display-name="T25" style:family="text" style:name="1115">
      <style:paragraph-properties/>
    </style:style>
    <style:style style:parent-style-name="1003" style:display-name="T26" style:family="text" style:name="1116">
      <style:paragraph-properties/>
    </style:style>
    <style:style style:parent-style-name="1003" style:display-name="T27" style:family="text" style:name="1117">
      <style:paragraph-properties/>
    </style:style>
    <style:style style:parent-style-name="1003" style:display-name="T28" style:family="text" style:name="1118">
      <style:paragraph-properties/>
    </style:style>
    <style:style style:parent-style-name="1003" style:display-name="T29" style:family="text" style:name="1119">
      <style:paragraph-properties/>
    </style:style>
    <style:style style:parent-style-name="1003" style:display-name="T30" style:family="text" style:name="1120">
      <style:paragraph-properties/>
    </style:style>
    <style:style style:parent-style-name="1003" style:display-name="T31" style:family="text" style:name="1121">
      <style:paragraph-properties/>
    </style:style>
    <style:style style:parent-style-name="1003" style:display-name="T32" style:family="text" style:name="1122">
      <style:paragraph-properties/>
    </style:style>
    <style:style style:parent-style-name="1003" style:display-name="T33" style:family="text" style:name="1123">
      <style:paragraph-properties/>
    </style:style>
    <style:style style:parent-style-name="1003" style:display-name="T34" style:family="text" style:name="1124">
      <style:paragraph-properties/>
    </style:style>
    <style:style style:parent-style-name="1003" style:display-name="T35" style:family="text" style:name="1125">
      <style:paragraph-properties/>
    </style:style>
    <style:style style:parent-style-name="1003" style:display-name="T36" style:family="text" style:name="1126">
      <style:paragraph-properties/>
    </style:style>
    <style:style style:parent-style-name="1003" style:display-name="T37" style:family="text" style:name="1127">
      <style:paragraph-properties/>
    </style:style>
    <style:style style:parent-style-name="1003" style:display-name="T38" style:family="text" style:name="1128">
      <style:paragraph-properties/>
    </style:style>
    <style:style style:parent-style-name="1003" style:display-name="T39" style:family="text" style:name="1129">
      <style:paragraph-properties/>
    </style:style>
    <style:style style:parent-style-name="1003" style:display-name="T40" style:family="text" style:name="1130">
      <style:paragraph-properties/>
    </style:style>
    <style:style style:parent-style-name="1003" style:display-name="T41" style:family="text" style:name="1131">
      <style:paragraph-properties/>
    </style:style>
    <style:style style:parent-style-name="1003" style:display-name="T42" style:family="text" style:name="1132">
      <style:paragraph-properties/>
    </style:style>
    <style:style style:parent-style-name="1003" style:display-name="T43" style:family="text" style:name="1133">
      <style:paragraph-properties/>
    </style:style>
    <style:style style:parent-style-name="1003" style:display-name="T44" style:family="text" style:name="1134">
      <style:paragraph-properties/>
    </style:style>
    <style:style style:parent-style-name="1003" style:display-name="T45" style:family="text" style:name="1135">
      <style:paragraph-properties/>
    </style:style>
    <style:style style:parent-style-name="1003" style:display-name="T46" style:family="text" style:name="1136">
      <style:paragraph-properties/>
    </style:style>
    <style:style style:parent-style-name="1003" style:display-name="T47" style:family="text" style:name="1137">
      <style:paragraph-properties/>
    </style:style>
    <style:style style:parent-style-name="1003" style:display-name="T48" style:family="text" style:name="1138">
      <style:paragraph-properties/>
    </style:style>
    <style:style style:parent-style-name="1003" style:display-name="T49" style:family="text" style:name="1139">
      <style:paragraph-properties/>
    </style:style>
    <style:style style:parent-style-name="1003" style:display-name="T50" style:family="text" style:name="1140">
      <style:paragraph-properties/>
    </style:style>
    <style:style style:parent-style-name="1003" style:display-name="T51" style:family="text" style:name="1141">
      <style:paragraph-properties/>
    </style:style>
    <style:style style:parent-style-name="1003" style:display-name="T52" style:family="text" style:name="1142">
      <style:paragraph-properties/>
    </style:style>
    <style:style style:parent-style-name="1003" style:display-name="T53" style:family="text" style:name="1143">
      <style:paragraph-properties/>
    </style:style>
    <style:style style:parent-style-name="1003" style:display-name="T54" style:family="text" style:name="1144">
      <style:paragraph-properties/>
    </style:style>
    <style:style style:parent-style-name="1003" style:display-name="T55" style:family="text" style:name="1145">
      <style:paragraph-properties/>
    </style:style>
    <style:style style:parent-style-name="1003" style:display-name="T56" style:family="text" style:name="1146">
      <style:paragraph-properties/>
    </style:style>
    <style:style style:parent-style-name="1003" style:display-name="T57" style:family="text" style:name="1147">
      <style:paragraph-properties/>
    </style:style>
    <style:style style:parent-style-name="1003" style:display-name="T58" style:family="text" style:name="1148">
      <style:paragraph-properties/>
    </style:style>
    <style:style style:parent-style-name="1003" style:display-name="T59" style:family="text" style:name="1149">
      <style:paragraph-properties/>
    </style:style>
    <style:style style:parent-style-name="1003" style:display-name="T60" style:family="text" style:name="1150">
      <style:paragraph-properties/>
    </style:style>
    <style:style style:parent-style-name="1003" style:display-name="T61" style:family="text" style:name="1151">
      <style:paragraph-properties/>
    </style:style>
    <style:style style:parent-style-name="1003" style:display-name="T62" style:family="text" style:name="1152">
      <style:paragraph-properties/>
    </style:style>
    <style:style style:parent-style-name="1003" style:display-name="T63" style:family="text" style:name="1153">
      <style:paragraph-properties/>
    </style:style>
    <style:style style:parent-style-name="1003" style:display-name="T1" style:family="text" style:name="1154">
      <style:paragraph-properties/>
    </style:style>
    <style:style style:parent-style-name="1003" style:display-name="T2" style:family="text" style:name="1155">
      <style:paragraph-properties/>
    </style:style>
    <style:style style:parent-style-name="1003" style:display-name="T3" style:family="text" style:name="1156">
      <style:paragraph-properties/>
    </style:style>
    <style:style style:parent-style-name="1003" style:display-name="T4" style:family="text" style:name="1157">
      <style:paragraph-properties/>
    </style:style>
    <style:style style:parent-style-name="1003" style:display-name="T5" style:family="text" style:name="1158">
      <style:paragraph-properties/>
    </style:style>
    <style:style style:parent-style-name="1003" style:display-name="T6" style:family="text" style:name="1159">
      <style:paragraph-properties/>
    </style:style>
    <style:style style:parent-style-name="1003" style:display-name="T7" style:family="text" style:name="1160">
      <style:paragraph-properties/>
    </style:style>
    <style:style style:parent-style-name="1003" style:display-name="T8" style:family="text" style:name="1161">
      <style:paragraph-properties/>
    </style:style>
    <style:style style:parent-style-name="1003" style:display-name="T9" style:family="text" style:name="1162">
      <style:paragraph-properties/>
    </style:style>
    <style:style style:parent-style-name="1003" style:display-name="T10" style:family="text" style:name="1163">
      <style:paragraph-properties/>
    </style:style>
    <style:style style:parent-style-name="1003" style:display-name="T11" style:family="text" style:name="1164">
      <style:paragraph-properties/>
    </style:style>
    <style:style style:parent-style-name="1003" style:display-name="T12" style:family="text" style:name="1165">
      <style:paragraph-properties/>
    </style:style>
    <style:style style:parent-style-name="1003" style:display-name="T13" style:family="text" style:name="1166">
      <style:paragraph-properties/>
    </style:style>
    <style:style style:parent-style-name="1003" style:display-name="T14" style:family="text" style:name="1167">
      <style:paragraph-properties/>
    </style:style>
    <style:style style:parent-style-name="1003" style:display-name="T15" style:family="text" style:name="1168">
      <style:paragraph-properties/>
    </style:style>
    <style:style style:parent-style-name="1003" style:display-name="T16" style:family="text" style:name="1169">
      <style:paragraph-properties/>
    </style:style>
    <style:style style:parent-style-name="1003" style:display-name="T17" style:family="text" style:name="1170">
      <style:paragraph-properties/>
    </style:style>
    <style:style style:parent-style-name="1003" style:display-name="T18" style:family="text" style:name="1171">
      <style:paragraph-properties/>
    </style:style>
    <style:style style:parent-style-name="1003" style:display-name="T19" style:family="text" style:name="1172">
      <style:paragraph-properties/>
    </style:style>
    <style:style style:parent-style-name="1003" style:display-name="T20" style:family="text" style:name="1173">
      <style:paragraph-properties/>
    </style:style>
    <style:style style:parent-style-name="1003" style:display-name="T21" style:family="text" style:name="1174">
      <style:paragraph-properties/>
    </style:style>
    <style:style style:parent-style-name="1003" style:display-name="T22" style:family="text" style:name="1175">
      <style:paragraph-properties/>
    </style:style>
    <style:style style:parent-style-name="1003" style:display-name="T23" style:family="text" style:name="1176">
      <style:paragraph-properties/>
    </style:style>
    <style:style style:parent-style-name="1003" style:display-name="T24" style:family="text" style:name="1177">
      <style:paragraph-properties/>
    </style:style>
    <style:style style:parent-style-name="1003" style:display-name="T25" style:family="text" style:name="1178">
      <style:paragraph-properties/>
    </style:style>
    <style:style style:parent-style-name="1003" style:display-name="T26" style:family="text" style:name="1179">
      <style:paragraph-properties/>
    </style:style>
    <style:style style:parent-style-name="1003" style:display-name="T27" style:family="text" style:name="1180">
      <style:paragraph-properties/>
    </style:style>
    <style:style style:parent-style-name="1003" style:display-name="T28" style:family="text" style:name="1181">
      <style:paragraph-properties/>
    </style:style>
    <style:style style:parent-style-name="1003" style:display-name="T29" style:family="text" style:name="1182">
      <style:paragraph-properties/>
    </style:style>
    <style:style style:parent-style-name="1003" style:display-name="T30" style:family="text" style:name="1183">
      <style:paragraph-properties/>
    </style:style>
    <style:style style:parent-style-name="1003" style:display-name="T31" style:family="text" style:name="1184">
      <style:paragraph-properties/>
    </style:style>
    <style:style style:parent-style-name="1003" style:display-name="T32" style:family="text" style:name="1185">
      <style:paragraph-properties/>
    </style:style>
    <style:style style:parent-style-name="1003" style:display-name="T33" style:family="text" style:name="1186">
      <style:paragraph-properties/>
    </style:style>
    <style:style style:parent-style-name="1003" style:display-name="T34" style:family="text" style:name="1187">
      <style:paragraph-properties/>
    </style:style>
    <style:style style:parent-style-name="1003" style:display-name="T35" style:family="text" style:name="1188">
      <style:paragraph-properties/>
    </style:style>
    <style:style style:parent-style-name="1003" style:display-name="T36" style:family="text" style:name="1189">
      <style:paragraph-properties/>
    </style:style>
    <style:style style:parent-style-name="1003" style:display-name="T37" style:family="text" style:name="1190">
      <style:paragraph-properties/>
    </style:style>
    <style:style style:parent-style-name="1003" style:display-name="T38" style:family="text" style:name="1191">
      <style:paragraph-properties/>
    </style:style>
    <style:style style:parent-style-name="1003" style:display-name="T39" style:family="text" style:name="1192">
      <style:paragraph-properties/>
    </style:style>
    <style:style style:parent-style-name="1003" style:display-name="T40" style:family="text" style:name="1193">
      <style:paragraph-properties/>
    </style:style>
    <style:style style:parent-style-name="1003" style:display-name="T41" style:family="text" style:name="1194">
      <style:paragraph-properties/>
    </style:style>
    <style:style style:parent-style-name="1003" style:display-name="T42" style:family="text" style:name="1195">
      <style:paragraph-properties/>
    </style:style>
    <style:style style:parent-style-name="1003" style:display-name="T43" style:family="text" style:name="1196">
      <style:paragraph-properties/>
    </style:style>
    <style:style style:parent-style-name="1003" style:display-name="T44" style:family="text" style:name="1197">
      <style:paragraph-properties/>
    </style:style>
    <style:style style:parent-style-name="1003" style:display-name="T45" style:family="text" style:name="1198">
      <style:paragraph-properties/>
    </style:style>
    <style:style style:parent-style-name="1003" style:display-name="T46" style:family="text" style:name="1199">
      <style:paragraph-properties/>
    </style:style>
    <style:style style:parent-style-name="1003" style:display-name="T47" style:family="text" style:name="1200">
      <style:paragraph-properties/>
    </style:style>
    <style:style style:parent-style-name="1003" style:display-name="T48" style:family="text" style:name="1201">
      <style:paragraph-properties/>
    </style:style>
    <style:style style:parent-style-name="1003" style:display-name="T49" style:family="text" style:name="1202">
      <style:paragraph-properties/>
    </style:style>
    <style:style style:parent-style-name="1003" style:display-name="T50" style:family="text" style:name="1203">
      <style:paragraph-properties/>
    </style:style>
    <style:style style:parent-style-name="1003" style:display-name="T51" style:family="text" style:name="1204">
      <style:paragraph-properties/>
    </style:style>
    <style:style style:parent-style-name="1003" style:display-name="T52" style:family="text" style:name="1205">
      <style:paragraph-properties/>
    </style:style>
    <style:style style:parent-style-name="1003" style:display-name="T53" style:family="text" style:name="1206">
      <style:paragraph-properties/>
    </style:style>
    <style:style style:parent-style-name="1003" style:display-name="T54" style:family="text" style:name="1207">
      <style:paragraph-properties/>
    </style:style>
    <style:style style:parent-style-name="1003" style:display-name="T55" style:family="text" style:name="1208">
      <style:paragraph-properties/>
    </style:style>
    <style:style style:parent-style-name="1003" style:display-name="T56" style:family="text" style:name="1209">
      <style:paragraph-properties/>
    </style:style>
    <style:style style:parent-style-name="1003" style:display-name="T57" style:family="text" style:name="1210">
      <style:paragraph-properties/>
    </style:style>
    <style:style style:parent-style-name="1003" style:display-name="T58" style:family="text" style:name="1211">
      <style:paragraph-properties/>
    </style:style>
    <style:style style:parent-style-name="1003" style:display-name="T59" style:family="text" style:name="1212">
      <style:paragraph-properties/>
    </style:style>
    <style:style style:parent-style-name="1003" style:display-name="T60" style:family="text" style:name="1213">
      <style:paragraph-properties/>
    </style:style>
    <style:style style:parent-style-name="1003" style:display-name="T61" style:family="text" style:name="1214">
      <style:paragraph-properties/>
    </style:style>
    <style:style style:parent-style-name="1003" style:display-name="T62" style:family="text" style:name="1215">
      <style:paragraph-properties/>
    </style:style>
    <style:style style:parent-style-name="1003" style:display-name="T63" style:family="text" style:name="1216">
      <style:paragraph-properties/>
    </style:style>
    <style:style style:parent-style-name="1003" style:display-name="T64" style:family="text" style:name="1217">
      <style:paragraph-properties/>
    </style:style>
    <style:style style:parent-style-name="1003" style:display-name="T65" style:family="text" style:name="1218">
      <style:paragraph-properties/>
    </style:style>
    <style:style style:parent-style-name="1003" style:display-name="T66" style:family="text" style:name="1219">
      <style:paragraph-properties/>
    </style:style>
    <style:style style:parent-style-name="1003" style:display-name="T67" style:family="text" style:name="1220">
      <style:paragraph-properties/>
    </style:style>
    <style:style style:parent-style-name="1003" style:display-name="T68" style:family="text" style:name="1221">
      <style:paragraph-properties/>
    </style:style>
    <style:style style:parent-style-name="1003" style:display-name="T69" style:family="text" style:name="1222">
      <style:paragraph-properties/>
    </style:style>
    <style:style style:parent-style-name="1003" style:display-name="T70" style:family="text" style:name="1223">
      <style:paragraph-properties/>
    </style:style>
    <style:style style:parent-style-name="1003" style:display-name="T71" style:family="text" style:name="1224">
      <style:paragraph-properties/>
    </style:style>
    <style:style style:parent-style-name="1003" style:display-name="T72" style:family="text" style:name="1225">
      <style:paragraph-properties/>
    </style:style>
    <style:style style:parent-style-name="1003" style:display-name="T73" style:family="text" style:name="1226">
      <style:paragraph-properties/>
    </style:style>
    <style:style style:parent-style-name="1003" style:display-name="T74" style:family="text" style:name="1227">
      <style:paragraph-properties/>
    </style:style>
    <style:style style:parent-style-name="1003" style:display-name="T75" style:family="text" style:name="1228">
      <style:paragraph-properties/>
    </style:style>
    <style:style style:parent-style-name="1003" style:display-name="T76" style:family="text" style:name="1229">
      <style:paragraph-properties/>
    </style:style>
    <style:style style:parent-style-name="1003" style:display-name="T77" style:family="text" style:name="1230">
      <style:paragraph-properties/>
    </style:style>
    <style:style style:parent-style-name="1003" style:display-name="T78" style:family="text" style:name="1231">
      <style:paragraph-properties/>
    </style:style>
    <style:style style:parent-style-name="1003" style:display-name="T79" style:family="text" style:name="1232">
      <style:paragraph-properties/>
    </style:style>
    <style:style style:parent-style-name="1003" style:display-name="T80" style:family="text" style:name="1233">
      <style:paragraph-properties/>
    </style:style>
    <style:style style:parent-style-name="1003" style:display-name="T81" style:family="text" style:name="1234">
      <style:paragraph-properties/>
    </style:style>
    <style:style style:parent-style-name="1003" style:display-name="T82" style:family="text" style:name="1235">
      <style:paragraph-properties/>
    </style:style>
    <style:style style:parent-style-name="1003" style:display-name="T83" style:family="text" style:name="1236">
      <style:paragraph-properties/>
    </style:style>
    <style:style style:parent-style-name="1003" style:display-name="T84" style:family="text" style:name="1237">
      <style:paragraph-properties/>
    </style:style>
    <style:style style:parent-style-name="1003" style:display-name="T85" style:family="text" style:name="1238">
      <style:paragraph-properties/>
    </style:style>
    <style:style style:parent-style-name="1003" style:display-name="T86" style:family="text" style:name="1239">
      <style:paragraph-properties/>
    </style:style>
    <style:style style:parent-style-name="1003" style:display-name="T87" style:family="text" style:name="1240">
      <style:paragraph-properties/>
    </style:style>
    <style:style style:parent-style-name="1003" style:display-name="T88" style:family="text" style:name="1241">
      <style:paragraph-properties/>
    </style:style>
    <style:style style:parent-style-name="1003" style:display-name="T89" style:family="text" style:name="1242">
      <style:paragraph-properties/>
    </style:style>
    <style:style style:parent-style-name="1003" style:display-name="T90" style:family="text" style:name="1243">
      <style:paragraph-properties/>
    </style:style>
    <style:style style:parent-style-name="1003" style:display-name="T91" style:family="text" style:name="1244">
      <style:paragraph-properties/>
    </style:style>
    <style:style style:parent-style-name="1003" style:display-name="T92" style:family="text" style:name="1245">
      <style:paragraph-properties/>
    </style:style>
    <style:style style:parent-style-name="1003" style:display-name="T93" style:family="text" style:name="1246">
      <style:paragraph-properties/>
    </style:style>
    <style:style style:parent-style-name="1003" style:display-name="T94" style:family="text" style:name="1247">
      <style:paragraph-properties/>
    </style:style>
    <style:style style:parent-style-name="1003" style:display-name="T95" style:family="text" style:name="1248">
      <style:paragraph-properties/>
    </style:style>
    <style:style style:parent-style-name="1003" style:display-name="T96" style:family="text" style:name="1249">
      <style:paragraph-properties/>
    </style:style>
    <style:style style:parent-style-name="1003" style:display-name="T97" style:family="text" style:name="1250">
      <style:paragraph-properties/>
    </style:style>
    <style:style style:parent-style-name="1003" style:display-name="T98" style:family="text" style:name="1251">
      <style:paragraph-properties/>
    </style:style>
    <style:style style:parent-style-name="1003" style:display-name="T99" style:family="text" style:name="1252">
      <style:paragraph-properties/>
    </style:style>
    <style:style style:parent-style-name="1003" style:display-name="T100" style:family="text" style:name="1253">
      <style:paragraph-properties/>
    </style:style>
    <style:style style:parent-style-name="1003" style:display-name="T101" style:family="text" style:name="1254">
      <style:paragraph-properties/>
    </style:style>
    <style:style style:parent-style-name="1003" style:display-name="T102" style:family="text" style:name="1255">
      <style:paragraph-properties/>
    </style:style>
    <style:style style:parent-style-name="1003" style:display-name="T103" style:family="text" style:name="1256">
      <style:paragraph-properties/>
    </style:style>
    <style:style style:parent-style-name="1003" style:display-name="T104" style:family="text" style:name="1257">
      <style:paragraph-properties/>
    </style:style>
    <style:style style:parent-style-name="1003" style:display-name="T105" style:family="text" style:name="1258">
      <style:paragraph-properties/>
    </style:style>
    <style:style style:parent-style-name="1003" style:display-name="T106" style:family="text" style:name="1259">
      <style:paragraph-properties/>
    </style:style>
    <style:style style:parent-style-name="1003" style:display-name="T107" style:family="text" style:name="1260">
      <style:paragraph-properties/>
    </style:style>
    <style:style style:parent-style-name="1003" style:display-name="T108" style:family="text" style:name="1261">
      <style:paragraph-properties/>
    </style:style>
    <style:style style:parent-style-name="1003" style:display-name="T109" style:family="text" style:name="1262">
      <style:paragraph-properties/>
    </style:style>
    <style:style style:parent-style-name="1003" style:display-name="T110" style:family="text" style:name="1263">
      <style:paragraph-properties/>
    </style:style>
    <style:style style:parent-style-name="1003" style:display-name="T111" style:family="text" style:name="1264">
      <style:paragraph-properties/>
    </style:style>
    <style:style style:parent-style-name="1003" style:display-name="T112" style:family="text" style:name="1265">
      <style:paragraph-properties/>
    </style:style>
    <style:style style:parent-style-name="1003" style:display-name="T113" style:family="text" style:name="1266">
      <style:paragraph-properties/>
    </style:style>
    <style:style style:parent-style-name="1003" style:display-name="T114" style:family="text" style:name="1267">
      <style:paragraph-properties/>
    </style:style>
    <style:style style:parent-style-name="1003" style:display-name="T115" style:family="text" style:name="1268">
      <style:paragraph-properties/>
    </style:style>
    <style:style style:parent-style-name="1003" style:display-name="T116" style:family="text" style:name="1269">
      <style:paragraph-properties/>
    </style:style>
    <style:style style:parent-style-name="1003" style:display-name="T117" style:family="text" style:name="1270">
      <style:paragraph-properties/>
    </style:style>
    <style:style style:parent-style-name="1003" style:display-name="T1" style:family="text" style:name="1271">
      <style:paragraph-properties/>
    </style:style>
    <style:style style:parent-style-name="1003" style:display-name="T2" style:family="text" style:name="1272">
      <style:paragraph-properties/>
    </style:style>
    <style:style style:parent-style-name="1003" style:display-name="T3" style:family="text" style:name="1273">
      <style:paragraph-properties/>
    </style:style>
    <style:style style:parent-style-name="1003" style:display-name="T4" style:family="text" style:name="1274">
      <style:paragraph-properties/>
    </style:style>
    <style:style style:parent-style-name="1003" style:display-name="T5" style:family="text" style:name="1275">
      <style:paragraph-properties/>
    </style:style>
    <style:style style:parent-style-name="1003" style:display-name="T6" style:family="text" style:name="1276">
      <style:paragraph-properties/>
    </style:style>
    <style:style style:parent-style-name="1003" style:display-name="T7" style:family="text" style:name="1277">
      <style:paragraph-properties/>
    </style:style>
    <style:style style:parent-style-name="1003" style:display-name="T8" style:family="text" style:name="1278">
      <style:paragraph-properties/>
    </style:style>
    <style:style style:parent-style-name="1003" style:display-name="T9" style:family="text" style:name="1279">
      <style:paragraph-properties/>
    </style:style>
    <style:style style:parent-style-name="1003" style:display-name="T10" style:family="text" style:name="1280">
      <style:paragraph-properties/>
    </style:style>
    <style:style style:parent-style-name="1003" style:display-name="T11" style:family="text" style:name="1281">
      <style:paragraph-properties/>
    </style:style>
    <style:style style:parent-style-name="1003" style:display-name="T12" style:family="text" style:name="1282">
      <style:paragraph-properties/>
    </style:style>
    <style:style style:parent-style-name="1003" style:display-name="T13" style:family="text" style:name="1283">
      <style:paragraph-properties/>
    </style:style>
    <style:style style:parent-style-name="1003" style:display-name="T14" style:family="text" style:name="1284">
      <style:paragraph-properties/>
    </style:style>
    <style:style style:parent-style-name="1003" style:display-name="T15" style:family="text" style:name="1285">
      <style:paragraph-properties/>
    </style:style>
    <style:style style:parent-style-name="1003" style:display-name="T16" style:family="text" style:name="1286">
      <style:paragraph-properties/>
    </style:style>
    <style:style style:parent-style-name="1003" style:display-name="T17" style:family="text" style:name="1287">
      <style:paragraph-properties/>
    </style:style>
    <style:style style:parent-style-name="1003" style:display-name="T18" style:family="text" style:name="1288">
      <style:paragraph-properties/>
    </style:style>
    <style:style style:parent-style-name="1003" style:display-name="T19" style:family="text" style:name="1289">
      <style:paragraph-properties/>
    </style:style>
    <style:style style:parent-style-name="1003" style:display-name="T20" style:family="text" style:name="1290">
      <style:paragraph-properties/>
    </style:style>
    <style:style style:parent-style-name="1003" style:display-name="T21" style:family="text" style:name="1291">
      <style:paragraph-properties/>
    </style:style>
    <style:style style:parent-style-name="1003" style:display-name="T22" style:family="text" style:name="1292">
      <style:paragraph-properties/>
    </style:style>
    <style:style style:parent-style-name="1003" style:display-name="T23" style:family="text" style:name="1293">
      <style:paragraph-properties/>
    </style:style>
    <style:style style:parent-style-name="1003" style:display-name="T24" style:family="text" style:name="1294">
      <style:paragraph-properties/>
    </style:style>
    <style:style style:parent-style-name="1003" style:display-name="T25" style:family="text" style:name="1295">
      <style:paragraph-properties/>
    </style:style>
    <style:style style:parent-style-name="1003" style:display-name="T26" style:family="text" style:name="1296">
      <style:paragraph-properties/>
    </style:style>
    <style:style style:parent-style-name="1003" style:display-name="T27" style:family="text" style:name="1297">
      <style:paragraph-properties/>
    </style:style>
    <style:style style:parent-style-name="1003" style:display-name="T28" style:family="text" style:name="1298">
      <style:paragraph-properties/>
    </style:style>
    <style:style style:parent-style-name="1003" style:display-name="T29" style:family="text" style:name="1299">
      <style:paragraph-properties/>
    </style:style>
    <style:style style:parent-style-name="1003" style:display-name="T30" style:family="text" style:name="1300">
      <style:paragraph-properties/>
    </style:style>
    <style:style style:parent-style-name="1003" style:display-name="T31" style:family="text" style:name="1301">
      <style:paragraph-properties/>
    </style:style>
    <style:style style:parent-style-name="1003" style:display-name="T32" style:family="text" style:name="1302">
      <style:paragraph-properties/>
    </style:style>
    <style:style style:parent-style-name="1003" style:display-name="T33" style:family="text" style:name="1303">
      <style:paragraph-properties/>
    </style:style>
    <style:style style:parent-style-name="1003" style:display-name="T34" style:family="text" style:name="1304">
      <style:paragraph-properties/>
    </style:style>
    <style:style style:parent-style-name="1003" style:display-name="T35" style:family="text" style:name="1305">
      <style:paragraph-properties/>
    </style:style>
    <style:style style:parent-style-name="1003" style:display-name="T36" style:family="text" style:name="1306">
      <style:paragraph-properties/>
    </style:style>
    <style:style style:parent-style-name="1003" style:display-name="T37" style:family="text" style:name="1307">
      <style:paragraph-properties/>
    </style:style>
    <style:style style:parent-style-name="1003" style:display-name="T38" style:family="text" style:name="1308">
      <style:paragraph-properties/>
    </style:style>
    <style:style style:parent-style-name="1003" style:display-name="T39" style:family="text" style:name="1309">
      <style:paragraph-properties/>
    </style:style>
    <style:style style:parent-style-name="1003" style:display-name="T40" style:family="text" style:name="1310">
      <style:paragraph-properties/>
    </style:style>
    <style:style style:parent-style-name="1003" style:display-name="T41" style:family="text" style:name="1311">
      <style:paragraph-properties/>
    </style:style>
    <style:style style:parent-style-name="1003" style:display-name="T42" style:family="text" style:name="1312">
      <style:paragraph-properties/>
    </style:style>
    <style:style style:parent-style-name="1003" style:display-name="T43" style:family="text" style:name="1313">
      <style:paragraph-properties/>
    </style:style>
    <style:style style:parent-style-name="1003" style:display-name="T44" style:family="text" style:name="1314">
      <style:paragraph-properties/>
    </style:style>
    <style:style style:parent-style-name="1003" style:display-name="T45" style:family="text" style:name="1315">
      <style:paragraph-properties/>
    </style:style>
    <style:style style:parent-style-name="1003" style:display-name="T46" style:family="text" style:name="1316">
      <style:paragraph-properties/>
    </style:style>
    <style:style style:parent-style-name="1003" style:display-name="T47" style:family="text" style:name="1317">
      <style:paragraph-properties/>
    </style:style>
    <style:style style:parent-style-name="1003" style:display-name="T48" style:family="text" style:name="1318">
      <style:paragraph-properties/>
    </style:style>
    <style:style style:parent-style-name="1003" style:display-name="T49" style:family="text" style:name="1319">
      <style:paragraph-properties/>
    </style:style>
    <style:style style:parent-style-name="1003" style:display-name="T50" style:family="text" style:name="1320">
      <style:paragraph-properties/>
    </style:style>
    <style:style style:parent-style-name="1003" style:display-name="T51" style:family="text" style:name="1321">
      <style:paragraph-properties/>
    </style:style>
    <style:style style:parent-style-name="1003" style:display-name="T52" style:family="text" style:name="1322">
      <style:paragraph-properties/>
    </style:style>
    <style:style style:parent-style-name="1003" style:display-name="T53" style:family="text" style:name="1323">
      <style:paragraph-properties/>
    </style:style>
    <style:style style:parent-style-name="1003" style:display-name="T54" style:family="text" style:name="1324">
      <style:paragraph-properties/>
    </style:style>
    <style:style style:parent-style-name="1003" style:display-name="T55" style:family="text" style:name="1325">
      <style:paragraph-properties/>
    </style:style>
    <style:style style:parent-style-name="1003" style:display-name="T56" style:family="text" style:name="1326">
      <style:paragraph-properties/>
    </style:style>
    <style:style style:parent-style-name="1003" style:display-name="T57" style:family="text" style:name="1327">
      <style:paragraph-properties/>
    </style:style>
    <style:style style:parent-style-name="1003" style:display-name="T58" style:family="text" style:name="1328">
      <style:paragraph-properties/>
    </style:style>
    <style:style style:parent-style-name="1003" style:display-name="T59" style:family="text" style:name="1329">
      <style:paragraph-properties/>
    </style:style>
    <style:style style:parent-style-name="1003" style:display-name="T60" style:family="text" style:name="1330">
      <style:paragraph-properties/>
    </style:style>
    <style:style style:parent-style-name="1003" style:display-name="T61" style:family="text" style:name="1331">
      <style:paragraph-properties/>
    </style:style>
    <style:style style:parent-style-name="1003" style:display-name="T62" style:family="text" style:name="1332">
      <style:paragraph-properties/>
    </style:style>
    <style:style style:parent-style-name="1003" style:display-name="T63" style:family="text" style:name="1333">
      <style:paragraph-properties/>
    </style:style>
    <style:style style:parent-style-name="1003" style:display-name="T64" style:family="text" style:name="1334">
      <style:paragraph-properties/>
    </style:style>
    <style:style style:parent-style-name="1003" style:display-name="T65" style:family="text" style:name="1335">
      <style:paragraph-properties/>
    </style:style>
    <style:style style:parent-style-name="1003" style:display-name="T66" style:family="text" style:name="1336">
      <style:paragraph-properties/>
    </style:style>
    <style:style style:parent-style-name="1003" style:display-name="T67" style:family="text" style:name="1337">
      <style:paragraph-properties/>
    </style:style>
    <style:style style:parent-style-name="1003" style:display-name="T68" style:family="text" style:name="1338">
      <style:paragraph-properties/>
    </style:style>
    <style:style style:parent-style-name="1003" style:display-name="T69" style:family="text" style:name="1339">
      <style:paragraph-properties/>
    </style:style>
    <style:style style:parent-style-name="1003" style:display-name="T70" style:family="text" style:name="1340">
      <style:paragraph-properties/>
    </style:style>
    <style:style style:parent-style-name="1003" style:display-name="T71" style:family="text" style:name="1341">
      <style:paragraph-properties/>
    </style:style>
    <style:style style:parent-style-name="1003" style:display-name="T72" style:family="text" style:name="1342">
      <style:paragraph-properties/>
    </style:style>
    <style:style style:parent-style-name="1003" style:display-name="T73" style:family="text" style:name="1343">
      <style:paragraph-properties/>
    </style:style>
    <style:style style:parent-style-name="1003" style:display-name="T74" style:family="text" style:name="1344">
      <style:paragraph-properties/>
    </style:style>
    <style:style style:parent-style-name="1003" style:display-name="T75" style:family="text" style:name="1345">
      <style:paragraph-properties/>
    </style:style>
    <style:style style:parent-style-name="1003" style:display-name="T76" style:family="text" style:name="1346">
      <style:paragraph-properties/>
    </style:style>
    <style:style style:parent-style-name="1003" style:display-name="T77" style:family="text" style:name="1347">
      <style:paragraph-properties/>
    </style:style>
    <style:style style:parent-style-name="1003" style:display-name="T78" style:family="text" style:name="1348">
      <style:paragraph-properties/>
    </style:style>
    <style:style style:parent-style-name="1003" style:display-name="T79" style:family="text" style:name="1349">
      <style:paragraph-properties/>
    </style:style>
    <style:style style:parent-style-name="1003" style:display-name="T80" style:family="text" style:name="1350">
      <style:paragraph-properties/>
    </style:style>
    <style:style style:parent-style-name="1003" style:display-name="T81" style:family="text" style:name="1351">
      <style:paragraph-properties/>
    </style:style>
    <style:style style:parent-style-name="1003" style:display-name="T82" style:family="text" style:name="1352">
      <style:paragraph-properties/>
    </style:style>
    <style:style style:parent-style-name="1003" style:display-name="T83" style:family="text" style:name="1353">
      <style:paragraph-properties/>
    </style:style>
    <style:style style:parent-style-name="1003" style:display-name="T84" style:family="text" style:name="1354">
      <style:paragraph-properties/>
    </style:style>
    <style:style style:parent-style-name="1003" style:display-name="T85" style:family="text" style:name="1355">
      <style:paragraph-properties/>
    </style:style>
    <style:style style:parent-style-name="1003" style:display-name="T86" style:family="text" style:name="1356">
      <style:paragraph-properties/>
    </style:style>
    <style:style style:parent-style-name="1003" style:display-name="T87" style:family="text" style:name="1357">
      <style:paragraph-properties/>
    </style:style>
    <style:style style:parent-style-name="1003" style:display-name="T88" style:family="text" style:name="1358">
      <style:paragraph-properties/>
    </style:style>
    <style:style style:parent-style-name="1003" style:display-name="T89" style:family="text" style:name="1359">
      <style:paragraph-properties/>
    </style:style>
    <style:style style:parent-style-name="1003" style:display-name="T90" style:family="text" style:name="1360">
      <style:paragraph-properties/>
    </style:style>
    <style:style style:parent-style-name="1003" style:display-name="T91" style:family="text" style:name="1361">
      <style:paragraph-properties/>
    </style:style>
    <style:style style:parent-style-name="1003" style:display-name="T92" style:family="text" style:name="1362">
      <style:paragraph-properties/>
    </style:style>
    <style:style style:parent-style-name="1003" style:display-name="T93" style:family="text" style:name="1363">
      <style:paragraph-properties/>
    </style:style>
    <style:style style:parent-style-name="1003" style:display-name="T94" style:family="text" style:name="1364">
      <style:paragraph-properties/>
    </style:style>
    <style:style style:parent-style-name="1003" style:display-name="T95" style:family="text" style:name="1365">
      <style:paragraph-properties/>
    </style:style>
    <style:style style:parent-style-name="1003" style:display-name="T96" style:family="text" style:name="1366">
      <style:paragraph-properties/>
    </style:style>
    <style:style style:parent-style-name="1003" style:display-name="T97" style:family="text" style:name="1367">
      <style:paragraph-properties/>
    </style:style>
    <style:style style:parent-style-name="1003" style:display-name="T98" style:family="text" style:name="1368">
      <style:paragraph-properties/>
    </style:style>
    <style:style style:parent-style-name="1003" style:display-name="T99" style:family="text" style:name="1369">
      <style:paragraph-properties/>
    </style:style>
    <style:style style:parent-style-name="1003" style:display-name="T100" style:family="text" style:name="1370">
      <style:paragraph-properties/>
    </style:style>
    <style:style style:parent-style-name="1003" style:display-name="T101" style:family="text" style:name="1371">
      <style:paragraph-properties/>
    </style:style>
    <style:style style:parent-style-name="1003" style:display-name="T102" style:family="text" style:name="1372">
      <style:paragraph-properties/>
    </style:style>
    <style:style style:parent-style-name="1003" style:display-name="T103" style:family="text" style:name="1373">
      <style:paragraph-properties/>
    </style:style>
    <style:style style:parent-style-name="1003" style:display-name="T104" style:family="text" style:name="1374">
      <style:paragraph-properties/>
    </style:style>
    <style:style style:parent-style-name="1003" style:display-name="T105" style:family="text" style:name="1375">
      <style:paragraph-properties/>
    </style:style>
    <style:style style:parent-style-name="1003" style:display-name="T106" style:family="text" style:name="1376">
      <style:paragraph-properties/>
    </style:style>
    <style:style style:parent-style-name="1003" style:display-name="T107" style:family="text" style:name="1377">
      <style:paragraph-properties/>
    </style:style>
    <style:style style:parent-style-name="1003" style:display-name="T108" style:family="text" style:name="1378">
      <style:paragraph-properties/>
    </style:style>
    <style:style style:parent-style-name="1003" style:display-name="T109" style:family="text" style:name="1379">
      <style:paragraph-properties/>
    </style:style>
    <style:style style:parent-style-name="1003" style:display-name="T110" style:family="text" style:name="1380">
      <style:paragraph-properties/>
    </style:style>
    <style:style style:parent-style-name="1003" style:display-name="T111" style:family="text" style:name="1381">
      <style:paragraph-properties/>
    </style:style>
    <style:style style:parent-style-name="1003" style:display-name="T112" style:family="text" style:name="1382">
      <style:paragraph-properties/>
    </style:style>
    <style:style style:parent-style-name="1003" style:display-name="T113" style:family="text" style:name="1383">
      <style:paragraph-properties/>
    </style:style>
    <style:style style:parent-style-name="1003" style:display-name="T114" style:family="text" style:name="1384">
      <style:paragraph-properties/>
    </style:style>
    <style:style style:parent-style-name="1003" style:display-name="T115" style:family="text" style:name="1385">
      <style:paragraph-properties/>
    </style:style>
    <style:style style:parent-style-name="1003" style:display-name="T116" style:family="text" style:name="1386">
      <style:paragraph-properties/>
    </style:style>
    <style:style style:parent-style-name="1003" style:display-name="T117" style:family="text" style:name="1387">
      <style:paragraph-properties/>
    </style:style>
    <style:style style:parent-style-name="1003" style:display-name="T118" style:family="text" style:name="1388">
      <style:paragraph-properties/>
    </style:style>
    <style:style style:parent-style-name="1003" style:display-name="T119" style:family="text" style:name="1389">
      <style:paragraph-properties/>
    </style:style>
    <style:style style:parent-style-name="1003" style:display-name="T120" style:family="text" style:name="1390">
      <style:paragraph-properties/>
    </style:style>
    <style:style style:parent-style-name="1003" style:display-name="T121" style:family="text" style:name="1391">
      <style:paragraph-properties/>
    </style:style>
    <style:style style:parent-style-name="1003" style:display-name="T122" style:family="text" style:name="1392">
      <style:paragraph-properties/>
    </style:style>
    <style:style style:parent-style-name="1003" style:display-name="T123" style:family="text" style:name="1393">
      <style:paragraph-properties/>
    </style:style>
    <style:style style:parent-style-name="1003" style:display-name="T124" style:family="text" style:name="1394">
      <style:paragraph-properties/>
    </style:style>
    <style:style style:parent-style-name="1003" style:display-name="T125" style:family="text" style:name="1395">
      <style:paragraph-properties/>
    </style:style>
    <style:style style:parent-style-name="1003" style:display-name="T126" style:family="text" style:name="1396">
      <style:paragraph-properties/>
    </style:style>
    <style:style style:parent-style-name="1003" style:display-name="T127" style:family="text" style:name="1397">
      <style:paragraph-properties/>
    </style:style>
    <style:style style:parent-style-name="1003" style:display-name="T128" style:family="text" style:name="1398">
      <style:paragraph-properties/>
    </style:style>
    <style:style style:parent-style-name="1003" style:display-name="T129" style:family="text" style:name="1399">
      <style:paragraph-properties/>
    </style:style>
    <style:style style:parent-style-name="1003" style:display-name="T130" style:family="text" style:name="1400">
      <style:paragraph-properties/>
    </style:style>
    <style:style style:parent-style-name="1003" style:display-name="T131" style:family="text" style:name="1401">
      <style:paragraph-properties/>
    </style:style>
    <style:style style:parent-style-name="1003" style:display-name="T132" style:family="text" style:name="1402">
      <style:paragraph-properties/>
    </style:style>
    <style:style style:parent-style-name="1003" style:display-name="T133" style:family="text" style:name="1403">
      <style:paragraph-properties/>
    </style:style>
    <style:style style:parent-style-name="1003" style:display-name="T134" style:family="text" style:name="1404">
      <style:paragraph-properties/>
    </style:style>
    <style:style style:parent-style-name="1003" style:display-name="T135" style:family="text" style:name="1405">
      <style:paragraph-properties/>
    </style:style>
    <style:style style:parent-style-name="1003" style:display-name="T136" style:family="text" style:name="1406">
      <style:paragraph-properties/>
    </style:style>
    <style:style style:parent-style-name="1003" style:display-name="T137" style:family="text" style:name="1407">
      <style:paragraph-properties/>
    </style:style>
    <style:style style:parent-style-name="1003" style:display-name="T138" style:family="text" style:name="1408">
      <style:paragraph-properties/>
    </style:style>
    <style:style style:parent-style-name="1003" style:display-name="T139" style:family="text" style:name="1409">
      <style:paragraph-properties/>
    </style:style>
    <style:style style:parent-style-name="1003" style:display-name="T140" style:family="text" style:name="1410">
      <style:paragraph-properties/>
    </style:style>
    <style:style style:parent-style-name="1003" style:display-name="T141" style:family="text" style:name="1411">
      <style:paragraph-properties/>
    </style:style>
    <style:style style:parent-style-name="1003" style:display-name="T142" style:family="text" style:name="1412">
      <style:paragraph-properties/>
    </style:style>
    <style:style style:parent-style-name="1003" style:display-name="T143" style:family="text" style:name="1413">
      <style:paragraph-properties/>
    </style:style>
    <style:style style:parent-style-name="1003" style:display-name="T144" style:family="text" style:name="1414">
      <style:paragraph-properties/>
    </style:style>
    <style:style style:parent-style-name="1003" style:display-name="T1" style:family="text" style:name="1415">
      <style:paragraph-properties/>
    </style:style>
    <style:style style:parent-style-name="1003" style:display-name="T2" style:family="text" style:name="1416">
      <style:paragraph-properties/>
    </style:style>
    <style:style style:parent-style-name="1003" style:display-name="T3" style:family="text" style:name="1417">
      <style:paragraph-properties/>
    </style:style>
    <style:style style:parent-style-name="1003" style:display-name="T4" style:family="text" style:name="1418">
      <style:paragraph-properties/>
    </style:style>
    <style:style style:parent-style-name="1003" style:display-name="T5" style:family="text" style:name="1419">
      <style:paragraph-properties/>
    </style:style>
    <style:style style:parent-style-name="1003" style:display-name="T6" style:family="text" style:name="1420">
      <style:paragraph-properties/>
    </style:style>
    <style:style style:parent-style-name="1003" style:display-name="T7" style:family="text" style:name="1421">
      <style:paragraph-properties/>
    </style:style>
    <style:style style:parent-style-name="1003" style:display-name="T8" style:family="text" style:name="1422">
      <style:paragraph-properties/>
    </style:style>
    <style:style style:parent-style-name="1003" style:display-name="T9" style:family="text" style:name="1423">
      <style:paragraph-properties/>
    </style:style>
    <style:style style:parent-style-name="1003" style:display-name="T10" style:family="text" style:name="1424">
      <style:paragraph-properties/>
    </style:style>
    <style:style style:parent-style-name="1003" style:display-name="T11" style:family="text" style:name="1425">
      <style:paragraph-properties/>
    </style:style>
    <style:style style:parent-style-name="1003" style:display-name="T12" style:family="text" style:name="1426">
      <style:paragraph-properties/>
    </style:style>
    <style:style style:parent-style-name="1003" style:display-name="T13" style:family="text" style:name="1427">
      <style:paragraph-properties/>
    </style:style>
    <style:style style:parent-style-name="1003" style:display-name="T14" style:family="text" style:name="1428">
      <style:paragraph-properties/>
    </style:style>
    <style:style style:parent-style-name="1003" style:display-name="T15" style:family="text" style:name="1429">
      <style:paragraph-properties/>
    </style:style>
    <style:style style:parent-style-name="1003" style:display-name="T16" style:family="text" style:name="1430">
      <style:paragraph-properties/>
    </style:style>
    <style:style style:parent-style-name="1003" style:display-name="T17" style:family="text" style:name="1431">
      <style:paragraph-properties/>
    </style:style>
    <style:style style:parent-style-name="1003" style:display-name="T18" style:family="text" style:name="1432">
      <style:paragraph-properties/>
    </style:style>
    <style:style style:parent-style-name="1003" style:display-name="T19" style:family="text" style:name="1433">
      <style:paragraph-properties/>
    </style:style>
    <style:style style:parent-style-name="1003" style:display-name="T20" style:family="text" style:name="1434">
      <style:paragraph-properties/>
    </style:style>
    <style:style style:parent-style-name="1003" style:display-name="T21" style:family="text" style:name="1435">
      <style:paragraph-properties/>
    </style:style>
    <style:style style:parent-style-name="1003" style:display-name="T22" style:family="text" style:name="1436">
      <style:paragraph-properties/>
    </style:style>
    <style:style style:parent-style-name="1003" style:display-name="T23" style:family="text" style:name="1437">
      <style:paragraph-properties/>
    </style:style>
    <style:style style:parent-style-name="1003" style:display-name="T24" style:family="text" style:name="1438">
      <style:paragraph-properties/>
    </style:style>
    <style:style style:parent-style-name="1003" style:display-name="T25" style:family="text" style:name="1439">
      <style:paragraph-properties/>
    </style:style>
    <style:style style:parent-style-name="1003" style:display-name="T26" style:family="text" style:name="1440">
      <style:paragraph-properties/>
    </style:style>
    <style:style style:parent-style-name="1003" style:display-name="T27" style:family="text" style:name="1441">
      <style:paragraph-properties/>
    </style:style>
    <style:style style:parent-style-name="1003" style:display-name="T28" style:family="text" style:name="1442">
      <style:paragraph-properties/>
    </style:style>
    <style:style style:parent-style-name="1003" style:display-name="T29" style:family="text" style:name="1443">
      <style:paragraph-properties/>
    </style:style>
    <style:style style:parent-style-name="1003" style:display-name="T30" style:family="text" style:name="1444">
      <style:paragraph-properties/>
    </style:style>
    <style:style style:parent-style-name="1003" style:display-name="T31" style:family="text" style:name="1445">
      <style:paragraph-properties/>
    </style:style>
    <style:style style:parent-style-name="1003" style:display-name="T32" style:family="text" style:name="1446">
      <style:paragraph-properties/>
    </style:style>
    <style:style style:parent-style-name="1003" style:display-name="T33" style:family="text" style:name="1447">
      <style:paragraph-properties/>
    </style:style>
    <style:style style:parent-style-name="1003" style:display-name="T34" style:family="text" style:name="1448">
      <style:paragraph-properties/>
    </style:style>
    <style:style style:parent-style-name="1003" style:display-name="T35" style:family="text" style:name="1449">
      <style:paragraph-properties/>
    </style:style>
    <style:style style:parent-style-name="1003" style:display-name="T36" style:family="text" style:name="1450">
      <style:paragraph-properties/>
    </style:style>
    <style:style style:parent-style-name="1003" style:display-name="T37" style:family="text" style:name="1451">
      <style:paragraph-properties/>
    </style:style>
    <style:style style:parent-style-name="1003" style:display-name="T38" style:family="text" style:name="1452">
      <style:paragraph-properties/>
    </style:style>
    <style:style style:parent-style-name="1003" style:display-name="T39" style:family="text" style:name="1453">
      <style:paragraph-properties/>
    </style:style>
    <style:style style:parent-style-name="1003" style:display-name="T40" style:family="text" style:name="1454">
      <style:paragraph-properties/>
    </style:style>
    <style:style style:parent-style-name="1003" style:display-name="T41" style:family="text" style:name="1455">
      <style:paragraph-properties/>
    </style:style>
    <style:style style:parent-style-name="1003" style:display-name="T42" style:family="text" style:name="1456">
      <style:paragraph-properties/>
    </style:style>
    <style:style style:parent-style-name="1003" style:display-name="T43" style:family="text" style:name="1457">
      <style:paragraph-properties/>
    </style:style>
    <style:style style:parent-style-name="1003" style:display-name="T44" style:family="text" style:name="1458">
      <style:paragraph-properties/>
    </style:style>
    <style:style style:parent-style-name="1003" style:display-name="T45" style:family="text" style:name="1459">
      <style:paragraph-properties/>
    </style:style>
    <style:style style:parent-style-name="1003" style:display-name="T46" style:family="text" style:name="1460">
      <style:paragraph-properties/>
    </style:style>
    <style:style style:parent-style-name="1003" style:display-name="T47" style:family="text" style:name="1461">
      <style:paragraph-properties/>
    </style:style>
    <style:style style:parent-style-name="1003" style:display-name="T48" style:family="text" style:name="1462">
      <style:paragraph-properties/>
    </style:style>
    <style:style style:parent-style-name="1003" style:display-name="T49" style:family="text" style:name="1463">
      <style:paragraph-properties/>
    </style:style>
    <style:style style:parent-style-name="1003" style:display-name="T50" style:family="text" style:name="1464">
      <style:paragraph-properties/>
    </style:style>
    <style:style style:parent-style-name="1003" style:display-name="T51" style:family="text" style:name="1465">
      <style:paragraph-properties/>
    </style:style>
    <style:style style:parent-style-name="1003" style:display-name="T52" style:family="text" style:name="1466">
      <style:paragraph-properties/>
    </style:style>
    <style:style style:parent-style-name="1003" style:display-name="T53" style:family="text" style:name="1467">
      <style:paragraph-properties/>
    </style:style>
    <style:style style:parent-style-name="1003" style:display-name="T54" style:family="text" style:name="1468">
      <style:paragraph-properties/>
    </style:style>
    <style:style style:parent-style-name="1003" style:display-name="T55" style:family="text" style:name="1469">
      <style:paragraph-properties/>
    </style:style>
    <style:style style:parent-style-name="1003" style:display-name="T56" style:family="text" style:name="1470">
      <style:paragraph-properties/>
    </style:style>
    <style:style style:parent-style-name="1003" style:display-name="T57" style:family="text" style:name="1471">
      <style:paragraph-properties/>
    </style:style>
    <style:style style:parent-style-name="1003" style:display-name="T58" style:family="text" style:name="1472">
      <style:paragraph-properties/>
    </style:style>
    <style:style style:parent-style-name="1003" style:display-name="T59" style:family="text" style:name="1473">
      <style:paragraph-properties/>
    </style:style>
    <style:style style:parent-style-name="1003" style:display-name="T60" style:family="text" style:name="1474">
      <style:paragraph-properties/>
    </style:style>
    <style:style style:parent-style-name="1003" style:display-name="T61" style:family="text" style:name="1475">
      <style:paragraph-properties/>
    </style:style>
    <style:style style:parent-style-name="1003" style:display-name="T62" style:family="text" style:name="1476">
      <style:paragraph-properties/>
    </style:style>
    <style:style style:parent-style-name="1003" style:display-name="T63" style:family="text" style:name="1477">
      <style:paragraph-properties/>
    </style:style>
    <style:style style:parent-style-name="1003" style:display-name="T64" style:family="text" style:name="1478">
      <style:paragraph-properties/>
    </style:style>
    <style:style style:parent-style-name="1003" style:display-name="T65" style:family="text" style:name="1479">
      <style:paragraph-properties/>
    </style:style>
    <style:style style:parent-style-name="1003" style:display-name="T66" style:family="text" style:name="1480">
      <style:paragraph-properties/>
    </style:style>
    <style:style style:parent-style-name="1003" style:display-name="T67" style:family="text" style:name="1481">
      <style:paragraph-properties/>
    </style:style>
    <style:style style:parent-style-name="1003" style:display-name="T68" style:family="text" style:name="1482">
      <style:paragraph-properties/>
    </style:style>
    <style:style style:parent-style-name="1003" style:display-name="T69" style:family="text" style:name="1483">
      <style:paragraph-properties/>
    </style:style>
    <style:style style:parent-style-name="1003" style:display-name="T70" style:family="text" style:name="1484">
      <style:paragraph-properties/>
    </style:style>
    <style:style style:parent-style-name="1003" style:display-name="T71" style:family="text" style:name="1485">
      <style:paragraph-properties/>
    </style:style>
    <style:style style:parent-style-name="1003" style:display-name="T72" style:family="text" style:name="1486">
      <style:paragraph-properties/>
    </style:style>
    <style:style style:parent-style-name="1003" style:display-name="T73" style:family="text" style:name="1487">
      <style:paragraph-properties/>
    </style:style>
    <style:style style:parent-style-name="1003" style:display-name="T74" style:family="text" style:name="1488">
      <style:paragraph-properties/>
    </style:style>
    <style:style style:parent-style-name="1003" style:display-name="T75" style:family="text" style:name="1489">
      <style:paragraph-properties/>
    </style:style>
    <style:style style:parent-style-name="1003" style:display-name="T76" style:family="text" style:name="1490">
      <style:paragraph-properties/>
    </style:style>
    <style:style style:parent-style-name="1003" style:display-name="T77" style:family="text" style:name="1491">
      <style:paragraph-properties/>
    </style:style>
    <style:style style:parent-style-name="1003" style:display-name="T78" style:family="text" style:name="1492">
      <style:paragraph-properties/>
    </style:style>
    <style:style style:parent-style-name="1003" style:display-name="T79" style:family="text" style:name="1493">
      <style:paragraph-properties/>
    </style:style>
    <style:style style:parent-style-name="1003" style:display-name="T80" style:family="text" style:name="1494">
      <style:paragraph-properties/>
    </style:style>
    <style:style style:parent-style-name="1003" style:display-name="T81" style:family="text" style:name="1495">
      <style:paragraph-properties/>
    </style:style>
    <style:style style:parent-style-name="1003" style:display-name="T82" style:family="text" style:name="1496">
      <style:paragraph-properties/>
    </style:style>
    <style:style style:parent-style-name="1003" style:display-name="T83" style:family="text" style:name="1497">
      <style:paragraph-properties/>
    </style:style>
    <style:style style:parent-style-name="1003" style:display-name="T84" style:family="text" style:name="1498">
      <style:paragraph-properties/>
    </style:style>
    <style:style style:parent-style-name="1003" style:display-name="T85" style:family="text" style:name="1499">
      <style:paragraph-properties/>
    </style:style>
    <style:style style:parent-style-name="1003" style:display-name="T86" style:family="text" style:name="1500">
      <style:paragraph-properties/>
    </style:style>
    <style:style style:parent-style-name="1003" style:display-name="T87" style:family="text" style:name="1501">
      <style:paragraph-properties/>
    </style:style>
    <style:style style:parent-style-name="1003" style:display-name="T88" style:family="text" style:name="1502">
      <style:paragraph-properties/>
    </style:style>
    <style:style style:parent-style-name="1003" style:display-name="T89" style:family="text" style:name="1503">
      <style:paragraph-properties/>
    </style:style>
    <style:style style:parent-style-name="1003" style:display-name="T90" style:family="text" style:name="1504">
      <style:paragraph-properties/>
    </style:style>
    <style:style style:parent-style-name="1003" style:display-name="T91" style:family="text" style:name="1505">
      <style:paragraph-properties/>
    </style:style>
    <style:style style:parent-style-name="1003" style:display-name="T92" style:family="text" style:name="1506">
      <style:paragraph-properties/>
    </style:style>
    <style:style style:parent-style-name="1003" style:display-name="T93" style:family="text" style:name="1507">
      <style:paragraph-properties/>
    </style:style>
    <style:style style:parent-style-name="1003" style:display-name="T94" style:family="text" style:name="1508">
      <style:paragraph-properties/>
    </style:style>
    <style:style style:parent-style-name="1003" style:display-name="T95" style:family="text" style:name="1509">
      <style:paragraph-properties/>
    </style:style>
    <style:style style:parent-style-name="1003" style:display-name="T96" style:family="text" style:name="1510">
      <style:paragraph-properties/>
    </style:style>
    <style:style style:parent-style-name="1003" style:display-name="T97" style:family="text" style:name="1511">
      <style:paragraph-properties/>
    </style:style>
    <style:style style:parent-style-name="1003" style:display-name="T98" style:family="text" style:name="1512">
      <style:paragraph-properties/>
    </style:style>
    <style:style style:parent-style-name="1003" style:display-name="T99" style:family="text" style:name="1513">
      <style:paragraph-properties/>
    </style:style>
    <style:style style:parent-style-name="1003" style:display-name="T100" style:family="text" style:name="1514">
      <style:paragraph-properties/>
    </style:style>
    <style:style style:parent-style-name="1003" style:display-name="T101" style:family="text" style:name="1515">
      <style:paragraph-properties/>
    </style:style>
    <style:style style:parent-style-name="1003" style:display-name="T102" style:family="text" style:name="1516">
      <style:paragraph-properties/>
    </style:style>
    <style:style style:parent-style-name="1003" style:display-name="T103" style:family="text" style:name="1517">
      <style:paragraph-properties/>
    </style:style>
    <style:style style:parent-style-name="1003" style:display-name="T104" style:family="text" style:name="1518">
      <style:paragraph-properties/>
    </style:style>
    <style:style style:parent-style-name="1003" style:display-name="T105" style:family="text" style:name="1519">
      <style:paragraph-properties/>
    </style:style>
    <style:style style:parent-style-name="1003" style:display-name="T106" style:family="text" style:name="1520">
      <style:paragraph-properties/>
    </style:style>
    <style:style style:parent-style-name="1003" style:display-name="T107" style:family="text" style:name="1521">
      <style:paragraph-properties/>
    </style:style>
    <style:style style:parent-style-name="1003" style:display-name="T108" style:family="text" style:name="1522">
      <style:paragraph-properties/>
    </style:style>
    <style:style style:parent-style-name="1003" style:display-name="T109" style:family="text" style:name="1523">
      <style:paragraph-properties/>
    </style:style>
    <style:style style:parent-style-name="1003" style:display-name="T110" style:family="text" style:name="1524">
      <style:paragraph-properties/>
    </style:style>
    <style:style style:parent-style-name="1003" style:display-name="T111" style:family="text" style:name="1525">
      <style:paragraph-properties/>
    </style:style>
    <style:style style:parent-style-name="1003" style:display-name="T112" style:family="text" style:name="1526">
      <style:paragraph-properties/>
    </style:style>
    <style:style style:parent-style-name="1003" style:display-name="T113" style:family="text" style:name="1527">
      <style:paragraph-properties/>
    </style:style>
    <style:style style:parent-style-name="1003" style:display-name="T114" style:family="text" style:name="1528">
      <style:paragraph-properties/>
    </style:style>
    <style:style style:parent-style-name="1003" style:display-name="T115" style:family="text" style:name="1529">
      <style:paragraph-properties/>
    </style:style>
    <style:style style:parent-style-name="1003" style:display-name="T116" style:family="text" style:name="1530">
      <style:paragraph-properties/>
    </style:style>
    <style:style style:parent-style-name="1003" style:display-name="T117" style:family="text" style:name="1531">
      <style:paragraph-properties/>
    </style:style>
    <style:style style:parent-style-name="1003" style:display-name="T118" style:family="text" style:name="1532">
      <style:paragraph-properties/>
    </style:style>
    <style:style style:parent-style-name="1003" style:display-name="T119" style:family="text" style:name="1533">
      <style:paragraph-properties/>
    </style:style>
    <style:style style:parent-style-name="1003" style:display-name="T120" style:family="text" style:name="1534">
      <style:paragraph-properties/>
    </style:style>
    <style:style style:parent-style-name="1003" style:display-name="T121" style:family="text" style:name="1535">
      <style:paragraph-properties/>
    </style:style>
    <style:style style:parent-style-name="1003" style:display-name="T122" style:family="text" style:name="1536">
      <style:paragraph-properties/>
    </style:style>
    <style:style style:parent-style-name="1003" style:display-name="T123" style:family="text" style:name="1537">
      <style:paragraph-properties/>
    </style:style>
    <style:style style:parent-style-name="1003" style:display-name="T124" style:family="text" style:name="1538">
      <style:paragraph-properties/>
    </style:style>
    <style:style style:parent-style-name="1003" style:display-name="T125" style:family="text" style:name="1539">
      <style:paragraph-properties/>
    </style:style>
    <style:style style:parent-style-name="1003" style:display-name="T126" style:family="text" style:name="1540">
      <style:paragraph-properties/>
    </style:style>
    <style:style style:parent-style-name="1003" style:display-name="T127" style:family="text" style:name="1541">
      <style:paragraph-properties/>
    </style:style>
    <style:style style:parent-style-name="1003" style:display-name="T128" style:family="text" style:name="1542">
      <style:paragraph-properties/>
    </style:style>
    <style:style style:parent-style-name="1003" style:display-name="T129" style:family="text" style:name="1543">
      <style:paragraph-properties/>
    </style:style>
    <style:style style:parent-style-name="1003" style:display-name="T130" style:family="text" style:name="1544">
      <style:paragraph-properties/>
    </style:style>
    <style:style style:parent-style-name="1003" style:display-name="T131" style:family="text" style:name="1545">
      <style:paragraph-properties/>
    </style:style>
    <style:style style:parent-style-name="1003" style:display-name="T132" style:family="text" style:name="1546">
      <style:paragraph-properties/>
    </style:style>
    <style:style style:parent-style-name="1003" style:display-name="T133" style:family="text" style:name="1547">
      <style:paragraph-properties/>
    </style:style>
    <style:style style:parent-style-name="1003" style:display-name="T134" style:family="text" style:name="1548">
      <style:paragraph-properties/>
    </style:style>
    <style:style style:parent-style-name="1003" style:display-name="T135" style:family="text" style:name="1549">
      <style:paragraph-properties/>
    </style:style>
    <style:style style:parent-style-name="1003" style:display-name="T136" style:family="text" style:name="1550">
      <style:paragraph-properties/>
    </style:style>
    <style:style style:parent-style-name="1003" style:display-name="T137" style:family="text" style:name="1551">
      <style:paragraph-properties/>
    </style:style>
    <style:style style:parent-style-name="1003" style:display-name="T138" style:family="text" style:name="1552">
      <style:paragraph-properties/>
    </style:style>
    <style:style style:parent-style-name="1003" style:display-name="T139" style:family="text" style:name="1553">
      <style:paragraph-properties/>
    </style:style>
    <style:style style:parent-style-name="1003" style:display-name="T140" style:family="text" style:name="1554">
      <style:paragraph-properties/>
    </style:style>
    <style:style style:parent-style-name="1003" style:display-name="T141" style:family="text" style:name="1555">
      <style:paragraph-properties/>
    </style:style>
    <style:style style:parent-style-name="1003" style:display-name="T142" style:family="text" style:name="1556">
      <style:paragraph-properties/>
    </style:style>
    <style:style style:parent-style-name="1003" style:display-name="T143" style:family="text" style:name="1557">
      <style:paragraph-properties/>
    </style:style>
    <style:style style:parent-style-name="1003" style:display-name="T144" style:family="text" style:name="1558">
      <style:paragraph-properties/>
    </style:style>
    <style:style style:parent-style-name="1003" style:display-name="T145" style:family="text" style:name="1559">
      <style:paragraph-properties/>
    </style:style>
    <style:style style:parent-style-name="1003" style:display-name="T146" style:family="text" style:name="1560">
      <style:paragraph-properties/>
      <style:text-properties fo:font-family="Courier New" style:font-family-complex="Courier New"/>
    </style:style>
    <style:style style:parent-style-name="1003" style:display-name="T147" style:family="text" style:name="1561">
      <style:paragraph-properties/>
      <style:text-properties fo:font-family="Wingdings" style:font-family-complex="Wingdings"/>
    </style:style>
    <style:style style:parent-style-name="1003" style:display-name="T148" style:family="text" style:name="1562">
      <style:paragraph-properties/>
      <style:text-properties fo:font-family="Symbol" style:font-family-complex="Symbol"/>
    </style:style>
    <style:style style:parent-style-name="1003" style:display-name="T149" style:family="text" style:name="1563">
      <style:paragraph-properties/>
      <style:text-properties fo:font-family="Courier New" style:font-family-complex="Courier New"/>
    </style:style>
    <style:style style:parent-style-name="1003" style:display-name="T150" style:family="text" style:name="1564">
      <style:paragraph-properties/>
      <style:text-properties fo:font-family="Wingdings" style:font-family-complex="Wingdings"/>
    </style:style>
    <style:style style:parent-style-name="1003" style:display-name="T151" style:family="text" style:name="1565">
      <style:paragraph-properties/>
      <style:text-properties fo:font-family="Symbol" style:font-family-complex="Symbol"/>
    </style:style>
    <style:style style:parent-style-name="1003" style:display-name="T152" style:family="text" style:name="1566">
      <style:paragraph-properties/>
      <style:text-properties fo:font-family="Courier New" style:font-family-complex="Courier New"/>
    </style:style>
    <style:style style:parent-style-name="1003" style:display-name="T153" style:family="text" style:name="1567">
      <style:paragraph-properties/>
      <style:text-properties fo:font-family="Wingdings" style:font-family-complex="Wingdings"/>
    </style:style>
    <style:style style:parent-style-name="1003" style:display-name="T154" style:family="text" style:name="1568">
      <style:paragraph-properties/>
      <style:text-properties fo:font-family="Symbol" style:font-family-complex="Symbol"/>
    </style:style>
    <style:style style:parent-style-name="1003" style:display-name="T155" style:family="text" style:name="1569">
      <style:paragraph-properties/>
      <style:text-properties fo:font-family="Courier New" style:font-family-complex="Courier New"/>
    </style:style>
    <style:style style:parent-style-name="1003" style:display-name="T156" style:family="text" style:name="1570">
      <style:paragraph-properties/>
      <style:text-properties fo:font-family="Wingdings" style:font-family-complex="Wingdings"/>
    </style:style>
    <style:style style:parent-style-name="1003" style:display-name="T157" style:family="text" style:name="1571">
      <style:paragraph-properties/>
      <style:text-properties fo:font-family="Symbol" style:font-family-complex="Symbol"/>
    </style:style>
    <style:style style:parent-style-name="1003" style:display-name="T158" style:family="text" style:name="1572">
      <style:paragraph-properties/>
      <style:text-properties fo:font-family="Courier New" style:font-family-complex="Courier New"/>
    </style:style>
    <style:style style:parent-style-name="1003" style:display-name="T159" style:family="text" style:name="1573">
      <style:paragraph-properties/>
      <style:text-properties fo:font-family="Wingdings" style:font-family-complex="Wingdings"/>
    </style:style>
    <style:style style:parent-style-name="1003" style:display-name="T160" style:family="text" style:name="1574">
      <style:paragraph-properties/>
      <style:text-properties fo:font-family="Symbol" style:font-family-complex="Symbol"/>
    </style:style>
    <style:style style:parent-style-name="1003" style:display-name="T161" style:family="text" style:name="1575">
      <style:paragraph-properties/>
      <style:text-properties fo:font-family="Courier New" style:font-family-complex="Courier New"/>
    </style:style>
    <style:style style:parent-style-name="1003" style:display-name="T162" style:family="text" style:name="1576">
      <style:paragraph-properties/>
      <style:text-properties fo:font-family="Wingdings" style:font-family-complex="Wingdings"/>
    </style:style>
    <style:style style:parent-style-name="1003" style:display-name="T163" style:family="text" style:name="1577">
      <style:paragraph-properties/>
      <style:text-properties fo:font-family="Symbol" style:font-family-complex="Symbol" fo:font-weight="bold"/>
    </style:style>
    <style:style style:parent-style-name="1003" style:display-name="T164" style:family="text" style:name="1578">
      <style:paragraph-properties/>
      <style:text-properties fo:font-family="Symbol" style:font-family-complex="Symbol"/>
    </style:style>
    <style:style style:parent-style-name="1003" style:display-name="T165" style:family="text" style:name="1579">
      <style:paragraph-properties/>
      <style:text-properties fo:font-family="Wingdings" style:font-family-complex="Wingdings"/>
    </style:style>
    <style:style style:parent-style-name="1003" style:display-name="T166" style:family="text" style:name="1580">
      <style:paragraph-properties/>
      <style:text-properties fo:font-family="Symbol" style:font-family-complex="Symbol"/>
    </style:style>
    <style:style style:parent-style-name="1003" style:display-name="T167" style:family="text" style:name="1581">
      <style:paragraph-properties/>
      <style:text-properties fo:font-family="Courier New" style:font-family-complex="Courier New"/>
    </style:style>
    <style:style style:parent-style-name="1003" style:display-name="T168" style:family="text" style:name="1582">
      <style:paragraph-properties/>
      <style:text-properties fo:font-family="Wingdings" style:font-family-complex="Wingdings"/>
    </style:style>
    <style:style style:parent-style-name="1003" style:display-name="T169" style:family="text" style:name="1583">
      <style:paragraph-properties/>
      <style:text-properties fo:font-family="Symbol" style:font-family-complex="Symbol"/>
    </style:style>
    <style:style style:parent-style-name="1003" style:display-name="T170" style:family="text" style:name="1584">
      <style:paragraph-properties/>
      <style:text-properties fo:font-family="Courier New" style:font-family-complex="Courier New"/>
    </style:style>
    <style:style style:parent-style-name="1003" style:display-name="T171" style:family="text" style:name="1585">
      <style:paragraph-properties/>
      <style:text-properties fo:font-family="Wingdings" style:font-family-complex="Wingdings"/>
    </style:style>
    <style:style style:parent-style-name="1003" style:display-name="T172" style:family="text" style:name="1586">
      <style:paragraph-properties/>
      <style:text-properties fo:font-family="Symbol" style:font-family-complex="Symbol"/>
    </style:style>
    <style:style style:parent-style-name="1003" style:display-name="T173" style:family="text" style:name="1587">
      <style:paragraph-properties/>
      <style:text-properties fo:font-family="Courier New" style:font-family-complex="Courier New"/>
    </style:style>
    <style:style style:parent-style-name="1003" style:display-name="T174" style:family="text" style:name="1588">
      <style:paragraph-properties/>
      <style:text-properties fo:font-family="Wingdings" style:font-family-complex="Wingdings"/>
    </style:style>
    <style:style style:parent-style-name="1003" style:display-name="T175" style:family="text" style:name="1589">
      <style:paragraph-properties/>
      <style:text-properties fo:font-family="Symbol" style:font-family-complex="Symbol"/>
    </style:style>
    <style:style style:parent-style-name="1003" style:display-name="T176" style:family="text" style:name="1590">
      <style:paragraph-properties/>
      <style:text-properties fo:font-family="Courier New" style:font-family-complex="Courier New"/>
    </style:style>
    <style:style style:parent-style-name="1003" style:display-name="T177" style:family="text" style:name="1591">
      <style:paragraph-properties/>
      <style:text-properties fo:font-family="Wingdings" style:font-family-complex="Wingdings"/>
    </style:style>
    <style:style style:parent-style-name="1003" style:display-name="T178" style:family="text" style:name="1592">
      <style:paragraph-properties/>
      <style:text-properties fo:font-family="Symbol" style:font-family-complex="Symbol"/>
    </style:style>
    <style:style style:parent-style-name="1003" style:display-name="T179" style:family="text" style:name="1593">
      <style:paragraph-properties/>
      <style:text-properties fo:font-family="Courier New" style:font-family-complex="Courier New"/>
    </style:style>
    <style:style style:parent-style-name="1003" style:display-name="T180" style:family="text" style:name="1594">
      <style:paragraph-properties/>
      <style:text-properties fo:font-family="Wingdings" style:font-family-complex="Wingdings"/>
    </style:style>
    <style:style style:parent-style-name="1003" style:display-name="T181" style:family="text" style:name="1595">
      <style:paragraph-properties/>
      <style:text-properties fo:font-family="Symbol" style:font-family-complex="Symbol"/>
    </style:style>
    <style:style style:parent-style-name="1003" style:display-name="T182" style:family="text" style:name="1596">
      <style:paragraph-properties/>
    </style:style>
    <style:style style:parent-style-name="1003" style:display-name="T183" style:family="text" style:name="1597">
      <style:paragraph-properties/>
      <style:text-properties fo:font-family="Wingdings" style:font-family-complex="Wingdings"/>
    </style:style>
    <style:style style:parent-style-name="1003" style:display-name="T184" style:family="text" style:name="1598">
      <style:paragraph-properties/>
      <style:text-properties fo:font-family="Symbol" style:font-family-complex="Symbol"/>
    </style:style>
    <style:style style:parent-style-name="1003" style:display-name="T185" style:family="text" style:name="1599">
      <style:paragraph-properties/>
      <style:text-properties fo:font-family="Courier New" style:font-family-complex="Courier New"/>
    </style:style>
    <style:style style:parent-style-name="1003" style:display-name="T186" style:family="text" style:name="1600">
      <style:paragraph-properties/>
      <style:text-properties fo:font-family="Wingdings" style:font-family-complex="Wingdings"/>
    </style:style>
    <style:style style:parent-style-name="1003" style:display-name="T187" style:family="text" style:name="1601">
      <style:paragraph-properties/>
      <style:text-properties fo:font-family="Symbol" style:font-family-complex="Symbol"/>
    </style:style>
    <style:style style:parent-style-name="1003" style:display-name="T188" style:family="text" style:name="1602">
      <style:paragraph-properties/>
      <style:text-properties fo:font-family="Courier New" style:font-family-complex="Courier New"/>
    </style:style>
    <style:style style:parent-style-name="1003" style:display-name="T189" style:family="text" style:name="1603">
      <style:paragraph-properties/>
      <style:text-properties fo:font-family="Wingdings" style:font-family-complex="Wingdings"/>
    </style:style>
    <style:style style:parent-style-name="1003" style:display-name="T190" style:family="text" style:name="1604">
      <style:paragraph-properties/>
      <style:text-properties fo:font-family="Symbol" style:font-family-complex="Symbol"/>
    </style:style>
    <style:style style:parent-style-name="1003" style:display-name="T191" style:family="text" style:name="1605">
      <style:paragraph-properties/>
    </style:style>
    <style:style style:parent-style-name="1003" style:display-name="T192" style:family="text" style:name="1606">
      <style:paragraph-properties/>
      <style:text-properties fo:font-family="Wingdings" style:font-family-complex="Wingdings"/>
    </style:style>
    <style:style style:parent-style-name="1003" style:display-name="T193" style:family="text" style:name="1607">
      <style:paragraph-properties/>
      <style:text-properties fo:font-family="Symbol" style:font-family-complex="Symbol"/>
    </style:style>
    <style:style style:parent-style-name="1003" style:display-name="T194" style:family="text" style:name="1608">
      <style:paragraph-properties/>
      <style:text-properties fo:font-family="Courier New" style:font-family-complex="Courier New"/>
    </style:style>
    <style:style style:parent-style-name="1003" style:display-name="T195" style:family="text" style:name="1609">
      <style:paragraph-properties/>
      <style:text-properties fo:font-family="Wingdings" style:font-family-complex="Wingdings"/>
    </style:style>
    <style:style style:parent-style-name="1003" style:display-name="T196" style:family="text" style:name="1610">
      <style:paragraph-properties/>
      <style:text-properties fo:font-family="Symbol" style:font-family-complex="Symbol"/>
    </style:style>
    <style:style style:parent-style-name="1003" style:display-name="T197" style:family="text" style:name="1611">
      <style:paragraph-properties/>
      <style:text-properties fo:font-family="Courier New" style:font-family-complex="Courier New"/>
    </style:style>
    <style:style style:parent-style-name="1003" style:display-name="T198" style:family="text" style:name="1612">
      <style:paragraph-properties/>
      <style:text-properties fo:font-family="Wingdings" style:font-family-complex="Wingdings"/>
    </style:style>
    <style:style style:parent-style-name="1003" style:display-name="T1" style:family="text" style:name="1613">
      <style:paragraph-properties/>
    </style:style>
    <style:style style:parent-style-name="1003" style:display-name="T2" style:family="text" style:name="1614">
      <style:paragraph-properties/>
    </style:style>
    <style:style style:parent-style-name="1003" style:display-name="T3" style:family="text" style:name="1615">
      <style:paragraph-properties/>
    </style:style>
    <style:style style:parent-style-name="1003" style:display-name="T4" style:family="text" style:name="1616">
      <style:paragraph-properties/>
    </style:style>
    <style:style style:parent-style-name="1003" style:display-name="T5" style:family="text" style:name="1617">
      <style:paragraph-properties/>
    </style:style>
    <style:style style:parent-style-name="1003" style:display-name="T6" style:family="text" style:name="1618">
      <style:paragraph-properties/>
    </style:style>
    <style:style style:parent-style-name="1003" style:display-name="T7" style:family="text" style:name="1619">
      <style:paragraph-properties/>
    </style:style>
    <style:style style:parent-style-name="1003" style:display-name="T8" style:family="text" style:name="1620">
      <style:paragraph-properties/>
    </style:style>
    <style:style style:parent-style-name="1003" style:display-name="T9" style:family="text" style:name="1621">
      <style:paragraph-properties/>
    </style:style>
    <style:style style:parent-style-name="1003" style:display-name="T10" style:family="text" style:name="1622">
      <style:paragraph-properties/>
    </style:style>
    <style:style style:parent-style-name="1003" style:display-name="T11" style:family="text" style:name="1623">
      <style:paragraph-properties/>
    </style:style>
    <style:style style:parent-style-name="1003" style:display-name="T12" style:family="text" style:name="1624">
      <style:paragraph-properties/>
    </style:style>
    <style:style style:parent-style-name="1003" style:display-name="T13" style:family="text" style:name="1625">
      <style:paragraph-properties/>
    </style:style>
    <style:style style:parent-style-name="1003" style:display-name="T14" style:family="text" style:name="1626">
      <style:paragraph-properties/>
    </style:style>
    <style:style style:parent-style-name="1003" style:display-name="T15" style:family="text" style:name="1627">
      <style:paragraph-properties/>
    </style:style>
    <style:style style:parent-style-name="1003" style:display-name="T16" style:family="text" style:name="1628">
      <style:paragraph-properties/>
    </style:style>
    <style:style style:parent-style-name="1003" style:display-name="T17" style:family="text" style:name="1629">
      <style:paragraph-properties/>
    </style:style>
    <style:style style:parent-style-name="1003" style:display-name="T18" style:family="text" style:name="1630">
      <style:paragraph-properties/>
    </style:style>
    <style:style style:parent-style-name="1003" style:display-name="T19" style:family="text" style:name="1631">
      <style:paragraph-properties/>
    </style:style>
    <style:style style:parent-style-name="1003" style:display-name="T20" style:family="text" style:name="1632">
      <style:paragraph-properties/>
    </style:style>
    <style:style style:parent-style-name="1003" style:display-name="T21" style:family="text" style:name="1633">
      <style:paragraph-properties/>
    </style:style>
    <style:style style:parent-style-name="1003" style:display-name="T22" style:family="text" style:name="1634">
      <style:paragraph-properties/>
    </style:style>
    <style:style style:parent-style-name="1003" style:display-name="T23" style:family="text" style:name="1635">
      <style:paragraph-properties/>
    </style:style>
    <style:style style:parent-style-name="1003" style:display-name="T24" style:family="text" style:name="1636">
      <style:paragraph-properties/>
    </style:style>
    <style:style style:parent-style-name="1003" style:display-name="T25" style:family="text" style:name="1637">
      <style:paragraph-properties/>
    </style:style>
    <style:style style:parent-style-name="1003" style:display-name="T26" style:family="text" style:name="1638">
      <style:paragraph-properties/>
    </style:style>
    <style:style style:parent-style-name="1003" style:display-name="T27" style:family="text" style:name="1639">
      <style:paragraph-properties/>
    </style:style>
    <style:style style:parent-style-name="1003" style:display-name="T28" style:family="text" style:name="1640">
      <style:paragraph-properties/>
    </style:style>
    <style:style style:parent-style-name="1003" style:display-name="T29" style:family="text" style:name="1641">
      <style:paragraph-properties/>
    </style:style>
    <style:style style:parent-style-name="1003" style:display-name="T30" style:family="text" style:name="1642">
      <style:paragraph-properties/>
    </style:style>
    <style:style style:parent-style-name="1003" style:display-name="T31" style:family="text" style:name="1643">
      <style:paragraph-properties/>
    </style:style>
    <style:style style:parent-style-name="1003" style:display-name="T32" style:family="text" style:name="1644">
      <style:paragraph-properties/>
    </style:style>
    <style:style style:parent-style-name="1003" style:display-name="T33" style:family="text" style:name="1645">
      <style:paragraph-properties/>
    </style:style>
    <style:style style:parent-style-name="1003" style:display-name="T34" style:family="text" style:name="1646">
      <style:paragraph-properties/>
    </style:style>
    <style:style style:parent-style-name="1003" style:display-name="T35" style:family="text" style:name="1647">
      <style:paragraph-properties/>
    </style:style>
    <style:style style:parent-style-name="1003" style:display-name="T36" style:family="text" style:name="1648">
      <style:paragraph-properties/>
    </style:style>
    <style:style style:parent-style-name="1003" style:display-name="T37" style:family="text" style:name="1649">
      <style:paragraph-properties/>
    </style:style>
    <style:style style:parent-style-name="1003" style:display-name="T38" style:family="text" style:name="1650">
      <style:paragraph-properties/>
    </style:style>
    <style:style style:parent-style-name="1003" style:display-name="T39" style:family="text" style:name="1651">
      <style:paragraph-properties/>
    </style:style>
    <style:style style:parent-style-name="1003" style:display-name="T40" style:family="text" style:name="1652">
      <style:paragraph-properties/>
    </style:style>
    <style:style style:parent-style-name="1003" style:display-name="T41" style:family="text" style:name="1653">
      <style:paragraph-properties/>
    </style:style>
    <style:style style:parent-style-name="1003" style:display-name="T42" style:family="text" style:name="1654">
      <style:paragraph-properties/>
    </style:style>
    <style:style style:parent-style-name="1003" style:display-name="T43" style:family="text" style:name="1655">
      <style:paragraph-properties/>
    </style:style>
    <style:style style:parent-style-name="1003" style:display-name="T44" style:family="text" style:name="1656">
      <style:paragraph-properties/>
    </style:style>
    <style:style style:parent-style-name="1003" style:display-name="T45" style:family="text" style:name="1657">
      <style:paragraph-properties/>
    </style:style>
    <style:style style:parent-style-name="1003" style:display-name="T46" style:family="text" style:name="1658">
      <style:paragraph-properties/>
    </style:style>
    <style:style style:parent-style-name="1003" style:display-name="T47" style:family="text" style:name="1659">
      <style:paragraph-properties/>
    </style:style>
    <style:style style:parent-style-name="1003" style:display-name="T48" style:family="text" style:name="1660">
      <style:paragraph-properties/>
    </style:style>
    <style:style style:parent-style-name="1003" style:display-name="T49" style:family="text" style:name="1661">
      <style:paragraph-properties/>
    </style:style>
    <style:style style:parent-style-name="1003" style:display-name="T50" style:family="text" style:name="1662">
      <style:paragraph-properties/>
    </style:style>
    <style:style style:parent-style-name="1003" style:display-name="T51" style:family="text" style:name="1663">
      <style:paragraph-properties/>
    </style:style>
    <style:style style:parent-style-name="1003" style:display-name="T52" style:family="text" style:name="1664">
      <style:paragraph-properties/>
    </style:style>
    <style:style style:parent-style-name="1003" style:display-name="T53" style:family="text" style:name="1665">
      <style:paragraph-properties/>
    </style:style>
    <style:style style:parent-style-name="1003" style:display-name="T54" style:family="text" style:name="1666">
      <style:paragraph-properties/>
    </style:style>
    <style:style style:parent-style-name="1003" style:display-name="T55" style:family="text" style:name="1667">
      <style:paragraph-properties/>
    </style:style>
    <style:style style:parent-style-name="1003" style:display-name="T56" style:family="text" style:name="1668">
      <style:paragraph-properties/>
    </style:style>
    <style:style style:parent-style-name="1003" style:display-name="T57" style:family="text" style:name="1669">
      <style:paragraph-properties/>
    </style:style>
    <style:style style:parent-style-name="1003" style:display-name="T58" style:family="text" style:name="1670">
      <style:paragraph-properties/>
    </style:style>
    <style:style style:parent-style-name="1003" style:display-name="T59" style:family="text" style:name="1671">
      <style:paragraph-properties/>
    </style:style>
    <style:style style:parent-style-name="1003" style:display-name="T60" style:family="text" style:name="1672">
      <style:paragraph-properties/>
    </style:style>
    <style:style style:parent-style-name="1003" style:display-name="T61" style:family="text" style:name="1673">
      <style:paragraph-properties/>
    </style:style>
    <style:style style:parent-style-name="1003" style:display-name="T62" style:family="text" style:name="1674">
      <style:paragraph-properties/>
    </style:style>
    <style:style style:parent-style-name="1003" style:display-name="T63" style:family="text" style:name="1675">
      <style:paragraph-properties/>
    </style:style>
    <style:style style:parent-style-name="1003" style:display-name="T64" style:family="text" style:name="1676">
      <style:paragraph-properties/>
    </style:style>
    <style:style style:parent-style-name="1003" style:display-name="T65" style:family="text" style:name="1677">
      <style:paragraph-properties/>
    </style:style>
    <style:style style:parent-style-name="1003" style:display-name="T66" style:family="text" style:name="1678">
      <style:paragraph-properties/>
    </style:style>
    <style:style style:parent-style-name="1003" style:display-name="T67" style:family="text" style:name="1679">
      <style:paragraph-properties/>
    </style:style>
    <style:style style:parent-style-name="1003" style:display-name="T68" style:family="text" style:name="1680">
      <style:paragraph-properties/>
    </style:style>
    <style:style style:parent-style-name="1003" style:display-name="T69" style:family="text" style:name="1681">
      <style:paragraph-properties/>
    </style:style>
    <style:style style:parent-style-name="1003" style:display-name="T70" style:family="text" style:name="1682">
      <style:paragraph-properties/>
    </style:style>
    <style:style style:parent-style-name="1003" style:display-name="T71" style:family="text" style:name="1683">
      <style:paragraph-properties/>
    </style:style>
    <style:style style:parent-style-name="1003" style:display-name="T72" style:family="text" style:name="1684">
      <style:paragraph-properties/>
    </style:style>
    <style:style style:parent-style-name="1003" style:display-name="T73" style:family="text" style:name="1685">
      <style:paragraph-properties/>
    </style:style>
    <style:style style:parent-style-name="1003" style:display-name="T74" style:family="text" style:name="1686">
      <style:paragraph-properties/>
    </style:style>
    <style:style style:parent-style-name="1003" style:display-name="T75" style:family="text" style:name="1687">
      <style:paragraph-properties/>
    </style:style>
    <style:style style:parent-style-name="1003" style:display-name="T76" style:family="text" style:name="1688">
      <style:paragraph-properties/>
    </style:style>
    <style:style style:parent-style-name="1003" style:display-name="T77" style:family="text" style:name="1689">
      <style:paragraph-properties/>
    </style:style>
    <style:style style:parent-style-name="1003" style:display-name="T78" style:family="text" style:name="1690">
      <style:paragraph-properties/>
    </style:style>
    <style:style style:parent-style-name="1003" style:display-name="T79" style:family="text" style:name="1691">
      <style:paragraph-properties/>
    </style:style>
    <style:style style:parent-style-name="1003" style:display-name="T80" style:family="text" style:name="1692">
      <style:paragraph-properties/>
    </style:style>
    <style:style style:parent-style-name="1003" style:display-name="T81" style:family="text" style:name="1693">
      <style:paragraph-properties/>
    </style:style>
    <style:style style:parent-style-name="1003" style:display-name="T82" style:family="text" style:name="1694">
      <style:paragraph-properties/>
    </style:style>
    <style:style style:parent-style-name="1003" style:display-name="T83" style:family="text" style:name="1695">
      <style:paragraph-properties/>
    </style:style>
    <style:style style:parent-style-name="1003" style:display-name="T84" style:family="text" style:name="1696">
      <style:paragraph-properties/>
    </style:style>
    <style:style style:parent-style-name="1003" style:display-name="T85" style:family="text" style:name="1697">
      <style:paragraph-properties/>
    </style:style>
    <style:style style:parent-style-name="1003" style:display-name="T86" style:family="text" style:name="1698">
      <style:paragraph-properties/>
    </style:style>
    <style:style style:parent-style-name="1003" style:display-name="T87" style:family="text" style:name="1699">
      <style:paragraph-properties/>
    </style:style>
    <style:style style:parent-style-name="1003" style:display-name="T88" style:family="text" style:name="1700">
      <style:paragraph-properties/>
    </style:style>
    <style:style style:parent-style-name="1003" style:display-name="T89" style:family="text" style:name="1701">
      <style:paragraph-properties/>
    </style:style>
    <style:style style:parent-style-name="1003" style:display-name="T90" style:family="text" style:name="1702">
      <style:paragraph-properties/>
    </style:style>
    <style:style style:parent-style-name="1003" style:display-name="T91" style:family="text" style:name="1703">
      <style:paragraph-properties/>
    </style:style>
    <style:style style:parent-style-name="1003" style:display-name="T92" style:family="text" style:name="1704">
      <style:paragraph-properties/>
    </style:style>
    <style:style style:parent-style-name="1003" style:display-name="T93" style:family="text" style:name="1705">
      <style:paragraph-properties/>
    </style:style>
    <style:style style:parent-style-name="1003" style:display-name="T94" style:family="text" style:name="1706">
      <style:paragraph-properties/>
    </style:style>
    <style:style style:parent-style-name="1003" style:display-name="T95" style:family="text" style:name="1707">
      <style:paragraph-properties/>
    </style:style>
    <style:style style:parent-style-name="1003" style:display-name="T96" style:family="text" style:name="1708">
      <style:paragraph-properties/>
    </style:style>
    <style:style style:parent-style-name="1003" style:display-name="T97" style:family="text" style:name="1709">
      <style:paragraph-properties/>
    </style:style>
    <style:style style:parent-style-name="1003" style:display-name="T98" style:family="text" style:name="1710">
      <style:paragraph-properties/>
    </style:style>
    <style:style style:parent-style-name="1003" style:display-name="T99" style:family="text" style:name="1711">
      <style:paragraph-properties/>
    </style:style>
    <style:style style:parent-style-name="1003" style:display-name="T100" style:family="text" style:name="1712">
      <style:paragraph-properties/>
    </style:style>
    <style:style style:parent-style-name="1003" style:display-name="T101" style:family="text" style:name="1713">
      <style:paragraph-properties/>
    </style:style>
    <style:style style:parent-style-name="1003" style:display-name="T102" style:family="text" style:name="1714">
      <style:paragraph-properties/>
    </style:style>
    <style:style style:parent-style-name="1003" style:display-name="T103" style:family="text" style:name="1715">
      <style:paragraph-properties/>
    </style:style>
    <style:style style:parent-style-name="1003" style:display-name="T104" style:family="text" style:name="1716">
      <style:paragraph-properties/>
    </style:style>
    <style:style style:parent-style-name="1003" style:display-name="T105" style:family="text" style:name="1717">
      <style:paragraph-properties/>
    </style:style>
    <style:style style:parent-style-name="1003" style:display-name="T106" style:family="text" style:name="1718">
      <style:paragraph-properties/>
    </style:style>
    <style:style style:parent-style-name="1003" style:display-name="T107" style:family="text" style:name="1719">
      <style:paragraph-properties/>
    </style:style>
    <style:style style:parent-style-name="1003" style:display-name="T108" style:family="text" style:name="1720">
      <style:paragraph-properties/>
    </style:style>
    <style:style style:parent-style-name="1003" style:display-name="T109" style:family="text" style:name="1721">
      <style:paragraph-properties/>
    </style:style>
    <style:style style:parent-style-name="1003" style:display-name="T110" style:family="text" style:name="1722">
      <style:paragraph-properties/>
    </style:style>
    <style:style style:parent-style-name="1003" style:display-name="T111" style:family="text" style:name="1723">
      <style:paragraph-properties/>
    </style:style>
    <style:style style:parent-style-name="1003" style:display-name="T112" style:family="text" style:name="1724">
      <style:paragraph-properties/>
    </style:style>
    <style:style style:parent-style-name="1003" style:display-name="T113" style:family="text" style:name="1725">
      <style:paragraph-properties/>
    </style:style>
    <style:style style:parent-style-name="1003" style:display-name="T114" style:family="text" style:name="1726">
      <style:paragraph-properties/>
    </style:style>
    <style:style style:parent-style-name="1003" style:display-name="T115" style:family="text" style:name="1727">
      <style:paragraph-properties/>
    </style:style>
    <style:style style:parent-style-name="1003" style:display-name="T116" style:family="text" style:name="1728">
      <style:paragraph-properties/>
    </style:style>
    <style:style style:parent-style-name="1003" style:display-name="T117" style:family="text" style:name="1729">
      <style:paragraph-properties/>
    </style:style>
    <style:style style:parent-style-name="1003" style:display-name="T118" style:family="text" style:name="1730">
      <style:paragraph-properties/>
    </style:style>
    <style:style style:parent-style-name="1003" style:display-name="T119" style:family="text" style:name="1731">
      <style:paragraph-properties/>
    </style:style>
    <style:style style:parent-style-name="1003" style:display-name="T120" style:family="text" style:name="1732">
      <style:paragraph-properties/>
    </style:style>
    <style:style style:parent-style-name="1003" style:display-name="T121" style:family="text" style:name="1733">
      <style:paragraph-properties/>
    </style:style>
    <style:style style:parent-style-name="1003" style:display-name="T122" style:family="text" style:name="1734">
      <style:paragraph-properties/>
    </style:style>
    <style:style style:parent-style-name="1003" style:display-name="T123" style:family="text" style:name="1735">
      <style:paragraph-properties/>
    </style:style>
    <style:style style:parent-style-name="1003" style:display-name="T124" style:family="text" style:name="1736">
      <style:paragraph-properties/>
    </style:style>
    <style:style style:parent-style-name="1003" style:display-name="T125" style:family="text" style:name="1737">
      <style:paragraph-properties/>
    </style:style>
    <style:style style:parent-style-name="1003" style:display-name="T126" style:family="text" style:name="1738">
      <style:paragraph-properties/>
    </style:style>
    <style:style style:parent-style-name="1003" style:display-name="T127" style:family="text" style:name="1739">
      <style:paragraph-properties/>
    </style:style>
    <style:style style:parent-style-name="1003" style:display-name="T128" style:family="text" style:name="1740">
      <style:paragraph-properties/>
    </style:style>
    <style:style style:parent-style-name="1003" style:display-name="T129" style:family="text" style:name="1741">
      <style:paragraph-properties/>
    </style:style>
    <style:style style:parent-style-name="1003" style:display-name="T130" style:family="text" style:name="1742">
      <style:paragraph-properties/>
    </style:style>
    <style:style style:parent-style-name="1003" style:display-name="T131" style:family="text" style:name="1743">
      <style:paragraph-properties/>
    </style:style>
    <style:style style:parent-style-name="1003" style:display-name="T132" style:family="text" style:name="1744">
      <style:paragraph-properties/>
    </style:style>
    <style:style style:parent-style-name="1003" style:display-name="T133" style:family="text" style:name="1745">
      <style:paragraph-properties/>
    </style:style>
    <style:style style:parent-style-name="1003" style:display-name="T134" style:family="text" style:name="1746">
      <style:paragraph-properties/>
    </style:style>
    <style:style style:parent-style-name="1003" style:display-name="T135" style:family="text" style:name="1747">
      <style:paragraph-properties/>
    </style:style>
    <style:style style:parent-style-name="1003" style:display-name="T136" style:family="text" style:name="1748">
      <style:paragraph-properties/>
    </style:style>
    <style:style style:parent-style-name="1003" style:display-name="T137" style:family="text" style:name="1749">
      <style:paragraph-properties/>
    </style:style>
    <style:style style:parent-style-name="1003" style:display-name="T138" style:family="text" style:name="1750">
      <style:paragraph-properties/>
    </style:style>
    <style:style style:parent-style-name="1003" style:display-name="T139" style:family="text" style:name="1751">
      <style:paragraph-properties/>
    </style:style>
    <style:style style:parent-style-name="1003" style:display-name="T140" style:family="text" style:name="1752">
      <style:paragraph-properties/>
    </style:style>
    <style:style style:parent-style-name="1003" style:display-name="T141" style:family="text" style:name="1753">
      <style:paragraph-properties/>
    </style:style>
    <style:style style:parent-style-name="1003" style:display-name="T142" style:family="text" style:name="1754">
      <style:paragraph-properties/>
    </style:style>
    <style:style style:parent-style-name="1003" style:display-name="T143" style:family="text" style:name="1755">
      <style:paragraph-properties/>
    </style:style>
    <style:style style:parent-style-name="1003" style:display-name="T144" style:family="text" style:name="1756">
      <style:paragraph-properties/>
    </style:style>
    <style:style style:parent-style-name="1003" style:display-name="T145" style:family="text" style:name="1757">
      <style:paragraph-properties/>
    </style:style>
    <style:style style:parent-style-name="1003" style:display-name="T146" style:family="text" style:name="1758">
      <style:paragraph-properties/>
      <style:text-properties fo:font-family="Courier New" style:font-family-complex="Courier New"/>
    </style:style>
    <style:style style:parent-style-name="1003" style:display-name="T147" style:family="text" style:name="1759">
      <style:paragraph-properties/>
      <style:text-properties fo:font-family="Wingdings" style:font-family-complex="Wingdings"/>
    </style:style>
    <style:style style:parent-style-name="1003" style:display-name="T148" style:family="text" style:name="1760">
      <style:paragraph-properties/>
      <style:text-properties fo:font-family="Symbol" style:font-family-complex="Symbol"/>
    </style:style>
    <style:style style:parent-style-name="1003" style:display-name="T149" style:family="text" style:name="1761">
      <style:paragraph-properties/>
      <style:text-properties fo:font-family="Courier New" style:font-family-complex="Courier New"/>
    </style:style>
    <style:style style:parent-style-name="1003" style:display-name="T150" style:family="text" style:name="1762">
      <style:paragraph-properties/>
      <style:text-properties fo:font-family="Wingdings" style:font-family-complex="Wingdings"/>
    </style:style>
    <style:style style:parent-style-name="1003" style:display-name="T151" style:family="text" style:name="1763">
      <style:paragraph-properties/>
      <style:text-properties fo:font-family="Symbol" style:font-family-complex="Symbol"/>
    </style:style>
    <style:style style:parent-style-name="1003" style:display-name="T152" style:family="text" style:name="1764">
      <style:paragraph-properties/>
      <style:text-properties fo:font-family="Courier New" style:font-family-complex="Courier New"/>
    </style:style>
    <style:style style:parent-style-name="1003" style:display-name="T153" style:family="text" style:name="1765">
      <style:paragraph-properties/>
      <style:text-properties fo:font-family="Wingdings" style:font-family-complex="Wingdings"/>
    </style:style>
    <style:style style:parent-style-name="1003" style:display-name="T154" style:family="text" style:name="1766">
      <style:paragraph-properties/>
      <style:text-properties fo:font-family="Symbol" style:font-family-complex="Symbol"/>
    </style:style>
    <style:style style:parent-style-name="1003" style:display-name="T155" style:family="text" style:name="1767">
      <style:paragraph-properties/>
      <style:text-properties fo:font-family="Courier New" style:font-family-complex="Courier New"/>
    </style:style>
    <style:style style:parent-style-name="1003" style:display-name="T156" style:family="text" style:name="1768">
      <style:paragraph-properties/>
      <style:text-properties fo:font-family="Wingdings" style:font-family-complex="Wingdings"/>
    </style:style>
    <style:style style:parent-style-name="1003" style:display-name="T157" style:family="text" style:name="1769">
      <style:paragraph-properties/>
      <style:text-properties fo:font-family="Symbol" style:font-family-complex="Symbol"/>
    </style:style>
    <style:style style:parent-style-name="1003" style:display-name="T158" style:family="text" style:name="1770">
      <style:paragraph-properties/>
      <style:text-properties fo:font-family="Courier New" style:font-family-complex="Courier New"/>
    </style:style>
    <style:style style:parent-style-name="1003" style:display-name="T159" style:family="text" style:name="1771">
      <style:paragraph-properties/>
      <style:text-properties fo:font-family="Wingdings" style:font-family-complex="Wingdings"/>
    </style:style>
    <style:style style:parent-style-name="1003" style:display-name="T160" style:family="text" style:name="1772">
      <style:paragraph-properties/>
      <style:text-properties fo:font-family="Symbol" style:font-family-complex="Symbol"/>
    </style:style>
    <style:style style:parent-style-name="1003" style:display-name="T161" style:family="text" style:name="1773">
      <style:paragraph-properties/>
      <style:text-properties fo:font-family="Courier New" style:font-family-complex="Courier New"/>
    </style:style>
    <style:style style:parent-style-name="1003" style:display-name="T162" style:family="text" style:name="1774">
      <style:paragraph-properties/>
      <style:text-properties fo:font-family="Wingdings" style:font-family-complex="Wingdings"/>
    </style:style>
    <style:style style:parent-style-name="1003" style:display-name="T163" style:family="text" style:name="1775">
      <style:paragraph-properties/>
      <style:text-properties fo:font-family="Symbol" style:font-family-complex="Symbol" fo:font-weight="bold"/>
    </style:style>
    <style:style style:parent-style-name="1003" style:display-name="T164" style:family="text" style:name="1776">
      <style:paragraph-properties/>
      <style:text-properties fo:font-family="Symbol" style:font-family-complex="Symbol"/>
    </style:style>
    <style:style style:parent-style-name="1003" style:display-name="T165" style:family="text" style:name="1777">
      <style:paragraph-properties/>
      <style:text-properties fo:font-family="Wingdings" style:font-family-complex="Wingdings"/>
    </style:style>
    <style:style style:parent-style-name="1003" style:display-name="T166" style:family="text" style:name="1778">
      <style:paragraph-properties/>
      <style:text-properties fo:font-family="Symbol" style:font-family-complex="Symbol"/>
    </style:style>
    <style:style style:parent-style-name="1003" style:display-name="T167" style:family="text" style:name="1779">
      <style:paragraph-properties/>
      <style:text-properties fo:font-family="Courier New" style:font-family-complex="Courier New"/>
    </style:style>
    <style:style style:parent-style-name="1003" style:display-name="T168" style:family="text" style:name="1780">
      <style:paragraph-properties/>
      <style:text-properties fo:font-family="Wingdings" style:font-family-complex="Wingdings"/>
    </style:style>
    <style:style style:parent-style-name="1003" style:display-name="T169" style:family="text" style:name="1781">
      <style:paragraph-properties/>
      <style:text-properties fo:font-family="Symbol" style:font-family-complex="Symbol"/>
    </style:style>
    <style:style style:parent-style-name="1003" style:display-name="T170" style:family="text" style:name="1782">
      <style:paragraph-properties/>
      <style:text-properties fo:font-family="Courier New" style:font-family-complex="Courier New"/>
    </style:style>
    <style:style style:parent-style-name="1003" style:display-name="T171" style:family="text" style:name="1783">
      <style:paragraph-properties/>
      <style:text-properties fo:font-family="Wingdings" style:font-family-complex="Wingdings"/>
    </style:style>
    <style:style style:parent-style-name="1003" style:display-name="T172" style:family="text" style:name="1784">
      <style:paragraph-properties/>
      <style:text-properties fo:font-family="Symbol" style:font-family-complex="Symbol"/>
    </style:style>
    <style:style style:parent-style-name="1003" style:display-name="T173" style:family="text" style:name="1785">
      <style:paragraph-properties/>
      <style:text-properties fo:font-family="Courier New" style:font-family-complex="Courier New"/>
    </style:style>
    <style:style style:parent-style-name="1003" style:display-name="T174" style:family="text" style:name="1786">
      <style:paragraph-properties/>
      <style:text-properties fo:font-family="Wingdings" style:font-family-complex="Wingdings"/>
    </style:style>
    <style:style style:parent-style-name="1003" style:display-name="T175" style:family="text" style:name="1787">
      <style:paragraph-properties/>
      <style:text-properties fo:font-family="Symbol" style:font-family-complex="Symbol"/>
    </style:style>
    <style:style style:parent-style-name="1003" style:display-name="T176" style:family="text" style:name="1788">
      <style:paragraph-properties/>
      <style:text-properties fo:font-family="Courier New" style:font-family-complex="Courier New"/>
    </style:style>
    <style:style style:parent-style-name="1003" style:display-name="T177" style:family="text" style:name="1789">
      <style:paragraph-properties/>
      <style:text-properties fo:font-family="Wingdings" style:font-family-complex="Wingdings"/>
    </style:style>
    <style:style style:parent-style-name="1003" style:display-name="T178" style:family="text" style:name="1790">
      <style:paragraph-properties/>
      <style:text-properties fo:font-family="Symbol" style:font-family-complex="Symbol"/>
    </style:style>
    <style:style style:parent-style-name="1003" style:display-name="T179" style:family="text" style:name="1791">
      <style:paragraph-properties/>
      <style:text-properties fo:font-family="Courier New" style:font-family-complex="Courier New"/>
    </style:style>
    <style:style style:parent-style-name="1003" style:display-name="T180" style:family="text" style:name="1792">
      <style:paragraph-properties/>
      <style:text-properties fo:font-family="Wingdings" style:font-family-complex="Wingdings"/>
    </style:style>
    <style:style style:parent-style-name="1003" style:display-name="T181" style:family="text" style:name="1793">
      <style:paragraph-properties/>
      <style:text-properties fo:font-family="Symbol" style:font-family-complex="Symbol"/>
    </style:style>
    <style:style style:parent-style-name="1003" style:display-name="T182" style:family="text" style:name="1794">
      <style:paragraph-properties/>
    </style:style>
    <style:style style:parent-style-name="1003" style:display-name="T183" style:family="text" style:name="1795">
      <style:paragraph-properties/>
      <style:text-properties fo:font-family="Wingdings" style:font-family-complex="Wingdings"/>
    </style:style>
    <style:style style:parent-style-name="1003" style:display-name="T184" style:family="text" style:name="1796">
      <style:paragraph-properties/>
      <style:text-properties fo:font-family="Symbol" style:font-family-complex="Symbol"/>
    </style:style>
    <style:style style:parent-style-name="1003" style:display-name="T185" style:family="text" style:name="1797">
      <style:paragraph-properties/>
      <style:text-properties fo:font-family="Courier New" style:font-family-complex="Courier New"/>
    </style:style>
    <style:style style:parent-style-name="1003" style:display-name="T186" style:family="text" style:name="1798">
      <style:paragraph-properties/>
      <style:text-properties fo:font-family="Wingdings" style:font-family-complex="Wingdings"/>
    </style:style>
    <style:style style:parent-style-name="1003" style:display-name="T187" style:family="text" style:name="1799">
      <style:paragraph-properties/>
      <style:text-properties fo:font-family="Symbol" style:font-family-complex="Symbol"/>
    </style:style>
    <style:style style:parent-style-name="1003" style:display-name="T188" style:family="text" style:name="1800">
      <style:paragraph-properties/>
      <style:text-properties fo:font-family="Courier New" style:font-family-complex="Courier New"/>
    </style:style>
    <style:style style:parent-style-name="1003" style:display-name="T189" style:family="text" style:name="1801">
      <style:paragraph-properties/>
      <style:text-properties fo:font-family="Wingdings" style:font-family-complex="Wingdings"/>
    </style:style>
    <style:style style:parent-style-name="1003" style:display-name="T190" style:family="text" style:name="1802">
      <style:paragraph-properties/>
      <style:text-properties fo:font-family="Symbol" style:font-family-complex="Symbol"/>
    </style:style>
    <style:style style:parent-style-name="1003" style:display-name="T191" style:family="text" style:name="1803">
      <style:paragraph-properties/>
    </style:style>
    <style:style style:parent-style-name="1003" style:display-name="T192" style:family="text" style:name="1804">
      <style:paragraph-properties/>
      <style:text-properties fo:font-family="Wingdings" style:font-family-complex="Wingdings"/>
    </style:style>
    <style:style style:parent-style-name="1003" style:display-name="T193" style:family="text" style:name="1805">
      <style:paragraph-properties/>
      <style:text-properties fo:font-family="Symbol" style:font-family-complex="Symbol"/>
    </style:style>
    <style:style style:parent-style-name="1003" style:display-name="T194" style:family="text" style:name="1806">
      <style:paragraph-properties/>
      <style:text-properties fo:font-family="Courier New" style:font-family-complex="Courier New"/>
    </style:style>
    <style:style style:parent-style-name="1003" style:display-name="T195" style:family="text" style:name="1807">
      <style:paragraph-properties/>
      <style:text-properties fo:font-family="Wingdings" style:font-family-complex="Wingdings"/>
    </style:style>
    <style:style style:parent-style-name="1003" style:display-name="T196" style:family="text" style:name="1808">
      <style:paragraph-properties/>
      <style:text-properties fo:font-family="Symbol" style:font-family-complex="Symbol"/>
    </style:style>
    <style:style style:parent-style-name="1003" style:display-name="T197" style:family="text" style:name="1809">
      <style:paragraph-properties/>
      <style:text-properties fo:font-family="Courier New" style:font-family-complex="Courier New"/>
    </style:style>
    <style:style style:parent-style-name="1003" style:display-name="T198" style:family="text" style:name="1810">
      <style:paragraph-properties/>
      <style:text-properties fo:font-family="Wingdings" style:font-family-complex="Wingdings"/>
    </style:style>
    <style:style style:parent-style-name="1003" style:display-name="T1" style:family="text" style:name="1811">
      <style:paragraph-properties/>
    </style:style>
    <style:style style:parent-style-name="1003" style:display-name="T2" style:family="text" style:name="1812">
      <style:paragraph-properties/>
    </style:style>
    <style:style style:parent-style-name="1003" style:display-name="T3" style:family="text" style:name="1813">
      <style:paragraph-properties/>
    </style:style>
    <style:style style:parent-style-name="1003" style:display-name="T4" style:family="text" style:name="1814">
      <style:paragraph-properties/>
    </style:style>
    <style:style style:parent-style-name="1003" style:display-name="T5" style:family="text" style:name="1815">
      <style:paragraph-properties/>
    </style:style>
    <style:style style:parent-style-name="1003" style:display-name="T6" style:family="text" style:name="1816">
      <style:paragraph-properties/>
    </style:style>
    <style:style style:parent-style-name="1003" style:display-name="T7" style:family="text" style:name="1817">
      <style:paragraph-properties/>
    </style:style>
    <style:style style:parent-style-name="1003" style:display-name="T8" style:family="text" style:name="1818">
      <style:paragraph-properties/>
    </style:style>
    <style:style style:parent-style-name="1003" style:display-name="T9" style:family="text" style:name="1819">
      <style:paragraph-properties/>
    </style:style>
    <style:style style:parent-style-name="1003" style:display-name="T10" style:family="text" style:name="1820">
      <style:paragraph-properties/>
    </style:style>
    <style:style style:parent-style-name="1003" style:display-name="T11" style:family="text" style:name="1821">
      <style:paragraph-properties/>
    </style:style>
    <style:style style:parent-style-name="1003" style:display-name="T12" style:family="text" style:name="1822">
      <style:paragraph-properties/>
    </style:style>
    <style:style style:parent-style-name="1003" style:display-name="T13" style:family="text" style:name="1823">
      <style:paragraph-properties/>
    </style:style>
    <style:style style:parent-style-name="1003" style:display-name="T14" style:family="text" style:name="1824">
      <style:paragraph-properties/>
    </style:style>
    <style:style style:parent-style-name="1003" style:display-name="T15" style:family="text" style:name="1825">
      <style:paragraph-properties/>
    </style:style>
    <style:style style:parent-style-name="1003" style:display-name="T16" style:family="text" style:name="1826">
      <style:paragraph-properties/>
    </style:style>
    <style:style style:parent-style-name="1003" style:display-name="T17" style:family="text" style:name="1827">
      <style:paragraph-properties/>
    </style:style>
    <style:style style:parent-style-name="1003" style:display-name="T18" style:family="text" style:name="1828">
      <style:paragraph-properties/>
    </style:style>
    <style:style style:parent-style-name="1003" style:display-name="T19" style:family="text" style:name="1829">
      <style:paragraph-properties/>
    </style:style>
    <style:style style:parent-style-name="1003" style:display-name="T20" style:family="text" style:name="1830">
      <style:paragraph-properties/>
    </style:style>
    <style:style style:parent-style-name="1003" style:display-name="T21" style:family="text" style:name="1831">
      <style:paragraph-properties/>
    </style:style>
    <style:style style:parent-style-name="1003" style:display-name="T22" style:family="text" style:name="1832">
      <style:paragraph-properties/>
    </style:style>
    <style:style style:parent-style-name="1003" style:display-name="T23" style:family="text" style:name="1833">
      <style:paragraph-properties/>
    </style:style>
    <style:style style:parent-style-name="1003" style:display-name="T24" style:family="text" style:name="1834">
      <style:paragraph-properties/>
    </style:style>
    <style:style style:parent-style-name="1003" style:display-name="T25" style:family="text" style:name="1835">
      <style:paragraph-properties/>
    </style:style>
    <style:style style:parent-style-name="1003" style:display-name="T26" style:family="text" style:name="1836">
      <style:paragraph-properties/>
    </style:style>
    <style:style style:parent-style-name="1003" style:display-name="T27" style:family="text" style:name="1837">
      <style:paragraph-properties/>
    </style:style>
    <style:style style:parent-style-name="1003" style:display-name="T28" style:family="text" style:name="1838">
      <style:paragraph-properties/>
    </style:style>
    <style:style style:parent-style-name="1003" style:display-name="T29" style:family="text" style:name="1839">
      <style:paragraph-properties/>
    </style:style>
    <style:style style:parent-style-name="1003" style:display-name="T30" style:family="text" style:name="1840">
      <style:paragraph-properties/>
    </style:style>
    <style:style style:parent-style-name="1003" style:display-name="T31" style:family="text" style:name="1841">
      <style:paragraph-properties/>
    </style:style>
    <style:style style:parent-style-name="1003" style:display-name="T32" style:family="text" style:name="1842">
      <style:paragraph-properties/>
    </style:style>
    <style:style style:parent-style-name="1003" style:display-name="T33" style:family="text" style:name="1843">
      <style:paragraph-properties/>
    </style:style>
    <style:style style:parent-style-name="1003" style:display-name="T34" style:family="text" style:name="1844">
      <style:paragraph-properties/>
    </style:style>
    <style:style style:parent-style-name="1003" style:display-name="T35" style:family="text" style:name="1845">
      <style:paragraph-properties/>
    </style:style>
    <style:style style:parent-style-name="1003" style:display-name="T36" style:family="text" style:name="1846">
      <style:paragraph-properties/>
    </style:style>
    <style:style style:parent-style-name="1003" style:display-name="T37" style:family="text" style:name="1847">
      <style:paragraph-properties/>
    </style:style>
    <style:style style:parent-style-name="1003" style:display-name="T38" style:family="text" style:name="1848">
      <style:paragraph-properties/>
    </style:style>
    <style:style style:parent-style-name="1003" style:display-name="T39" style:family="text" style:name="1849">
      <style:paragraph-properties/>
    </style:style>
    <style:style style:parent-style-name="1003" style:display-name="T40" style:family="text" style:name="1850">
      <style:paragraph-properties/>
    </style:style>
    <style:style style:parent-style-name="1003" style:display-name="T41" style:family="text" style:name="1851">
      <style:paragraph-properties/>
    </style:style>
    <style:style style:parent-style-name="1003" style:display-name="T42" style:family="text" style:name="1852">
      <style:paragraph-properties/>
    </style:style>
    <style:style style:parent-style-name="1003" style:display-name="T43" style:family="text" style:name="1853">
      <style:paragraph-properties/>
    </style:style>
    <style:style style:parent-style-name="1003" style:display-name="T44" style:family="text" style:name="1854">
      <style:paragraph-properties/>
    </style:style>
    <style:style style:parent-style-name="1003" style:display-name="T45" style:family="text" style:name="1855">
      <style:paragraph-properties/>
    </style:style>
    <style:style style:parent-style-name="1003" style:display-name="T46" style:family="text" style:name="1856">
      <style:paragraph-properties/>
    </style:style>
    <style:style style:parent-style-name="1003" style:display-name="T47" style:family="text" style:name="1857">
      <style:paragraph-properties/>
    </style:style>
    <style:style style:parent-style-name="1003" style:display-name="T48" style:family="text" style:name="1858">
      <style:paragraph-properties/>
    </style:style>
    <style:style style:parent-style-name="1003" style:display-name="T49" style:family="text" style:name="1859">
      <style:paragraph-properties/>
    </style:style>
    <style:style style:parent-style-name="1003" style:display-name="T50" style:family="text" style:name="1860">
      <style:paragraph-properties/>
    </style:style>
    <style:style style:parent-style-name="1003" style:display-name="T51" style:family="text" style:name="1861">
      <style:paragraph-properties/>
    </style:style>
    <style:style style:parent-style-name="1003" style:display-name="T52" style:family="text" style:name="1862">
      <style:paragraph-properties/>
    </style:style>
    <style:style style:parent-style-name="1003" style:display-name="T53" style:family="text" style:name="1863">
      <style:paragraph-properties/>
    </style:style>
    <style:style style:parent-style-name="1003" style:display-name="T54" style:family="text" style:name="1864">
      <style:paragraph-properties/>
    </style:style>
    <style:style style:parent-style-name="1003" style:display-name="T55" style:family="text" style:name="1865">
      <style:paragraph-properties/>
    </style:style>
    <style:style style:parent-style-name="1003" style:display-name="T56" style:family="text" style:name="1866">
      <style:paragraph-properties/>
    </style:style>
    <style:style style:parent-style-name="1003" style:display-name="T57" style:family="text" style:name="1867">
      <style:paragraph-properties/>
    </style:style>
    <style:style style:parent-style-name="1003" style:display-name="T58" style:family="text" style:name="1868">
      <style:paragraph-properties/>
    </style:style>
    <style:style style:parent-style-name="1003" style:display-name="T59" style:family="text" style:name="1869">
      <style:paragraph-properties/>
    </style:style>
    <style:style style:parent-style-name="1003" style:display-name="T60" style:family="text" style:name="1870">
      <style:paragraph-properties/>
    </style:style>
    <style:style style:parent-style-name="1003" style:display-name="T61" style:family="text" style:name="1871">
      <style:paragraph-properties/>
    </style:style>
    <style:style style:parent-style-name="1003" style:display-name="T62" style:family="text" style:name="1872">
      <style:paragraph-properties/>
    </style:style>
    <style:style style:parent-style-name="1003" style:display-name="T63" style:family="text" style:name="1873">
      <style:paragraph-properties/>
    </style:style>
    <style:style style:parent-style-name="1003" style:display-name="T64" style:family="text" style:name="1874">
      <style:paragraph-properties/>
    </style:style>
    <style:style style:parent-style-name="1003" style:display-name="T65" style:family="text" style:name="1875">
      <style:paragraph-properties/>
    </style:style>
    <style:style style:parent-style-name="1003" style:display-name="T66" style:family="text" style:name="1876">
      <style:paragraph-properties/>
    </style:style>
    <style:style style:parent-style-name="1003" style:display-name="T67" style:family="text" style:name="1877">
      <style:paragraph-properties/>
    </style:style>
    <style:style style:parent-style-name="1003" style:display-name="T68" style:family="text" style:name="1878">
      <style:paragraph-properties/>
    </style:style>
    <style:style style:parent-style-name="1003" style:display-name="T69" style:family="text" style:name="1879">
      <style:paragraph-properties/>
    </style:style>
    <style:style style:parent-style-name="1003" style:display-name="T70" style:family="text" style:name="1880">
      <style:paragraph-properties/>
    </style:style>
    <style:style style:parent-style-name="1003" style:display-name="T71" style:family="text" style:name="1881">
      <style:paragraph-properties/>
    </style:style>
    <style:style style:parent-style-name="1003" style:display-name="T72" style:family="text" style:name="1882">
      <style:paragraph-properties/>
    </style:style>
    <style:style style:parent-style-name="1003" style:display-name="T73" style:family="text" style:name="1883">
      <style:paragraph-properties/>
    </style:style>
    <style:style style:parent-style-name="1003" style:display-name="T74" style:family="text" style:name="1884">
      <style:paragraph-properties/>
    </style:style>
    <style:style style:parent-style-name="1003" style:display-name="T75" style:family="text" style:name="1885">
      <style:paragraph-properties/>
    </style:style>
    <style:style style:parent-style-name="1003" style:display-name="T76" style:family="text" style:name="1886">
      <style:paragraph-properties/>
    </style:style>
    <style:style style:parent-style-name="1003" style:display-name="T77" style:family="text" style:name="1887">
      <style:paragraph-properties/>
    </style:style>
    <style:style style:parent-style-name="1003" style:display-name="T78" style:family="text" style:name="1888">
      <style:paragraph-properties/>
    </style:style>
    <style:style style:parent-style-name="1003" style:display-name="T79" style:family="text" style:name="1889">
      <style:paragraph-properties/>
    </style:style>
    <style:style style:parent-style-name="1003" style:display-name="T80" style:family="text" style:name="1890">
      <style:paragraph-properties/>
    </style:style>
    <style:style style:parent-style-name="1003" style:display-name="T81" style:family="text" style:name="1891">
      <style:paragraph-properties/>
    </style:style>
    <style:style style:parent-style-name="1003" style:display-name="T82" style:family="text" style:name="1892">
      <style:paragraph-properties/>
    </style:style>
    <style:style style:parent-style-name="1003" style:display-name="T83" style:family="text" style:name="1893">
      <style:paragraph-properties/>
    </style:style>
    <style:style style:parent-style-name="1003" style:display-name="T84" style:family="text" style:name="1894">
      <style:paragraph-properties/>
    </style:style>
    <style:style style:parent-style-name="1003" style:display-name="T85" style:family="text" style:name="1895">
      <style:paragraph-properties/>
    </style:style>
    <style:style style:parent-style-name="1003" style:display-name="T86" style:family="text" style:name="1896">
      <style:paragraph-properties/>
    </style:style>
    <style:style style:parent-style-name="1003" style:display-name="T87" style:family="text" style:name="1897">
      <style:paragraph-properties/>
    </style:style>
    <style:style style:parent-style-name="1003" style:display-name="T88" style:family="text" style:name="1898">
      <style:paragraph-properties/>
    </style:style>
    <style:style style:parent-style-name="1003" style:display-name="T89" style:family="text" style:name="1899">
      <style:paragraph-properties/>
    </style:style>
    <style:style style:parent-style-name="1003" style:display-name="T90" style:family="text" style:name="1900">
      <style:paragraph-properties/>
    </style:style>
    <style:style style:parent-style-name="1003" style:display-name="T91" style:family="text" style:name="1901">
      <style:paragraph-properties/>
    </style:style>
    <style:style style:parent-style-name="1003" style:display-name="T92" style:family="text" style:name="1902">
      <style:paragraph-properties/>
    </style:style>
    <style:style style:parent-style-name="1003" style:display-name="T93" style:family="text" style:name="1903">
      <style:paragraph-properties/>
    </style:style>
    <style:style style:parent-style-name="1003" style:display-name="T94" style:family="text" style:name="1904">
      <style:paragraph-properties/>
    </style:style>
    <style:style style:parent-style-name="1003" style:display-name="T95" style:family="text" style:name="1905">
      <style:paragraph-properties/>
    </style:style>
    <style:style style:parent-style-name="1003" style:display-name="T96" style:family="text" style:name="1906">
      <style:paragraph-properties/>
    </style:style>
    <style:style style:parent-style-name="1003" style:display-name="T97" style:family="text" style:name="1907">
      <style:paragraph-properties/>
    </style:style>
    <style:style style:parent-style-name="1003" style:display-name="T98" style:family="text" style:name="1908">
      <style:paragraph-properties/>
    </style:style>
    <style:style style:parent-style-name="1003" style:display-name="T99" style:family="text" style:name="1909">
      <style:paragraph-properties/>
    </style:style>
    <style:style style:parent-style-name="1003" style:display-name="T100" style:family="text" style:name="1910">
      <style:paragraph-properties/>
    </style:style>
    <style:style style:parent-style-name="1003" style:display-name="T101" style:family="text" style:name="1911">
      <style:paragraph-properties/>
    </style:style>
    <style:style style:parent-style-name="1003" style:display-name="T102" style:family="text" style:name="1912">
      <style:paragraph-properties/>
    </style:style>
    <style:style style:parent-style-name="1003" style:display-name="T103" style:family="text" style:name="1913">
      <style:paragraph-properties/>
    </style:style>
    <style:style style:parent-style-name="1003" style:display-name="T104" style:family="text" style:name="1914">
      <style:paragraph-properties/>
    </style:style>
    <style:style style:parent-style-name="1003" style:display-name="T105" style:family="text" style:name="1915">
      <style:paragraph-properties/>
    </style:style>
    <style:style style:parent-style-name="1003" style:display-name="T106" style:family="text" style:name="1916">
      <style:paragraph-properties/>
    </style:style>
    <style:style style:parent-style-name="1003" style:display-name="T107" style:family="text" style:name="1917">
      <style:paragraph-properties/>
    </style:style>
    <style:style style:parent-style-name="1003" style:display-name="T108" style:family="text" style:name="1918">
      <style:paragraph-properties/>
    </style:style>
    <style:style style:parent-style-name="1003" style:display-name="T109" style:family="text" style:name="1919">
      <style:paragraph-properties/>
    </style:style>
    <style:style style:parent-style-name="1003" style:display-name="T110" style:family="text" style:name="1920">
      <style:paragraph-properties/>
    </style:style>
    <style:style style:parent-style-name="1003" style:display-name="T111" style:family="text" style:name="1921">
      <style:paragraph-properties/>
    </style:style>
    <style:style style:parent-style-name="1003" style:display-name="T112" style:family="text" style:name="1922">
      <style:paragraph-properties/>
    </style:style>
    <style:style style:parent-style-name="1003" style:display-name="T113" style:family="text" style:name="1923">
      <style:paragraph-properties/>
    </style:style>
    <style:style style:parent-style-name="1003" style:display-name="T114" style:family="text" style:name="1924">
      <style:paragraph-properties/>
    </style:style>
    <style:style style:parent-style-name="1003" style:display-name="T115" style:family="text" style:name="1925">
      <style:paragraph-properties/>
    </style:style>
    <style:style style:parent-style-name="1003" style:display-name="T116" style:family="text" style:name="1926">
      <style:paragraph-properties/>
    </style:style>
    <style:style style:parent-style-name="1003" style:display-name="T117" style:family="text" style:name="1927">
      <style:paragraph-properties/>
    </style:style>
    <style:style style:parent-style-name="1003" style:display-name="T118" style:family="text" style:name="1928">
      <style:paragraph-properties/>
    </style:style>
    <style:style style:parent-style-name="1003" style:display-name="T119" style:family="text" style:name="1929">
      <style:paragraph-properties/>
    </style:style>
    <style:style style:parent-style-name="1003" style:display-name="T120" style:family="text" style:name="1930">
      <style:paragraph-properties/>
    </style:style>
    <style:style style:parent-style-name="1003" style:display-name="T121" style:family="text" style:name="1931">
      <style:paragraph-properties/>
    </style:style>
    <style:style style:parent-style-name="1003" style:display-name="T122" style:family="text" style:name="1932">
      <style:paragraph-properties/>
    </style:style>
    <style:style style:parent-style-name="1003" style:display-name="T123" style:family="text" style:name="1933">
      <style:paragraph-properties/>
    </style:style>
    <style:style style:parent-style-name="1003" style:display-name="T124" style:family="text" style:name="1934">
      <style:paragraph-properties/>
    </style:style>
    <style:style style:parent-style-name="1003" style:display-name="T125" style:family="text" style:name="1935">
      <style:paragraph-properties/>
    </style:style>
    <style:style style:parent-style-name="1003" style:display-name="T126" style:family="text" style:name="1936">
      <style:paragraph-properties/>
    </style:style>
    <style:style style:parent-style-name="1003" style:display-name="T127" style:family="text" style:name="1937">
      <style:paragraph-properties/>
    </style:style>
    <style:style style:parent-style-name="1003" style:display-name="T128" style:family="text" style:name="1938">
      <style:paragraph-properties/>
    </style:style>
    <style:style style:parent-style-name="1003" style:display-name="T129" style:family="text" style:name="1939">
      <style:paragraph-properties/>
    </style:style>
    <style:style style:parent-style-name="1003" style:display-name="T130" style:family="text" style:name="1940">
      <style:paragraph-properties/>
    </style:style>
    <style:style style:parent-style-name="1003" style:display-name="T131" style:family="text" style:name="1941">
      <style:paragraph-properties/>
    </style:style>
    <style:style style:parent-style-name="1003" style:display-name="T132" style:family="text" style:name="1942">
      <style:paragraph-properties/>
    </style:style>
    <style:style style:parent-style-name="1003" style:display-name="T133" style:family="text" style:name="1943">
      <style:paragraph-properties/>
    </style:style>
    <style:style style:parent-style-name="1003" style:display-name="T134" style:family="text" style:name="1944">
      <style:paragraph-properties/>
    </style:style>
    <style:style style:parent-style-name="1003" style:display-name="T135" style:family="text" style:name="1945">
      <style:paragraph-properties/>
    </style:style>
    <style:style style:parent-style-name="1003" style:display-name="T136" style:family="text" style:name="1946">
      <style:paragraph-properties/>
    </style:style>
    <style:style style:parent-style-name="1003" style:display-name="T137" style:family="text" style:name="1947">
      <style:paragraph-properties/>
    </style:style>
    <style:style style:parent-style-name="1003" style:display-name="T138" style:family="text" style:name="1948">
      <style:paragraph-properties/>
    </style:style>
    <style:style style:parent-style-name="1003" style:display-name="T139" style:family="text" style:name="1949">
      <style:paragraph-properties/>
    </style:style>
    <style:style style:parent-style-name="1003" style:display-name="T140" style:family="text" style:name="1950">
      <style:paragraph-properties/>
    </style:style>
    <style:style style:parent-style-name="1003" style:display-name="T141" style:family="text" style:name="1951">
      <style:paragraph-properties/>
    </style:style>
    <style:style style:parent-style-name="1003" style:display-name="T142" style:family="text" style:name="1952">
      <style:paragraph-properties/>
    </style:style>
    <style:style style:parent-style-name="1003" style:display-name="T143" style:family="text" style:name="1953">
      <style:paragraph-properties/>
    </style:style>
    <style:style style:parent-style-name="1003" style:display-name="T144" style:family="text" style:name="1954">
      <style:paragraph-properties/>
    </style:style>
    <style:style style:parent-style-name="1003" style:display-name="T145" style:family="text" style:name="1955">
      <style:paragraph-properties/>
    </style:style>
    <style:style style:parent-style-name="1003" style:display-name="T146" style:family="text" style:name="1956">
      <style:paragraph-properties/>
      <style:text-properties fo:font-family="Courier New" style:font-family-complex="Courier New"/>
    </style:style>
    <style:style style:parent-style-name="1003" style:display-name="T147" style:family="text" style:name="1957">
      <style:paragraph-properties/>
      <style:text-properties fo:font-family="Wingdings" style:font-family-complex="Wingdings"/>
    </style:style>
    <style:style style:parent-style-name="1003" style:display-name="T148" style:family="text" style:name="1958">
      <style:paragraph-properties/>
      <style:text-properties fo:font-family="Symbol" style:font-family-complex="Symbol"/>
    </style:style>
    <style:style style:parent-style-name="1003" style:display-name="T149" style:family="text" style:name="1959">
      <style:paragraph-properties/>
      <style:text-properties fo:font-family="Courier New" style:font-family-complex="Courier New"/>
    </style:style>
    <style:style style:parent-style-name="1003" style:display-name="T150" style:family="text" style:name="1960">
      <style:paragraph-properties/>
      <style:text-properties fo:font-family="Wingdings" style:font-family-complex="Wingdings"/>
    </style:style>
    <style:style style:parent-style-name="1003" style:display-name="T151" style:family="text" style:name="1961">
      <style:paragraph-properties/>
      <style:text-properties fo:font-family="Symbol" style:font-family-complex="Symbol"/>
    </style:style>
    <style:style style:parent-style-name="1003" style:display-name="T152" style:family="text" style:name="1962">
      <style:paragraph-properties/>
      <style:text-properties fo:font-family="Courier New" style:font-family-complex="Courier New"/>
    </style:style>
    <style:style style:parent-style-name="1003" style:display-name="T153" style:family="text" style:name="1963">
      <style:paragraph-properties/>
      <style:text-properties fo:font-family="Wingdings" style:font-family-complex="Wingdings"/>
    </style:style>
    <style:style style:parent-style-name="1003" style:display-name="T154" style:family="text" style:name="1964">
      <style:paragraph-properties/>
      <style:text-properties fo:font-family="Symbol" style:font-family-complex="Symbol"/>
    </style:style>
    <style:style style:parent-style-name="1003" style:display-name="T155" style:family="text" style:name="1965">
      <style:paragraph-properties/>
      <style:text-properties fo:font-family="Courier New" style:font-family-complex="Courier New"/>
    </style:style>
    <style:style style:parent-style-name="1003" style:display-name="T156" style:family="text" style:name="1966">
      <style:paragraph-properties/>
      <style:text-properties fo:font-family="Wingdings" style:font-family-complex="Wingdings"/>
    </style:style>
    <style:style style:parent-style-name="1003" style:display-name="T157" style:family="text" style:name="1967">
      <style:paragraph-properties/>
      <style:text-properties fo:font-family="Symbol" style:font-family-complex="Symbol"/>
    </style:style>
    <style:style style:parent-style-name="1003" style:display-name="T158" style:family="text" style:name="1968">
      <style:paragraph-properties/>
      <style:text-properties fo:font-family="Courier New" style:font-family-complex="Courier New"/>
    </style:style>
    <style:style style:parent-style-name="1003" style:display-name="T159" style:family="text" style:name="1969">
      <style:paragraph-properties/>
      <style:text-properties fo:font-family="Wingdings" style:font-family-complex="Wingdings"/>
    </style:style>
    <style:style style:parent-style-name="1003" style:display-name="T160" style:family="text" style:name="1970">
      <style:paragraph-properties/>
      <style:text-properties fo:font-family="Symbol" style:font-family-complex="Symbol"/>
    </style:style>
    <style:style style:parent-style-name="1003" style:display-name="T161" style:family="text" style:name="1971">
      <style:paragraph-properties/>
      <style:text-properties fo:font-family="Courier New" style:font-family-complex="Courier New"/>
    </style:style>
    <style:style style:parent-style-name="1003" style:display-name="T162" style:family="text" style:name="1972">
      <style:paragraph-properties/>
      <style:text-properties fo:font-family="Wingdings" style:font-family-complex="Wingdings"/>
    </style:style>
    <style:style style:parent-style-name="1003" style:display-name="T163" style:family="text" style:name="1973">
      <style:paragraph-properties/>
      <style:text-properties fo:font-family="Symbol" style:font-family-complex="Symbol" fo:font-weight="bold"/>
    </style:style>
    <style:style style:parent-style-name="1003" style:display-name="T164" style:family="text" style:name="1974">
      <style:paragraph-properties/>
      <style:text-properties fo:font-family="Symbol" style:font-family-complex="Symbol"/>
    </style:style>
    <style:style style:parent-style-name="1003" style:display-name="T165" style:family="text" style:name="1975">
      <style:paragraph-properties/>
      <style:text-properties fo:font-family="Wingdings" style:font-family-complex="Wingdings"/>
    </style:style>
    <style:style style:parent-style-name="1003" style:display-name="T166" style:family="text" style:name="1976">
      <style:paragraph-properties/>
      <style:text-properties fo:font-family="Symbol" style:font-family-complex="Symbol"/>
    </style:style>
    <style:style style:parent-style-name="1003" style:display-name="T167" style:family="text" style:name="1977">
      <style:paragraph-properties/>
      <style:text-properties fo:font-family="Courier New" style:font-family-complex="Courier New"/>
    </style:style>
    <style:style style:parent-style-name="1003" style:display-name="T168" style:family="text" style:name="1978">
      <style:paragraph-properties/>
      <style:text-properties fo:font-family="Wingdings" style:font-family-complex="Wingdings"/>
    </style:style>
    <style:style style:parent-style-name="1003" style:display-name="T169" style:family="text" style:name="1979">
      <style:paragraph-properties/>
      <style:text-properties fo:font-family="Symbol" style:font-family-complex="Symbol"/>
    </style:style>
    <style:style style:parent-style-name="1003" style:display-name="T170" style:family="text" style:name="1980">
      <style:paragraph-properties/>
      <style:text-properties fo:font-family="Courier New" style:font-family-complex="Courier New"/>
    </style:style>
    <style:style style:parent-style-name="1003" style:display-name="T171" style:family="text" style:name="1981">
      <style:paragraph-properties/>
      <style:text-properties fo:font-family="Wingdings" style:font-family-complex="Wingdings"/>
    </style:style>
    <style:style style:parent-style-name="1003" style:display-name="T172" style:family="text" style:name="1982">
      <style:paragraph-properties/>
      <style:text-properties fo:font-family="Symbol" style:font-family-complex="Symbol"/>
    </style:style>
    <style:style style:parent-style-name="1003" style:display-name="T173" style:family="text" style:name="1983">
      <style:paragraph-properties/>
      <style:text-properties fo:font-family="Courier New" style:font-family-complex="Courier New"/>
    </style:style>
    <style:style style:parent-style-name="1003" style:display-name="T174" style:family="text" style:name="1984">
      <style:paragraph-properties/>
      <style:text-properties fo:font-family="Wingdings" style:font-family-complex="Wingdings"/>
    </style:style>
    <style:style style:parent-style-name="1003" style:display-name="T175" style:family="text" style:name="1985">
      <style:paragraph-properties/>
      <style:text-properties fo:font-family="Symbol" style:font-family-complex="Symbol"/>
    </style:style>
    <style:style style:parent-style-name="1003" style:display-name="T176" style:family="text" style:name="1986">
      <style:paragraph-properties/>
      <style:text-properties fo:font-family="Courier New" style:font-family-complex="Courier New"/>
    </style:style>
    <style:style style:parent-style-name="1003" style:display-name="T177" style:family="text" style:name="1987">
      <style:paragraph-properties/>
      <style:text-properties fo:font-family="Wingdings" style:font-family-complex="Wingdings"/>
    </style:style>
    <style:style style:parent-style-name="1003" style:display-name="T178" style:family="text" style:name="1988">
      <style:paragraph-properties/>
      <style:text-properties fo:font-family="Symbol" style:font-family-complex="Symbol"/>
    </style:style>
    <style:style style:parent-style-name="1003" style:display-name="T179" style:family="text" style:name="1989">
      <style:paragraph-properties/>
      <style:text-properties fo:font-family="Courier New" style:font-family-complex="Courier New"/>
    </style:style>
    <style:style style:parent-style-name="1003" style:display-name="T180" style:family="text" style:name="1990">
      <style:paragraph-properties/>
      <style:text-properties fo:font-family="Wingdings" style:font-family-complex="Wingdings"/>
    </style:style>
    <style:style style:parent-style-name="1003" style:display-name="T181" style:family="text" style:name="1991">
      <style:paragraph-properties/>
      <style:text-properties fo:font-family="Symbol" style:font-family-complex="Symbol"/>
    </style:style>
    <style:style style:parent-style-name="1003" style:display-name="T182" style:family="text" style:name="1992">
      <style:paragraph-properties/>
    </style:style>
    <style:style style:parent-style-name="1003" style:display-name="T183" style:family="text" style:name="1993">
      <style:paragraph-properties/>
      <style:text-properties fo:font-family="Wingdings" style:font-family-complex="Wingdings"/>
    </style:style>
    <style:style style:parent-style-name="1003" style:display-name="T184" style:family="text" style:name="1994">
      <style:paragraph-properties/>
      <style:text-properties fo:font-family="Symbol" style:font-family-complex="Symbol"/>
    </style:style>
    <style:style style:parent-style-name="1003" style:display-name="T185" style:family="text" style:name="1995">
      <style:paragraph-properties/>
      <style:text-properties fo:font-family="Courier New" style:font-family-complex="Courier New"/>
    </style:style>
    <style:style style:parent-style-name="1003" style:display-name="T186" style:family="text" style:name="1996">
      <style:paragraph-properties/>
      <style:text-properties fo:font-family="Wingdings" style:font-family-complex="Wingdings"/>
    </style:style>
    <style:style style:parent-style-name="1003" style:display-name="T187" style:family="text" style:name="1997">
      <style:paragraph-properties/>
      <style:text-properties fo:font-family="Symbol" style:font-family-complex="Symbol"/>
    </style:style>
    <style:style style:parent-style-name="1003" style:display-name="T188" style:family="text" style:name="1998">
      <style:paragraph-properties/>
      <style:text-properties fo:font-family="Courier New" style:font-family-complex="Courier New"/>
    </style:style>
    <style:style style:parent-style-name="1003" style:display-name="T189" style:family="text" style:name="1999">
      <style:paragraph-properties/>
      <style:text-properties fo:font-family="Wingdings" style:font-family-complex="Wingdings"/>
    </style:style>
    <style:style style:parent-style-name="1003" style:display-name="T190" style:family="text" style:name="2000">
      <style:paragraph-properties/>
      <style:text-properties fo:font-family="Symbol" style:font-family-complex="Symbol"/>
    </style:style>
    <style:style style:parent-style-name="1003" style:display-name="T191" style:family="text" style:name="2001">
      <style:paragraph-properties/>
    </style:style>
    <style:style style:parent-style-name="1003" style:display-name="T192" style:family="text" style:name="2002">
      <style:paragraph-properties/>
      <style:text-properties fo:font-family="Wingdings" style:font-family-complex="Wingdings"/>
    </style:style>
    <style:style style:parent-style-name="1003" style:display-name="T193" style:family="text" style:name="2003">
      <style:paragraph-properties/>
      <style:text-properties fo:font-family="Symbol" style:font-family-complex="Symbol"/>
    </style:style>
    <style:style style:parent-style-name="1003" style:display-name="T194" style:family="text" style:name="2004">
      <style:paragraph-properties/>
      <style:text-properties fo:font-family="Courier New" style:font-family-complex="Courier New"/>
    </style:style>
    <style:style style:parent-style-name="1003" style:display-name="T195" style:family="text" style:name="2005">
      <style:paragraph-properties/>
      <style:text-properties fo:font-family="Wingdings" style:font-family-complex="Wingdings"/>
    </style:style>
    <style:style style:parent-style-name="1003" style:display-name="T196" style:family="text" style:name="2006">
      <style:paragraph-properties/>
      <style:text-properties fo:font-family="Symbol" style:font-family-complex="Symbol"/>
    </style:style>
    <style:style style:parent-style-name="1003" style:display-name="T197" style:family="text" style:name="2007">
      <style:paragraph-properties/>
      <style:text-properties fo:font-family="Courier New" style:font-family-complex="Courier New"/>
    </style:style>
    <style:style style:parent-style-name="1003" style:display-name="T198" style:family="text" style:name="2008">
      <style:paragraph-properties/>
      <style:text-properties fo:font-family="Wingdings" style:font-family-complex="Wingdings"/>
    </style:style>
    <style:style style:parent-style-name="1003" style:display-name="T1" style:family="text" style:name="2009">
      <style:paragraph-properties/>
    </style:style>
    <style:style style:parent-style-name="1003" style:display-name="T2" style:family="text" style:name="2010">
      <style:paragraph-properties/>
    </style:style>
    <style:style style:parent-style-name="1003" style:display-name="T3" style:family="text" style:name="2011">
      <style:paragraph-properties/>
    </style:style>
    <style:style style:parent-style-name="1003" style:display-name="T4" style:family="text" style:name="2012">
      <style:paragraph-properties/>
    </style:style>
    <style:style style:parent-style-name="1003" style:display-name="T5" style:family="text" style:name="2013">
      <style:paragraph-properties/>
    </style:style>
    <style:style style:parent-style-name="1003" style:display-name="T6" style:family="text" style:name="2014">
      <style:paragraph-properties/>
    </style:style>
    <style:style style:parent-style-name="1003" style:display-name="T7" style:family="text" style:name="2015">
      <style:paragraph-properties/>
    </style:style>
    <style:style style:parent-style-name="1003" style:display-name="T8" style:family="text" style:name="2016">
      <style:paragraph-properties/>
    </style:style>
    <style:style style:parent-style-name="1003" style:display-name="T9" style:family="text" style:name="2017">
      <style:paragraph-properties/>
    </style:style>
    <style:style style:parent-style-name="1003" style:display-name="T10" style:family="text" style:name="2018">
      <style:paragraph-properties/>
    </style:style>
    <style:style style:parent-style-name="1003" style:display-name="T11" style:family="text" style:name="2019">
      <style:paragraph-properties/>
    </style:style>
    <style:style style:parent-style-name="1003" style:display-name="T12" style:family="text" style:name="2020">
      <style:paragraph-properties/>
    </style:style>
    <style:style style:parent-style-name="1003" style:display-name="T13" style:family="text" style:name="2021">
      <style:paragraph-properties/>
    </style:style>
    <style:style style:parent-style-name="1003" style:display-name="T14" style:family="text" style:name="2022">
      <style:paragraph-properties/>
    </style:style>
    <style:style style:parent-style-name="1003" style:display-name="T15" style:family="text" style:name="2023">
      <style:paragraph-properties/>
    </style:style>
    <style:style style:parent-style-name="1003" style:display-name="T16" style:family="text" style:name="2024">
      <style:paragraph-properties/>
    </style:style>
    <style:style style:parent-style-name="1003" style:display-name="T17" style:family="text" style:name="2025">
      <style:paragraph-properties/>
    </style:style>
    <style:style style:parent-style-name="1003" style:display-name="T18" style:family="text" style:name="2026">
      <style:paragraph-properties/>
    </style:style>
    <style:style style:parent-style-name="1003" style:display-name="T19" style:family="text" style:name="2027">
      <style:paragraph-properties/>
    </style:style>
    <style:style style:parent-style-name="1003" style:display-name="T20" style:family="text" style:name="2028">
      <style:paragraph-properties/>
    </style:style>
    <style:style style:parent-style-name="1003" style:display-name="T21" style:family="text" style:name="2029">
      <style:paragraph-properties/>
    </style:style>
    <style:style style:parent-style-name="1003" style:display-name="T22" style:family="text" style:name="2030">
      <style:paragraph-properties/>
    </style:style>
    <style:style style:parent-style-name="1003" style:display-name="T23" style:family="text" style:name="2031">
      <style:paragraph-properties/>
    </style:style>
    <style:style style:parent-style-name="1003" style:display-name="T24" style:family="text" style:name="2032">
      <style:paragraph-properties/>
    </style:style>
    <style:style style:parent-style-name="1003" style:display-name="T25" style:family="text" style:name="2033">
      <style:paragraph-properties/>
    </style:style>
    <style:style style:parent-style-name="1003" style:display-name="T26" style:family="text" style:name="2034">
      <style:paragraph-properties/>
    </style:style>
    <style:style style:parent-style-name="1003" style:display-name="T27" style:family="text" style:name="2035">
      <style:paragraph-properties/>
    </style:style>
    <style:style style:parent-style-name="1003" style:display-name="T28" style:family="text" style:name="2036">
      <style:paragraph-properties/>
    </style:style>
    <style:style style:parent-style-name="1003" style:display-name="T29" style:family="text" style:name="2037">
      <style:paragraph-properties/>
    </style:style>
    <style:style style:parent-style-name="1003" style:display-name="T30" style:family="text" style:name="2038">
      <style:paragraph-properties/>
    </style:style>
    <style:style style:parent-style-name="1003" style:display-name="T31" style:family="text" style:name="2039">
      <style:paragraph-properties/>
    </style:style>
    <style:style style:parent-style-name="1003" style:display-name="T32" style:family="text" style:name="2040">
      <style:paragraph-properties/>
    </style:style>
    <style:style style:parent-style-name="1003" style:display-name="T33" style:family="text" style:name="2041">
      <style:paragraph-properties/>
    </style:style>
    <style:style style:parent-style-name="1003" style:display-name="T34" style:family="text" style:name="2042">
      <style:paragraph-properties/>
    </style:style>
    <style:style style:parent-style-name="1003" style:display-name="T35" style:family="text" style:name="2043">
      <style:paragraph-properties/>
    </style:style>
    <style:style style:parent-style-name="1003" style:display-name="T36" style:family="text" style:name="2044">
      <style:paragraph-properties/>
    </style:style>
    <style:style style:parent-style-name="1003" style:display-name="T37" style:family="text" style:name="2045">
      <style:paragraph-properties/>
    </style:style>
    <style:style style:parent-style-name="1003" style:display-name="T38" style:family="text" style:name="2046">
      <style:paragraph-properties/>
    </style:style>
    <style:style style:parent-style-name="1003" style:display-name="T39" style:family="text" style:name="2047">
      <style:paragraph-properties/>
    </style:style>
    <style:style style:parent-style-name="1003" style:display-name="T40" style:family="text" style:name="2048">
      <style:paragraph-properties/>
    </style:style>
    <style:style style:parent-style-name="1003" style:display-name="T41" style:family="text" style:name="2049">
      <style:paragraph-properties/>
    </style:style>
    <style:style style:parent-style-name="1003" style:display-name="T42" style:family="text" style:name="2050">
      <style:paragraph-properties/>
    </style:style>
    <style:style style:parent-style-name="1003" style:display-name="T43" style:family="text" style:name="2051">
      <style:paragraph-properties/>
    </style:style>
    <style:style style:parent-style-name="1003" style:display-name="T44" style:family="text" style:name="2052">
      <style:paragraph-properties/>
    </style:style>
    <style:style style:parent-style-name="1003" style:display-name="T45" style:family="text" style:name="2053">
      <style:paragraph-properties/>
    </style:style>
    <style:style style:parent-style-name="1003" style:display-name="T46" style:family="text" style:name="2054">
      <style:paragraph-properties/>
    </style:style>
    <style:style style:parent-style-name="1003" style:display-name="T47" style:family="text" style:name="2055">
      <style:paragraph-properties/>
    </style:style>
    <style:style style:parent-style-name="1003" style:display-name="T48" style:family="text" style:name="2056">
      <style:paragraph-properties/>
    </style:style>
    <style:style style:parent-style-name="1003" style:display-name="T49" style:family="text" style:name="2057">
      <style:paragraph-properties/>
    </style:style>
    <style:style style:parent-style-name="1003" style:display-name="T50" style:family="text" style:name="2058">
      <style:paragraph-properties/>
    </style:style>
    <style:style style:parent-style-name="1003" style:display-name="T51" style:family="text" style:name="2059">
      <style:paragraph-properties/>
    </style:style>
    <style:style style:parent-style-name="1003" style:display-name="T52" style:family="text" style:name="2060">
      <style:paragraph-properties/>
    </style:style>
    <style:style style:parent-style-name="1003" style:display-name="T53" style:family="text" style:name="2061">
      <style:paragraph-properties/>
    </style:style>
    <style:style style:parent-style-name="1003" style:display-name="T54" style:family="text" style:name="2062">
      <style:paragraph-properties/>
    </style:style>
    <style:style style:parent-style-name="1003" style:display-name="T55" style:family="text" style:name="2063">
      <style:paragraph-properties/>
    </style:style>
    <style:style style:parent-style-name="1003" style:display-name="T56" style:family="text" style:name="2064">
      <style:paragraph-properties/>
    </style:style>
    <style:style style:parent-style-name="1003" style:display-name="T57" style:family="text" style:name="2065">
      <style:paragraph-properties/>
    </style:style>
    <style:style style:parent-style-name="1003" style:display-name="T58" style:family="text" style:name="2066">
      <style:paragraph-properties/>
    </style:style>
    <style:style style:parent-style-name="1003" style:display-name="T59" style:family="text" style:name="2067">
      <style:paragraph-properties/>
    </style:style>
    <style:style style:parent-style-name="1003" style:display-name="T60" style:family="text" style:name="2068">
      <style:paragraph-properties/>
    </style:style>
    <style:style style:parent-style-name="1003" style:display-name="T61" style:family="text" style:name="2069">
      <style:paragraph-properties/>
    </style:style>
    <style:style style:parent-style-name="1003" style:display-name="T62" style:family="text" style:name="2070">
      <style:paragraph-properties/>
    </style:style>
    <style:style style:parent-style-name="1003" style:display-name="T63" style:family="text" style:name="2071">
      <style:paragraph-properties/>
    </style:style>
    <style:style style:parent-style-name="1003" style:display-name="T64" style:family="text" style:name="2072">
      <style:paragraph-properties/>
    </style:style>
    <style:style style:parent-style-name="1003" style:display-name="T65" style:family="text" style:name="2073">
      <style:paragraph-properties/>
    </style:style>
    <style:style style:parent-style-name="1003" style:display-name="T66" style:family="text" style:name="2074">
      <style:paragraph-properties/>
    </style:style>
    <style:style style:parent-style-name="1003" style:display-name="T67" style:family="text" style:name="2075">
      <style:paragraph-properties/>
    </style:style>
    <style:style style:parent-style-name="1003" style:display-name="T68" style:family="text" style:name="2076">
      <style:paragraph-properties/>
    </style:style>
    <style:style style:parent-style-name="1003" style:display-name="T69" style:family="text" style:name="2077">
      <style:paragraph-properties/>
    </style:style>
    <style:style style:parent-style-name="1003" style:display-name="T70" style:family="text" style:name="2078">
      <style:paragraph-properties/>
    </style:style>
    <style:style style:parent-style-name="1003" style:display-name="T71" style:family="text" style:name="2079">
      <style:paragraph-properties/>
    </style:style>
    <style:style style:parent-style-name="1003" style:display-name="T72" style:family="text" style:name="2080">
      <style:paragraph-properties/>
    </style:style>
    <style:style style:parent-style-name="1003" style:display-name="T73" style:family="text" style:name="2081">
      <style:paragraph-properties/>
    </style:style>
    <style:style style:parent-style-name="1003" style:display-name="T74" style:family="text" style:name="2082">
      <style:paragraph-properties/>
    </style:style>
    <style:style style:parent-style-name="1003" style:display-name="T75" style:family="text" style:name="2083">
      <style:paragraph-properties/>
    </style:style>
    <style:style style:parent-style-name="1003" style:display-name="T76" style:family="text" style:name="2084">
      <style:paragraph-properties/>
    </style:style>
    <style:style style:parent-style-name="1003" style:display-name="T77" style:family="text" style:name="2085">
      <style:paragraph-properties/>
    </style:style>
    <style:style style:parent-style-name="1003" style:display-name="T78" style:family="text" style:name="2086">
      <style:paragraph-properties/>
    </style:style>
    <style:style style:parent-style-name="1003" style:display-name="T79" style:family="text" style:name="2087">
      <style:paragraph-properties/>
    </style:style>
    <style:style style:parent-style-name="1003" style:display-name="T80" style:family="text" style:name="2088">
      <style:paragraph-properties/>
    </style:style>
    <style:style style:parent-style-name="1003" style:display-name="T81" style:family="text" style:name="2089">
      <style:paragraph-properties/>
    </style:style>
    <style:style style:parent-style-name="1003" style:display-name="T82" style:family="text" style:name="2090">
      <style:paragraph-properties/>
    </style:style>
    <style:style style:parent-style-name="1003" style:display-name="T83" style:family="text" style:name="2091">
      <style:paragraph-properties/>
    </style:style>
    <style:style style:parent-style-name="1003" style:display-name="T84" style:family="text" style:name="2092">
      <style:paragraph-properties/>
    </style:style>
    <style:style style:parent-style-name="1003" style:display-name="T85" style:family="text" style:name="2093">
      <style:paragraph-properties/>
    </style:style>
    <style:style style:parent-style-name="1003" style:display-name="T86" style:family="text" style:name="2094">
      <style:paragraph-properties/>
    </style:style>
    <style:style style:parent-style-name="1003" style:display-name="T87" style:family="text" style:name="2095">
      <style:paragraph-properties/>
    </style:style>
    <style:style style:parent-style-name="1003" style:display-name="T88" style:family="text" style:name="2096">
      <style:paragraph-properties/>
    </style:style>
    <style:style style:parent-style-name="1003" style:display-name="T89" style:family="text" style:name="2097">
      <style:paragraph-properties/>
    </style:style>
    <style:style style:parent-style-name="1003" style:display-name="T90" style:family="text" style:name="2098">
      <style:paragraph-properties/>
    </style:style>
    <style:style style:parent-style-name="1003" style:display-name="T91" style:family="text" style:name="2099">
      <style:paragraph-properties/>
    </style:style>
    <style:style style:parent-style-name="1003" style:display-name="T92" style:family="text" style:name="2100">
      <style:paragraph-properties/>
    </style:style>
    <style:style style:parent-style-name="1003" style:display-name="T93" style:family="text" style:name="2101">
      <style:paragraph-properties/>
    </style:style>
    <style:style style:parent-style-name="1003" style:display-name="T94" style:family="text" style:name="2102">
      <style:paragraph-properties/>
    </style:style>
    <style:style style:parent-style-name="1003" style:display-name="T95" style:family="text" style:name="2103">
      <style:paragraph-properties/>
    </style:style>
    <style:style style:parent-style-name="1003" style:display-name="T96" style:family="text" style:name="2104">
      <style:paragraph-properties/>
    </style:style>
    <style:style style:parent-style-name="1003" style:display-name="T97" style:family="text" style:name="2105">
      <style:paragraph-properties/>
    </style:style>
    <style:style style:parent-style-name="1003" style:display-name="T98" style:family="text" style:name="2106">
      <style:paragraph-properties/>
    </style:style>
    <style:style style:parent-style-name="1003" style:display-name="T99" style:family="text" style:name="2107">
      <style:paragraph-properties/>
    </style:style>
    <style:style style:parent-style-name="1003" style:display-name="T100" style:family="text" style:name="2108">
      <style:paragraph-properties/>
    </style:style>
    <style:style style:parent-style-name="1003" style:display-name="T101" style:family="text" style:name="2109">
      <style:paragraph-properties/>
    </style:style>
    <style:style style:parent-style-name="1003" style:display-name="T102" style:family="text" style:name="2110">
      <style:paragraph-properties/>
    </style:style>
    <style:style style:parent-style-name="1003" style:display-name="T103" style:family="text" style:name="2111">
      <style:paragraph-properties/>
    </style:style>
    <style:style style:parent-style-name="1003" style:display-name="T104" style:family="text" style:name="2112">
      <style:paragraph-properties/>
    </style:style>
    <style:style style:parent-style-name="1003" style:display-name="T105" style:family="text" style:name="2113">
      <style:paragraph-properties/>
    </style:style>
    <style:style style:parent-style-name="1003" style:display-name="T106" style:family="text" style:name="2114">
      <style:paragraph-properties/>
    </style:style>
    <style:style style:parent-style-name="1003" style:display-name="T107" style:family="text" style:name="2115">
      <style:paragraph-properties/>
    </style:style>
    <style:style style:parent-style-name="1003" style:display-name="T108" style:family="text" style:name="2116">
      <style:paragraph-properties/>
    </style:style>
    <style:style style:parent-style-name="1003" style:display-name="T109" style:family="text" style:name="2117">
      <style:paragraph-properties/>
    </style:style>
    <style:style style:parent-style-name="1003" style:display-name="T110" style:family="text" style:name="2118">
      <style:paragraph-properties/>
    </style:style>
    <style:style style:parent-style-name="1003" style:display-name="T111" style:family="text" style:name="2119">
      <style:paragraph-properties/>
    </style:style>
    <style:style style:parent-style-name="1003" style:display-name="T112" style:family="text" style:name="2120">
      <style:paragraph-properties/>
    </style:style>
    <style:style style:parent-style-name="1003" style:display-name="T113" style:family="text" style:name="2121">
      <style:paragraph-properties/>
    </style:style>
    <style:style style:parent-style-name="1003" style:display-name="T114" style:family="text" style:name="2122">
      <style:paragraph-properties/>
    </style:style>
    <style:style style:parent-style-name="1003" style:display-name="T115" style:family="text" style:name="2123">
      <style:paragraph-properties/>
    </style:style>
    <style:style style:parent-style-name="1003" style:display-name="T116" style:family="text" style:name="2124">
      <style:paragraph-properties/>
    </style:style>
    <style:style style:parent-style-name="1003" style:display-name="T117" style:family="text" style:name="2125">
      <style:paragraph-properties/>
    </style:style>
    <style:style style:parent-style-name="1003" style:display-name="T118" style:family="text" style:name="2126">
      <style:paragraph-properties/>
    </style:style>
    <style:style style:parent-style-name="1003" style:display-name="T119" style:family="text" style:name="2127">
      <style:paragraph-properties/>
    </style:style>
    <style:style style:parent-style-name="1003" style:display-name="T120" style:family="text" style:name="2128">
      <style:paragraph-properties/>
    </style:style>
    <style:style style:parent-style-name="1003" style:display-name="T121" style:family="text" style:name="2129">
      <style:paragraph-properties/>
    </style:style>
    <style:style style:parent-style-name="1003" style:display-name="T122" style:family="text" style:name="2130">
      <style:paragraph-properties/>
    </style:style>
    <style:style style:parent-style-name="1003" style:display-name="T123" style:family="text" style:name="2131">
      <style:paragraph-properties/>
    </style:style>
    <style:style style:parent-style-name="1003" style:display-name="T124" style:family="text" style:name="2132">
      <style:paragraph-properties/>
    </style:style>
    <style:style style:parent-style-name="1003" style:display-name="T125" style:family="text" style:name="2133">
      <style:paragraph-properties/>
    </style:style>
    <style:style style:parent-style-name="1003" style:display-name="T126" style:family="text" style:name="2134">
      <style:paragraph-properties/>
    </style:style>
    <style:style style:parent-style-name="1003" style:display-name="T127" style:family="text" style:name="2135">
      <style:paragraph-properties/>
    </style:style>
    <style:style style:parent-style-name="1003" style:display-name="T128" style:family="text" style:name="2136">
      <style:paragraph-properties/>
    </style:style>
    <style:style style:parent-style-name="1003" style:display-name="T129" style:family="text" style:name="2137">
      <style:paragraph-properties/>
    </style:style>
    <style:style style:parent-style-name="1003" style:display-name="T130" style:family="text" style:name="2138">
      <style:paragraph-properties/>
    </style:style>
    <style:style style:parent-style-name="1003" style:display-name="T131" style:family="text" style:name="2139">
      <style:paragraph-properties/>
    </style:style>
    <style:style style:parent-style-name="1003" style:display-name="T132" style:family="text" style:name="2140">
      <style:paragraph-properties/>
    </style:style>
    <style:style style:parent-style-name="1003" style:display-name="T133" style:family="text" style:name="2141">
      <style:paragraph-properties/>
    </style:style>
    <style:style style:parent-style-name="1003" style:display-name="T134" style:family="text" style:name="2142">
      <style:paragraph-properties/>
    </style:style>
    <style:style style:parent-style-name="1003" style:display-name="T135" style:family="text" style:name="2143">
      <style:paragraph-properties/>
    </style:style>
    <style:style style:parent-style-name="1003" style:display-name="T136" style:family="text" style:name="2144">
      <style:paragraph-properties/>
    </style:style>
    <style:style style:parent-style-name="1003" style:display-name="T137" style:family="text" style:name="2145">
      <style:paragraph-properties/>
    </style:style>
    <style:style style:parent-style-name="1003" style:display-name="T138" style:family="text" style:name="2146">
      <style:paragraph-properties/>
    </style:style>
    <style:style style:parent-style-name="1003" style:display-name="T139" style:family="text" style:name="2147">
      <style:paragraph-properties/>
    </style:style>
    <style:style style:parent-style-name="1003" style:display-name="T140" style:family="text" style:name="2148">
      <style:paragraph-properties/>
    </style:style>
    <style:style style:parent-style-name="1003" style:display-name="T141" style:family="text" style:name="2149">
      <style:paragraph-properties/>
    </style:style>
    <style:style style:parent-style-name="1003" style:display-name="T142" style:family="text" style:name="2150">
      <style:paragraph-properties/>
    </style:style>
    <style:style style:parent-style-name="1003" style:display-name="T143" style:family="text" style:name="2151">
      <style:paragraph-properties/>
    </style:style>
    <style:style style:parent-style-name="1003" style:display-name="T144" style:family="text" style:name="2152">
      <style:paragraph-properties/>
    </style:style>
    <style:style style:parent-style-name="1003" style:display-name="T145" style:family="text" style:name="2153">
      <style:paragraph-properties/>
    </style:style>
    <style:style style:parent-style-name="1003" style:display-name="T146" style:family="text" style:name="2154">
      <style:paragraph-properties/>
      <style:text-properties fo:font-family="Courier New" style:font-family-complex="Courier New"/>
    </style:style>
    <style:style style:parent-style-name="1003" style:display-name="T147" style:family="text" style:name="2155">
      <style:paragraph-properties/>
      <style:text-properties fo:font-family="Wingdings" style:font-family-complex="Wingdings"/>
    </style:style>
    <style:style style:parent-style-name="1003" style:display-name="T148" style:family="text" style:name="2156">
      <style:paragraph-properties/>
      <style:text-properties fo:font-family="Symbol" style:font-family-complex="Symbol"/>
    </style:style>
    <style:style style:parent-style-name="1003" style:display-name="T149" style:family="text" style:name="2157">
      <style:paragraph-properties/>
      <style:text-properties fo:font-family="Courier New" style:font-family-complex="Courier New"/>
    </style:style>
    <style:style style:parent-style-name="1003" style:display-name="T150" style:family="text" style:name="2158">
      <style:paragraph-properties/>
      <style:text-properties fo:font-family="Wingdings" style:font-family-complex="Wingdings"/>
    </style:style>
    <style:style style:parent-style-name="1003" style:display-name="T151" style:family="text" style:name="2159">
      <style:paragraph-properties/>
      <style:text-properties fo:font-family="Symbol" style:font-family-complex="Symbol"/>
    </style:style>
    <style:style style:parent-style-name="1003" style:display-name="T152" style:family="text" style:name="2160">
      <style:paragraph-properties/>
      <style:text-properties fo:font-family="Courier New" style:font-family-complex="Courier New"/>
    </style:style>
    <style:style style:parent-style-name="1003" style:display-name="T153" style:family="text" style:name="2161">
      <style:paragraph-properties/>
      <style:text-properties fo:font-family="Wingdings" style:font-family-complex="Wingdings"/>
    </style:style>
    <style:style style:parent-style-name="1003" style:display-name="T154" style:family="text" style:name="2162">
      <style:paragraph-properties/>
      <style:text-properties fo:font-family="Symbol" style:font-family-complex="Symbol"/>
    </style:style>
    <style:style style:parent-style-name="1003" style:display-name="T155" style:family="text" style:name="2163">
      <style:paragraph-properties/>
      <style:text-properties fo:font-family="Courier New" style:font-family-complex="Courier New"/>
    </style:style>
    <style:style style:parent-style-name="1003" style:display-name="T156" style:family="text" style:name="2164">
      <style:paragraph-properties/>
      <style:text-properties fo:font-family="Wingdings" style:font-family-complex="Wingdings"/>
    </style:style>
    <style:style style:parent-style-name="1003" style:display-name="T157" style:family="text" style:name="2165">
      <style:paragraph-properties/>
      <style:text-properties fo:font-family="Symbol" style:font-family-complex="Symbol"/>
    </style:style>
    <style:style style:parent-style-name="1003" style:display-name="T158" style:family="text" style:name="2166">
      <style:paragraph-properties/>
      <style:text-properties fo:font-family="Courier New" style:font-family-complex="Courier New"/>
    </style:style>
    <style:style style:parent-style-name="1003" style:display-name="T159" style:family="text" style:name="2167">
      <style:paragraph-properties/>
      <style:text-properties fo:font-family="Wingdings" style:font-family-complex="Wingdings"/>
    </style:style>
    <style:style style:parent-style-name="1003" style:display-name="T160" style:family="text" style:name="2168">
      <style:paragraph-properties/>
      <style:text-properties fo:font-family="Symbol" style:font-family-complex="Symbol"/>
    </style:style>
    <style:style style:parent-style-name="1003" style:display-name="T161" style:family="text" style:name="2169">
      <style:paragraph-properties/>
      <style:text-properties fo:font-family="Courier New" style:font-family-complex="Courier New"/>
    </style:style>
    <style:style style:parent-style-name="1003" style:display-name="T162" style:family="text" style:name="2170">
      <style:paragraph-properties/>
      <style:text-properties fo:font-family="Wingdings" style:font-family-complex="Wingdings"/>
    </style:style>
    <style:style style:parent-style-name="1003" style:display-name="T163" style:family="text" style:name="2171">
      <style:paragraph-properties/>
      <style:text-properties fo:font-family="Symbol" style:font-family-complex="Symbol" fo:font-weight="bold"/>
    </style:style>
    <style:style style:parent-style-name="1003" style:display-name="T164" style:family="text" style:name="2172">
      <style:paragraph-properties/>
      <style:text-properties fo:font-family="Symbol" style:font-family-complex="Symbol"/>
    </style:style>
    <style:style style:parent-style-name="1003" style:display-name="T165" style:family="text" style:name="2173">
      <style:paragraph-properties/>
      <style:text-properties fo:font-family="Wingdings" style:font-family-complex="Wingdings"/>
    </style:style>
    <style:style style:parent-style-name="1003" style:display-name="T166" style:family="text" style:name="2174">
      <style:paragraph-properties/>
      <style:text-properties fo:font-family="Symbol" style:font-family-complex="Symbol"/>
    </style:style>
    <style:style style:parent-style-name="1003" style:display-name="T167" style:family="text" style:name="2175">
      <style:paragraph-properties/>
      <style:text-properties fo:font-family="Courier New" style:font-family-complex="Courier New"/>
    </style:style>
    <style:style style:parent-style-name="1003" style:display-name="T168" style:family="text" style:name="2176">
      <style:paragraph-properties/>
      <style:text-properties fo:font-family="Wingdings" style:font-family-complex="Wingdings"/>
    </style:style>
    <style:style style:parent-style-name="1003" style:display-name="T169" style:family="text" style:name="2177">
      <style:paragraph-properties/>
      <style:text-properties fo:font-family="Symbol" style:font-family-complex="Symbol"/>
    </style:style>
    <style:style style:parent-style-name="1003" style:display-name="T170" style:family="text" style:name="2178">
      <style:paragraph-properties/>
      <style:text-properties fo:font-family="Courier New" style:font-family-complex="Courier New"/>
    </style:style>
    <style:style style:parent-style-name="1003" style:display-name="T171" style:family="text" style:name="2179">
      <style:paragraph-properties/>
      <style:text-properties fo:font-family="Wingdings" style:font-family-complex="Wingdings"/>
    </style:style>
    <style:style style:parent-style-name="1003" style:display-name="T172" style:family="text" style:name="2180">
      <style:paragraph-properties/>
      <style:text-properties fo:font-family="Symbol" style:font-family-complex="Symbol"/>
    </style:style>
    <style:style style:parent-style-name="1003" style:display-name="T173" style:family="text" style:name="2181">
      <style:paragraph-properties/>
      <style:text-properties fo:font-family="Courier New" style:font-family-complex="Courier New"/>
    </style:style>
    <style:style style:parent-style-name="1003" style:display-name="T174" style:family="text" style:name="2182">
      <style:paragraph-properties/>
      <style:text-properties fo:font-family="Wingdings" style:font-family-complex="Wingdings"/>
    </style:style>
    <style:style style:parent-style-name="1003" style:display-name="T175" style:family="text" style:name="2183">
      <style:paragraph-properties/>
      <style:text-properties fo:font-family="Symbol" style:font-family-complex="Symbol"/>
    </style:style>
    <style:style style:parent-style-name="1003" style:display-name="T176" style:family="text" style:name="2184">
      <style:paragraph-properties/>
      <style:text-properties fo:font-family="Courier New" style:font-family-complex="Courier New"/>
    </style:style>
    <style:style style:parent-style-name="1003" style:display-name="T177" style:family="text" style:name="2185">
      <style:paragraph-properties/>
      <style:text-properties fo:font-family="Wingdings" style:font-family-complex="Wingdings"/>
    </style:style>
    <style:style style:parent-style-name="1003" style:display-name="T178" style:family="text" style:name="2186">
      <style:paragraph-properties/>
      <style:text-properties fo:font-family="Symbol" style:font-family-complex="Symbol"/>
    </style:style>
    <style:style style:parent-style-name="1003" style:display-name="T179" style:family="text" style:name="2187">
      <style:paragraph-properties/>
      <style:text-properties fo:font-family="Courier New" style:font-family-complex="Courier New"/>
    </style:style>
    <style:style style:parent-style-name="1003" style:display-name="T180" style:family="text" style:name="2188">
      <style:paragraph-properties/>
      <style:text-properties fo:font-family="Wingdings" style:font-family-complex="Wingdings"/>
    </style:style>
    <style:style style:parent-style-name="1003" style:display-name="T181" style:family="text" style:name="2189">
      <style:paragraph-properties/>
      <style:text-properties fo:font-family="Symbol" style:font-family-complex="Symbol"/>
    </style:style>
    <style:style style:parent-style-name="1003" style:display-name="T182" style:family="text" style:name="2190">
      <style:paragraph-properties/>
    </style:style>
    <style:style style:parent-style-name="1003" style:display-name="T183" style:family="text" style:name="2191">
      <style:paragraph-properties/>
      <style:text-properties fo:font-family="Wingdings" style:font-family-complex="Wingdings"/>
    </style:style>
    <style:style style:parent-style-name="1003" style:display-name="T184" style:family="text" style:name="2192">
      <style:paragraph-properties/>
      <style:text-properties fo:font-family="Symbol" style:font-family-complex="Symbol"/>
    </style:style>
    <style:style style:parent-style-name="1003" style:display-name="T185" style:family="text" style:name="2193">
      <style:paragraph-properties/>
      <style:text-properties fo:font-family="Courier New" style:font-family-complex="Courier New"/>
    </style:style>
    <style:style style:parent-style-name="1003" style:display-name="T186" style:family="text" style:name="2194">
      <style:paragraph-properties/>
      <style:text-properties fo:font-family="Wingdings" style:font-family-complex="Wingdings"/>
    </style:style>
    <style:style style:parent-style-name="1003" style:display-name="T187" style:family="text" style:name="2195">
      <style:paragraph-properties/>
      <style:text-properties fo:font-family="Symbol" style:font-family-complex="Symbol"/>
    </style:style>
    <style:style style:parent-style-name="1003" style:display-name="T188" style:family="text" style:name="2196">
      <style:paragraph-properties/>
      <style:text-properties fo:font-family="Courier New" style:font-family-complex="Courier New"/>
    </style:style>
    <style:style style:parent-style-name="1003" style:display-name="T189" style:family="text" style:name="2197">
      <style:paragraph-properties/>
      <style:text-properties fo:font-family="Wingdings" style:font-family-complex="Wingdings"/>
    </style:style>
    <style:style style:parent-style-name="1003" style:display-name="T190" style:family="text" style:name="2198">
      <style:paragraph-properties/>
      <style:text-properties fo:font-family="Symbol" style:font-family-complex="Symbol"/>
    </style:style>
    <style:style style:parent-style-name="1003" style:display-name="T191" style:family="text" style:name="2199">
      <style:paragraph-properties/>
    </style:style>
    <style:style style:parent-style-name="1003" style:display-name="T192" style:family="text" style:name="2200">
      <style:paragraph-properties/>
      <style:text-properties fo:font-family="Wingdings" style:font-family-complex="Wingdings"/>
    </style:style>
    <style:style style:parent-style-name="1003" style:display-name="T193" style:family="text" style:name="2201">
      <style:paragraph-properties/>
      <style:text-properties fo:font-family="Symbol" style:font-family-complex="Symbol"/>
    </style:style>
    <style:style style:parent-style-name="1003" style:display-name="T194" style:family="text" style:name="2202">
      <style:paragraph-properties/>
      <style:text-properties fo:font-family="Courier New" style:font-family-complex="Courier New"/>
    </style:style>
    <style:style style:parent-style-name="1003" style:display-name="T195" style:family="text" style:name="2203">
      <style:paragraph-properties/>
      <style:text-properties fo:font-family="Wingdings" style:font-family-complex="Wingdings"/>
    </style:style>
    <style:style style:parent-style-name="1003" style:display-name="T196" style:family="text" style:name="2204">
      <style:paragraph-properties/>
      <style:text-properties fo:font-family="Symbol" style:font-family-complex="Symbol"/>
    </style:style>
    <style:style style:parent-style-name="1003" style:display-name="T197" style:family="text" style:name="2205">
      <style:paragraph-properties/>
      <style:text-properties fo:font-family="Courier New" style:font-family-complex="Courier New"/>
    </style:style>
    <style:style style:parent-style-name="1003" style:display-name="T198" style:family="text" style:name="2206">
      <style:paragraph-properties/>
      <style:text-properties fo:font-family="Wingdings" style:font-family-complex="Wingdings"/>
    </style:style>
    <style:style style:parent-style-name="1003" style:display-name="T1" style:family="text" style:name="2207">
      <style:paragraph-properties/>
    </style:style>
    <style:style style:parent-style-name="1003" style:display-name="T2" style:family="text" style:name="2208">
      <style:paragraph-properties/>
    </style:style>
    <style:style style:parent-style-name="1003" style:display-name="T3" style:family="text" style:name="2209">
      <style:paragraph-properties/>
    </style:style>
    <style:style style:parent-style-name="1003" style:display-name="T4" style:family="text" style:name="2210">
      <style:paragraph-properties/>
    </style:style>
    <style:style style:parent-style-name="1003" style:display-name="T5" style:family="text" style:name="2211">
      <style:paragraph-properties/>
    </style:style>
    <style:style style:parent-style-name="1003" style:display-name="T6" style:family="text" style:name="2212">
      <style:paragraph-properties/>
    </style:style>
    <style:style style:parent-style-name="1003" style:display-name="T7" style:family="text" style:name="2213">
      <style:paragraph-properties/>
    </style:style>
    <style:style style:parent-style-name="1003" style:display-name="T8" style:family="text" style:name="2214">
      <style:paragraph-properties/>
    </style:style>
    <style:style style:parent-style-name="1003" style:display-name="T9" style:family="text" style:name="2215">
      <style:paragraph-properties/>
    </style:style>
    <style:style style:parent-style-name="1003" style:display-name="T10" style:family="text" style:name="2216">
      <style:paragraph-properties/>
    </style:style>
    <style:style style:parent-style-name="1003" style:display-name="T11" style:family="text" style:name="2217">
      <style:paragraph-properties/>
    </style:style>
    <style:style style:parent-style-name="1003" style:display-name="T12" style:family="text" style:name="2218">
      <style:paragraph-properties/>
    </style:style>
    <style:style style:parent-style-name="1003" style:display-name="T13" style:family="text" style:name="2219">
      <style:paragraph-properties/>
    </style:style>
    <style:style style:parent-style-name="1003" style:display-name="T14" style:family="text" style:name="2220">
      <style:paragraph-properties/>
    </style:style>
    <style:style style:parent-style-name="1003" style:display-name="T15" style:family="text" style:name="2221">
      <style:paragraph-properties/>
    </style:style>
    <style:style style:parent-style-name="1003" style:display-name="T16" style:family="text" style:name="2222">
      <style:paragraph-properties/>
    </style:style>
    <style:style style:parent-style-name="1003" style:display-name="T17" style:family="text" style:name="2223">
      <style:paragraph-properties/>
    </style:style>
    <style:style style:parent-style-name="1003" style:display-name="T18" style:family="text" style:name="2224">
      <style:paragraph-properties/>
    </style:style>
    <style:style style:parent-style-name="1003" style:display-name="T19" style:family="text" style:name="2225">
      <style:paragraph-properties/>
    </style:style>
    <style:style style:parent-style-name="1003" style:display-name="T20" style:family="text" style:name="2226">
      <style:paragraph-properties/>
    </style:style>
    <style:style style:parent-style-name="1003" style:display-name="T21" style:family="text" style:name="2227">
      <style:paragraph-properties/>
    </style:style>
    <style:style style:parent-style-name="1003" style:display-name="T22" style:family="text" style:name="2228">
      <style:paragraph-properties/>
    </style:style>
    <style:style style:parent-style-name="1003" style:display-name="T23" style:family="text" style:name="2229">
      <style:paragraph-properties/>
    </style:style>
    <style:style style:parent-style-name="1003" style:display-name="T24" style:family="text" style:name="2230">
      <style:paragraph-properties/>
    </style:style>
    <style:style style:parent-style-name="1003" style:display-name="T25" style:family="text" style:name="2231">
      <style:paragraph-properties/>
    </style:style>
    <style:style style:parent-style-name="1003" style:display-name="T26" style:family="text" style:name="2232">
      <style:paragraph-properties/>
    </style:style>
    <style:style style:parent-style-name="1003" style:display-name="T27" style:family="text" style:name="2233">
      <style:paragraph-properties/>
    </style:style>
    <style:style style:parent-style-name="1003" style:display-name="T28" style:family="text" style:name="2234">
      <style:paragraph-properties/>
    </style:style>
    <style:style style:parent-style-name="1003" style:display-name="T29" style:family="text" style:name="2235">
      <style:paragraph-properties/>
    </style:style>
    <style:style style:parent-style-name="1003" style:display-name="T30" style:family="text" style:name="2236">
      <style:paragraph-properties/>
    </style:style>
    <style:style style:parent-style-name="1003" style:display-name="T31" style:family="text" style:name="2237">
      <style:paragraph-properties/>
    </style:style>
    <style:style style:parent-style-name="1003" style:display-name="T32" style:family="text" style:name="2238">
      <style:paragraph-properties/>
    </style:style>
    <style:style style:parent-style-name="1003" style:display-name="T33" style:family="text" style:name="2239">
      <style:paragraph-properties/>
    </style:style>
    <style:style style:parent-style-name="1003" style:display-name="T34" style:family="text" style:name="2240">
      <style:paragraph-properties/>
    </style:style>
    <style:style style:parent-style-name="1003" style:display-name="T35" style:family="text" style:name="2241">
      <style:paragraph-properties/>
    </style:style>
    <style:style style:parent-style-name="1003" style:display-name="T36" style:family="text" style:name="2242">
      <style:paragraph-properties/>
    </style:style>
    <style:style style:parent-style-name="1003" style:display-name="T37" style:family="text" style:name="2243">
      <style:paragraph-properties/>
    </style:style>
    <style:style style:parent-style-name="1003" style:display-name="T38" style:family="text" style:name="2244">
      <style:paragraph-properties/>
    </style:style>
    <style:style style:parent-style-name="1003" style:display-name="T39" style:family="text" style:name="2245">
      <style:paragraph-properties/>
    </style:style>
    <style:style style:parent-style-name="1003" style:display-name="T40" style:family="text" style:name="2246">
      <style:paragraph-properties/>
    </style:style>
    <style:style style:parent-style-name="1003" style:display-name="T41" style:family="text" style:name="2247">
      <style:paragraph-properties/>
    </style:style>
    <style:style style:parent-style-name="1003" style:display-name="T42" style:family="text" style:name="2248">
      <style:paragraph-properties/>
    </style:style>
    <style:style style:parent-style-name="1003" style:display-name="T43" style:family="text" style:name="2249">
      <style:paragraph-properties/>
    </style:style>
    <style:style style:parent-style-name="1003" style:display-name="T44" style:family="text" style:name="2250">
      <style:paragraph-properties/>
    </style:style>
    <style:style style:parent-style-name="1003" style:display-name="T45" style:family="text" style:name="2251">
      <style:paragraph-properties/>
    </style:style>
    <style:style style:parent-style-name="1003" style:display-name="T46" style:family="text" style:name="2252">
      <style:paragraph-properties/>
    </style:style>
    <style:style style:parent-style-name="1003" style:display-name="T47" style:family="text" style:name="2253">
      <style:paragraph-properties/>
    </style:style>
    <style:style style:parent-style-name="1003" style:display-name="T48" style:family="text" style:name="2254">
      <style:paragraph-properties/>
    </style:style>
    <style:style style:parent-style-name="1003" style:display-name="T49" style:family="text" style:name="2255">
      <style:paragraph-properties/>
    </style:style>
    <style:style style:parent-style-name="1003" style:display-name="T50" style:family="text" style:name="2256">
      <style:paragraph-properties/>
    </style:style>
    <style:style style:parent-style-name="1003" style:display-name="T51" style:family="text" style:name="2257">
      <style:paragraph-properties/>
    </style:style>
    <style:style style:parent-style-name="1003" style:display-name="T52" style:family="text" style:name="2258">
      <style:paragraph-properties/>
    </style:style>
    <style:style style:parent-style-name="1003" style:display-name="T53" style:family="text" style:name="2259">
      <style:paragraph-properties/>
    </style:style>
    <style:style style:parent-style-name="1003" style:display-name="T54" style:family="text" style:name="2260">
      <style:paragraph-properties/>
    </style:style>
    <style:style style:parent-style-name="1003" style:display-name="T55" style:family="text" style:name="2261">
      <style:paragraph-properties/>
    </style:style>
    <style:style style:parent-style-name="1003" style:display-name="T56" style:family="text" style:name="2262">
      <style:paragraph-properties/>
    </style:style>
    <style:style style:parent-style-name="1003" style:display-name="T57" style:family="text" style:name="2263">
      <style:paragraph-properties/>
    </style:style>
    <style:style style:parent-style-name="1003" style:display-name="T58" style:family="text" style:name="2264">
      <style:paragraph-properties/>
    </style:style>
    <style:style style:parent-style-name="1003" style:display-name="T59" style:family="text" style:name="2265">
      <style:paragraph-properties/>
    </style:style>
    <style:style style:parent-style-name="1003" style:display-name="T60" style:family="text" style:name="2266">
      <style:paragraph-properties/>
    </style:style>
    <style:style style:parent-style-name="1003" style:display-name="T61" style:family="text" style:name="2267">
      <style:paragraph-properties/>
    </style:style>
    <style:style style:parent-style-name="1003" style:display-name="T62" style:family="text" style:name="2268">
      <style:paragraph-properties/>
    </style:style>
    <style:style style:parent-style-name="1003" style:display-name="T63" style:family="text" style:name="2269">
      <style:paragraph-properties/>
    </style:style>
    <style:style style:parent-style-name="1003" style:display-name="T64" style:family="text" style:name="2270">
      <style:paragraph-properties/>
    </style:style>
    <style:style style:parent-style-name="1003" style:display-name="T65" style:family="text" style:name="2271">
      <style:paragraph-properties/>
    </style:style>
    <style:style style:parent-style-name="1003" style:display-name="T66" style:family="text" style:name="2272">
      <style:paragraph-properties/>
    </style:style>
    <style:style style:parent-style-name="1003" style:display-name="T67" style:family="text" style:name="2273">
      <style:paragraph-properties/>
    </style:style>
    <style:style style:parent-style-name="1003" style:display-name="T68" style:family="text" style:name="2274">
      <style:paragraph-properties/>
    </style:style>
    <style:style style:parent-style-name="1003" style:display-name="T69" style:family="text" style:name="2275">
      <style:paragraph-properties/>
    </style:style>
    <style:style style:parent-style-name="1003" style:display-name="T70" style:family="text" style:name="2276">
      <style:paragraph-properties/>
    </style:style>
    <style:style style:parent-style-name="1003" style:display-name="T71" style:family="text" style:name="2277">
      <style:paragraph-properties/>
    </style:style>
    <style:style style:parent-style-name="1003" style:display-name="T72" style:family="text" style:name="2278">
      <style:paragraph-properties/>
    </style:style>
    <style:style style:parent-style-name="1003" style:display-name="T73" style:family="text" style:name="2279">
      <style:paragraph-properties/>
    </style:style>
    <style:style style:parent-style-name="1003" style:display-name="T74" style:family="text" style:name="2280">
      <style:paragraph-properties/>
    </style:style>
    <style:style style:parent-style-name="1003" style:display-name="T75" style:family="text" style:name="2281">
      <style:paragraph-properties/>
    </style:style>
    <style:style style:parent-style-name="1003" style:display-name="T76" style:family="text" style:name="2282">
      <style:paragraph-properties/>
    </style:style>
    <style:style style:parent-style-name="1003" style:display-name="T77" style:family="text" style:name="2283">
      <style:paragraph-properties/>
    </style:style>
    <style:style style:parent-style-name="1003" style:display-name="T78" style:family="text" style:name="2284">
      <style:paragraph-properties/>
    </style:style>
    <style:style style:parent-style-name="1003" style:display-name="T79" style:family="text" style:name="2285">
      <style:paragraph-properties/>
    </style:style>
    <style:style style:parent-style-name="1003" style:display-name="T80" style:family="text" style:name="2286">
      <style:paragraph-properties/>
    </style:style>
    <style:style style:parent-style-name="1003" style:display-name="T81" style:family="text" style:name="2287">
      <style:paragraph-properties/>
    </style:style>
    <style:style style:parent-style-name="1003" style:display-name="T82" style:family="text" style:name="2288">
      <style:paragraph-properties/>
    </style:style>
    <style:style style:parent-style-name="1003" style:display-name="T83" style:family="text" style:name="2289">
      <style:paragraph-properties/>
    </style:style>
    <style:style style:parent-style-name="1003" style:display-name="T84" style:family="text" style:name="2290">
      <style:paragraph-properties/>
    </style:style>
    <style:style style:parent-style-name="1003" style:display-name="T85" style:family="text" style:name="2291">
      <style:paragraph-properties/>
    </style:style>
    <style:style style:parent-style-name="1003" style:display-name="T86" style:family="text" style:name="2292">
      <style:paragraph-properties/>
    </style:style>
    <style:style style:parent-style-name="1003" style:display-name="T87" style:family="text" style:name="2293">
      <style:paragraph-properties/>
    </style:style>
    <style:style style:parent-style-name="1003" style:display-name="T88" style:family="text" style:name="2294">
      <style:paragraph-properties/>
    </style:style>
    <style:style style:parent-style-name="1003" style:display-name="T89" style:family="text" style:name="2295">
      <style:paragraph-properties/>
    </style:style>
    <style:style style:parent-style-name="1003" style:display-name="T90" style:family="text" style:name="2296">
      <style:paragraph-properties/>
    </style:style>
    <style:style style:parent-style-name="1003" style:display-name="T91" style:family="text" style:name="2297">
      <style:paragraph-properties/>
    </style:style>
    <style:style style:parent-style-name="1003" style:display-name="T92" style:family="text" style:name="2298">
      <style:paragraph-properties/>
    </style:style>
    <style:style style:parent-style-name="1003" style:display-name="T93" style:family="text" style:name="2299">
      <style:paragraph-properties/>
    </style:style>
    <style:style style:parent-style-name="1003" style:display-name="T94" style:family="text" style:name="2300">
      <style:paragraph-properties/>
    </style:style>
    <style:style style:parent-style-name="1003" style:display-name="T95" style:family="text" style:name="2301">
      <style:paragraph-properties/>
    </style:style>
    <style:style style:parent-style-name="1003" style:display-name="T96" style:family="text" style:name="2302">
      <style:paragraph-properties/>
    </style:style>
    <style:style style:parent-style-name="1003" style:display-name="T97" style:family="text" style:name="2303">
      <style:paragraph-properties/>
    </style:style>
    <style:style style:parent-style-name="1003" style:display-name="T98" style:family="text" style:name="2304">
      <style:paragraph-properties/>
    </style:style>
    <style:style style:parent-style-name="1003" style:display-name="T99" style:family="text" style:name="2305">
      <style:paragraph-properties/>
    </style:style>
    <style:style style:parent-style-name="1003" style:display-name="T100" style:family="text" style:name="2306">
      <style:paragraph-properties/>
    </style:style>
    <style:style style:parent-style-name="1003" style:display-name="T101" style:family="text" style:name="2307">
      <style:paragraph-properties/>
    </style:style>
    <style:style style:parent-style-name="1003" style:display-name="T102" style:family="text" style:name="2308">
      <style:paragraph-properties/>
    </style:style>
    <style:style style:parent-style-name="1003" style:display-name="T103" style:family="text" style:name="2309">
      <style:paragraph-properties/>
    </style:style>
    <style:style style:parent-style-name="1003" style:display-name="T104" style:family="text" style:name="2310">
      <style:paragraph-properties/>
    </style:style>
    <style:style style:parent-style-name="1003" style:display-name="T105" style:family="text" style:name="2311">
      <style:paragraph-properties/>
    </style:style>
    <style:style style:parent-style-name="1003" style:display-name="T106" style:family="text" style:name="2312">
      <style:paragraph-properties/>
    </style:style>
    <style:style style:parent-style-name="1003" style:display-name="T107" style:family="text" style:name="2313">
      <style:paragraph-properties/>
    </style:style>
    <style:style style:parent-style-name="1003" style:display-name="T108" style:family="text" style:name="2314">
      <style:paragraph-properties/>
    </style:style>
    <style:style style:parent-style-name="1003" style:display-name="T109" style:family="text" style:name="2315">
      <style:paragraph-properties/>
    </style:style>
    <style:style style:parent-style-name="1003" style:display-name="T110" style:family="text" style:name="2316">
      <style:paragraph-properties/>
    </style:style>
    <style:style style:parent-style-name="1003" style:display-name="T111" style:family="text" style:name="2317">
      <style:paragraph-properties/>
    </style:style>
    <style:style style:parent-style-name="1003" style:display-name="T112" style:family="text" style:name="2318">
      <style:paragraph-properties/>
    </style:style>
    <style:style style:parent-style-name="1003" style:display-name="T113" style:family="text" style:name="2319">
      <style:paragraph-properties/>
    </style:style>
    <style:style style:parent-style-name="1003" style:display-name="T114" style:family="text" style:name="2320">
      <style:paragraph-properties/>
    </style:style>
    <style:style style:parent-style-name="1003" style:display-name="T115" style:family="text" style:name="2321">
      <style:paragraph-properties/>
    </style:style>
    <style:style style:parent-style-name="1003" style:display-name="T116" style:family="text" style:name="2322">
      <style:paragraph-properties/>
    </style:style>
    <style:style style:parent-style-name="1003" style:display-name="T117" style:family="text" style:name="2323">
      <style:paragraph-properties/>
    </style:style>
    <style:style style:parent-style-name="1003" style:display-name="T118" style:family="text" style:name="2324">
      <style:paragraph-properties/>
    </style:style>
    <style:style style:parent-style-name="1003" style:display-name="T119" style:family="text" style:name="2325">
      <style:paragraph-properties/>
    </style:style>
    <style:style style:parent-style-name="1003" style:display-name="T120" style:family="text" style:name="2326">
      <style:paragraph-properties/>
    </style:style>
    <style:style style:parent-style-name="1003" style:display-name="T121" style:family="text" style:name="2327">
      <style:paragraph-properties/>
    </style:style>
    <style:style style:parent-style-name="1003" style:display-name="T122" style:family="text" style:name="2328">
      <style:paragraph-properties/>
    </style:style>
    <style:style style:parent-style-name="1003" style:display-name="T123" style:family="text" style:name="2329">
      <style:paragraph-properties/>
    </style:style>
    <style:style style:parent-style-name="1003" style:display-name="T124" style:family="text" style:name="2330">
      <style:paragraph-properties/>
    </style:style>
    <style:style style:parent-style-name="1003" style:display-name="T125" style:family="text" style:name="2331">
      <style:paragraph-properties/>
    </style:style>
    <style:style style:parent-style-name="1003" style:display-name="T126" style:family="text" style:name="2332">
      <style:paragraph-properties/>
    </style:style>
    <style:style style:parent-style-name="1003" style:display-name="T127" style:family="text" style:name="2333">
      <style:paragraph-properties/>
    </style:style>
    <style:style style:parent-style-name="1003" style:display-name="T128" style:family="text" style:name="2334">
      <style:paragraph-properties/>
    </style:style>
    <style:style style:parent-style-name="1003" style:display-name="T129" style:family="text" style:name="2335">
      <style:paragraph-properties/>
    </style:style>
    <style:style style:parent-style-name="1003" style:display-name="T130" style:family="text" style:name="2336">
      <style:paragraph-properties/>
    </style:style>
    <style:style style:parent-style-name="1003" style:display-name="T131" style:family="text" style:name="2337">
      <style:paragraph-properties/>
    </style:style>
    <style:style style:parent-style-name="1003" style:display-name="T132" style:family="text" style:name="2338">
      <style:paragraph-properties/>
    </style:style>
    <style:style style:parent-style-name="1003" style:display-name="T133" style:family="text" style:name="2339">
      <style:paragraph-properties/>
    </style:style>
    <style:style style:parent-style-name="1003" style:display-name="T134" style:family="text" style:name="2340">
      <style:paragraph-properties/>
    </style:style>
    <style:style style:parent-style-name="1003" style:display-name="T135" style:family="text" style:name="2341">
      <style:paragraph-properties/>
    </style:style>
    <style:style style:parent-style-name="1003" style:display-name="T136" style:family="text" style:name="2342">
      <style:paragraph-properties/>
    </style:style>
    <style:style style:parent-style-name="1003" style:display-name="T137" style:family="text" style:name="2343">
      <style:paragraph-properties/>
    </style:style>
    <style:style style:parent-style-name="1003" style:display-name="T138" style:family="text" style:name="2344">
      <style:paragraph-properties/>
    </style:style>
    <style:style style:parent-style-name="1003" style:display-name="T139" style:family="text" style:name="2345">
      <style:paragraph-properties/>
    </style:style>
    <style:style style:parent-style-name="1003" style:display-name="T140" style:family="text" style:name="2346">
      <style:paragraph-properties/>
    </style:style>
    <style:style style:parent-style-name="1003" style:display-name="T141" style:family="text" style:name="2347">
      <style:paragraph-properties/>
    </style:style>
    <style:style style:parent-style-name="1003" style:display-name="T142" style:family="text" style:name="2348">
      <style:paragraph-properties/>
    </style:style>
    <style:style style:parent-style-name="1003" style:display-name="T143" style:family="text" style:name="2349">
      <style:paragraph-properties/>
    </style:style>
    <style:style style:parent-style-name="1003" style:display-name="T144" style:family="text" style:name="2350">
      <style:paragraph-properties/>
    </style:style>
    <style:style style:parent-style-name="1003" style:display-name="T145" style:family="text" style:name="2351">
      <style:paragraph-properties/>
    </style:style>
    <style:style style:parent-style-name="1003" style:display-name="T146" style:family="text" style:name="2352">
      <style:paragraph-properties/>
      <style:text-properties fo:font-family="Courier New" style:font-family-complex="Courier New"/>
    </style:style>
    <style:style style:parent-style-name="1003" style:display-name="T147" style:family="text" style:name="2353">
      <style:paragraph-properties/>
      <style:text-properties fo:font-family="Wingdings" style:font-family-complex="Wingdings"/>
    </style:style>
    <style:style style:parent-style-name="1003" style:display-name="T148" style:family="text" style:name="2354">
      <style:paragraph-properties/>
      <style:text-properties fo:font-family="Symbol" style:font-family-complex="Symbol"/>
    </style:style>
    <style:style style:parent-style-name="1003" style:display-name="T149" style:family="text" style:name="2355">
      <style:paragraph-properties/>
      <style:text-properties fo:font-family="Courier New" style:font-family-complex="Courier New"/>
    </style:style>
    <style:style style:parent-style-name="1003" style:display-name="T150" style:family="text" style:name="2356">
      <style:paragraph-properties/>
      <style:text-properties fo:font-family="Wingdings" style:font-family-complex="Wingdings"/>
    </style:style>
    <style:style style:parent-style-name="1003" style:display-name="T151" style:family="text" style:name="2357">
      <style:paragraph-properties/>
      <style:text-properties fo:font-family="Symbol" style:font-family-complex="Symbol"/>
    </style:style>
    <style:style style:parent-style-name="1003" style:display-name="T152" style:family="text" style:name="2358">
      <style:paragraph-properties/>
      <style:text-properties fo:font-family="Courier New" style:font-family-complex="Courier New"/>
    </style:style>
    <style:style style:parent-style-name="1003" style:display-name="T153" style:family="text" style:name="2359">
      <style:paragraph-properties/>
      <style:text-properties fo:font-family="Wingdings" style:font-family-complex="Wingdings"/>
    </style:style>
    <style:style style:parent-style-name="1003" style:display-name="T154" style:family="text" style:name="2360">
      <style:paragraph-properties/>
      <style:text-properties fo:font-family="Symbol" style:font-family-complex="Symbol"/>
    </style:style>
    <style:style style:parent-style-name="1003" style:display-name="T155" style:family="text" style:name="2361">
      <style:paragraph-properties/>
      <style:text-properties fo:font-family="Courier New" style:font-family-complex="Courier New"/>
    </style:style>
    <style:style style:parent-style-name="1003" style:display-name="T156" style:family="text" style:name="2362">
      <style:paragraph-properties/>
      <style:text-properties fo:font-family="Wingdings" style:font-family-complex="Wingdings"/>
    </style:style>
    <style:style style:parent-style-name="1003" style:display-name="T157" style:family="text" style:name="2363">
      <style:paragraph-properties/>
      <style:text-properties fo:font-family="Symbol" style:font-family-complex="Symbol"/>
    </style:style>
    <style:style style:parent-style-name="1003" style:display-name="T158" style:family="text" style:name="2364">
      <style:paragraph-properties/>
      <style:text-properties fo:font-family="Courier New" style:font-family-complex="Courier New"/>
    </style:style>
    <style:style style:parent-style-name="1003" style:display-name="T159" style:family="text" style:name="2365">
      <style:paragraph-properties/>
      <style:text-properties fo:font-family="Wingdings" style:font-family-complex="Wingdings"/>
    </style:style>
    <style:style style:parent-style-name="1003" style:display-name="T160" style:family="text" style:name="2366">
      <style:paragraph-properties/>
      <style:text-properties fo:font-family="Symbol" style:font-family-complex="Symbol"/>
    </style:style>
    <style:style style:parent-style-name="1003" style:display-name="T161" style:family="text" style:name="2367">
      <style:paragraph-properties/>
      <style:text-properties fo:font-family="Courier New" style:font-family-complex="Courier New"/>
    </style:style>
    <style:style style:parent-style-name="1003" style:display-name="T162" style:family="text" style:name="2368">
      <style:paragraph-properties/>
      <style:text-properties fo:font-family="Wingdings" style:font-family-complex="Wingdings"/>
    </style:style>
    <style:style style:parent-style-name="1003" style:display-name="T163" style:family="text" style:name="2369">
      <style:paragraph-properties/>
      <style:text-properties fo:font-family="Symbol" style:font-family-complex="Symbol" fo:font-weight="bold"/>
    </style:style>
    <style:style style:parent-style-name="1003" style:display-name="T164" style:family="text" style:name="2370">
      <style:paragraph-properties/>
      <style:text-properties fo:font-family="Symbol" style:font-family-complex="Symbol"/>
    </style:style>
    <style:style style:parent-style-name="1003" style:display-name="T165" style:family="text" style:name="2371">
      <style:paragraph-properties/>
      <style:text-properties fo:font-family="Wingdings" style:font-family-complex="Wingdings"/>
    </style:style>
    <style:style style:parent-style-name="1003" style:display-name="T166" style:family="text" style:name="2372">
      <style:paragraph-properties/>
      <style:text-properties fo:font-family="Symbol" style:font-family-complex="Symbol"/>
    </style:style>
    <style:style style:parent-style-name="1003" style:display-name="T167" style:family="text" style:name="2373">
      <style:paragraph-properties/>
      <style:text-properties fo:font-family="Courier New" style:font-family-complex="Courier New"/>
    </style:style>
    <style:style style:parent-style-name="1003" style:display-name="T168" style:family="text" style:name="2374">
      <style:paragraph-properties/>
      <style:text-properties fo:font-family="Wingdings" style:font-family-complex="Wingdings"/>
    </style:style>
    <style:style style:parent-style-name="1003" style:display-name="T169" style:family="text" style:name="2375">
      <style:paragraph-properties/>
      <style:text-properties fo:font-family="Symbol" style:font-family-complex="Symbol"/>
    </style:style>
    <style:style style:parent-style-name="1003" style:display-name="T170" style:family="text" style:name="2376">
      <style:paragraph-properties/>
      <style:text-properties fo:font-family="Courier New" style:font-family-complex="Courier New"/>
    </style:style>
    <style:style style:parent-style-name="1003" style:display-name="T171" style:family="text" style:name="2377">
      <style:paragraph-properties/>
      <style:text-properties fo:font-family="Wingdings" style:font-family-complex="Wingdings"/>
    </style:style>
    <style:style style:parent-style-name="1003" style:display-name="T172" style:family="text" style:name="2378">
      <style:paragraph-properties/>
      <style:text-properties fo:font-family="Symbol" style:font-family-complex="Symbol"/>
    </style:style>
    <style:style style:parent-style-name="1003" style:display-name="T173" style:family="text" style:name="2379">
      <style:paragraph-properties/>
      <style:text-properties fo:font-family="Courier New" style:font-family-complex="Courier New"/>
    </style:style>
    <style:style style:parent-style-name="1003" style:display-name="T174" style:family="text" style:name="2380">
      <style:paragraph-properties/>
      <style:text-properties fo:font-family="Wingdings" style:font-family-complex="Wingdings"/>
    </style:style>
    <style:style style:parent-style-name="1003" style:display-name="T175" style:family="text" style:name="2381">
      <style:paragraph-properties/>
      <style:text-properties fo:font-family="Symbol" style:font-family-complex="Symbol"/>
    </style:style>
    <style:style style:parent-style-name="1003" style:display-name="T176" style:family="text" style:name="2382">
      <style:paragraph-properties/>
      <style:text-properties fo:font-family="Courier New" style:font-family-complex="Courier New"/>
    </style:style>
    <style:style style:parent-style-name="1003" style:display-name="T177" style:family="text" style:name="2383">
      <style:paragraph-properties/>
      <style:text-properties fo:font-family="Wingdings" style:font-family-complex="Wingdings"/>
    </style:style>
    <style:style style:parent-style-name="1003" style:display-name="T178" style:family="text" style:name="2384">
      <style:paragraph-properties/>
      <style:text-properties fo:font-family="Symbol" style:font-family-complex="Symbol"/>
    </style:style>
    <style:style style:parent-style-name="1003" style:display-name="T179" style:family="text" style:name="2385">
      <style:paragraph-properties/>
      <style:text-properties fo:font-family="Courier New" style:font-family-complex="Courier New"/>
    </style:style>
    <style:style style:parent-style-name="1003" style:display-name="T180" style:family="text" style:name="2386">
      <style:paragraph-properties/>
      <style:text-properties fo:font-family="Wingdings" style:font-family-complex="Wingdings"/>
    </style:style>
    <style:style style:parent-style-name="1003" style:display-name="T181" style:family="text" style:name="2387">
      <style:paragraph-properties/>
      <style:text-properties fo:font-family="Symbol" style:font-family-complex="Symbol"/>
    </style:style>
    <style:style style:parent-style-name="1003" style:display-name="T182" style:family="text" style:name="2388">
      <style:paragraph-properties/>
    </style:style>
    <style:style style:parent-style-name="1003" style:display-name="T183" style:family="text" style:name="2389">
      <style:paragraph-properties/>
      <style:text-properties fo:font-family="Wingdings" style:font-family-complex="Wingdings"/>
    </style:style>
    <style:style style:parent-style-name="1003" style:display-name="T184" style:family="text" style:name="2390">
      <style:paragraph-properties/>
      <style:text-properties fo:font-family="Symbol" style:font-family-complex="Symbol"/>
    </style:style>
    <style:style style:parent-style-name="1003" style:display-name="T185" style:family="text" style:name="2391">
      <style:paragraph-properties/>
      <style:text-properties fo:font-family="Courier New" style:font-family-complex="Courier New"/>
    </style:style>
    <style:style style:parent-style-name="1003" style:display-name="T186" style:family="text" style:name="2392">
      <style:paragraph-properties/>
      <style:text-properties fo:font-family="Wingdings" style:font-family-complex="Wingdings"/>
    </style:style>
    <style:style style:parent-style-name="1003" style:display-name="T187" style:family="text" style:name="2393">
      <style:paragraph-properties/>
      <style:text-properties fo:font-family="Symbol" style:font-family-complex="Symbol"/>
    </style:style>
    <style:style style:parent-style-name="1003" style:display-name="T188" style:family="text" style:name="2394">
      <style:paragraph-properties/>
      <style:text-properties fo:font-family="Courier New" style:font-family-complex="Courier New"/>
    </style:style>
    <style:style style:parent-style-name="1003" style:display-name="T189" style:family="text" style:name="2395">
      <style:paragraph-properties/>
      <style:text-properties fo:font-family="Wingdings" style:font-family-complex="Wingdings"/>
    </style:style>
    <style:style style:parent-style-name="1003" style:display-name="T190" style:family="text" style:name="2396">
      <style:paragraph-properties/>
      <style:text-properties fo:font-family="Symbol" style:font-family-complex="Symbol"/>
    </style:style>
    <style:style style:parent-style-name="1003" style:display-name="T191" style:family="text" style:name="2397">
      <style:paragraph-properties/>
    </style:style>
    <style:style style:parent-style-name="1003" style:display-name="T192" style:family="text" style:name="2398">
      <style:paragraph-properties/>
      <style:text-properties fo:font-family="Wingdings" style:font-family-complex="Wingdings"/>
    </style:style>
    <style:style style:parent-style-name="1003" style:display-name="T193" style:family="text" style:name="2399">
      <style:paragraph-properties/>
      <style:text-properties fo:font-family="Symbol" style:font-family-complex="Symbol"/>
    </style:style>
    <style:style style:parent-style-name="1003" style:display-name="T194" style:family="text" style:name="2400">
      <style:paragraph-properties/>
      <style:text-properties fo:font-family="Courier New" style:font-family-complex="Courier New"/>
    </style:style>
    <style:style style:parent-style-name="1003" style:display-name="T195" style:family="text" style:name="2401">
      <style:paragraph-properties/>
      <style:text-properties fo:font-family="Wingdings" style:font-family-complex="Wingdings"/>
    </style:style>
    <style:style style:parent-style-name="1003" style:display-name="T196" style:family="text" style:name="2402">
      <style:paragraph-properties/>
      <style:text-properties fo:font-family="Symbol" style:font-family-complex="Symbol"/>
    </style:style>
    <style:style style:parent-style-name="1003" style:display-name="T197" style:family="text" style:name="2403">
      <style:paragraph-properties/>
      <style:text-properties fo:font-family="Courier New" style:font-family-complex="Courier New"/>
    </style:style>
    <style:style style:parent-style-name="1003" style:display-name="T198" style:family="text" style:name="2404">
      <style:paragraph-properties/>
      <style:text-properties fo:font-family="Wingdings" style:font-family-complex="Wingdings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 fo:font-family="Courier New" style:font-family-complex="Courier New"/>
    </style:style>
    <style:style style:family="text" style:name="T147">
      <style:text-properties fo:font-family="Wingdings" style:font-family-complex="Wingdings"/>
    </style:style>
    <style:style style:family="text" style:name="T148">
      <style:text-properties fo:font-family="Symbol" style:font-family-complex="Symbol"/>
    </style:style>
    <style:style style:family="text" style:name="T149">
      <style:text-properties fo:font-family="Courier New" style:font-family-complex="Courier New"/>
    </style:style>
    <style:style style:family="text" style:name="T150">
      <style:text-properties fo:font-family="Wingdings" style:font-family-complex="Wingdings"/>
    </style:style>
    <style:style style:family="text" style:name="T151">
      <style:text-properties fo:font-family="Symbol" style:font-family-complex="Symbol"/>
    </style:style>
    <style:style style:family="text" style:name="T152">
      <style:text-properties fo:font-family="Courier New" style:font-family-complex="Courier New"/>
    </style:style>
    <style:style style:family="text" style:name="T153">
      <style:text-properties fo:font-family="Wingdings" style:font-family-complex="Wingdings"/>
    </style:style>
    <style:style style:family="text" style:name="T154">
      <style:text-properties fo:font-family="Symbol" style:font-family-complex="Symbol"/>
    </style:style>
    <style:style style:family="text" style:name="T155">
      <style:text-properties fo:font-family="Courier New" style:font-family-complex="Courier New"/>
    </style:style>
    <style:style style:family="text" style:name="T156">
      <style:text-properties fo:font-family="Wingdings" style:font-family-complex="Wingdings"/>
    </style:style>
    <style:style style:family="text" style:name="T157">
      <style:text-properties fo:font-family="Symbol" style:font-family-complex="Symbol"/>
    </style:style>
    <style:style style:family="text" style:name="T158">
      <style:text-properties fo:font-family="Courier New" style:font-family-complex="Courier New"/>
    </style:style>
    <style:style style:family="text" style:name="T159">
      <style:text-properties fo:font-family="Wingdings" style:font-family-complex="Wingdings"/>
    </style:style>
    <style:style style:family="text" style:name="T160">
      <style:text-properties fo:font-family="Symbol" style:font-family-complex="Symbol"/>
    </style:style>
    <style:style style:family="text" style:name="T161">
      <style:text-properties fo:font-family="Courier New" style:font-family-complex="Courier New"/>
    </style:style>
    <style:style style:family="text" style:name="T162">
      <style:text-properties fo:font-family="Wingdings" style:font-family-complex="Wingdings"/>
    </style:style>
    <style:style style:family="text" style:name="T163">
      <style:text-properties fo:font-family="Symbol" style:font-family-complex="Symbol" fo:font-weight="bold"/>
    </style:style>
    <style:style style:family="text" style:name="T164">
      <style:text-properties fo:font-family="Symbol" style:font-family-complex="Symbol"/>
    </style:style>
    <style:style style:family="text" style:name="T165">
      <style:text-properties fo:font-family="Wingdings" style:font-family-complex="Wingdings"/>
    </style:style>
    <style:style style:family="text" style:name="T166">
      <style:text-properties fo:font-family="Symbol" style:font-family-complex="Symbol"/>
    </style:style>
    <style:style style:family="text" style:name="T167">
      <style:text-properties fo:font-family="Courier New" style:font-family-complex="Courier New"/>
    </style:style>
    <style:style style:family="text" style:name="T168">
      <style:text-properties fo:font-family="Wingdings" style:font-family-complex="Wingdings"/>
    </style:style>
    <style:style style:family="text" style:name="T169">
      <style:text-properties fo:font-family="Symbol" style:font-family-complex="Symbol"/>
    </style:style>
    <style:style style:family="text" style:name="T170">
      <style:text-properties fo:font-family="Courier New" style:font-family-complex="Courier New"/>
    </style:style>
    <style:style style:family="text" style:name="T171">
      <style:text-properties fo:font-family="Wingdings" style:font-family-complex="Wingdings"/>
    </style:style>
    <style:style style:family="text" style:name="T172">
      <style:text-properties fo:font-family="Symbol" style:font-family-complex="Symbol"/>
    </style:style>
    <style:style style:family="text" style:name="T173">
      <style:text-properties fo:font-family="Courier New" style:font-family-complex="Courier New"/>
    </style:style>
    <style:style style:family="text" style:name="T174">
      <style:text-properties fo:font-family="Wingdings" style:font-family-complex="Wingdings"/>
    </style:style>
    <style:style style:family="text" style:name="T175">
      <style:text-properties fo:font-family="Symbol" style:font-family-complex="Symbol"/>
    </style:style>
    <style:style style:family="text" style:name="T176">
      <style:text-properties fo:font-family="Courier New" style:font-family-complex="Courier New"/>
    </style:style>
    <style:style style:family="text" style:name="T177">
      <style:text-properties fo:font-family="Wingdings" style:font-family-complex="Wingdings"/>
    </style:style>
    <style:style style:family="text" style:name="T178">
      <style:text-properties fo:font-family="Symbol" style:font-family-complex="Symbol"/>
    </style:style>
    <style:style style:family="text" style:name="T179">
      <style:text-properties fo:font-family="Courier New" style:font-family-complex="Courier New"/>
    </style:style>
    <style:style style:family="text" style:name="T180">
      <style:text-properties fo:font-family="Wingdings" style:font-family-complex="Wingdings"/>
    </style:style>
    <style:style style:family="text" style:name="T181">
      <style:text-properties fo:font-family="Symbol" style:font-family-complex="Symbol"/>
    </style:style>
    <style:style style:family="text" style:name="T182">
      <style:text-properties/>
    </style:style>
    <style:style style:family="text" style:name="T183">
      <style:text-properties fo:font-family="Wingdings" style:font-family-complex="Wingdings"/>
    </style:style>
    <style:style style:family="text" style:name="T184">
      <style:text-properties fo:font-family="Symbol" style:font-family-complex="Symbol"/>
    </style:style>
    <style:style style:family="text" style:name="T185">
      <style:text-properties fo:font-family="Courier New" style:font-family-complex="Courier New"/>
    </style:style>
    <style:style style:family="text" style:name="T186">
      <style:text-properties fo:font-family="Wingdings" style:font-family-complex="Wingdings"/>
    </style:style>
    <style:style style:family="text" style:name="T187">
      <style:text-properties fo:font-family="Symbol" style:font-family-complex="Symbol"/>
    </style:style>
    <style:style style:family="text" style:name="T188">
      <style:text-properties fo:font-family="Courier New" style:font-family-complex="Courier New"/>
    </style:style>
    <style:style style:family="text" style:name="T189">
      <style:text-properties fo:font-family="Wingdings" style:font-family-complex="Wingdings"/>
    </style:style>
    <style:style style:family="text" style:name="T190">
      <style:text-properties fo:font-family="Symbol" style:font-family-complex="Symbol"/>
    </style:style>
    <style:style style:family="text" style:name="T191">
      <style:text-properties/>
    </style:style>
    <style:style style:family="text" style:name="T192">
      <style:text-properties fo:font-family="Wingdings" style:font-family-complex="Wingdings"/>
    </style:style>
    <style:style style:family="text" style:name="T193">
      <style:text-properties fo:font-family="Symbol" style:font-family-complex="Symbol"/>
    </style:style>
    <style:style style:family="text" style:name="T194">
      <style:text-properties fo:font-family="Courier New" style:font-family-complex="Courier New"/>
    </style:style>
    <style:style style:family="text" style:name="T195">
      <style:text-properties fo:font-family="Wingdings" style:font-family-complex="Wingdings"/>
    </style:style>
    <style:style style:family="text" style:name="T196">
      <style:text-properties fo:font-family="Symbol" style:font-family-complex="Symbol"/>
    </style:style>
    <style:style style:family="text" style:name="T197">
      <style:text-properties fo:font-family="Courier New" style:font-family-complex="Courier New"/>
    </style:style>
    <style:style style:family="text" style:name="T198">
      <style:text-properties fo:font-family="Wingdings" style:font-family-complex="Wingdings"/>
    </style:style>
    <text:list-style style:name="WWNum1">
      <text:list-level-style-bullet text:level="1" text:style-name="T1" text:bullet-char="•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38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9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1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2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4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5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6">
      <text:list-level-style-number text:level="1" text:style-name="T4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47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8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0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51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53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54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56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57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5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9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0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61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6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63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8">
      <text:list-level-style-number text:level="1" text:style-name="T6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65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66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6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68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9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71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72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74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75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7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77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78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79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0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81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84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85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86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87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88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9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0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9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9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9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9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9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9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2">
      <text:list-level-style-number text:level="1" text:style-name="T10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0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0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0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0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0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0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0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0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3">
      <text:list-level-style-number text:level="1" text:style-name="T10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1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1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1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1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1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1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1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4">
      <text:list-level-style-number text:level="1" text:style-name="T11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2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2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2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2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2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2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5">
      <text:list-level-style-number text:level="1" text:style-name="T12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28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29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30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31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32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33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34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35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6">
      <text:list-level-style-number text:level="1" text:style-name="T13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37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38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0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41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4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43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44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7">
      <text:list-level-style-number text:level="1" text:style-name="T14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 fo:font-weight="bold"/>
      </text:list-level-style-bullet>
      <text:list-level-style-bullet text:level="2" text:style-name="T164" text:bullet-char="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ymbol" style:font-family-complex="Symbol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number text:level="2" text:style-name="T182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number text:level="2" text:style-name="T191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3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4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5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6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7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8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style style:parent-style-name="1083" style:family="paragraph" style:name="P55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565">
      <style:text-properties fo:font-size="8pt" style:font-size-complex="8pt" fo:language="it" fo:country="IT" fo:font-weight="bold"/>
    </style:style>
    <style:style style:parent-style-name="Graphics" style:family="graphic" style:name="gr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66">
      <style:text-properties fo:font-size="8pt" style:font-size-complex="8pt" fo:language="it" fo:country="IT" fo:font-weight="bold"/>
    </style:style>
    <style:style style:family="text" style:name="T156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568">
      <style:text-properties fo:font-size="8pt" style:font-size-complex="8pt" fo:language="it" fo:country="IT" fo:font-weight="bold"/>
    </style:style>
    <style:style style:family="text" style:name="T1569">
      <style:text-properties fo:font-size="8pt" style:font-size-complex="8pt" fo:language="it" fo:country="IT" fo:font-weight="normal"/>
    </style:style>
    <style:style style:family="text" style:name="T1570">
      <style:text-properties fo:font-size="8pt" style:font-size-complex="8pt" fo:language="it" fo:country="IT" fo:font-weight="normal"/>
    </style:style>
    <style:style style:family="text" style:name="T1571">
      <style:text-properties fo:font-size="8pt" style:font-size-complex="8pt" fo:language="it" fo:country="IT" fo:font-weight="bold"/>
    </style:style>
    <style:style style:parent-style-name="1083" style:family="paragraph" style:name="P92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744">
      <style:text-properties fo:font-size="8pt" style:font-size-complex="8pt" fo:language="it" fo:country="IT" fo:font-weight="bold"/>
    </style:style>
    <style:style style:parent-style-name="Graphics" style:family="graphic" style:name="gr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45">
      <style:text-properties fo:font-size="8pt" style:font-size-complex="8pt" fo:language="it" fo:country="IT" fo:font-weight="bold"/>
    </style:style>
    <style:style style:family="text" style:name="T1746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747">
      <style:text-properties fo:font-size="8pt" style:font-size-complex="8pt" fo:language="it" fo:country="IT" fo:font-weight="bold"/>
    </style:style>
    <style:style style:family="text" style:name="T1748">
      <style:text-properties fo:font-size="8pt" style:font-size-complex="8pt" fo:language="it" fo:country="IT" fo:font-weight="normal"/>
    </style:style>
    <style:style style:family="text" style:name="T1749">
      <style:text-properties fo:font-size="8pt" style:font-size-complex="8pt" fo:language="it" fo:country="IT" fo:font-weight="normal"/>
    </style:style>
    <style:style style:family="text" style:name="T1750">
      <style:text-properties fo:font-size="8pt" style:font-size-complex="8pt" fo:language="it" fo:country="IT" fo:font-weight="bold"/>
    </style:style>
    <style:style style:parent-style-name="1083" style:family="paragraph" style:name="P96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762">
      <style:text-properties fo:font-size="8pt" style:font-size-complex="8pt" fo:language="it" fo:country="IT" fo:font-weight="bold"/>
    </style:style>
    <style:style style:parent-style-name="Graphics" style:family="graphic" style:name="gr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63">
      <style:text-properties fo:font-size="8pt" style:font-size-complex="8pt" fo:language="it" fo:country="IT" fo:font-weight="bold"/>
    </style:style>
    <style:style style:family="text" style:name="T1764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765">
      <style:text-properties fo:font-size="8pt" style:font-size-complex="8pt" fo:language="it" fo:country="IT" fo:font-weight="bold"/>
    </style:style>
    <style:style style:family="text" style:name="T1766">
      <style:text-properties fo:font-size="8pt" style:font-size-complex="8pt" fo:language="it" fo:country="IT" fo:font-weight="normal"/>
    </style:style>
    <style:style style:family="text" style:name="T1767">
      <style:text-properties fo:font-size="8pt" style:font-size-complex="8pt" fo:language="it" fo:country="IT" fo:font-weight="normal"/>
    </style:style>
    <style:style style:family="text" style:name="T1768">
      <style:text-properties fo:font-size="8pt" style:font-size-complex="8pt" fo:language="it" fo:country="IT" fo:font-weight="bold"/>
    </style:style>
    <style:style style:parent-style-name="1083" style:family="paragraph" style:name="P215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143">
      <style:text-properties fo:font-size="8pt" style:font-size-complex="8pt" fo:language="it" fo:country="IT" fo:font-weight="bold"/>
    </style:style>
    <style:style style:parent-style-name="Graphics" style:family="graphic" style:name="gr12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44">
      <style:text-properties fo:font-size="8pt" style:font-size-complex="8pt" fo:language="it" fo:country="IT" fo:font-weight="bold"/>
    </style:style>
    <style:style style:family="text" style:name="T2145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146">
      <style:text-properties fo:font-size="8pt" style:font-size-complex="8pt" fo:language="it" fo:country="IT" fo:font-weight="bold"/>
    </style:style>
    <style:style style:family="text" style:name="T2147">
      <style:text-properties fo:font-size="8pt" style:font-size-complex="8pt" fo:language="it" fo:country="IT" fo:font-weight="normal"/>
    </style:style>
    <style:style style:family="text" style:name="T2148">
      <style:text-properties fo:font-size="8pt" style:font-size-complex="8pt" fo:language="it" fo:country="IT" fo:font-weight="normal"/>
    </style:style>
    <style:style style:family="text" style:name="T2149">
      <style:text-properties fo:font-size="8pt" style:font-size-complex="8pt" fo:language="it" fo:country="IT" fo:font-weight="bold"/>
    </style:style>
    <style:style style:parent-style-name="1083" style:family="paragraph" style:name="P244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260">
      <style:text-properties fo:font-size="8pt" style:font-size-complex="8pt" fo:language="it" fo:country="IT" fo:font-weight="bold"/>
    </style:style>
    <style:style style:parent-style-name="Graphics" style:family="graphic" style:name="gr1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61">
      <style:text-properties fo:font-size="8pt" style:font-size-complex="8pt" fo:language="it" fo:country="IT" fo:font-weight="bold"/>
    </style:style>
    <style:style style:family="text" style:name="T2262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263">
      <style:text-properties fo:font-size="8pt" style:font-size-complex="8pt" fo:language="it" fo:country="IT" fo:font-weight="bold"/>
    </style:style>
    <style:style style:family="text" style:name="T2264">
      <style:text-properties fo:font-size="8pt" style:font-size-complex="8pt" fo:language="it" fo:country="IT" fo:font-weight="normal"/>
    </style:style>
    <style:style style:family="text" style:name="T2265">
      <style:text-properties fo:font-size="8pt" style:font-size-complex="8pt" fo:language="it" fo:country="IT" fo:font-weight="normal"/>
    </style:style>
    <style:style style:family="text" style:name="T2266">
      <style:text-properties fo:font-size="8pt" style:font-size-complex="8pt" fo:language="it" fo:country="IT" fo:font-weight="bold"/>
    </style:style>
    <style:style style:parent-style-name="1083" style:family="paragraph" style:name="P296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457">
      <style:text-properties fo:font-size="8pt" style:font-size-complex="8pt" fo:language="it" fo:country="IT" fo:font-weight="bold"/>
    </style:style>
    <style:style style:parent-style-name="Graphics" style:family="graphic" style:name="gr2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458">
      <style:text-properties fo:font-size="8pt" style:font-size-complex="8pt" fo:language="it" fo:country="IT" fo:font-weight="bold"/>
    </style:style>
    <style:style style:family="text" style:name="T2459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460">
      <style:text-properties fo:font-size="8pt" style:font-size-complex="8pt" fo:language="it" fo:country="IT" fo:font-weight="bold"/>
    </style:style>
    <style:style style:family="text" style:name="T2461">
      <style:text-properties fo:font-size="8pt" style:font-size-complex="8pt" fo:language="it" fo:country="IT" fo:font-weight="normal"/>
    </style:style>
    <style:style style:family="text" style:name="T2462">
      <style:text-properties fo:font-size="8pt" style:font-size-complex="8pt" fo:language="it" fo:country="IT" fo:font-weight="normal"/>
    </style:style>
    <style:style style:family="text" style:name="T2463">
      <style:text-properties fo:font-size="8pt" style:font-size-complex="8pt" fo:language="it" fo:country="IT" fo:font-weight="bold"/>
    </style:style>
    <style:style style:parent-style-name="1083" style:family="paragraph" style:name="P323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575">
      <style:text-properties fo:font-size="8pt" style:font-size-complex="8pt" fo:language="it" fo:country="IT" fo:font-weight="bold"/>
    </style:style>
    <style:style style:parent-style-name="Graphics" style:family="graphic" style:name="gr2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576">
      <style:text-properties fo:font-size="8pt" style:font-size-complex="8pt" fo:language="it" fo:country="IT" fo:font-weight="bold"/>
    </style:style>
    <style:style style:family="text" style:name="T257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578">
      <style:text-properties fo:font-size="8pt" style:font-size-complex="8pt" fo:language="it" fo:country="IT" fo:font-weight="bold"/>
    </style:style>
    <style:style style:family="text" style:name="T2579">
      <style:text-properties fo:font-size="8pt" style:font-size-complex="8pt" fo:language="it" fo:country="IT" fo:font-weight="normal"/>
    </style:style>
    <style:style style:family="text" style:name="T2580">
      <style:text-properties fo:font-size="8pt" style:font-size-complex="8pt" fo:language="it" fo:country="IT" fo:font-weight="normal"/>
    </style:style>
    <style:style style:family="text" style:name="T2581">
      <style:text-properties fo:font-size="8pt" style:font-size-complex="8pt" fo:language="it" fo:country="IT" fo:font-weight="bold"/>
    </style:style>
  </office:automatic-styles>
  <office:master-styles>
    <style:master-page style:name="Standard" style:page-layout-name="Mpm1"/>
    <style:master-page style:name="MasterPage2" style:page-layout-name="Mpm2">
      <style:footer>
        <text:p text:style-name="P55"><text:span text:style-name="T1565"/><text:span/><draw:frame draw:name="Copia Immagine13 1" draw:style-name="gr3" text:anchor-type="as-char" svg:width="0.619cm" svg:height="0.619cm" svg:x="0cm" svg:y="0cm"><draw:image xlink:href="Pictures/image1.png" xlink:type="simple" xlink:show="embed" xlink:actuate="onLoad"/></draw:frame><text:span text:style-name="T1566"><text:tab/>GIACENZE CRYPTO : </text:span><text:span text:style-name="T1567">Esportazione files CSV</text:span><text:span text:style-name="T1568"><text:s/></text:span><text:span text:style-name="T1569">(Aggiornato alla versione 1.</text:span><text:span text:style-name="T1570">0.53)</text:span><text:span text:style-name="T1571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3" style:page-layout-name="Mpm3">
      <style:footer>
        <text:p text:style-name="P92"><text:span text:style-name="T1744"/><text:span/><draw:frame draw:name="Copia Immagine13 1" draw:style-name="gr5" text:anchor-type="as-char" svg:width="0.619cm" svg:height="0.619cm" svg:x="0cm" svg:y="0cm"><draw:image xlink:href="Pictures/image1.png" xlink:type="simple" xlink:show="embed" xlink:actuate="onLoad"/></draw:frame><text:span text:style-name="T1745"><text:tab/>GIACENZE CRYPTO : </text:span><text:span text:style-name="T1746">Esportazione files CSV</text:span><text:span text:style-name="T1747"><text:s/></text:span><text:span text:style-name="T1748">(Aggiornato alla versione 1.</text:span><text:span text:style-name="T1749">0.53)</text:span><text:span text:style-name="T1750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4" style:page-layout-name="Mpm4">
      <style:footer>
        <text:p text:style-name="P96"><text:span text:style-name="T1762"/><text:span/><draw:frame draw:name="Copia Immagine13 1" draw:style-name="gr6" text:anchor-type="as-char" svg:width="0.619cm" svg:height="0.619cm" svg:x="0cm" svg:y="0cm"><draw:image xlink:href="Pictures/image1.png" xlink:type="simple" xlink:show="embed" xlink:actuate="onLoad"/></draw:frame><text:span text:style-name="T1763"><text:tab/>GIACENZE CRYPTO : </text:span><text:span text:style-name="T1764">Esportazione files CSV</text:span><text:span text:style-name="T1765"><text:s/></text:span><text:span text:style-name="T1766">(Aggiornato alla versione 1.</text:span><text:span text:style-name="T1767">0.53)</text:span><text:span text:style-name="T1768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5" style:page-layout-name="Mpm5">
      <style:footer>
        <text:p text:style-name="P215"><text:span text:style-name="T2143"/><text:span/><draw:frame draw:name="Copia Immagine13 1" draw:style-name="gr12" text:anchor-type="as-char" svg:width="0.619cm" svg:height="0.619cm" svg:x="0cm" svg:y="0cm"><draw:image xlink:href="Pictures/image1.png" xlink:type="simple" xlink:show="embed" xlink:actuate="onLoad"/></draw:frame><text:span text:style-name="T2144"><text:tab/>GIACENZE CRYPTO : </text:span><text:span text:style-name="T2145">Esportazione files CSV</text:span><text:span text:style-name="T2146"><text:s/></text:span><text:span text:style-name="T2147">(Aggiornato alla versione 1.</text:span><text:span text:style-name="T2148">0.53)</text:span><text:span text:style-name="T2149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6" style:page-layout-name="Mpm6">
      <style:footer>
        <text:p text:style-name="P244"><text:span text:style-name="T2260"/><text:span/><draw:frame draw:name="Copia Immagine13 1" draw:style-name="gr17" text:anchor-type="as-char" svg:width="0.619cm" svg:height="0.619cm" svg:x="0cm" svg:y="0cm"><draw:image xlink:href="Pictures/image1.png" xlink:type="simple" xlink:show="embed" xlink:actuate="onLoad"/></draw:frame><text:span text:style-name="T2261"><text:tab/>GIACENZE CRYPTO : </text:span><text:span text:style-name="T2262">Esportazione files CSV</text:span><text:span text:style-name="T2263"><text:s/></text:span><text:span text:style-name="T2264">(Aggiornato alla versione 1.</text:span><text:span text:style-name="T2265">0.53)</text:span><text:span text:style-name="T2266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7" style:page-layout-name="Mpm7">
      <style:footer>
        <text:p text:style-name="P296"><text:span text:style-name="T2457"/><text:span/><draw:frame draw:name="Copia Immagine13 1" draw:style-name="gr23" text:anchor-type="as-char" svg:width="0.619cm" svg:height="0.619cm" svg:x="0cm" svg:y="0cm"><draw:image xlink:href="Pictures/image1.png" xlink:type="simple" xlink:show="embed" xlink:actuate="onLoad"/></draw:frame><text:span text:style-name="T2458"><text:tab/>GIACENZE CRYPTO : </text:span><text:span text:style-name="T2459">Esportazione files CSV</text:span><text:span text:style-name="T2460"><text:s/></text:span><text:span text:style-name="T2461">(Aggiornato alla versione 1.</text:span><text:span text:style-name="T2462">0.53)</text:span><text:span text:style-name="T2463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8" style:page-layout-name="Mpm8">
      <style:footer>
        <text:p text:style-name="P323"><text:span text:style-name="T2575"/><text:span/><draw:frame draw:name="Copia Immagine13 1" draw:style-name="gr28" text:anchor-type="as-char" svg:width="0.619cm" svg:height="0.619cm" svg:x="0cm" svg:y="0cm"><draw:image xlink:href="Pictures/image1.png" xlink:type="simple" xlink:show="embed" xlink:actuate="onLoad"/></draw:frame><text:span text:style-name="T2576"><text:tab/>GIACENZE CRYPTO : </text:span><text:span text:style-name="T2577">Esportazione files CSV</text:span><text:span text:style-name="T2578"><text:s/></text:span><text:span text:style-name="T2579">(Aggiornato alla versione 1.</text:span><text:span text:style-name="T2580">0.53)</text:span><text:span text:style-name="T2581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  <meta:creation-date>2024-07-12T21:04:48Z</meta:creation-date>
  </office:meta>
</office:document-meta>
</file>